
<file path=META-INF/manifest.xml><?xml version="1.0" encoding="utf-8"?>
<manifest:manifest xmlns:manifest="urn:oasis:names:tc:opendocument:xmlns:manifest:1.0">
  <manifest:file-entry manifest:full-path="Pictures/image1.jpg" manifest:media-type=""/>
  <manifest:file-entry manifest:full-path="Pictures/image2.png" manifest:media-type=""/>
  <manifest:file-entry manifest:full-path="Pictures/image3.jpg" manifest:media-type=""/>
  <manifest:file-entry manifest:full-path="Pictures/image4.jpg" manifest:media-type=""/>
  <manifest:file-entry manifest:full-path="Pictures/image5.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6" style:master-page-name="MasterPage2" style:family="paragraph" style:name="P39">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3">
      <style:text-properties fo:font-family="Times New Roman" fo:font-size="10.5pt"/>
    </style:style>
    <style:style style:family="text" style:name="T474">
      <style:text-properties fo:font-family="Times New Roman" fo:font-size="10.5pt"/>
    </style:style>
    <style:style style:parent-style-name="716" style:family="paragraph" style:name="P40">
      <style:paragraph-properties fo:line-height="115%" fo:text-align="center" fo:margin-left="0.224cm" fo:margin-right="0.4216cm" fo:text-indent="0cm" fo:margin-top="4.6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5">
      <style:text-properties style:text-underline-type="single" style:text-underline-style="solid" style:text-underline-width="auto" style:text-underline-color="font-color"/>
    </style:style>
    <style:style style:family="text" style:name="T476">
      <style:text-properties fo:letter-spacing="-0.15pt" style:text-underline-type="single" style:text-underline-style="solid" style:text-underline-width="auto" style:text-underline-color="font-color"/>
    </style:style>
    <style:style style:family="text" style:name="T477">
      <style:text-properties style:text-underline-type="single" style:text-underline-style="solid" style:text-underline-width="auto" style:text-underline-color="font-color"/>
    </style:style>
    <style:style style:family="text" style:name="T478">
      <style:text-properties fo:letter-spacing="-0.15pt" style:text-underline-type="single" style:text-underline-style="solid" style:text-underline-width="auto" style:text-underline-color="font-color"/>
    </style:style>
    <style:style style:family="text" style:name="T479">
      <style:text-properties fo:letter-spacing="-0.15pt"/>
    </style:style>
    <style:style style:family="text" style:name="T480">
      <style:text-properties/>
    </style:style>
    <style:style style:family="text" style:name="T481">
      <style:text-properties fo:letter-spacing="-0.15pt"/>
    </style:style>
    <style:style style:family="text" style:name="T482">
      <style:text-properties fo:letter-spacing="-0.15pt"/>
    </style:style>
    <style:style style:family="text" style:name="T483">
      <style:text-properties style:text-underline-type="single" style:text-underline-style="solid" style:text-underline-width="auto" style:text-underline-color="font-color"/>
    </style:style>
    <style:style style:family="text" style:name="T484">
      <style:text-properties fo:letter-spacing="-0.15pt" style:text-underline-type="single" style:text-underline-style="solid" style:text-underline-width="auto" style:text-underline-color="font-color"/>
    </style:style>
    <style:style style:family="text" style:name="T485">
      <style:text-properties style:text-underline-type="single" style:text-underline-style="solid" style:text-underline-width="auto" style:text-underline-color="font-color"/>
    </style:style>
    <style:style style:family="text" style:name="T486">
      <style:text-properties fo:letter-spacing="-0.15pt" style:text-underline-type="single" style:text-underline-style="solid" style:text-underline-width="auto" style:text-underline-color="font-color"/>
    </style:style>
    <style:style style:family="text" style:name="T487">
      <style:text-properties style:text-underline-type="single" style:text-underline-style="solid" style:text-underline-width="auto" style:text-underline-color="font-color"/>
    </style:style>
    <style:style style:family="text" style:name="T488">
      <style:text-properties fo:letter-spacing="-0.15pt" style:text-underline-type="single" style:text-underline-style="solid" style:text-underline-width="auto" style:text-underline-color="font-color"/>
    </style:style>
    <style:style style:family="text" style:name="T489">
      <style:text-properties style:text-underline-type="single" style:text-underline-style="solid" style:text-underline-width="auto" style:text-underline-color="font-color"/>
    </style:style>
    <style:style style:family="text" style:name="T490">
      <style:text-properties fo:letter-spacing="-0.15pt" style:text-underline-type="single" style:text-underline-style="solid" style:text-underline-width="auto" style:text-underline-color="font-color"/>
    </style:style>
    <style:style style:family="text" style:name="T491">
      <style:text-properties style:text-underline-type="single" style:text-underline-style="solid" style:text-underline-width="auto" style:text-underline-color="font-color"/>
    </style:style>
    <style:style style:family="text" style:name="T492">
      <style:text-properties fo:letter-spacing="-0.15pt" style:text-underline-type="single" style:text-underline-style="solid" style:text-underline-width="auto" style:text-underline-color="font-color"/>
    </style:style>
    <style:style style:family="text" style:name="T493">
      <style:text-properties style:text-underline-type="single" style:text-underline-style="solid" style:text-underline-width="auto" style:text-underline-color="font-color"/>
    </style:style>
    <style:style style:family="text" style:name="T494">
      <style:text-properties fo:letter-spacing="-0.15pt" style:text-underline-type="single" style:text-underline-style="solid" style:text-underline-width="auto" style:text-underline-color="font-color"/>
    </style:style>
    <style:style style:family="text" style:name="T495">
      <style:text-properties style:text-underline-type="single" style:text-underline-style="solid" style:text-underline-width="auto" style:text-underline-color="font-color"/>
    </style:style>
    <style:style style:family="text" style:name="T496">
      <style:text-properties fo:letter-spacing="-0.15pt"/>
    </style:style>
    <style:style style:family="text" style:name="T497">
      <style:text-properties style:text-underline-type="single" style:text-underline-style="solid" style:text-underline-width="auto" style:text-underline-color="font-color"/>
    </style:style>
    <style:style style:parent-style-name="716" style:family="paragraph" style:name="P41">
      <style:paragraph-properties fo:margin-left="0cm" fo:margin-right="0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8">
      <style:text-properties fo:font-size="18pt"/>
    </style:style>
    <style:style style:family="text" style:name="T499">
      <style:text-properties fo:font-size="18pt"/>
    </style:style>
    <style:style style:parent-style-name="716" style:family="paragraph" style:name="P42">
      <style:paragraph-properties fo:text-align="center" fo:margin-left="0.3599cm" fo:margin-right="0.5574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0">
      <style:text-properties fo:letter-spacing="-0.7pt"/>
    </style:style>
    <style:style style:family="text" style:name="T501">
      <style:text-properties fo:letter-spacing="-0.5pt"/>
    </style:style>
    <style:style style:family="text" style:name="T502">
      <style:text-properties fo:letter-spacing="-0.25pt"/>
    </style:style>
    <style:style style:parent-style-name="716" style:family="paragraph" style:name="P4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3">
      <style:text-properties fo:font-size="13pt"/>
    </style:style>
    <style:style style:family="text" style:name="T504">
      <style:text-properties fo:font-size="13pt"/>
    </style:style>
    <style:style style:parent-style-name="711" style:family="paragraph" style:name="P44">
      <style:paragraph-properties fo:text-align="center" fo:margin-left="0.3599cm" fo:margin-right="0.5574cm" fo:text-indent="0cm" fo:margin-top="7.9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505">
      <style:text-properties fo:letter-spacing="-0.1pt"/>
    </style:style>
    <style:style style:parent-style-name="716" style:family="paragraph" style:name="P4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6">
      <style:text-properties fo:font-weight="bold"/>
    </style:style>
    <style:style style:family="text" style:name="T507">
      <style:text-properties fo:font-weight="bold"/>
    </style:style>
    <style:style style:parent-style-name="716" style:family="paragraph" style:name="P46">
      <style:paragraph-properties fo:line-height="115%" fo:text-align="center" fo:margin-left="0.3599cm" fo:margin-right="0.5592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8">
      <style:text-properties fo:letter-spacing="-0.1pt"/>
    </style:style>
    <style:style style:family="text" style:name="T509">
      <style:text-properties fo:letter-spacing="-0.1pt"/>
    </style:style>
    <style:style style:family="text" style:name="T510">
      <style:text-properties fo:letter-spacing="-0.1pt"/>
    </style:style>
    <style:style style:family="text" style:name="T511">
      <style:text-properties fo:letter-spacing="-0.1pt"/>
    </style:style>
    <style:style style:family="text" style:name="T512">
      <style:text-properties fo:letter-spacing="-0.1pt"/>
    </style:style>
    <style:style style:family="text" style:name="T513">
      <style:text-properties fo:letter-spacing="-0.1pt"/>
    </style:style>
    <style:style style:family="text" style:name="T514">
      <style:text-properties fo:letter-spacing="-0.1pt"/>
    </style:style>
    <style:style style:family="text" style:name="T515">
      <style:text-properties fo:letter-spacing="-0.1pt"/>
    </style:style>
    <style:style style:family="text" style:name="T516">
      <style:text-properties fo:letter-spacing="-0.1pt"/>
    </style:style>
    <style:style style:family="text" style:name="T517">
      <style:text-properties fo:letter-spacing="-0.1pt"/>
    </style:style>
    <style:style style:family="text" style:name="T518">
      <style:text-properties fo:letter-spacing="-0.1pt"/>
    </style:style>
    <style:style style:family="text" style:name="T519">
      <style:text-properties fo:letter-spacing="-0.1pt"/>
    </style:style>
    <style:style style:family="text" style:name="T520">
      <style:text-properties fo:letter-spacing="-0.1pt"/>
    </style:style>
    <style:style style:parent-style-name="716" style:family="paragraph" style:name="P4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21">
      <style:text-properties fo:font-size="13pt"/>
    </style:style>
    <style:style style:family="text" style:name="T522">
      <style:text-properties fo:font-size="13pt"/>
    </style:style>
    <style:style style:parent-style-name="716" style:family="paragraph" style:name="P48">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23">
      <style:text-properties fo:font-size="12.5pt"/>
    </style:style>
    <style:style style:family="text" style:name="T524">
      <style:text-properties fo:font-size="12.5pt"/>
    </style:style>
    <style:style style:parent-style-name="716" style:family="paragraph" style:name="P49">
      <style:paragraph-properties fo:text-align="center" fo:margin-left="0.3599cm" fo:margin-right="0.557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25">
      <style:text-properties fo:font-weight="bold"/>
    </style:style>
    <style:style style:family="text" style:name="T526">
      <style:text-properties fo:letter-spacing="-0.25pt" fo:font-weight="bold"/>
    </style:style>
    <style:style style:family="text" style:name="T527">
      <style:text-properties fo:letter-spacing="-0.1pt"/>
    </style:style>
    <style:style style:family="text" style:name="T528">
      <style:text-properties fo:letter-spacing="-0.1pt"/>
    </style:style>
    <style:style style:family="text" style:name="T529">
      <style:text-properties fo:letter-spacing="-0.1pt"/>
    </style:style>
    <style:style style:family="text" style:name="T530">
      <style:text-properties fo:letter-spacing="-0.1pt"/>
    </style:style>
    <style:style style:family="text" style:name="T531">
      <style:text-properties fo:letter-spacing="-0.1pt"/>
    </style:style>
    <style:style style:family="text" style:name="T532">
      <style:text-properties fo:letter-spacing="-0.1pt"/>
    </style:style>
    <style:style style:parent-style-name="716" style:family="paragraph" style:name="P50">
      <style:paragraph-properties fo:line-height="115%" fo:text-align="center" fo:margin-left="0.3599cm" fo:margin-right="0.5592cm" fo:text-indent="0cm" fo:margin-top="9.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33">
      <style:text-properties fo:font-weight="bold"/>
    </style:style>
    <style:style style:family="text" style:name="T534">
      <style:text-properties fo:letter-spacing="-0.15pt" fo:font-weight="bold"/>
    </style:style>
    <style:style style:family="text" style:name="T535">
      <style:text-properties fo:letter-spacing="-0.15pt"/>
    </style:style>
    <style:style style:family="text" style:name="T536">
      <style:text-properties fo:letter-spacing="-0.15pt"/>
    </style:style>
    <style:style style:family="text" style:name="T537">
      <style:text-properties fo:letter-spacing="-0.15pt"/>
    </style:style>
    <style:style style:family="text" style:name="T538">
      <style:text-properties fo:letter-spacing="-0.15pt"/>
    </style:style>
    <style:style style:family="text" style:name="T539">
      <style:text-properties fo:letter-spacing="-0.15pt"/>
    </style:style>
    <style:style style:family="text" style:name="T540">
      <style:text-properties fo:letter-spacing="-0.15pt"/>
    </style:style>
    <style:style style:family="text" style:name="T541">
      <style:text-properties fo:letter-spacing="-0.15pt"/>
    </style:style>
    <style:style style:family="text" style:name="T542">
      <style:text-properties fo:letter-spacing="-0.15pt"/>
    </style:style>
    <style:style style:family="text" style:name="T543">
      <style:text-properties fo:letter-spacing="-0.15pt"/>
    </style:style>
    <style:style style:family="text" style:name="T544">
      <style:text-properties fo:letter-spacing="-0.15pt"/>
    </style:style>
    <style:style style:family="text" style:name="T545">
      <style:text-properties fo:letter-spacing="-0.1pt"/>
    </style:style>
    <style:style style:parent-style-name="716" style:family="paragraph" style:name="P51">
      <style:paragraph-properties fo:margin-left="0cm" fo:margin-right="0cm" fo:text-indent="0cm" fo:margin-top="0.3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46">
      <style:text-properties fo:font-size="13.5pt"/>
    </style:style>
    <style:style style:family="text" style:name="T547">
      <style:text-properties fo:font-size="13.5pt"/>
    </style:style>
    <style:style style:parent-style-name="716" style:family="paragraph" style:name="P52">
      <style:paragraph-properties fo:text-align="center" fo:margin-left="0.3599cm" fo:margin-right="0.557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48">
      <style:text-properties fo:font-weight="bold"/>
    </style:style>
    <style:style style:family="text" style:name="T549">
      <style:text-properties fo:letter-spacing="-0.1pt"/>
    </style:style>
    <style:style style:parent-style-name="716" style:family="paragraph" style:name="P5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0">
      <style:text-properties fo:font-size="13pt"/>
    </style:style>
    <style:style style:family="text" style:name="T551">
      <style:text-properties fo:font-size="13pt"/>
    </style:style>
    <style:style style:parent-style-name="716" style:family="paragraph" style:name="P5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2">
      <style:text-properties fo:font-size="13pt"/>
    </style:style>
    <style:style style:family="text" style:name="T553">
      <style:text-properties fo:font-size="13pt"/>
    </style:style>
    <style:style style:parent-style-name="716" style:family="paragraph" style:name="P55">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4">
      <style:text-properties fo:font-size="15.5pt"/>
    </style:style>
    <style:style style:family="text" style:name="T555">
      <style:text-properties fo:font-size="15.5pt"/>
    </style:style>
    <style:style style:parent-style-name="716" style:family="paragraph" style:name="P56">
      <style:paragraph-properties fo:text-align="center" fo:margin-left="0.3599cm" fo:margin-right="0.557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6">
      <style:text-properties fo:letter-spacing="-0.15pt"/>
    </style:style>
    <style:style style:family="text" style:name="T557">
      <style:text-properties fo:letter-spacing="-0.1pt"/>
    </style:style>
    <style:style style:family="text" style:name="T558">
      <style:text-properties fo:letter-spacing="-0.15pt"/>
    </style:style>
    <style:style style:family="text" style:name="T559">
      <style:text-properties fo:letter-spacing="-0.1pt"/>
    </style:style>
    <style:style style:family="text" style:name="T560">
      <style:text-properties fo:letter-spacing="-0.1pt"/>
    </style:style>
    <style:style style:family="text" style:name="T561">
      <style:text-properties fo:letter-spacing="-0.15pt"/>
    </style:style>
    <style:style style:family="text" style:name="T562">
      <style:text-properties fo:letter-spacing="-0.1pt"/>
    </style:style>
    <style:style style:family="text" style:name="T563">
      <style:text-properties fo:letter-spacing="-0.1pt"/>
    </style:style>
    <style:style style:parent-style-name="909" style:family="text" style:name="T564">
      <style:text-properties/>
    </style:style>
    <style:style style:parent-style-name="909" style:family="text" style:name="T565">
      <style:text-properties/>
    </style:style>
    <style:style style:parent-style-name="909" style:family="text" style:name="T566">
      <style:text-properties style:text-underline-type="single" style:text-underline-style="solid" style:text-underline-width="auto" style:text-underline-color="font-color"/>
    </style:style>
    <style:style style:parent-style-name="909" style:family="text" style:name="T567">
      <style:text-properties/>
    </style:style>
    <style:style style:parent-style-name="909" style:family="text" style:name="T568">
      <style:text-properties fo:letter-spacing="-0.1pt" style:text-underline-type="single" style:text-underline-style="solid" style:text-underline-width="auto" style:text-underline-color="font-color"/>
    </style:style>
    <style:style style:parent-style-name="716" style:family="paragraph" style:name="P5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9">
      <style:text-properties fo:font-size="13pt"/>
    </style:style>
    <style:style style:family="text" style:name="T570">
      <style:text-properties fo:font-size="13pt"/>
    </style:style>
    <style:style style:parent-style-name="716" style:family="paragraph" style:name="P58">
      <style:paragraph-properties fo:margin-left="0cm" fo:margin-right="0cm" fo:text-indent="0cm" fo:margin-top="0.3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1">
      <style:text-properties fo:font-size="14.5pt"/>
    </style:style>
    <style:style style:family="text" style:name="T572">
      <style:text-properties fo:font-size="14.5pt"/>
    </style:style>
    <style:style style:parent-style-name="716" style:family="paragraph" style:name="P59">
      <style:paragraph-properties fo:line-height="115%" fo:text-align="center" fo:margin-left="0.2205cm" fo:margin-right="0.4181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3">
      <style:text-properties fo:letter-spacing="-0.1pt"/>
    </style:style>
    <style:style style:family="text" style:name="T574">
      <style:text-properties fo:letter-spacing="-0.1pt"/>
    </style:style>
    <style:style style:family="text" style:name="T575">
      <style:text-properties fo:letter-spacing="-0.1pt"/>
    </style:style>
    <style:style style:family="text" style:name="T576">
      <style:text-properties fo:letter-spacing="-0.1pt"/>
    </style:style>
    <style:style style:family="text" style:name="T577">
      <style:text-properties fo:letter-spacing="-0.1pt"/>
    </style:style>
    <style:style style:family="text" style:name="T578">
      <style:text-properties fo:letter-spacing="-0.1pt"/>
    </style:style>
    <style:style style:family="text" style:name="T579">
      <style:text-properties fo:letter-spacing="-0.1pt"/>
    </style:style>
    <style:style style:family="text" style:name="T580">
      <style:text-properties fo:letter-spacing="-0.1pt"/>
    </style:style>
    <style:style style:family="text" style:name="T581">
      <style:text-properties fo:letter-spacing="-0.1pt"/>
    </style:style>
    <style:style style:family="text" style:name="T582">
      <style:text-properties fo:letter-spacing="-0.1pt"/>
    </style:style>
    <style:style style:family="text" style:name="T583">
      <style:text-properties fo:letter-spacing="-0.1pt"/>
    </style:style>
    <style:style style:family="text" style:name="T584">
      <style:text-properties fo:letter-spacing="-0.1pt"/>
    </style:style>
    <style:style style:family="text" style:name="T585">
      <style:text-properties fo:letter-spacing="-0.1pt"/>
    </style:style>
    <style:style style:family="text" style:name="T586">
      <style:text-properties fo:letter-spacing="-0.1pt"/>
    </style:style>
    <style:style style:parent-style-name="716" style:master-page-name="MasterPage3" style:family="paragraph" style:name="P60">
      <style:paragraph-properties fo:text-align="center" fo:margin-left="2.815cm" fo:margin-right="3.013cm" fo:text-indent="0cm" fo:margin-top="3.7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87">
      <style:text-properties fo:letter-spacing="-0.5pt"/>
    </style:style>
    <style:style style:family="text" style:name="T588">
      <style:text-properties fo:letter-spacing="-0.5pt"/>
    </style:style>
    <style:style style:family="text" style:name="T589">
      <style:text-properties fo:letter-spacing="-0.5pt"/>
    </style:style>
    <style:style style:family="text" style:name="T590">
      <style:text-properties fo:letter-spacing="-0.5pt"/>
    </style:style>
    <style:style style:family="text" style:name="T591">
      <style:text-properties fo:letter-spacing="-0.5pt"/>
    </style:style>
    <style:style style:family="text" style:name="T592">
      <style:text-properties fo:letter-spacing="-0.5pt"/>
    </style:style>
    <style:style style:parent-style-name="716" style:family="paragraph" style:name="P61">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93">
      <style:text-properties fo:font-size="11.5pt"/>
    </style:style>
    <style:style style:family="text" style:name="T594">
      <style:text-properties fo:font-size="11.5pt"/>
    </style:style>
    <style:style style:parent-style-name="716" style:family="paragraph" style:name="P62">
      <style:paragraph-properties fo:text-align="center" fo:margin-left="2.815cm" fo:margin-right="3.013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95">
      <style:text-properties fo:letter-spacing="-0.25pt"/>
    </style:style>
    <style:style style:family="text" style:name="T596">
      <style:text-properties fo:letter-spacing="-0.25pt"/>
    </style:style>
    <style:style style:family="text" style:name="T597">
      <style:text-properties fo:letter-spacing="-0.25pt"/>
    </style:style>
    <style:style style:family="text" style:name="T598">
      <style:text-properties fo:letter-spacing="-0.25pt"/>
    </style:style>
    <style:style style:family="text" style:name="T599">
      <style:text-properties fo:letter-spacing="-0.25pt"/>
    </style:style>
    <style:style style:family="text" style:name="T600">
      <style:text-properties fo:letter-spacing="-0.25pt"/>
    </style:style>
    <style:style style:family="text" style:name="T601">
      <style:text-properties fo:letter-spacing="-0.25pt"/>
    </style:style>
    <style:style style:family="text" style:name="T602">
      <style:text-properties fo:letter-spacing="-0.25pt"/>
    </style:style>
    <style:style style:parent-style-name="909" style:family="text" style:name="T603">
      <style:text-properties/>
    </style:style>
    <style:style style:parent-style-name="909" style:family="text" style:name="T604">
      <style:text-properties/>
    </style:style>
    <style:style style:parent-style-name="909" style:family="text" style:name="T605">
      <style:text-properties fo:letter-spacing="-0.1pt" style:text-underline-type="single" style:text-underline-style="solid" style:text-underline-width="auto" style:text-underline-color="font-color"/>
    </style:style>
    <style:style style:parent-style-name="716" style:family="paragraph" style:name="P6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06">
      <style:text-properties fo:font-size="13pt"/>
    </style:style>
    <style:style style:family="text" style:name="T607">
      <style:text-properties fo:font-size="13pt"/>
    </style:style>
    <style:style style:parent-style-name="716" style:family="paragraph" style:name="P6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08">
      <style:text-properties fo:font-size="13pt"/>
    </style:style>
    <style:style style:family="text" style:name="T609">
      <style:text-properties fo:font-size="13pt"/>
    </style:style>
    <style:style style:parent-style-name="712" style:family="paragraph" style:name="P65">
      <style:paragraph-properties fo:text-align="center" fo:margin-left="0.3599cm" fo:margin-right="0.5574cm" fo:text-indent="0cm" fo:margin-top="9.7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610">
      <style:text-properties fo:font-size="14pt" fo:letter-spacing="-0.1pt" fo:font-weight="bold"/>
    </style:style>
    <style:style style:parent-style-name="716" style:family="paragraph" style:name="P66">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11">
      <style:text-properties fo:font-size="17pt" fo:font-weight="bold"/>
    </style:style>
    <style:style style:family="text" style:name="T612">
      <style:text-properties fo:font-size="17pt" fo:font-weight="bold"/>
    </style:style>
    <style:style style:parent-style-name="716" style:family="paragraph" style:name="P67">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13">
      <style:text-properties fo:letter-spacing="-0.15pt"/>
    </style:style>
    <style:style style:family="text" style:name="T614">
      <style:text-properties fo:letter-spacing="-0.15pt"/>
    </style:style>
    <style:style style:family="text" style:name="T615">
      <style:text-properties fo:letter-spacing="-0.15pt"/>
    </style:style>
    <style:style style:family="text" style:name="T616">
      <style:text-properties fo:letter-spacing="-0.15pt"/>
    </style:style>
    <style:style style:family="text" style:name="T617">
      <style:text-properties fo:letter-spacing="-0.15pt"/>
    </style:style>
    <style:style style:family="text" style:name="T618">
      <style:text-properties fo:letter-spacing="-0.15pt"/>
    </style:style>
    <style:style style:family="text" style:name="T619">
      <style:text-properties fo:letter-spacing="-0.15pt"/>
    </style:style>
    <style:style style:family="text" style:name="T620">
      <style:text-properties fo:letter-spacing="-0.15pt"/>
    </style:style>
    <style:style style:family="text" style:name="T621">
      <style:text-properties fo:letter-spacing="-0.15pt"/>
    </style:style>
    <style:style style:family="text" style:name="T622">
      <style:text-properties fo:letter-spacing="-0.15pt"/>
    </style:style>
    <style:style style:family="text" style:name="T623">
      <style:text-properties fo:letter-spacing="-0.15pt"/>
    </style:style>
    <style:style style:family="text" style:name="T624">
      <style:text-properties fo:letter-spacing="-0.15pt"/>
    </style:style>
    <style:style style:family="text" style:name="T625">
      <style:text-properties/>
    </style:style>
    <style:style style:parent-style-name="716" style:family="paragraph" style:name="P6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26">
      <style:text-properties fo:letter-spacing="-0.25pt"/>
    </style:style>
    <style:style style:family="text" style:name="T627">
      <style:text-properties fo:letter-spacing="-0.25pt"/>
    </style:style>
    <style:style style:family="text" style:name="T628">
      <style:text-properties fo:letter-spacing="-0.25pt"/>
    </style:style>
    <style:style style:family="text" style:name="T629">
      <style:text-properties fo:letter-spacing="-0.25pt"/>
    </style:style>
    <style:style style:family="text" style:name="T630">
      <style:text-properties fo:letter-spacing="-0.25pt"/>
    </style:style>
    <style:style style:family="text" style:name="T631">
      <style:text-properties fo:letter-spacing="-0.25pt"/>
    </style:style>
    <style:style style:family="text" style:name="T632">
      <style:text-properties fo:letter-spacing="-0.25pt"/>
    </style:style>
    <style:style style:family="text" style:name="T633">
      <style:text-properties fo:letter-spacing="-0.25pt"/>
    </style:style>
    <style:style style:family="text" style:name="T634">
      <style:text-properties fo:letter-spacing="-0.25pt"/>
    </style:style>
    <style:style style:family="text" style:name="T635">
      <style:text-properties fo:letter-spacing="-0.25pt"/>
    </style:style>
    <style:style style:family="text" style:name="T636">
      <style:text-properties fo:letter-spacing="-0.25pt"/>
    </style:style>
    <style:style style:family="text" style:name="T637">
      <style:text-properties fo:letter-spacing="-0.25pt"/>
    </style:style>
    <style:style style:parent-style-name="716" style:family="paragraph" style:name="P7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1">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38">
      <style:text-properties fo:letter-spacing="-0.15pt"/>
    </style:style>
    <style:style style:family="text" style:name="T639">
      <style:text-properties fo:letter-spacing="-0.15pt"/>
    </style:style>
    <style:style style:family="text" style:name="T640">
      <style:text-properties fo:letter-spacing="-0.15pt"/>
    </style:style>
    <style:style style:family="text" style:name="T641">
      <style:text-properties fo:letter-spacing="-0.15pt"/>
    </style:style>
    <style:style style:family="text" style:name="T642">
      <style:text-properties fo:letter-spacing="-0.15pt"/>
    </style:style>
    <style:style style:family="text" style:name="T643">
      <style:text-properties fo:letter-spacing="-0.15pt"/>
    </style:style>
    <style:style style:family="text" style:name="T644">
      <style:text-properties fo:letter-spacing="-0.15pt"/>
    </style:style>
    <style:style style:family="text" style:name="T645">
      <style:text-properties fo:letter-spacing="-0.15pt"/>
    </style:style>
    <style:style style:family="text" style:name="T646">
      <style:text-properties fo:letter-spacing="-0.15pt"/>
    </style:style>
    <style:style style:family="text" style:name="T647">
      <style:text-properties fo:letter-spacing="-0.15pt"/>
    </style:style>
    <style:style style:family="text" style:name="T648">
      <style:text-properties fo:letter-spacing="-0.15pt"/>
    </style:style>
    <style:style style:family="text" style:name="T649">
      <style:text-properties fo:letter-spacing="-0.1pt"/>
    </style:style>
    <style:style style:family="text" style:name="T650">
      <style:text-properties fo:letter-spacing="-0.1pt"/>
    </style:style>
    <style:style style:family="text" style:name="T651">
      <style:text-properties fo:letter-spacing="-0.1pt"/>
    </style:style>
    <style:style style:family="text" style:name="T652">
      <style:text-properties fo:letter-spacing="-0.1pt"/>
    </style:style>
    <style:style style:family="text" style:name="T653">
      <style:text-properties fo:letter-spacing="-0.1pt"/>
    </style:style>
    <style:style style:family="text" style:name="T654">
      <style:text-properties fo:letter-spacing="-0.1pt"/>
    </style:style>
    <style:style style:family="text" style:name="T655">
      <style:text-properties fo:letter-spacing="-0.1pt"/>
    </style:style>
    <style:style style:family="text" style:name="T656">
      <style:text-properties fo:letter-spacing="-0.1pt"/>
    </style:style>
    <style:style style:family="text" style:name="T657">
      <style:text-properties fo:letter-spacing="-0.1pt"/>
    </style:style>
    <style:style style:family="text" style:name="T658">
      <style:text-properties fo:letter-spacing="-0.1pt"/>
    </style:style>
    <style:style style:family="text" style:name="T659">
      <style:text-properties fo:letter-spacing="-0.1pt"/>
    </style:style>
    <style:style style:parent-style-name="716" style:family="paragraph" style:name="P7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3">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60">
      <style:text-properties fo:letter-spacing="-0.25pt"/>
    </style:style>
    <style:style style:family="text" style:name="T661">
      <style:text-properties fo:letter-spacing="-0.25pt"/>
    </style:style>
    <style:style style:family="text" style:name="T662">
      <style:text-properties fo:letter-spacing="-0.25pt"/>
    </style:style>
    <style:style style:family="text" style:name="T663">
      <style:text-properties fo:letter-spacing="-0.25pt"/>
    </style:style>
    <style:style style:family="text" style:name="T664">
      <style:text-properties fo:letter-spacing="-0.25pt"/>
    </style:style>
    <style:style style:family="text" style:name="T665">
      <style:text-properties fo:letter-spacing="-0.25pt"/>
    </style:style>
    <style:style style:family="text" style:name="T666">
      <style:text-properties fo:letter-spacing="-0.25pt"/>
    </style:style>
    <style:style style:family="text" style:name="T667">
      <style:text-properties fo:letter-spacing="-0.25pt"/>
    </style:style>
    <style:style style:family="text" style:name="T668">
      <style:text-properties fo:letter-spacing="-0.25pt"/>
    </style:style>
    <style:style style:family="text" style:name="T669">
      <style:text-properties fo:letter-spacing="-0.25pt"/>
    </style:style>
    <style:style style:parent-style-name="716" style:family="paragraph" style:name="P7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5">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70">
      <style:text-properties fo:letter-spacing="-0.25pt"/>
    </style:style>
    <style:style style:family="text" style:name="T671">
      <style:text-properties fo:letter-spacing="-0.25pt"/>
    </style:style>
    <style:style style:family="text" style:name="T672">
      <style:text-properties fo:letter-spacing="-0.25pt"/>
    </style:style>
    <style:style style:family="text" style:name="T673">
      <style:text-properties fo:letter-spacing="-0.25pt"/>
    </style:style>
    <style:style style:family="text" style:name="T674">
      <style:text-properties fo:letter-spacing="-0.25pt"/>
    </style:style>
    <style:style style:family="text" style:name="T675">
      <style:text-properties fo:letter-spacing="-0.25pt"/>
    </style:style>
    <style:style style:family="text" style:name="T676">
      <style:text-properties fo:letter-spacing="-0.25pt"/>
    </style:style>
    <style:style style:family="text" style:name="T677">
      <style:text-properties fo:letter-spacing="-0.25pt"/>
    </style:style>
    <style:style style:family="text" style:name="T678">
      <style:text-properties fo:letter-spacing="-0.25pt"/>
    </style:style>
    <style:style style:family="text" style:name="T679">
      <style:text-properties fo:letter-spacing="-0.25pt"/>
    </style:style>
    <style:style style:family="text" style:name="T680">
      <style:text-properties fo:letter-spacing="-0.25pt"/>
    </style:style>
    <style:style style:parent-style-name="716" style:family="paragraph" style:name="P7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81">
      <style:text-properties fo:letter-spacing="-0.25pt"/>
    </style:style>
    <style:style style:family="text" style:name="T682">
      <style:text-properties fo:letter-spacing="-0.25pt"/>
    </style:style>
    <style:style style:family="text" style:name="T683">
      <style:text-properties fo:letter-spacing="-0.25pt"/>
    </style:style>
    <style:style style:family="text" style:name="T684">
      <style:text-properties fo:letter-spacing="-0.25pt"/>
    </style:style>
    <style:style style:family="text" style:name="T685">
      <style:text-properties fo:letter-spacing="-0.25pt"/>
    </style:style>
    <style:style style:family="text" style:name="T686">
      <style:text-properties fo:letter-spacing="-0.25pt"/>
    </style:style>
    <style:style style:family="text" style:name="T687">
      <style:text-properties fo:letter-spacing="-0.25pt"/>
    </style:style>
    <style:style style:family="text" style:name="T688">
      <style:text-properties fo:letter-spacing="-0.25pt"/>
    </style:style>
    <style:style style:family="text" style:name="T689">
      <style:text-properties fo:letter-spacing="-0.25pt"/>
    </style:style>
    <style:style style:parent-style-name="716" style:family="paragraph" style:name="P7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690">
      <style:text-properties fo:letter-spacing="-0.15pt"/>
    </style:style>
    <style:style style:family="text" style:name="T691">
      <style:text-properties fo:letter-spacing="-0.15pt"/>
    </style:style>
    <style:style style:family="text" style:name="T692">
      <style:text-properties fo:letter-spacing="-0.15pt"/>
    </style:style>
    <style:style style:family="text" style:name="T693">
      <style:text-properties fo:letter-spacing="-0.15pt"/>
    </style:style>
    <style:style style:family="text" style:name="T694">
      <style:text-properties fo:letter-spacing="-0.15pt"/>
    </style:style>
    <style:style style:family="text" style:name="T695">
      <style:text-properties fo:letter-spacing="-0.15pt"/>
    </style:style>
    <style:style style:family="text" style:name="T696">
      <style:text-properties fo:letter-spacing="-0.15pt"/>
    </style:style>
    <style:style style:family="text" style:name="T697">
      <style:text-properties fo:letter-spacing="-0.15pt"/>
    </style:style>
    <style:style style:family="text" style:name="T698">
      <style:text-properties fo:letter-spacing="-0.15pt"/>
    </style:style>
    <style:style style:family="text" style:name="T699">
      <style:text-properties fo:letter-spacing="-0.15pt"/>
    </style:style>
    <style:style style:parent-style-name="716" style:family="paragraph" style:name="P7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8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700">
      <style:text-properties fo:letter-spacing="-0.25pt"/>
    </style:style>
    <style:style style:family="text" style:name="T701">
      <style:text-properties fo:letter-spacing="-0.25pt"/>
    </style:style>
    <style:style style:family="text" style:name="T702">
      <style:text-properties fo:letter-spacing="-0.25pt"/>
    </style:style>
    <style:style style:family="text" style:name="T703">
      <style:text-properties fo:letter-spacing="-0.25pt"/>
    </style:style>
    <style:style style:family="text" style:name="T704">
      <style:text-properties fo:letter-spacing="-0.25pt"/>
    </style:style>
    <style:style style:family="text" style:name="T705">
      <style:text-properties fo:letter-spacing="-0.25pt"/>
    </style:style>
    <style:style style:family="text" style:name="T706">
      <style:text-properties fo:letter-spacing="-0.25pt"/>
    </style:style>
    <style:style style:family="text" style:name="T707">
      <style:text-properties fo:letter-spacing="-0.25pt"/>
    </style:style>
    <style:style style:family="text" style:name="T708">
      <style:text-properties fo:letter-spacing="-0.25pt"/>
    </style:style>
    <style:style style:family="text" style:name="T709">
      <style:text-properties fo:letter-spacing="-0.25pt"/>
    </style:style>
    <style:style style:parent-style-name="712" style:master-page-name="MasterPage4" style:family="paragraph" style:name="P81">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710">
      <style:text-properties fo:font-size="16pt" fo:font-weight="bold"/>
    </style:style>
    <style:style style:family="text" style:name="T711">
      <style:text-properties fo:font-size="16pt" fo:letter-spacing="-0.7pt" fo:font-weight="bold"/>
    </style:style>
    <style:style style:family="text" style:name="T712">
      <style:text-properties fo:font-size="16pt" fo:font-weight="bold"/>
    </style:style>
    <style:style style:family="text" style:name="T713">
      <style:text-properties fo:font-size="16pt" fo:letter-spacing="-0.7pt" fo:font-weight="bold"/>
    </style:style>
    <style:style style:family="text" style:name="T714">
      <style:text-properties fo:font-size="16pt" fo:letter-spacing="-0.1pt" fo:font-weight="bold"/>
    </style:style>
    <style:style style:parent-style-name="715" style:family="paragraph" style:name="P82">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15">
      <style:text-properties/>
    </style:style>
    <style:style style:parent-style-name="186" style:family="text" style:name="T716">
      <style:text-properties fo:letter-spacing="-0.1pt"/>
    </style:style>
    <style:style style:parent-style-name="186" style:family="text" style:name="T717">
      <style:text-properties/>
    </style:style>
    <style:style style:parent-style-name="713" style:family="paragraph" style:name="P83">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718">
      <style:text-properties/>
    </style:style>
    <style:style style:parent-style-name="186" style:family="text" style:name="T719">
      <style:text-properties fo:letter-spacing="-0.1pt"/>
    </style:style>
    <style:style style:parent-style-name="186" style:family="text" style:name="T720">
      <style:text-properties/>
    </style:style>
    <style:style style:parent-style-name="714" style:family="paragraph" style:name="P84">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21">
      <style:text-properties/>
    </style:style>
    <style:style style:parent-style-name="186" style:family="text" style:name="T722">
      <style:text-properties/>
    </style:style>
    <style:style style:parent-style-name="186" style:family="text" style:name="T723">
      <style:text-properties fo:letter-spacing="-0.3pt"/>
    </style:style>
    <style:style style:parent-style-name="186" style:family="text" style:name="T724">
      <style:text-properties/>
    </style:style>
    <style:style style:parent-style-name="186" style:family="text" style:name="T725">
      <style:text-properties fo:letter-spacing="-0.25pt"/>
    </style:style>
    <style:style style:parent-style-name="186" style:family="text" style:name="T726">
      <style:text-properties/>
    </style:style>
    <style:style style:parent-style-name="186" style:family="text" style:name="T727">
      <style:text-properties fo:letter-spacing="-0.25pt"/>
    </style:style>
    <style:style style:parent-style-name="186" style:family="text" style:name="T728">
      <style:text-properties/>
    </style:style>
    <style:style style:parent-style-name="186" style:family="text" style:name="T729">
      <style:text-properties fo:letter-spacing="-0.25pt"/>
    </style:style>
    <style:style style:parent-style-name="186" style:family="text" style:name="T730">
      <style:text-properties fo:letter-spacing="-0.1pt"/>
    </style:style>
    <style:style style:parent-style-name="186" style:family="text" style:name="T731">
      <style:text-properties/>
    </style:style>
    <style:style style:parent-style-name="714" style:family="paragraph" style:name="P85">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32">
      <style:text-properties/>
    </style:style>
    <style:style style:parent-style-name="186" style:family="text" style:name="T733">
      <style:text-properties/>
    </style:style>
    <style:style style:parent-style-name="186" style:family="text" style:name="T734">
      <style:text-properties fo:letter-spacing="-0.1pt"/>
    </style:style>
    <style:style style:parent-style-name="186" style:family="text" style:name="T735">
      <style:text-properties/>
    </style:style>
    <style:style style:parent-style-name="186" style:family="text" style:name="T736">
      <style:text-properties fo:letter-spacing="-0.1pt"/>
    </style:style>
    <style:style style:parent-style-name="186" style:family="text" style:name="T737">
      <style:text-properties/>
    </style:style>
    <style:style style:parent-style-name="186" style:family="text" style:name="T738">
      <style:text-properties fo:letter-spacing="-0.1pt"/>
    </style:style>
    <style:style style:parent-style-name="186" style:family="text" style:name="T739">
      <style:text-properties fo:letter-spacing="-0.1pt"/>
    </style:style>
    <style:style style:parent-style-name="186" style:family="text" style:name="T740">
      <style:text-properties/>
    </style:style>
    <style:style style:parent-style-name="714" style:family="paragraph" style:name="P86">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41">
      <style:text-properties/>
    </style:style>
    <style:style style:parent-style-name="186" style:family="text" style:name="T742">
      <style:text-properties/>
    </style:style>
    <style:style style:parent-style-name="186" style:family="text" style:name="T743">
      <style:text-properties/>
    </style:style>
    <style:style style:family="text" style:name="T744">
      <style:text-properties/>
    </style:style>
    <style:style style:parent-style-name="714" style:family="paragraph" style:name="P87">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45">
      <style:text-properties/>
    </style:style>
    <style:style style:parent-style-name="186" style:family="text" style:name="T746">
      <style:text-properties/>
    </style:style>
    <style:style style:parent-style-name="186" style:family="text" style:name="T747">
      <style:text-properties/>
    </style:style>
    <style:style style:family="text" style:name="T748">
      <style:text-properties/>
    </style:style>
    <style:style style:parent-style-name="714" style:family="paragraph" style:name="P88">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49">
      <style:text-properties/>
    </style:style>
    <style:style style:parent-style-name="186" style:family="text" style:name="T750">
      <style:text-properties/>
    </style:style>
    <style:style style:parent-style-name="186" style:family="text" style:name="T751">
      <style:text-properties/>
    </style:style>
    <style:style style:parent-style-name="186" style:family="text" style:name="T752">
      <style:text-properties/>
    </style:style>
    <style:style style:parent-style-name="186" style:family="text" style:name="T753">
      <style:text-properties fo:letter-spacing="-0.5pt"/>
    </style:style>
    <style:style style:parent-style-name="186" style:family="text" style:name="T754">
      <style:text-properties/>
    </style:style>
    <style:style style:parent-style-name="186" style:family="text" style:name="T755">
      <style:text-properties fo:letter-spacing="-0.5pt"/>
    </style:style>
    <style:style style:parent-style-name="186" style:family="text" style:name="T756">
      <style:text-properties/>
    </style:style>
    <style:style style:parent-style-name="186" style:family="text" style:name="T757">
      <style:text-properties fo:letter-spacing="-0.5pt"/>
    </style:style>
    <style:style style:parent-style-name="186" style:family="text" style:name="T758">
      <style:text-properties fo:letter-spacing="-0.1pt"/>
    </style:style>
    <style:style style:parent-style-name="186" style:family="text" style:name="T759">
      <style:text-properties/>
    </style:style>
    <style:style style:parent-style-name="186" style:family="text" style:name="T760">
      <style:text-properties/>
    </style:style>
    <style:style style:parent-style-name="713" style:family="paragraph" style:name="P89">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761">
      <style:text-properties/>
    </style:style>
    <style:style style:parent-style-name="186" style:family="text" style:name="T762">
      <style:text-properties/>
    </style:style>
    <style:style style:parent-style-name="186" style:family="text" style:name="T763">
      <style:text-properties fo:letter-spacing="-0.1pt"/>
    </style:style>
    <style:style style:parent-style-name="186" style:family="text" style:name="T764">
      <style:text-properties/>
    </style:style>
    <style:style style:parent-style-name="714" style:family="paragraph" style:name="P90">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65">
      <style:text-properties/>
    </style:style>
    <style:style style:parent-style-name="186" style:family="text" style:name="T766">
      <style:text-properties/>
    </style:style>
    <style:style style:parent-style-name="186" style:family="text" style:name="T767">
      <style:text-properties fo:letter-spacing="-0.5pt"/>
    </style:style>
    <style:style style:parent-style-name="186" style:family="text" style:name="T768">
      <style:text-properties/>
    </style:style>
    <style:style style:parent-style-name="186" style:family="text" style:name="T769">
      <style:text-properties fo:letter-spacing="-0.5pt"/>
    </style:style>
    <style:style style:parent-style-name="186" style:family="text" style:name="T770">
      <style:text-properties/>
    </style:style>
    <style:style style:parent-style-name="186" style:family="text" style:name="T771">
      <style:text-properties fo:letter-spacing="-0.5pt"/>
    </style:style>
    <style:style style:parent-style-name="186" style:family="text" style:name="T772">
      <style:text-properties fo:letter-spacing="-0.1pt"/>
    </style:style>
    <style:style style:parent-style-name="186" style:family="text" style:name="T773">
      <style:text-properties/>
    </style:style>
    <style:style style:parent-style-name="714" style:family="paragraph" style:name="P91">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74">
      <style:text-properties/>
    </style:style>
    <style:style style:parent-style-name="186" style:family="text" style:name="T775">
      <style:text-properties/>
    </style:style>
    <style:style style:parent-style-name="186" style:family="text" style:name="T776">
      <style:text-properties fo:letter-spacing="-0.3pt"/>
    </style:style>
    <style:style style:parent-style-name="186" style:family="text" style:name="T777">
      <style:text-properties/>
    </style:style>
    <style:style style:parent-style-name="186" style:family="text" style:name="T778">
      <style:text-properties fo:letter-spacing="-0.3pt"/>
    </style:style>
    <style:style style:parent-style-name="186" style:family="text" style:name="T779">
      <style:text-properties/>
    </style:style>
    <style:style style:parent-style-name="186" style:family="text" style:name="T780">
      <style:text-properties fo:letter-spacing="-0.3pt"/>
    </style:style>
    <style:style style:parent-style-name="186" style:family="text" style:name="T781">
      <style:text-properties/>
    </style:style>
    <style:style style:parent-style-name="186" style:family="text" style:name="T782">
      <style:text-properties fo:letter-spacing="-0.25pt"/>
    </style:style>
    <style:style style:parent-style-name="186" style:family="text" style:name="T783">
      <style:text-properties fo:letter-spacing="-0.1pt"/>
    </style:style>
    <style:style style:parent-style-name="186" style:family="text" style:name="T784">
      <style:text-properties/>
    </style:style>
    <style:style style:family="text" style:name="T785">
      <style:text-properties/>
    </style:style>
    <style:style style:parent-style-name="714" style:family="paragraph" style:name="P92">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86">
      <style:text-properties/>
    </style:style>
    <style:style style:parent-style-name="186" style:family="text" style:name="T787">
      <style:text-properties/>
    </style:style>
    <style:style style:parent-style-name="186" style:family="text" style:name="T788">
      <style:text-properties fo:letter-spacing="-0.75pt"/>
    </style:style>
    <style:style style:parent-style-name="186" style:family="text" style:name="T789">
      <style:text-properties/>
    </style:style>
    <style:style style:parent-style-name="186" style:family="text" style:name="T790">
      <style:text-properties fo:letter-spacing="-0.75pt"/>
    </style:style>
    <style:style style:parent-style-name="186" style:family="text" style:name="T791">
      <style:text-properties/>
    </style:style>
    <style:style style:parent-style-name="186" style:family="text" style:name="T792">
      <style:text-properties fo:letter-spacing="-0.75pt"/>
    </style:style>
    <style:style style:parent-style-name="186" style:family="text" style:name="T793">
      <style:text-properties/>
    </style:style>
    <style:style style:parent-style-name="186" style:family="text" style:name="T794">
      <style:text-properties fo:letter-spacing="-0.75pt"/>
    </style:style>
    <style:style style:parent-style-name="186" style:family="text" style:name="T795">
      <style:text-properties/>
    </style:style>
    <style:style style:parent-style-name="186" style:family="text" style:name="T796">
      <style:text-properties fo:letter-spacing="-0.1pt"/>
    </style:style>
    <style:style style:parent-style-name="186" style:family="text" style:name="T797">
      <style:text-properties/>
    </style:style>
    <style:style style:parent-style-name="714" style:family="paragraph" style:name="P93">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798">
      <style:text-properties/>
    </style:style>
    <style:style style:parent-style-name="186" style:family="text" style:name="T799">
      <style:text-properties/>
    </style:style>
    <style:style style:parent-style-name="186" style:family="text" style:name="T800">
      <style:text-properties fo:letter-spacing="-0.35pt"/>
    </style:style>
    <style:style style:parent-style-name="186" style:family="text" style:name="T801">
      <style:text-properties/>
    </style:style>
    <style:style style:parent-style-name="186" style:family="text" style:name="T802">
      <style:text-properties fo:letter-spacing="-0.35pt"/>
    </style:style>
    <style:style style:parent-style-name="186" style:family="text" style:name="T803">
      <style:text-properties/>
    </style:style>
    <style:style style:parent-style-name="186" style:family="text" style:name="T804">
      <style:text-properties fo:letter-spacing="-0.35pt"/>
    </style:style>
    <style:style style:parent-style-name="186" style:family="text" style:name="T805">
      <style:text-properties/>
    </style:style>
    <style:style style:parent-style-name="186" style:family="text" style:name="T806">
      <style:text-properties fo:letter-spacing="-0.35pt"/>
    </style:style>
    <style:style style:parent-style-name="186" style:family="text" style:name="T807">
      <style:text-properties/>
    </style:style>
    <style:style style:parent-style-name="186" style:family="text" style:name="T808">
      <style:text-properties fo:letter-spacing="-0.35pt"/>
    </style:style>
    <style:style style:parent-style-name="186" style:family="text" style:name="T809">
      <style:text-properties/>
    </style:style>
    <style:style style:parent-style-name="186" style:family="text" style:name="T810">
      <style:text-properties fo:letter-spacing="-0.35pt"/>
    </style:style>
    <style:style style:parent-style-name="186" style:family="text" style:name="T811">
      <style:text-properties/>
    </style:style>
    <style:style style:parent-style-name="186" style:family="text" style:name="T812">
      <style:text-properties fo:letter-spacing="-0.35pt"/>
    </style:style>
    <style:style style:parent-style-name="186" style:family="text" style:name="T813">
      <style:text-properties/>
    </style:style>
    <style:style style:parent-style-name="186" style:family="text" style:name="T814">
      <style:text-properties/>
    </style:style>
    <style:style style:parent-style-name="714" style:family="paragraph" style:name="P94">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15">
      <style:text-properties/>
    </style:style>
    <style:style style:parent-style-name="186" style:family="text" style:name="T816">
      <style:text-properties/>
    </style:style>
    <style:style style:parent-style-name="186" style:family="text" style:name="T817">
      <style:text-properties fo:letter-spacing="-0.65pt"/>
    </style:style>
    <style:style style:parent-style-name="186" style:family="text" style:name="T818">
      <style:text-properties/>
    </style:style>
    <style:style style:parent-style-name="186" style:family="text" style:name="T819">
      <style:text-properties fo:letter-spacing="-0.65pt"/>
    </style:style>
    <style:style style:parent-style-name="186" style:family="text" style:name="T820">
      <style:text-properties/>
    </style:style>
    <style:style style:parent-style-name="186" style:family="text" style:name="T821">
      <style:text-properties fo:letter-spacing="-0.65pt"/>
    </style:style>
    <style:style style:parent-style-name="186" style:family="text" style:name="T822">
      <style:text-properties fo:letter-spacing="-0.15pt"/>
    </style:style>
    <style:style style:parent-style-name="186" style:family="text" style:name="T823">
      <style:text-properties/>
    </style:style>
    <style:style style:parent-style-name="714" style:family="paragraph" style:name="P95">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24">
      <style:text-properties/>
    </style:style>
    <style:style style:parent-style-name="186" style:family="text" style:name="T825">
      <style:text-properties fo:letter-spacing="-0.1pt"/>
    </style:style>
    <style:style style:parent-style-name="186" style:family="text" style:name="T826">
      <style:text-properties/>
    </style:style>
    <style:style style:parent-style-name="713" style:family="paragraph" style:name="P96">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827">
      <style:text-properties/>
    </style:style>
    <style:style style:parent-style-name="186" style:family="text" style:name="T828">
      <style:text-properties/>
    </style:style>
    <style:style style:parent-style-name="186" style:family="text" style:name="T829">
      <style:text-properties fo:letter-spacing="-0.3pt"/>
    </style:style>
    <style:style style:parent-style-name="186" style:family="text" style:name="T830">
      <style:text-properties/>
    </style:style>
    <style:style style:parent-style-name="186" style:family="text" style:name="T831">
      <style:text-properties fo:letter-spacing="-0.3pt"/>
    </style:style>
    <style:style style:parent-style-name="186" style:family="text" style:name="T832">
      <style:text-properties/>
    </style:style>
    <style:style style:parent-style-name="186" style:family="text" style:name="T833">
      <style:text-properties fo:letter-spacing="-0.3pt"/>
    </style:style>
    <style:style style:parent-style-name="186" style:family="text" style:name="T834">
      <style:text-properties/>
    </style:style>
    <style:style style:parent-style-name="186" style:family="text" style:name="T835">
      <style:text-properties fo:letter-spacing="-0.3pt"/>
    </style:style>
    <style:style style:parent-style-name="186" style:family="text" style:name="T836">
      <style:text-properties/>
    </style:style>
    <style:style style:parent-style-name="186" style:family="text" style:name="T837">
      <style:text-properties fo:letter-spacing="-0.3pt"/>
    </style:style>
    <style:style style:parent-style-name="186" style:family="text" style:name="T838">
      <style:text-properties/>
    </style:style>
    <style:style style:parent-style-name="186" style:family="text" style:name="T839">
      <style:text-properties fo:letter-spacing="-0.3pt"/>
    </style:style>
    <style:style style:parent-style-name="186" style:family="text" style:name="T840">
      <style:text-properties/>
    </style:style>
    <style:style style:parent-style-name="186" style:family="text" style:name="T841">
      <style:text-properties fo:letter-spacing="-0.1pt"/>
    </style:style>
    <style:style style:parent-style-name="186" style:family="text" style:name="T842">
      <style:text-properties/>
    </style:style>
    <style:style style:parent-style-name="714" style:family="paragraph" style:name="P97">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43">
      <style:text-properties/>
    </style:style>
    <style:style style:parent-style-name="186" style:family="text" style:name="T844">
      <style:text-properties/>
    </style:style>
    <style:style style:parent-style-name="186" style:family="text" style:name="T845">
      <style:text-properties fo:letter-spacing="-0.15pt"/>
    </style:style>
    <style:style style:parent-style-name="186" style:family="text" style:name="T846">
      <style:text-properties/>
    </style:style>
    <style:style style:parent-style-name="186" style:family="text" style:name="T847">
      <style:text-properties fo:letter-spacing="-0.15pt"/>
    </style:style>
    <style:style style:parent-style-name="186" style:family="text" style:name="T848">
      <style:text-properties/>
    </style:style>
    <style:style style:parent-style-name="186" style:family="text" style:name="T849">
      <style:text-properties fo:letter-spacing="-0.1pt"/>
    </style:style>
    <style:style style:parent-style-name="186" style:family="text" style:name="T850">
      <style:text-properties fo:letter-spacing="-0.1pt"/>
    </style:style>
    <style:style style:parent-style-name="186" style:family="text" style:name="T851">
      <style:text-properties/>
    </style:style>
    <style:style style:parent-style-name="715" style:family="paragraph" style:name="P98">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52">
      <style:text-properties/>
    </style:style>
    <style:style style:parent-style-name="186" style:family="text" style:name="T853">
      <style:text-properties/>
    </style:style>
    <style:style style:parent-style-name="186" style:family="text" style:name="T854">
      <style:text-properties/>
    </style:style>
    <style:style style:family="text" style:name="T855">
      <style:text-properties/>
    </style:style>
    <style:style style:parent-style-name="715" style:family="paragraph" style:name="P99">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56">
      <style:text-properties/>
    </style:style>
    <style:style style:parent-style-name="186" style:family="text" style:name="T857">
      <style:text-properties/>
    </style:style>
    <style:style style:parent-style-name="186" style:family="text" style:name="T858">
      <style:text-properties/>
    </style:style>
    <style:style style:family="text" style:name="T859">
      <style:text-properties/>
    </style:style>
    <style:style style:parent-style-name="715" style:family="paragraph" style:name="P100">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60">
      <style:text-properties/>
    </style:style>
    <style:style style:parent-style-name="186" style:family="text" style:name="T861">
      <style:text-properties/>
    </style:style>
    <style:style style:parent-style-name="186" style:family="text" style:name="T862">
      <style:text-properties/>
    </style:style>
    <style:style style:family="text" style:name="T863">
      <style:text-properties/>
    </style:style>
    <style:style style:family="text" style:name="T864">
      <style:text-properties/>
    </style:style>
    <style:style style:parent-style-name="713" style:family="paragraph" style:name="P101">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865">
      <style:text-properties/>
    </style:style>
    <style:style style:parent-style-name="186" style:family="text" style:name="T866">
      <style:text-properties/>
    </style:style>
    <style:style style:parent-style-name="186" style:family="text" style:name="T867">
      <style:text-properties fo:letter-spacing="-0.1pt"/>
    </style:style>
    <style:style style:parent-style-name="186" style:family="text" style:name="T868">
      <style:text-properties/>
    </style:style>
    <style:style style:parent-style-name="713" style:family="paragraph" style:name="P102">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869">
      <style:text-properties/>
    </style:style>
    <style:style style:parent-style-name="186" style:family="text" style:name="T870">
      <style:text-properties/>
    </style:style>
    <style:style style:parent-style-name="186" style:family="text" style:name="T871">
      <style:text-properties fo:letter-spacing="-0.15pt"/>
    </style:style>
    <style:style style:parent-style-name="186" style:family="text" style:name="T872">
      <style:text-properties/>
    </style:style>
    <style:style style:parent-style-name="714" style:family="paragraph" style:name="P103">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73">
      <style:text-properties/>
    </style:style>
    <style:style style:parent-style-name="186" style:family="text" style:name="T874">
      <style:text-properties/>
    </style:style>
    <style:style style:parent-style-name="186" style:family="text" style:name="T875">
      <style:text-properties fo:letter-spacing="-0.3pt"/>
    </style:style>
    <style:style style:parent-style-name="186" style:family="text" style:name="T876">
      <style:text-properties/>
    </style:style>
    <style:style style:parent-style-name="186" style:family="text" style:name="T877">
      <style:text-properties fo:letter-spacing="-0.15pt"/>
    </style:style>
    <style:style style:parent-style-name="186" style:family="text" style:name="T878">
      <style:text-properties fo:letter-spacing="-0.1pt"/>
    </style:style>
    <style:style style:parent-style-name="186" style:family="text" style:name="T879">
      <style:text-properties/>
    </style:style>
    <style:style style:parent-style-name="714" style:family="paragraph" style:name="P104">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880">
      <style:text-properties/>
    </style:style>
    <style:style style:parent-style-name="186" style:family="text" style:name="T881">
      <style:text-properties/>
    </style:style>
    <style:style style:parent-style-name="186" style:family="text" style:name="T882">
      <style:text-properties fo:letter-spacing="-0.3pt"/>
    </style:style>
    <style:style style:parent-style-name="186" style:family="text" style:name="T883">
      <style:text-properties/>
    </style:style>
    <style:style style:parent-style-name="186" style:family="text" style:name="T884">
      <style:text-properties fo:letter-spacing="-0.3pt"/>
    </style:style>
    <style:style style:parent-style-name="186" style:family="text" style:name="T885">
      <style:text-properties/>
    </style:style>
    <style:style style:parent-style-name="186" style:family="text" style:name="T886">
      <style:text-properties fo:letter-spacing="-0.3pt"/>
    </style:style>
    <style:style style:parent-style-name="186" style:family="text" style:name="T887">
      <style:text-properties fo:letter-spacing="-0.1pt"/>
    </style:style>
    <style:style style:parent-style-name="186" style:family="text" style:name="T888">
      <style:text-properties/>
    </style:style>
    <style:style style:parent-style-name="713" style:family="paragraph" style:name="P105">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889">
      <style:text-properties/>
    </style:style>
    <style:style style:parent-style-name="186" style:family="text" style:name="T890">
      <style:text-properties/>
    </style:style>
    <style:style style:parent-style-name="186" style:family="text" style:name="T891">
      <style:text-properties fo:letter-spacing="-0.45pt"/>
    </style:style>
    <style:style style:parent-style-name="186" style:family="text" style:name="T892">
      <style:text-properties/>
    </style:style>
    <style:style style:parent-style-name="186" style:family="text" style:name="T893">
      <style:text-properties fo:letter-spacing="-0.3pt"/>
    </style:style>
    <style:style style:parent-style-name="186" style:family="text" style:name="T894">
      <style:text-properties/>
    </style:style>
    <style:style style:parent-style-name="186" style:family="text" style:name="T895">
      <style:text-properties fo:letter-spacing="-0.3pt"/>
    </style:style>
    <style:style style:parent-style-name="186" style:family="text" style:name="T896">
      <style:text-properties/>
    </style:style>
    <style:style style:parent-style-name="186" style:family="text" style:name="T897">
      <style:text-properties fo:letter-spacing="-0.3pt"/>
    </style:style>
    <style:style style:parent-style-name="186" style:family="text" style:name="T898">
      <style:text-properties fo:letter-spacing="-0.1pt"/>
    </style:style>
    <style:style style:parent-style-name="186" style:family="text" style:name="T899">
      <style:text-properties/>
    </style:style>
    <style:style style:parent-style-name="713" style:family="paragraph" style:name="P106">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900">
      <style:text-properties/>
    </style:style>
    <style:style style:parent-style-name="186" style:family="text" style:name="T901">
      <style:text-properties/>
    </style:style>
    <style:style style:parent-style-name="186" style:family="text" style:name="T902">
      <style:text-properties fo:letter-spacing="-0.05pt"/>
    </style:style>
    <style:style style:parent-style-name="186" style:family="text" style:name="T903">
      <style:text-properties/>
    </style:style>
    <style:style style:parent-style-name="186" style:family="text" style:name="T904">
      <style:text-properties fo:letter-spacing="-0.05pt"/>
    </style:style>
    <style:style style:parent-style-name="186" style:family="text" style:name="T905">
      <style:text-properties/>
    </style:style>
    <style:style style:parent-style-name="186" style:family="text" style:name="T906">
      <style:text-properties fo:letter-spacing="-0.05pt"/>
    </style:style>
    <style:style style:parent-style-name="186" style:family="text" style:name="T907">
      <style:text-properties/>
    </style:style>
    <style:style style:parent-style-name="186" style:family="text" style:name="T908">
      <style:text-properties fo:letter-spacing="-0.05pt"/>
    </style:style>
    <style:style style:parent-style-name="186" style:family="text" style:name="T909">
      <style:text-properties/>
    </style:style>
    <style:style style:parent-style-name="186" style:family="text" style:name="T910">
      <style:text-properties fo:letter-spacing="-0.05pt"/>
    </style:style>
    <style:style style:parent-style-name="186" style:family="text" style:name="T911">
      <style:text-properties/>
    </style:style>
    <style:style style:parent-style-name="186" style:family="text" style:name="T912">
      <style:text-properties fo:letter-spacing="-0.05pt"/>
    </style:style>
    <style:style style:parent-style-name="186" style:family="text" style:name="T913">
      <style:text-properties/>
    </style:style>
    <style:style style:parent-style-name="186" style:family="text" style:name="T914">
      <style:text-properties fo:letter-spacing="-0.05pt"/>
    </style:style>
    <style:style style:parent-style-name="186" style:family="text" style:name="T915">
      <style:text-properties fo:letter-spacing="-0.1pt"/>
    </style:style>
    <style:style style:parent-style-name="186" style:family="text" style:name="T916">
      <style:text-properties/>
    </style:style>
    <style:style style:parent-style-name="714" style:family="paragraph" style:name="P107">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17">
      <style:text-properties/>
    </style:style>
    <style:style style:parent-style-name="186" style:family="text" style:name="T918">
      <style:text-properties/>
    </style:style>
    <style:style style:parent-style-name="186" style:family="text" style:name="T919">
      <style:text-properties fo:letter-spacing="-0.35pt"/>
    </style:style>
    <style:style style:parent-style-name="186" style:family="text" style:name="T920">
      <style:text-properties/>
    </style:style>
    <style:style style:parent-style-name="186" style:family="text" style:name="T921">
      <style:text-properties fo:letter-spacing="-0.25pt"/>
    </style:style>
    <style:style style:parent-style-name="186" style:family="text" style:name="T922">
      <style:text-properties/>
    </style:style>
    <style:style style:parent-style-name="186" style:family="text" style:name="T923">
      <style:text-properties fo:letter-spacing="-0.25pt"/>
    </style:style>
    <style:style style:parent-style-name="186" style:family="text" style:name="T924">
      <style:text-properties/>
    </style:style>
    <style:style style:parent-style-name="186" style:family="text" style:name="T925">
      <style:text-properties fo:letter-spacing="-0.3pt"/>
    </style:style>
    <style:style style:parent-style-name="186" style:family="text" style:name="T926">
      <style:text-properties/>
    </style:style>
    <style:style style:parent-style-name="186" style:family="text" style:name="T927">
      <style:text-properties fo:letter-spacing="-0.25pt"/>
    </style:style>
    <style:style style:parent-style-name="186" style:family="text" style:name="T928">
      <style:text-properties/>
    </style:style>
    <style:style style:parent-style-name="186" style:family="text" style:name="T929">
      <style:text-properties fo:letter-spacing="-0.25pt"/>
    </style:style>
    <style:style style:parent-style-name="186" style:family="text" style:name="T930">
      <style:text-properties fo:letter-spacing="-0.1pt"/>
    </style:style>
    <style:style style:parent-style-name="186" style:family="text" style:name="T931">
      <style:text-properties/>
    </style:style>
    <style:style style:parent-style-name="713" style:family="paragraph" style:name="P108">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932">
      <style:text-properties/>
    </style:style>
    <style:style style:parent-style-name="186" style:family="text" style:name="T933">
      <style:text-properties/>
    </style:style>
    <style:style style:parent-style-name="186" style:family="text" style:name="T934">
      <style:text-properties fo:letter-spacing="-0.1pt"/>
    </style:style>
    <style:style style:parent-style-name="186" style:family="text" style:name="T935">
      <style:text-properties/>
    </style:style>
    <style:style style:parent-style-name="714" style:family="paragraph" style:name="P109">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36">
      <style:text-properties/>
    </style:style>
    <style:style style:parent-style-name="186" style:family="text" style:name="T937">
      <style:text-properties/>
    </style:style>
    <style:style style:parent-style-name="186" style:family="text" style:name="T938">
      <style:text-properties fo:letter-spacing="-0.25pt"/>
    </style:style>
    <style:style style:parent-style-name="186" style:family="text" style:name="T939">
      <style:text-properties/>
    </style:style>
    <style:style style:parent-style-name="186" style:family="text" style:name="T940">
      <style:text-properties fo:letter-spacing="-0.15pt"/>
    </style:style>
    <style:style style:parent-style-name="186" style:family="text" style:name="T941">
      <style:text-properties fo:letter-spacing="-0.1pt"/>
    </style:style>
    <style:style style:parent-style-name="186" style:family="text" style:name="T942">
      <style:text-properties/>
    </style:style>
    <style:style style:parent-style-name="714" style:family="paragraph" style:name="P110">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43">
      <style:text-properties/>
    </style:style>
    <style:style style:parent-style-name="186" style:family="text" style:name="T944">
      <style:text-properties/>
    </style:style>
    <style:style style:parent-style-name="186" style:family="text" style:name="T945">
      <style:text-properties fo:letter-spacing="-0.5pt"/>
    </style:style>
    <style:style style:parent-style-name="186" style:family="text" style:name="T946">
      <style:text-properties/>
    </style:style>
    <style:style style:parent-style-name="186" style:family="text" style:name="T947">
      <style:text-properties fo:letter-spacing="-0.3pt"/>
    </style:style>
    <style:style style:parent-style-name="186" style:family="text" style:name="T948">
      <style:text-properties/>
    </style:style>
    <style:style style:parent-style-name="186" style:family="text" style:name="T949">
      <style:text-properties fo:letter-spacing="-0.35pt"/>
    </style:style>
    <style:style style:parent-style-name="186" style:family="text" style:name="T950">
      <style:text-properties/>
    </style:style>
    <style:style style:parent-style-name="186" style:family="text" style:name="T951">
      <style:text-properties fo:letter-spacing="-0.3pt"/>
    </style:style>
    <style:style style:parent-style-name="186" style:family="text" style:name="T952">
      <style:text-properties fo:letter-spacing="-0.1pt"/>
    </style:style>
    <style:style style:parent-style-name="186" style:family="text" style:name="T953">
      <style:text-properties/>
    </style:style>
    <style:style style:parent-style-name="713" style:family="paragraph" style:name="P111">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954">
      <style:text-properties/>
    </style:style>
    <style:style style:parent-style-name="186" style:family="text" style:name="T955">
      <style:text-properties/>
    </style:style>
    <style:style style:parent-style-name="186" style:family="text" style:name="T956">
      <style:text-properties fo:letter-spacing="-0.25pt"/>
    </style:style>
    <style:style style:parent-style-name="186" style:family="text" style:name="T957">
      <style:text-properties/>
    </style:style>
    <style:style style:parent-style-name="186" style:family="text" style:name="T958">
      <style:text-properties fo:letter-spacing="-0.25pt"/>
    </style:style>
    <style:style style:parent-style-name="186" style:family="text" style:name="T959">
      <style:text-properties/>
    </style:style>
    <style:style style:parent-style-name="186" style:family="text" style:name="T960">
      <style:text-properties fo:letter-spacing="-0.15pt"/>
    </style:style>
    <style:style style:parent-style-name="186" style:family="text" style:name="T961">
      <style:text-properties fo:letter-spacing="-0.1pt"/>
    </style:style>
    <style:style style:parent-style-name="186" style:family="text" style:name="T962">
      <style:text-properties/>
    </style:style>
    <style:style style:parent-style-name="714" style:family="paragraph" style:name="P112">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63">
      <style:text-properties/>
    </style:style>
    <style:style style:parent-style-name="186" style:family="text" style:name="T964">
      <style:text-properties/>
    </style:style>
    <style:style style:parent-style-name="186" style:family="text" style:name="T965">
      <style:text-properties fo:letter-spacing="-0.5pt"/>
    </style:style>
    <style:style style:parent-style-name="186" style:family="text" style:name="T966">
      <style:text-properties/>
    </style:style>
    <style:style style:parent-style-name="186" style:family="text" style:name="T967">
      <style:text-properties fo:letter-spacing="-0.45pt"/>
    </style:style>
    <style:style style:parent-style-name="186" style:family="text" style:name="T968">
      <style:text-properties fo:letter-spacing="-0.1pt"/>
    </style:style>
    <style:style style:parent-style-name="186" style:family="text" style:name="T969">
      <style:text-properties/>
    </style:style>
    <style:style style:parent-style-name="713" style:family="paragraph" style:name="P113">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970">
      <style:text-properties/>
    </style:style>
    <style:style style:parent-style-name="186" style:family="text" style:name="T971">
      <style:text-properties/>
    </style:style>
    <style:style style:parent-style-name="186" style:family="text" style:name="T972">
      <style:text-properties fo:letter-spacing="-0.1pt"/>
    </style:style>
    <style:style style:parent-style-name="186" style:family="text" style:name="T973">
      <style:text-properties/>
    </style:style>
    <style:style style:parent-style-name="714" style:family="paragraph" style:name="P114">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74">
      <style:text-properties/>
    </style:style>
    <style:style style:parent-style-name="186" style:family="text" style:name="T975">
      <style:text-properties/>
    </style:style>
    <style:style style:parent-style-name="186" style:family="text" style:name="T976">
      <style:text-properties fo:letter-spacing="-0.1pt"/>
    </style:style>
    <style:style style:parent-style-name="186" style:family="text" style:name="T977">
      <style:text-properties/>
    </style:style>
    <style:style style:parent-style-name="186" style:family="text" style:name="T978">
      <style:text-properties fo:letter-spacing="-0.1pt"/>
    </style:style>
    <style:style style:parent-style-name="186" style:family="text" style:name="T979">
      <style:text-properties/>
    </style:style>
    <style:style style:parent-style-name="186" style:family="text" style:name="T980">
      <style:text-properties fo:letter-spacing="-0.1pt"/>
    </style:style>
    <style:style style:parent-style-name="186" style:family="text" style:name="T981">
      <style:text-properties/>
    </style:style>
    <style:style style:parent-style-name="714" style:family="paragraph" style:name="P115">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82">
      <style:text-properties/>
    </style:style>
    <style:style style:parent-style-name="186" style:family="text" style:name="T983">
      <style:text-properties/>
    </style:style>
    <style:style style:parent-style-name="186" style:family="text" style:name="T984">
      <style:text-properties fo:letter-spacing="-0.1pt"/>
    </style:style>
    <style:style style:parent-style-name="186" style:family="text" style:name="T985">
      <style:text-properties fo:letter-spacing="-0.1pt"/>
    </style:style>
    <style:style style:parent-style-name="186" style:family="text" style:name="T986">
      <style:text-properties/>
    </style:style>
    <style:style style:parent-style-name="714" style:family="paragraph" style:name="P116">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87">
      <style:text-properties/>
    </style:style>
    <style:style style:parent-style-name="186" style:family="text" style:name="T988">
      <style:text-properties/>
    </style:style>
    <style:style style:parent-style-name="186" style:family="text" style:name="T989">
      <style:text-properties fo:letter-spacing="-0.35pt"/>
    </style:style>
    <style:style style:parent-style-name="186" style:family="text" style:name="T990">
      <style:text-properties/>
    </style:style>
    <style:style style:parent-style-name="186" style:family="text" style:name="T991">
      <style:text-properties fo:letter-spacing="-0.3pt"/>
    </style:style>
    <style:style style:parent-style-name="186" style:family="text" style:name="T992">
      <style:text-properties/>
    </style:style>
    <style:style style:parent-style-name="186" style:family="text" style:name="T993">
      <style:text-properties fo:letter-spacing="-0.25pt"/>
    </style:style>
    <style:style style:parent-style-name="186" style:family="text" style:name="T994">
      <style:text-properties fo:letter-spacing="-0.15pt"/>
    </style:style>
    <style:style style:parent-style-name="186" style:family="text" style:name="T995">
      <style:text-properties/>
    </style:style>
    <style:style style:parent-style-name="714" style:family="paragraph" style:name="P117">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996">
      <style:text-properties/>
    </style:style>
    <style:style style:parent-style-name="186" style:family="text" style:name="T997">
      <style:text-properties/>
    </style:style>
    <style:style style:parent-style-name="186" style:family="text" style:name="T998">
      <style:text-properties fo:letter-spacing="-0.3pt"/>
    </style:style>
    <style:style style:parent-style-name="186" style:family="text" style:name="T999">
      <style:text-properties/>
    </style:style>
    <style:style style:parent-style-name="186" style:family="text" style:name="T1000">
      <style:text-properties fo:letter-spacing="-0.25pt"/>
    </style:style>
    <style:style style:parent-style-name="186" style:family="text" style:name="T1001">
      <style:text-properties/>
    </style:style>
    <style:style style:parent-style-name="186" style:family="text" style:name="T1002">
      <style:text-properties fo:letter-spacing="-0.25pt"/>
    </style:style>
    <style:style style:parent-style-name="186" style:family="text" style:name="T1003">
      <style:text-properties/>
    </style:style>
    <style:style style:parent-style-name="186" style:family="text" style:name="T1004">
      <style:text-properties fo:letter-spacing="-0.25pt"/>
    </style:style>
    <style:style style:parent-style-name="186" style:family="text" style:name="T1005">
      <style:text-properties/>
    </style:style>
    <style:style style:parent-style-name="186" style:family="text" style:name="T1006">
      <style:text-properties fo:letter-spacing="-0.15pt"/>
    </style:style>
    <style:style style:parent-style-name="186" style:family="text" style:name="T1007">
      <style:text-properties fo:letter-spacing="-0.1pt"/>
    </style:style>
    <style:style style:parent-style-name="186" style:family="text" style:name="T1008">
      <style:text-properties/>
    </style:style>
    <style:style style:parent-style-name="713" style:family="paragraph" style:name="P118">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1009">
      <style:text-properties/>
    </style:style>
    <style:style style:parent-style-name="186" style:family="text" style:name="T1010">
      <style:text-properties/>
    </style:style>
    <style:style style:parent-style-name="186" style:family="text" style:name="T1011">
      <style:text-properties fo:letter-spacing="-0.1pt"/>
    </style:style>
    <style:style style:parent-style-name="186" style:family="text" style:name="T1012">
      <style:text-properties/>
    </style:style>
    <style:style style:parent-style-name="714" style:family="paragraph" style:name="P119">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1013">
      <style:text-properties/>
    </style:style>
    <style:style style:parent-style-name="186" style:family="text" style:name="T1014">
      <style:text-properties/>
    </style:style>
    <style:style style:parent-style-name="186" style:family="text" style:name="T1015">
      <style:text-properties fo:letter-spacing="-0.3pt"/>
    </style:style>
    <style:style style:parent-style-name="186" style:family="text" style:name="T1016">
      <style:text-properties/>
    </style:style>
    <style:style style:parent-style-name="186" style:family="text" style:name="T1017">
      <style:text-properties fo:letter-spacing="-0.15pt"/>
    </style:style>
    <style:style style:parent-style-name="186" style:family="text" style:name="T1018">
      <style:text-properties/>
    </style:style>
    <style:style style:parent-style-name="186" style:family="text" style:name="T1019">
      <style:text-properties fo:letter-spacing="-0.1pt"/>
    </style:style>
    <style:style style:parent-style-name="186" style:family="text" style:name="T1020">
      <style:text-properties/>
    </style:style>
    <style:style style:parent-style-name="186" style:family="text" style:name="T1021">
      <style:text-properties fo:letter-spacing="-0.15pt"/>
    </style:style>
    <style:style style:parent-style-name="186" style:family="text" style:name="T1022">
      <style:text-properties/>
    </style:style>
    <style:style style:parent-style-name="186" style:family="text" style:name="T1023">
      <style:text-properties fo:letter-spacing="-0.15pt"/>
    </style:style>
    <style:style style:parent-style-name="186" style:family="text" style:name="T1024">
      <style:text-properties/>
    </style:style>
    <style:style style:parent-style-name="186" style:family="text" style:name="T1025">
      <style:text-properties fo:letter-spacing="-0.1pt"/>
    </style:style>
    <style:style style:parent-style-name="186" style:family="text" style:name="T1026">
      <style:text-properties/>
    </style:style>
    <style:style style:parent-style-name="186" style:family="text" style:name="T1027">
      <style:text-properties fo:letter-spacing="-0.15pt"/>
    </style:style>
    <style:style style:parent-style-name="186" style:family="text" style:name="T1028">
      <style:text-properties/>
    </style:style>
    <style:style style:parent-style-name="186" style:family="text" style:name="T1029">
      <style:text-properties fo:letter-spacing="-0.1pt"/>
    </style:style>
    <style:style style:parent-style-name="186" style:family="text" style:name="T1030">
      <style:text-properties fo:letter-spacing="-0.1pt"/>
    </style:style>
    <style:style style:parent-style-name="186" style:family="text" style:name="T1031">
      <style:text-properties/>
    </style:style>
    <style:style style:parent-style-name="713" style:family="paragraph" style:name="P120">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bold"/>
    </style:style>
    <style:style style:parent-style-name="186" style:family="text" style:name="T1032">
      <style:text-properties/>
    </style:style>
    <style:style style:parent-style-name="186" style:family="text" style:name="T1033">
      <style:text-properties/>
    </style:style>
    <style:style style:parent-style-name="186" style:family="text" style:name="T1034">
      <style:text-properties fo:letter-spacing="-0.65pt"/>
    </style:style>
    <style:style style:parent-style-name="186" style:family="text" style:name="T1035">
      <style:text-properties/>
    </style:style>
    <style:style style:parent-style-name="186" style:family="text" style:name="T1036">
      <style:text-properties fo:letter-spacing="-0.65pt"/>
    </style:style>
    <style:style style:parent-style-name="186" style:family="text" style:name="T1037">
      <style:text-properties/>
    </style:style>
    <style:style style:parent-style-name="186" style:family="text" style:name="T1038">
      <style:text-properties fo:letter-spacing="-0.65pt"/>
    </style:style>
    <style:style style:parent-style-name="186" style:family="text" style:name="T1039">
      <style:text-properties/>
    </style:style>
    <style:style style:parent-style-name="186" style:family="text" style:name="T1040">
      <style:text-properties fo:letter-spacing="-0.65pt"/>
    </style:style>
    <style:style style:parent-style-name="186" style:family="text" style:name="T1041">
      <style:text-properties/>
    </style:style>
    <style:style style:parent-style-name="186" style:family="text" style:name="T1042">
      <style:text-properties fo:letter-spacing="-0.65pt"/>
    </style:style>
    <style:style style:parent-style-name="186" style:family="text" style:name="T1043">
      <style:text-properties/>
    </style:style>
    <style:style style:parent-style-name="186" style:family="text" style:name="T1044">
      <style:text-properties/>
    </style:style>
    <style:style style:parent-style-name="714" style:family="paragraph" style:name="P121">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1045">
      <style:text-properties/>
    </style:style>
    <style:style style:parent-style-name="186" style:family="text" style:name="T1046">
      <style:text-properties/>
    </style:style>
    <style:style style:parent-style-name="186" style:family="text" style:name="T1047">
      <style:text-properties fo:letter-spacing="-0.3pt"/>
    </style:style>
    <style:style style:parent-style-name="186" style:family="text" style:name="T1048">
      <style:text-properties/>
    </style:style>
    <style:style style:parent-style-name="186" style:family="text" style:name="T1049">
      <style:text-properties fo:letter-spacing="-0.25pt"/>
    </style:style>
    <style:style style:parent-style-name="186" style:family="text" style:name="T1050">
      <style:text-properties/>
    </style:style>
    <style:style style:parent-style-name="186" style:family="text" style:name="T1051">
      <style:text-properties fo:letter-spacing="-0.25pt"/>
    </style:style>
    <style:style style:parent-style-name="186" style:family="text" style:name="T1052">
      <style:text-properties/>
    </style:style>
    <style:style style:parent-style-name="186" style:family="text" style:name="T1053">
      <style:text-properties fo:letter-spacing="-0.15pt"/>
    </style:style>
    <style:style style:parent-style-name="186" style:family="text" style:name="T1054">
      <style:text-properties fo:letter-spacing="-0.25pt"/>
    </style:style>
    <style:style style:parent-style-name="186" style:family="text" style:name="T1055">
      <style:text-properties/>
    </style:style>
    <style:style style:parent-style-name="714" style:family="paragraph" style:name="P122">
      <style:paragraph-properties>
        <style:tab-stops>
          <style:tab-stop style:position="17.6cm" style:type="right" style:leader-type="dotted" style:leader-style="dotted"/>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186" style:family="text" style:name="T1056">
      <style:text-properties/>
    </style:style>
    <style:style style:parent-style-name="186" style:family="text" style:name="T1057">
      <style:text-properties/>
    </style:style>
    <style:style style:parent-style-name="186" style:family="text" style:name="T1058">
      <style:text-properties fo:letter-spacing="-0.5pt"/>
    </style:style>
    <style:style style:parent-style-name="186" style:family="text" style:name="T1059">
      <style:text-properties/>
    </style:style>
    <style:style style:parent-style-name="186" style:family="text" style:name="T1060">
      <style:text-properties fo:letter-spacing="-0.35pt"/>
    </style:style>
    <style:style style:parent-style-name="186" style:family="text" style:name="T1061">
      <style:text-properties/>
    </style:style>
    <style:style style:parent-style-name="186" style:family="text" style:name="T1062">
      <style:text-properties fo:letter-spacing="-0.35pt"/>
    </style:style>
    <style:style style:parent-style-name="186" style:family="text" style:name="T1063">
      <style:text-properties/>
    </style:style>
    <style:style style:parent-style-name="186" style:family="text" style:name="T1064">
      <style:text-properties fo:letter-spacing="-0.35pt"/>
    </style:style>
    <style:style style:parent-style-name="186" style:family="text" style:name="T1065">
      <style:text-properties/>
    </style:style>
    <style:style style:parent-style-name="186" style:family="text" style:name="T1066">
      <style:text-properties fo:letter-spacing="-0.35pt"/>
    </style:style>
    <style:style style:parent-style-name="186" style:family="text" style:name="T1067">
      <style:text-properties fo:letter-spacing="-0.1pt"/>
    </style:style>
    <style:style style:parent-style-name="186" style:family="text" style:name="T1068">
      <style:text-properties/>
    </style:style>
    <style:style style:family="paragraph" style:name="P123">
      <style:paragraph-properties/>
      <style:text-properties/>
    </style:style>
    <style:style style:parent-style-name="712" style:family="paragraph" style:name="P124">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709" style:master-page-name="MasterPage5" style:family="paragraph" style:name="P125">
      <style:paragraph-properties fo:text-align="center" fo:margin-left="0.3599cm" fo:margin-right="0.5574cm" fo:text-indent="0cm" fo:margin-top="3.5pt" fo:margin-bottom="0pt" fo:break-before="page"/>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family="text" style:name="T1069">
      <style:text-properties fo:letter-spacing="-0.1pt"/>
    </style:style>
    <style:style style:parent-style-name="716" style:family="paragraph" style:name="P126">
      <style:paragraph-properties fo:line-height="115%" fo:text-align="center" fo:margin-left="0.224cm" fo:margin-right="0.4216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909" style:family="text" style:name="T1070">
      <style:text-properties/>
    </style:style>
    <style:style style:parent-style-name="909" style:family="text" style:name="T1071">
      <style:text-properties/>
    </style:style>
    <style:style style:parent-style-name="909" style:family="text" style:name="T1072">
      <style:text-properties fo:color="#00006d" style:text-underline-type="single" style:text-underline-style="solid" style:text-underline-width="auto" style:text-underline-color="font-color"/>
    </style:style>
    <style:style style:family="text" style:name="T1073">
      <style:text-properties fo:color="#00006d"/>
    </style:style>
    <style:style style:parent-style-name="909" style:family="text" style:name="T1074">
      <style:text-properties/>
    </style:style>
    <style:style style:parent-style-name="909" style:family="text" style:name="T1075">
      <style:text-properties/>
    </style:style>
    <style:style style:parent-style-name="909" style:family="text" style:name="T1076">
      <style:text-properties fo:color="#00006d" style:text-underline-type="single" style:text-underline-style="solid" style:text-underline-width="auto" style:text-underline-color="font-color"/>
    </style:style>
    <style:style style:parent-style-name="909" style:family="text" style:name="T1077">
      <style:text-properties/>
    </style:style>
    <style:style style:parent-style-name="909" style:family="text" style:name="T1078">
      <style:text-properties fo:color="#00006d" fo:letter-spacing="-0.3pt" style:text-underline-type="single" style:text-underline-style="solid" style:text-underline-width="auto" style:text-underline-color="font-color"/>
    </style:style>
    <style:style style:parent-style-name="909" style:family="text" style:name="T1079">
      <style:text-properties/>
    </style:style>
    <style:style style:parent-style-name="909" style:family="text" style:name="T1080">
      <style:text-properties fo:color="#00006d" style:text-underline-type="single" style:text-underline-style="solid" style:text-underline-width="auto" style:text-underline-color="font-color"/>
    </style:style>
    <style:style style:parent-style-name="909" style:family="text" style:name="T1081">
      <style:text-properties/>
    </style:style>
    <style:style style:parent-style-name="909" style:family="text" style:name="T1082">
      <style:text-properties fo:color="#00006d" fo:letter-spacing="-0.3pt" style:text-underline-type="single" style:text-underline-style="solid" style:text-underline-width="auto" style:text-underline-color="font-color"/>
    </style:style>
    <style:style style:parent-style-name="909" style:family="text" style:name="T1083">
      <style:text-properties/>
    </style:style>
    <style:style style:parent-style-name="909" style:family="text" style:name="T1084">
      <style:text-properties fo:color="#00006d" style:text-underline-type="single" style:text-underline-style="solid" style:text-underline-width="auto" style:text-underline-color="font-color"/>
    </style:style>
    <style:style style:parent-style-name="909" style:family="text" style:name="T1085">
      <style:text-properties/>
    </style:style>
    <style:style style:parent-style-name="909" style:family="text" style:name="T1086">
      <style:text-properties fo:color="#00006d" fo:letter-spacing="-0.3pt" style:text-underline-type="single" style:text-underline-style="solid" style:text-underline-width="auto" style:text-underline-color="font-color"/>
    </style:style>
    <style:style style:parent-style-name="909" style:family="text" style:name="T1087">
      <style:text-properties/>
    </style:style>
    <style:style style:parent-style-name="909" style:family="text" style:name="T1088">
      <style:text-properties fo:color="#00006d" style:text-underline-type="single" style:text-underline-style="solid" style:text-underline-width="auto" style:text-underline-color="font-color"/>
    </style:style>
    <style:style style:parent-style-name="909" style:family="text" style:name="T1089">
      <style:text-properties/>
    </style:style>
    <style:style style:parent-style-name="909" style:family="text" style:name="T1090">
      <style:text-properties fo:color="#00006d" fo:letter-spacing="-0.3pt" style:text-underline-type="single" style:text-underline-style="solid" style:text-underline-width="auto" style:text-underline-color="font-color"/>
    </style:style>
    <style:style style:parent-style-name="909" style:family="text" style:name="T1091">
      <style:text-properties/>
    </style:style>
    <style:style style:parent-style-name="909" style:family="text" style:name="T1092">
      <style:text-properties fo:color="#00006d" style:text-underline-type="single" style:text-underline-style="solid" style:text-underline-width="auto" style:text-underline-color="font-color"/>
    </style:style>
    <style:style style:parent-style-name="909" style:family="text" style:name="T1093">
      <style:text-properties/>
    </style:style>
    <style:style style:parent-style-name="909" style:family="text" style:name="T1094">
      <style:text-properties fo:color="#00006d" fo:letter-spacing="-0.3pt" style:text-underline-type="single" style:text-underline-style="solid" style:text-underline-width="auto" style:text-underline-color="font-color"/>
    </style:style>
    <style:style style:parent-style-name="909" style:family="text" style:name="T1095">
      <style:text-properties/>
    </style:style>
    <style:style style:parent-style-name="909" style:family="text" style:name="T1096">
      <style:text-properties fo:color="#00006d" style:text-underline-type="single" style:text-underline-style="solid" style:text-underline-width="auto" style:text-underline-color="font-color"/>
    </style:style>
    <style:style style:parent-style-name="909" style:family="text" style:name="T1097">
      <style:text-properties/>
    </style:style>
    <style:style style:parent-style-name="909" style:family="text" style:name="T1098">
      <style:text-properties fo:color="#00006d" fo:letter-spacing="-0.3pt" style:text-underline-type="single" style:text-underline-style="solid" style:text-underline-width="auto" style:text-underline-color="font-color"/>
    </style:style>
    <style:style style:parent-style-name="909" style:family="text" style:name="T1099">
      <style:text-properties/>
    </style:style>
    <style:style style:parent-style-name="909" style:family="text" style:name="T1100">
      <style:text-properties fo:color="#00006d" style:text-underline-type="single" style:text-underline-style="solid" style:text-underline-width="auto" style:text-underline-color="font-color"/>
    </style:style>
    <style:style style:parent-style-name="909" style:family="text" style:name="T1101">
      <style:text-properties/>
    </style:style>
    <style:style style:parent-style-name="909" style:family="text" style:name="T1102">
      <style:text-properties fo:color="#00006d" fo:letter-spacing="-0.3pt" style:text-underline-type="single" style:text-underline-style="solid" style:text-underline-width="auto" style:text-underline-color="font-color"/>
    </style:style>
    <style:style style:parent-style-name="909" style:family="text" style:name="T1103">
      <style:text-properties/>
    </style:style>
    <style:style style:parent-style-name="909" style:family="text" style:name="T1104">
      <style:text-properties fo:color="#00006d" style:text-underline-type="single" style:text-underline-style="solid" style:text-underline-width="auto" style:text-underline-color="font-color"/>
    </style:style>
    <style:style style:parent-style-name="909" style:family="text" style:name="T1105">
      <style:text-properties/>
    </style:style>
    <style:style style:parent-style-name="909" style:family="text" style:name="T1106">
      <style:text-properties fo:color="#00006d" fo:letter-spacing="-0.3pt" style:text-underline-type="single" style:text-underline-style="solid" style:text-underline-width="auto" style:text-underline-color="font-color"/>
    </style:style>
    <style:style style:parent-style-name="909" style:family="text" style:name="T1107">
      <style:text-properties/>
    </style:style>
    <style:style style:parent-style-name="909" style:family="text" style:name="T1108">
      <style:text-properties fo:color="#00006d" style:text-underline-type="single" style:text-underline-style="solid" style:text-underline-width="auto" style:text-underline-color="font-color"/>
    </style:style>
    <style:style style:parent-style-name="716" style:family="paragraph" style:name="P127">
      <style:paragraph-properties fo:line-height="115%" fo:text-align="center" fo:margin-left="0.3599cm" fo:margin-right="0.557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109">
      <style:text-properties fo:letter-spacing="-0.15pt"/>
    </style:style>
    <style:style style:family="text" style:name="T1110">
      <style:text-properties fo:letter-spacing="-0.15pt"/>
    </style:style>
    <style:style style:family="text" style:name="T1111">
      <style:text-properties fo:letter-spacing="-0.15pt"/>
    </style:style>
    <style:style style:parent-style-name="909" style:family="text" style:name="T1112">
      <style:text-properties/>
    </style:style>
    <style:style style:parent-style-name="909" style:family="text" style:name="T1113">
      <style:text-properties/>
    </style:style>
    <style:style style:parent-style-name="909" style:family="text" style:name="T1114">
      <style:text-properties fo:color="#00006d" style:text-underline-type="single" style:text-underline-style="solid" style:text-underline-width="auto" style:text-underline-color="font-color"/>
    </style:style>
    <style:style style:parent-style-name="909" style:family="text" style:name="T1115">
      <style:text-properties/>
    </style:style>
    <style:style style:parent-style-name="909" style:family="text" style:name="T1116">
      <style:text-properties fo:color="#00006d" fo:letter-spacing="-0.15pt" style:text-underline-type="single" style:text-underline-style="solid" style:text-underline-width="auto" style:text-underline-color="font-color"/>
    </style:style>
    <style:style style:parent-style-name="909" style:family="text" style:name="T1117">
      <style:text-properties/>
    </style:style>
    <style:style style:parent-style-name="909" style:family="text" style:name="T1118">
      <style:text-properties fo:color="#00006d" style:text-underline-type="single" style:text-underline-style="solid" style:text-underline-width="auto" style:text-underline-color="font-color"/>
    </style:style>
    <style:style style:parent-style-name="909" style:family="text" style:name="T1119">
      <style:text-properties/>
    </style:style>
    <style:style style:parent-style-name="909" style:family="text" style:name="T1120">
      <style:text-properties fo:color="#00006d" fo:letter-spacing="-0.15pt" style:text-underline-type="single" style:text-underline-style="solid" style:text-underline-width="auto" style:text-underline-color="font-color"/>
    </style:style>
    <style:style style:parent-style-name="909" style:family="text" style:name="T1121">
      <style:text-properties/>
    </style:style>
    <style:style style:parent-style-name="909" style:family="text" style:name="T1122">
      <style:text-properties fo:color="#00006d" style:text-underline-type="single" style:text-underline-style="solid" style:text-underline-width="auto" style:text-underline-color="font-color"/>
    </style:style>
    <style:style style:parent-style-name="909" style:family="text" style:name="T1123">
      <style:text-properties/>
    </style:style>
    <style:style style:parent-style-name="909" style:family="text" style:name="T1124">
      <style:text-properties fo:color="#00006d" fo:letter-spacing="-0.15pt" style:text-underline-type="single" style:text-underline-style="solid" style:text-underline-width="auto" style:text-underline-color="font-color"/>
    </style:style>
    <style:style style:parent-style-name="909" style:family="text" style:name="T1125">
      <style:text-properties/>
    </style:style>
    <style:style style:parent-style-name="909" style:family="text" style:name="T1126">
      <style:text-properties fo:color="#00006d" style:text-underline-type="single" style:text-underline-style="solid" style:text-underline-width="auto" style:text-underline-color="font-color"/>
    </style:style>
    <style:style style:parent-style-name="909" style:family="text" style:name="T1127">
      <style:text-properties/>
    </style:style>
    <style:style style:parent-style-name="909" style:family="text" style:name="T1128">
      <style:text-properties fo:color="#00006d" fo:letter-spacing="-0.15pt" style:text-underline-type="single" style:text-underline-style="solid" style:text-underline-width="auto" style:text-underline-color="font-color"/>
    </style:style>
    <style:style style:parent-style-name="909" style:family="text" style:name="T1129">
      <style:text-properties/>
    </style:style>
    <style:style style:parent-style-name="909" style:family="text" style:name="T1130">
      <style:text-properties fo:color="#00006d" style:text-underline-type="single" style:text-underline-style="solid" style:text-underline-width="auto" style:text-underline-color="font-color"/>
    </style:style>
    <style:style style:parent-style-name="909" style:family="text" style:name="T1131">
      <style:text-properties/>
    </style:style>
    <style:style style:parent-style-name="909" style:family="text" style:name="T1132">
      <style:text-properties fo:color="#00006d" fo:letter-spacing="-0.15pt" style:text-underline-type="single" style:text-underline-style="solid" style:text-underline-width="auto" style:text-underline-color="font-color"/>
    </style:style>
    <style:style style:parent-style-name="909" style:family="text" style:name="T1133">
      <style:text-properties/>
    </style:style>
    <style:style style:parent-style-name="909" style:family="text" style:name="T1134">
      <style:text-properties fo:color="#00006d" style:text-underline-type="single" style:text-underline-style="solid" style:text-underline-width="auto" style:text-underline-color="font-color"/>
    </style:style>
    <style:style style:parent-style-name="909" style:family="text" style:name="T1135">
      <style:text-properties/>
    </style:style>
    <style:style style:parent-style-name="909" style:family="text" style:name="T1136">
      <style:text-properties fo:color="#00006d" fo:letter-spacing="-0.15pt" style:text-underline-type="single" style:text-underline-style="solid" style:text-underline-width="auto" style:text-underline-color="font-color"/>
    </style:style>
    <style:style style:parent-style-name="909" style:family="text" style:name="T1137">
      <style:text-properties/>
    </style:style>
    <style:style style:parent-style-name="909" style:family="text" style:name="T1138">
      <style:text-properties fo:color="#00006d" style:text-underline-type="single" style:text-underline-style="solid" style:text-underline-width="auto" style:text-underline-color="font-color"/>
    </style:style>
    <style:style style:family="text" style:name="T1139">
      <style:text-properties fo:color="#00006d" fo:letter-spacing="-0.15pt"/>
    </style:style>
    <style:style style:family="text" style:name="T1140">
      <style:text-properties fo:letter-spacing="-0.15pt"/>
    </style:style>
    <style:style style:family="text" style:name="T1141">
      <style:text-properties fo:letter-spacing="-0.15pt"/>
    </style:style>
    <style:style style:parent-style-name="909" style:family="text" style:name="T1142">
      <style:text-properties/>
    </style:style>
    <style:style style:parent-style-name="909" style:family="text" style:name="T1143">
      <style:text-properties/>
    </style:style>
    <style:style style:parent-style-name="909" style:family="text" style:name="T1144">
      <style:text-properties fo:color="#00006d" style:text-underline-type="single" style:text-underline-style="solid" style:text-underline-width="auto" style:text-underline-color="font-color"/>
    </style:style>
    <style:style style:parent-style-name="716" style:family="paragraph" style:name="P12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145">
      <style:text-properties fo:font-size="13pt"/>
    </style:style>
    <style:style style:family="text" style:name="T1146">
      <style:text-properties fo:font-size="13pt"/>
    </style:style>
    <style:style style:parent-style-name="716" style:family="paragraph" style:name="P12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147">
      <style:text-properties fo:font-size="13pt"/>
    </style:style>
    <style:style style:family="text" style:name="T1148">
      <style:text-properties fo:font-size="13pt"/>
    </style:style>
    <style:style style:parent-style-name="710" style:family="paragraph" style:name="P130">
      <style:paragraph-properties fo:text-align="center" fo:margin-left="0cm" fo:margin-right="0cm" fo:text-indent="0cm" fo:margin-top="0.05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1149">
      <style:text-properties fo:letter-spacing="-0.5pt"/>
    </style:style>
    <style:style style:family="text" style:name="T1150">
      <style:text-properties fo:letter-spacing="-0.5pt"/>
    </style:style>
    <style:style style:family="text" style:name="T1151">
      <style:text-properties fo:letter-spacing="-0.5pt"/>
    </style:style>
    <style:style style:family="text" style:name="T1152">
      <style:text-properties fo:letter-spacing="-0.5pt"/>
    </style:style>
    <style:style style:family="text" style:name="T1153">
      <style:text-properties fo:letter-spacing="-0.25pt"/>
    </style:style>
    <style:style style:parent-style-name="710" style:family="paragraph" style:name="P131">
      <style:paragraph-properties fo:text-align="center" fo:margin-left="0cm" fo:margin-right="0cm" fo:text-indent="0cm" fo:margin-top="6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1154">
      <style:text-properties fo:letter-spacing="-0.1pt"/>
    </style:style>
    <style:style style:family="text" style:name="T1155">
      <style:text-properties fo:letter-spacing="0.95pt"/>
    </style:style>
    <style:style style:family="text" style:name="T1156">
      <style:text-properties fo:letter-spacing="-0.1pt"/>
    </style:style>
    <style:style style:family="text" style:name="T1157">
      <style:text-properties fo:letter-spacing="1pt"/>
    </style:style>
    <style:style style:family="text" style:name="T1158">
      <style:text-properties fo:letter-spacing="-0.1pt"/>
    </style:style>
    <style:style style:parent-style-name="716" style:family="paragraph" style:name="P13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159">
      <style:text-properties fo:font-size="14pt" fo:font-style="italic" fo:font-weight="bold"/>
    </style:style>
    <style:style style:family="text" style:name="T1160">
      <style:text-properties fo:font-size="14pt" fo:font-style="italic" fo:font-weight="bold"/>
    </style:style>
    <style:style style:parent-style-name="716" style:family="paragraph" style:name="P133">
      <style:paragraph-properties fo:line-height="115%" fo:margin-left="0cm" fo:margin-right="0.5504cm" fo:text-indent="0cm" fo:margin-top="9.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161">
      <style:text-properties fo:letter-spacing="-0.1pt"/>
    </style:style>
    <style:style style:family="text" style:name="T1162">
      <style:text-properties fo:letter-spacing="-0.1pt"/>
    </style:style>
    <style:style style:family="text" style:name="T1163">
      <style:text-properties fo:letter-spacing="-0.1pt"/>
    </style:style>
    <style:style style:family="text" style:name="T1164">
      <style:text-properties fo:letter-spacing="-0.1pt"/>
    </style:style>
    <style:style style:family="text" style:name="T1165">
      <style:text-properties fo:letter-spacing="-0.1pt"/>
    </style:style>
    <style:style style:family="text" style:name="T1166">
      <style:text-properties fo:letter-spacing="-0.1pt"/>
    </style:style>
    <style:style style:family="text" style:name="T1167">
      <style:text-properties fo:letter-spacing="-0.1pt"/>
    </style:style>
    <style:style style:family="text" style:name="T1168">
      <style:text-properties fo:letter-spacing="-0.1pt"/>
    </style:style>
    <style:style style:family="text" style:name="T1169">
      <style:text-properties fo:letter-spacing="-0.1pt"/>
    </style:style>
    <style:style style:family="text" style:name="T1170">
      <style:text-properties fo:letter-spacing="-0.1pt"/>
    </style:style>
    <style:style style:family="text" style:name="T1171">
      <style:text-properties fo:letter-spacing="-0.1pt"/>
    </style:style>
    <style:style style:family="text" style:name="T1172">
      <style:text-properties fo:letter-spacing="-0.1pt"/>
    </style:style>
    <style:style style:family="text" style:name="T1173">
      <style:text-properties fo:letter-spacing="-0.1pt"/>
    </style:style>
    <style:style style:parent-style-name="717" style:list-style-name="WWNum2" style:family="paragraph" style:name="P134">
      <style:paragraph-properties fo:margin-left="1.561cm" fo:margin-right="0cm" fo:text-indent="-1.364cm" fo:margin-top="7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174">
      <style:text-properties fo:font-size="12pt" fo:font-weight="bold"/>
    </style:style>
    <style:style style:family="text" style:name="T1175">
      <style:text-properties fo:font-size="12pt" fo:letter-spacing="-0.1pt" fo:font-weight="bold"/>
    </style:style>
    <style:style style:family="text" style:name="T1176">
      <style:text-properties fo:font-size="12pt"/>
    </style:style>
    <style:style style:family="text" style:name="T1177">
      <style:text-properties fo:font-size="12pt" fo:letter-spacing="-0.1pt"/>
    </style:style>
    <style:style style:family="text" style:name="T1178">
      <style:text-properties fo:font-size="12pt"/>
    </style:style>
    <style:style style:family="text" style:name="T1179">
      <style:text-properties fo:font-size="12pt" fo:letter-spacing="-0.1pt"/>
    </style:style>
    <style:style style:family="text" style:name="T1180">
      <style:text-properties fo:font-size="12pt"/>
    </style:style>
    <style:style style:family="text" style:name="T1181">
      <style:text-properties fo:font-size="12pt" fo:letter-spacing="-0.1pt"/>
    </style:style>
    <style:style style:family="text" style:name="T1182">
      <style:text-properties fo:font-size="12pt"/>
    </style:style>
    <style:style style:family="text" style:name="T1183">
      <style:text-properties fo:font-size="12pt" fo:letter-spacing="-0.1pt"/>
    </style:style>
    <style:style style:family="text" style:name="T1184">
      <style:text-properties fo:font-size="12pt"/>
    </style:style>
    <style:style style:family="text" style:name="T1185">
      <style:text-properties fo:font-size="12pt" fo:letter-spacing="-0.1pt"/>
    </style:style>
    <style:style style:family="text" style:name="T1186">
      <style:text-properties fo:font-size="12pt"/>
    </style:style>
    <style:style style:family="text" style:name="T1187">
      <style:text-properties fo:font-size="12pt" fo:letter-spacing="-0.1pt"/>
    </style:style>
    <style:style style:parent-style-name="717" style:list-style-name="WWNum2" style:family="paragraph" style:name="P135">
      <style:paragraph-properties fo:line-height="115%" fo:margin-left="1.443cm" fo:margin-right="0.6738cm" fo:text-indent="-1.244cm" fo:margin-top="2.05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188">
      <style:text-properties fo:font-size="12pt" fo:font-weight="bold"/>
    </style:style>
    <style:style style:family="text" style:name="T1189">
      <style:text-properties fo:font-size="12pt" fo:letter-spacing="-0.15pt" fo:font-weight="bold"/>
    </style:style>
    <style:style style:family="text" style:name="T1190">
      <style:text-properties fo:font-size="12pt"/>
    </style:style>
    <style:style style:family="text" style:name="T1191">
      <style:text-properties fo:font-size="12pt" fo:letter-spacing="-0.15pt"/>
    </style:style>
    <style:style style:family="text" style:name="T1192">
      <style:text-properties fo:font-size="12pt"/>
    </style:style>
    <style:style style:family="text" style:name="T1193">
      <style:text-properties fo:font-size="12pt" fo:letter-spacing="-0.15pt"/>
    </style:style>
    <style:style style:family="text" style:name="T1194">
      <style:text-properties fo:font-size="12pt"/>
    </style:style>
    <style:style style:family="text" style:name="T1195">
      <style:text-properties fo:font-size="12pt" fo:letter-spacing="-0.15pt"/>
    </style:style>
    <style:style style:family="text" style:name="T1196">
      <style:text-properties fo:font-size="12pt"/>
    </style:style>
    <style:style style:family="text" style:name="T1197">
      <style:text-properties fo:font-size="12pt" fo:letter-spacing="-0.15pt"/>
    </style:style>
    <style:style style:family="text" style:name="T1198">
      <style:text-properties fo:font-size="12pt"/>
    </style:style>
    <style:style style:family="text" style:name="T1199">
      <style:text-properties fo:font-size="12pt" fo:letter-spacing="-0.15pt"/>
    </style:style>
    <style:style style:family="text" style:name="T1200">
      <style:text-properties fo:font-size="12pt"/>
    </style:style>
    <style:style style:family="text" style:name="T1201">
      <style:text-properties fo:font-size="12pt" fo:letter-spacing="-0.15pt"/>
    </style:style>
    <style:style style:family="text" style:name="T1202">
      <style:text-properties fo:font-size="12pt"/>
    </style:style>
    <style:style style:family="text" style:name="T1203">
      <style:text-properties fo:font-size="12pt" fo:letter-spacing="-0.15pt"/>
    </style:style>
    <style:style style:family="text" style:name="T1204">
      <style:text-properties fo:font-size="12pt"/>
    </style:style>
    <style:style style:family="text" style:name="T1205">
      <style:text-properties fo:font-size="12pt" fo:letter-spacing="-0.15pt"/>
    </style:style>
    <style:style style:family="text" style:name="T1206">
      <style:text-properties fo:font-size="12pt"/>
    </style:style>
    <style:style style:family="text" style:name="T1207">
      <style:text-properties fo:font-size="12pt" fo:letter-spacing="-0.15pt"/>
    </style:style>
    <style:style style:family="text" style:name="T1208">
      <style:text-properties fo:font-size="12pt"/>
    </style:style>
    <style:style style:family="text" style:name="T1209">
      <style:text-properties fo:font-size="12pt" fo:letter-spacing="-0.15pt"/>
    </style:style>
    <style:style style:family="text" style:name="T1210">
      <style:text-properties fo:font-size="12pt"/>
    </style:style>
    <style:style style:family="text" style:name="T1211">
      <style:text-properties fo:font-size="12pt" fo:letter-spacing="-0.1pt"/>
    </style:style>
    <style:style style:parent-style-name="717" style:list-style-name="WWNum2" style:family="paragraph" style:name="P136">
      <style:paragraph-properties fo:margin-left="1.561cm" fo:margin-right="0cm" fo:text-indent="-1.364cm">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212">
      <style:text-properties fo:font-size="12pt" fo:font-weight="bold"/>
    </style:style>
    <style:style style:family="text" style:name="T1213">
      <style:text-properties fo:font-size="12pt"/>
    </style:style>
    <style:style style:family="text" style:name="T1214">
      <style:text-properties fo:font-size="12pt" fo:letter-spacing="-0.1pt"/>
    </style:style>
    <style:style style:parent-style-name="716" style:family="paragraph" style:name="P13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15">
      <style:text-properties fo:font-size="13pt"/>
    </style:style>
    <style:style style:family="text" style:name="T1216">
      <style:text-properties fo:font-size="13pt"/>
    </style:style>
    <style:style style:parent-style-name="716" style:family="paragraph" style:name="P138">
      <style:paragraph-properties fo:margin-left="0cm" fo:margin-right="0cm" fo:text-indent="0cm" fo:margin-top="0.3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17">
      <style:text-properties fo:font-size="14.5pt"/>
    </style:style>
    <style:style style:family="text" style:name="T1218">
      <style:text-properties fo:font-size="14.5pt"/>
    </style:style>
    <style:style style:parent-style-name="716" style:family="paragraph" style:name="P139">
      <style:paragraph-properties fo:text-align="center" fo:margin-left="0.3599cm" fo:margin-right="0.557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19">
      <style:text-properties fo:letter-spacing="-0.1pt"/>
    </style:style>
    <style:style style:family="text" style:name="T1220">
      <style:text-properties fo:letter-spacing="-0.1pt"/>
    </style:style>
    <style:style style:family="text" style:name="T1221">
      <style:text-properties fo:letter-spacing="-0.1pt"/>
    </style:style>
    <style:style style:family="text" style:name="T1222">
      <style:text-properties fo:letter-spacing="-0.1pt"/>
    </style:style>
    <style:style style:family="text" style:name="T1223">
      <style:text-properties fo:letter-spacing="-0.1pt"/>
    </style:style>
    <style:style style:family="text" style:name="T1224">
      <style:text-properties fo:letter-spacing="-0.1pt"/>
    </style:style>
    <style:style style:family="text" style:name="T1225">
      <style:text-properties fo:letter-spacing="-0.1pt"/>
    </style:style>
    <style:style style:family="text" style:name="T1226">
      <style:text-properties fo:letter-spacing="-0.1pt"/>
    </style:style>
    <style:style style:family="text" style:name="T1227">
      <style:text-properties fo:letter-spacing="-0.1pt"/>
    </style:style>
    <style:style style:parent-style-name="909" style:family="text" style:name="T1228">
      <style:text-properties/>
    </style:style>
    <style:style style:parent-style-name="909" style:family="text" style:name="T1229">
      <style:text-properties/>
    </style:style>
    <style:style style:parent-style-name="909" style:family="text" style:name="T1230">
      <style:text-properties fo:color="#00006d" style:text-underline-type="single" style:text-underline-style="solid" style:text-underline-width="auto" style:text-underline-color="font-color"/>
    </style:style>
    <style:style style:parent-style-name="909" style:family="text" style:name="T1231">
      <style:text-properties/>
    </style:style>
    <style:style style:parent-style-name="909" style:family="text" style:name="T1232">
      <style:text-properties fo:color="#00006d" fo:letter-spacing="-0.1pt" style:text-underline-type="single" style:text-underline-style="solid" style:text-underline-width="auto" style:text-underline-color="font-color"/>
    </style:style>
    <style:style style:parent-style-name="707" style:master-page-name="MasterPage6" style:family="paragraph" style:name="P140">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1233">
      <style:text-properties fo:letter-spacing="-0.1pt"/>
    </style:style>
    <style:style style:parent-style-name="716" style:family="paragraph" style:name="P141">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34">
      <style:text-properties fo:font-size="17pt" fo:font-weight="bold"/>
    </style:style>
    <style:style style:family="text" style:name="T1235">
      <style:text-properties fo:font-size="17pt" fo:font-weight="bold"/>
    </style:style>
    <style:style style:parent-style-name="716" style:family="paragraph" style:name="P142">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36">
      <style:text-properties fo:letter-spacing="-0.15pt"/>
    </style:style>
    <style:style style:family="text" style:name="T1237">
      <style:text-properties fo:letter-spacing="-0.15pt"/>
    </style:style>
    <style:style style:family="text" style:name="T1238">
      <style:text-properties fo:letter-spacing="-0.15pt"/>
    </style:style>
    <style:style style:family="text" style:name="T1239">
      <style:text-properties fo:letter-spacing="-0.15pt"/>
    </style:style>
    <style:style style:family="text" style:name="T1240">
      <style:text-properties fo:letter-spacing="-0.15pt"/>
    </style:style>
    <style:style style:family="text" style:name="T1241">
      <style:text-properties fo:letter-spacing="-0.15pt"/>
    </style:style>
    <style:style style:family="text" style:name="T1242">
      <style:text-properties fo:letter-spacing="-0.15pt"/>
    </style:style>
    <style:style style:family="text" style:name="T1243">
      <style:text-properties fo:letter-spacing="-0.15pt"/>
    </style:style>
    <style:style style:family="text" style:name="T1244">
      <style:text-properties fo:letter-spacing="-0.15pt"/>
    </style:style>
    <style:style style:family="text" style:name="T1245">
      <style:text-properties fo:letter-spacing="-0.15pt"/>
    </style:style>
    <style:style style:parent-style-name="716" style:family="paragraph" style:name="P14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44">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46">
      <style:text-properties fo:letter-spacing="-0.15pt"/>
    </style:style>
    <style:style style:family="text" style:name="T1247">
      <style:text-properties fo:letter-spacing="-0.15pt"/>
    </style:style>
    <style:style style:family="text" style:name="T1248">
      <style:text-properties fo:letter-spacing="-0.15pt"/>
    </style:style>
    <style:style style:family="text" style:name="T1249">
      <style:text-properties fo:letter-spacing="-0.15pt"/>
    </style:style>
    <style:style style:family="text" style:name="T1250">
      <style:text-properties fo:letter-spacing="-0.15pt"/>
    </style:style>
    <style:style style:family="text" style:name="T1251">
      <style:text-properties fo:letter-spacing="-0.15pt"/>
    </style:style>
    <style:style style:family="text" style:name="T1252">
      <style:text-properties fo:letter-spacing="-0.15pt"/>
    </style:style>
    <style:style style:family="text" style:name="T1253">
      <style:text-properties fo:letter-spacing="-0.15pt"/>
    </style:style>
    <style:style style:family="text" style:name="T1254">
      <style:text-properties fo:letter-spacing="-0.15pt"/>
    </style:style>
    <style:style style:family="text" style:name="T1255">
      <style:text-properties fo:letter-spacing="-0.15pt"/>
    </style:style>
    <style:style style:family="text" style:name="T1256">
      <style:text-properties fo:letter-spacing="-0.15pt"/>
    </style:style>
    <style:style style:family="text" style:name="T1257">
      <style:text-properties fo:letter-spacing="-0.15pt"/>
    </style:style>
    <style:style style:parent-style-name="716" style:family="paragraph" style:name="P14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58">
      <style:text-properties fo:font-size="13pt"/>
    </style:style>
    <style:style style:family="text" style:name="T1259">
      <style:text-properties fo:font-size="13pt"/>
    </style:style>
    <style:style style:parent-style-name="708" style:family="paragraph" style:name="P146">
      <style:paragraph-properties fo:margin-top="8.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260">
      <style:text-properties fo:letter-spacing="-0.3pt"/>
    </style:style>
    <style:style style:family="text" style:name="T1261">
      <style:text-properties fo:letter-spacing="-0.25pt"/>
    </style:style>
    <style:style style:family="text" style:name="T1262">
      <style:text-properties fo:letter-spacing="-0.25pt"/>
    </style:style>
    <style:style style:family="text" style:name="T1263">
      <style:text-properties fo:letter-spacing="-0.25pt"/>
    </style:style>
    <style:style style:family="text" style:name="T1264">
      <style:text-properties fo:letter-spacing="-0.1pt"/>
    </style:style>
    <style:style style:parent-style-name="716" style:family="paragraph" style:name="P147">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65">
      <style:text-properties fo:font-size="17pt" fo:font-weight="bold"/>
    </style:style>
    <style:style style:family="text" style:name="T1266">
      <style:text-properties fo:font-size="17pt" fo:font-weight="bold"/>
    </style:style>
    <style:style style:parent-style-name="716" style:family="paragraph" style:name="P14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67">
      <style:text-properties fo:letter-spacing="-0.25pt"/>
    </style:style>
    <style:style style:family="text" style:name="T1268">
      <style:text-properties fo:letter-spacing="-0.25pt"/>
    </style:style>
    <style:style style:family="text" style:name="T1269">
      <style:text-properties fo:letter-spacing="-0.25pt"/>
    </style:style>
    <style:style style:family="text" style:name="T1270">
      <style:text-properties fo:letter-spacing="-0.25pt"/>
    </style:style>
    <style:style style:family="text" style:name="T1271">
      <style:text-properties fo:letter-spacing="-0.25pt"/>
    </style:style>
    <style:style style:family="text" style:name="T1272">
      <style:text-properties fo:letter-spacing="-0.25pt"/>
    </style:style>
    <style:style style:family="text" style:name="T1273">
      <style:text-properties fo:letter-spacing="-0.25pt"/>
    </style:style>
    <style:style style:family="text" style:name="T1274">
      <style:text-properties fo:letter-spacing="-0.25pt"/>
    </style:style>
    <style:style style:parent-style-name="716" style:family="paragraph" style:name="P14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50">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75">
      <style:text-properties fo:letter-spacing="-0.1pt"/>
    </style:style>
    <style:style style:parent-style-name="716" style:family="paragraph" style:name="P15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52">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76">
      <style:text-properties fo:letter-spacing="-0.1pt"/>
    </style:style>
    <style:style style:family="text" style:name="T1277">
      <style:text-properties fo:letter-spacing="-0.1pt"/>
    </style:style>
    <style:style style:family="text" style:name="T1278">
      <style:text-properties fo:letter-spacing="-0.1pt"/>
    </style:style>
    <style:style style:family="text" style:name="T1279">
      <style:text-properties fo:letter-spacing="-0.1pt"/>
    </style:style>
    <style:style style:family="text" style:name="T1280">
      <style:text-properties fo:letter-spacing="-0.1pt"/>
    </style:style>
    <style:style style:family="text" style:name="T1281">
      <style:text-properties fo:letter-spacing="-0.1pt"/>
    </style:style>
    <style:style style:family="text" style:name="T1282">
      <style:text-properties fo:letter-spacing="-0.1pt"/>
    </style:style>
    <style:style style:family="text" style:name="T1283">
      <style:text-properties fo:letter-spacing="-0.1pt"/>
    </style:style>
    <style:style style:family="text" style:name="T1284">
      <style:text-properties fo:letter-spacing="-0.1pt"/>
    </style:style>
    <style:style style:family="text" style:name="T1285">
      <style:text-properties fo:letter-spacing="-0.1pt"/>
    </style:style>
    <style:style style:family="text" style:name="T1286">
      <style:text-properties fo:letter-spacing="-0.1pt"/>
    </style:style>
    <style:style style:family="text" style:name="T1287">
      <style:text-properties fo:letter-spacing="-0.1pt"/>
    </style:style>
    <style:style style:family="text" style:name="T1288">
      <style:text-properties fo:letter-spacing="-0.1pt"/>
    </style:style>
    <style:style style:family="text" style:name="T1289">
      <style:text-properties fo:letter-spacing="-0.1pt"/>
    </style:style>
    <style:style style:parent-style-name="716" style:family="paragraph" style:name="P15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5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290">
      <style:text-properties fo:letter-spacing="-0.1pt"/>
    </style:style>
    <style:style style:family="text" style:name="T1291">
      <style:text-properties fo:letter-spacing="-0.1pt"/>
    </style:style>
    <style:style style:family="text" style:name="T1292">
      <style:text-properties fo:letter-spacing="-0.1pt"/>
    </style:style>
    <style:style style:family="text" style:name="T1293">
      <style:text-properties fo:letter-spacing="-0.1pt"/>
    </style:style>
    <style:style style:family="text" style:name="T1294">
      <style:text-properties fo:letter-spacing="-0.1pt"/>
    </style:style>
    <style:style style:family="text" style:name="T1295">
      <style:text-properties fo:letter-spacing="-0.1pt"/>
    </style:style>
    <style:style style:family="text" style:name="T1296">
      <style:text-properties fo:letter-spacing="-0.1pt"/>
    </style:style>
    <style:style style:family="text" style:name="T1297">
      <style:text-properties fo:letter-spacing="-0.1pt"/>
    </style:style>
    <style:style style:family="text" style:name="T1298">
      <style:text-properties fo:letter-spacing="-0.1pt"/>
    </style:style>
    <style:style style:family="text" style:name="T1299">
      <style:text-properties fo:letter-spacing="-0.1pt"/>
    </style:style>
    <style:style style:family="text" style:name="T1300">
      <style:text-properties fo:letter-spacing="-0.1pt"/>
    </style:style>
    <style:style style:family="text" style:name="T1301">
      <style:text-properties fo:letter-spacing="-0.1pt"/>
    </style:style>
    <style:style style:family="text" style:name="T1302">
      <style:text-properties fo:letter-spacing="-0.1pt"/>
    </style:style>
    <style:style style:family="text" style:name="T1303">
      <style:text-properties fo:letter-spacing="-0.1pt"/>
    </style:style>
    <style:style style:family="text" style:name="T1304">
      <style:text-properties fo:letter-spacing="-0.1pt"/>
    </style:style>
    <style:style style:family="text" style:name="T1305">
      <style:text-properties fo:letter-spacing="-0.1pt"/>
    </style:style>
    <style:style style:family="text" style:name="T1306">
      <style:text-properties/>
    </style:style>
    <style:style style:family="text" style:name="T1307">
      <style:text-properties fo:letter-spacing="-0.1pt"/>
    </style:style>
    <style:style style:family="text" style:name="T1308">
      <style:text-properties fo:letter-spacing="-0.1pt"/>
    </style:style>
    <style:style style:family="text" style:name="T1309">
      <style:text-properties fo:letter-spacing="-0.1pt"/>
    </style:style>
    <style:style style:parent-style-name="716" style:family="paragraph" style:name="P15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56">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10">
      <style:text-properties fo:letter-spacing="-0.1pt"/>
    </style:style>
    <style:style style:parent-style-name="712" style:master-page-name="MasterPage7" style:family="paragraph" style:name="P157">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311">
      <style:text-properties fo:color="#999999" fo:font-size="12pt" fo:font-style="italic"/>
    </style:style>
    <style:style style:family="text" style:name="T1312">
      <style:text-properties fo:color="#999999" fo:font-size="12pt" fo:font-style="italic"/>
    </style:style>
    <style:style style:family="text" style:name="T1313">
      <style:text-properties fo:color="#999999" fo:font-size="12pt" fo:letter-spacing="-0.1pt" fo:font-style="italic"/>
    </style:style>
    <style:style style:parent-style-name="716" style:family="paragraph" style:name="P158">
      <style:paragraph-properties fo:margin-left="0cm" fo:margin-right="0cm" fo:text-indent="0cm" fo:margin-top="0.3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Graphics" style:family="graphic" style:name="gr3">
      <style:graphic-properties draw:image-opacity="100%" style:repeat="stretch" fo:margin-left="0cm" fo:margin-right="0cm" fo:margin-top="0cm" fo:margin-bottom="0cm" style:horizontal-pos="from-left" style:horizontal-rel="page" style:vertical-pos="from-top" style:vertical-rel="paragraph" fo:background-color="transparent"/>
    </style:style>
    <style:style style:parent-style-name="712" style:master-page-name="MasterPage8" style:family="paragraph" style:name="P159">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314">
      <style:text-properties fo:font-size="14pt" fo:font-weight="bold"/>
    </style:style>
    <style:style style:family="text" style:name="T1315">
      <style:text-properties fo:font-size="14pt" fo:letter-spacing="-0.3pt" fo:font-weight="bold"/>
    </style:style>
    <style:style style:family="text" style:name="T1316">
      <style:text-properties fo:font-size="14pt" fo:letter-spacing="-0.1pt" fo:font-weight="bold"/>
    </style:style>
    <style:style style:parent-style-name="716" style:family="paragraph" style:name="P16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17">
      <style:text-properties fo:font-size="15pt" fo:font-weight="bold"/>
    </style:style>
    <style:style style:family="text" style:name="T1318">
      <style:text-properties fo:font-size="15pt" fo:font-weight="bold"/>
    </style:style>
    <style:style style:parent-style-name="716" style:family="paragraph" style:name="P161">
      <style:paragraph-properties fo:line-height="115%" fo:margin-left="0cm" fo:margin-right="0.5504cm" fo:text-indent="0cm" fo:margin-top="11.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19">
      <style:text-properties fo:letter-spacing="-0.1pt"/>
    </style:style>
    <style:style style:family="text" style:name="T1320">
      <style:text-properties fo:letter-spacing="-0.1pt"/>
    </style:style>
    <style:style style:family="text" style:name="T1321">
      <style:text-properties fo:letter-spacing="-0.1pt"/>
    </style:style>
    <style:style style:family="text" style:name="T1322">
      <style:text-properties fo:letter-spacing="-0.1pt"/>
    </style:style>
    <style:style style:family="text" style:name="T1323">
      <style:text-properties fo:letter-spacing="-0.1pt"/>
    </style:style>
    <style:style style:family="text" style:name="T1324">
      <style:text-properties fo:letter-spacing="-0.1pt"/>
    </style:style>
    <style:style style:family="text" style:name="T1325">
      <style:text-properties fo:letter-spacing="-0.1pt"/>
    </style:style>
    <style:style style:family="text" style:name="T1326">
      <style:text-properties fo:letter-spacing="-0.1pt"/>
    </style:style>
    <style:style style:family="text" style:name="T1327">
      <style:text-properties fo:letter-spacing="-0.1pt"/>
    </style:style>
    <style:style style:family="text" style:name="T1328">
      <style:text-properties fo:letter-spacing="-0.1pt"/>
    </style:style>
    <style:style style:family="text" style:name="T1329">
      <style:text-properties fo:letter-spacing="-0.1pt"/>
    </style:style>
    <style:style style:family="text" style:name="T1330">
      <style:text-properties fo:letter-spacing="-0.1pt"/>
    </style:style>
    <style:style style:family="text" style:name="T1331">
      <style:text-properties fo:letter-spacing="-0.1pt"/>
    </style:style>
    <style:style style:family="text" style:name="T1332">
      <style:text-properties fo:letter-spacing="-0.1pt"/>
    </style:style>
    <style:style style:family="text" style:name="T1333">
      <style:text-properties fo:letter-spacing="-0.1pt"/>
    </style:style>
    <style:style style:parent-style-name="716" style:family="paragraph" style:name="P162">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34">
      <style:text-properties fo:letter-spacing="-0.1pt"/>
    </style:style>
    <style:style style:family="text" style:name="T1335">
      <style:text-properties fo:letter-spacing="-0.1pt"/>
    </style:style>
    <style:style style:family="text" style:name="T1336">
      <style:text-properties fo:letter-spacing="-0.1pt"/>
    </style:style>
    <style:style style:family="text" style:name="T1337">
      <style:text-properties fo:letter-spacing="-0.1pt"/>
    </style:style>
    <style:style style:family="text" style:name="T1338">
      <style:text-properties fo:letter-spacing="-0.1pt"/>
    </style:style>
    <style:style style:family="text" style:name="T1339">
      <style:text-properties fo:letter-spacing="-0.1pt"/>
    </style:style>
    <style:style style:family="text" style:name="T1340">
      <style:text-properties fo:letter-spacing="-0.1pt"/>
    </style:style>
    <style:style style:family="text" style:name="T1341">
      <style:text-properties fo:letter-spacing="-0.1pt"/>
    </style:style>
    <style:style style:family="text" style:name="T1342">
      <style:text-properties fo:letter-spacing="-0.1pt"/>
    </style:style>
    <style:style style:family="text" style:name="T1343">
      <style:text-properties fo:letter-spacing="-0.1pt"/>
    </style:style>
    <style:style style:family="text" style:name="T1344">
      <style:text-properties fo:letter-spacing="-0.1pt"/>
    </style:style>
    <style:style style:family="text" style:name="T1345">
      <style:text-properties fo:letter-spacing="-0.1pt"/>
    </style:style>
    <style:style style:family="text" style:name="T1346">
      <style:text-properties fo:letter-spacing="-0.1pt"/>
    </style:style>
    <style:style style:family="text" style:name="T1347">
      <style:text-properties fo:letter-spacing="-0.1pt"/>
    </style:style>
    <style:style style:family="text" style:name="T1348">
      <style:text-properties fo:letter-spacing="-0.1pt"/>
    </style:style>
    <style:style style:family="text" style:name="T1349">
      <style:text-properties fo:letter-spacing="-0.1pt"/>
    </style:style>
    <style:style style:family="text" style:name="T1350">
      <style:text-properties fo:letter-spacing="-0.1pt"/>
    </style:style>
    <style:style style:parent-style-name="716" style:family="paragraph" style:name="P163">
      <style:paragraph-properties fo:line-height="115%" fo:margin-left="0cm" fo:margin-right="0.4498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51">
      <style:text-properties fo:letter-spacing="-0.1pt"/>
    </style:style>
    <style:style style:family="text" style:name="T1352">
      <style:text-properties fo:letter-spacing="-0.1pt"/>
    </style:style>
    <style:style style:family="text" style:name="T1353">
      <style:text-properties fo:letter-spacing="-0.1pt"/>
    </style:style>
    <style:style style:family="text" style:name="T1354">
      <style:text-properties fo:letter-spacing="-0.1pt"/>
    </style:style>
    <style:style style:family="text" style:name="T1355">
      <style:text-properties fo:letter-spacing="-0.1pt"/>
    </style:style>
    <style:style style:family="text" style:name="T1356">
      <style:text-properties fo:letter-spacing="-0.1pt"/>
    </style:style>
    <style:style style:family="text" style:name="T1357">
      <style:text-properties fo:letter-spacing="-0.1pt"/>
    </style:style>
    <style:style style:family="text" style:name="T1358">
      <style:text-properties fo:letter-spacing="-0.1pt"/>
    </style:style>
    <style:style style:family="text" style:name="T1359">
      <style:text-properties fo:letter-spacing="-0.1pt"/>
    </style:style>
    <style:style style:family="text" style:name="T1360">
      <style:text-properties fo:letter-spacing="-0.1pt"/>
    </style:style>
    <style:style style:family="text" style:name="T1361">
      <style:text-properties fo:letter-spacing="-0.1pt"/>
    </style:style>
    <style:style style:family="text" style:name="T1362">
      <style:text-properties fo:letter-spacing="-0.1pt"/>
    </style:style>
    <style:style style:family="text" style:name="T1363">
      <style:text-properties fo:letter-spacing="-0.1pt"/>
    </style:style>
    <style:style style:family="text" style:name="T1364">
      <style:text-properties fo:letter-spacing="-0.1pt"/>
    </style:style>
    <style:style style:family="text" style:name="T1365">
      <style:text-properties fo:letter-spacing="-0.1pt"/>
    </style:style>
    <style:style style:family="text" style:name="T1366">
      <style:text-properties fo:letter-spacing="-0.1pt"/>
    </style:style>
    <style:style style:family="text" style:name="T1367">
      <style:text-properties fo:letter-spacing="-0.1pt"/>
    </style:style>
    <style:style style:parent-style-name="716" style:family="paragraph" style:name="P164">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68">
      <style:text-properties fo:letter-spacing="-0.1pt"/>
    </style:style>
    <style:style style:parent-style-name="716" style:family="paragraph" style:name="P16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69">
      <style:text-properties fo:font-size="13pt"/>
    </style:style>
    <style:style style:family="text" style:name="T1370">
      <style:text-properties fo:font-size="13pt"/>
    </style:style>
    <style:style style:parent-style-name="716" style:family="paragraph" style:name="P166">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71">
      <style:text-properties fo:font-size="17pt"/>
    </style:style>
    <style:style style:family="text" style:name="T1372">
      <style:text-properties fo:font-size="17pt"/>
    </style:style>
    <style:style style:parent-style-name="712" style:family="paragraph" style:name="P167">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373">
      <style:text-properties fo:font-size="14pt" fo:font-weight="bold"/>
    </style:style>
    <style:style style:family="text" style:name="T1374">
      <style:text-properties fo:font-size="14pt" fo:letter-spacing="-0.15pt" fo:font-weight="bold"/>
    </style:style>
    <style:style style:family="text" style:name="T1375">
      <style:text-properties fo:font-size="14pt" fo:font-weight="bold"/>
    </style:style>
    <style:style style:family="text" style:name="T1376">
      <style:text-properties fo:font-size="14pt" fo:letter-spacing="-0.15pt" fo:font-weight="bold"/>
    </style:style>
    <style:style style:family="text" style:name="T1377">
      <style:text-properties fo:font-size="14pt" fo:letter-spacing="-0.1pt" fo:font-weight="bold"/>
    </style:style>
    <style:style style:parent-style-name="716" style:family="paragraph" style:name="P168">
      <style:paragraph-properties fo:margin-left="0cm" fo:margin-right="0.5204cm" fo:text-indent="0cm" fo:margin-top="9.4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78">
      <style:text-properties fo:letter-spacing="-0.1pt"/>
    </style:style>
    <style:style style:family="text" style:name="T1379">
      <style:text-properties fo:letter-spacing="-0.1pt"/>
    </style:style>
    <style:style style:family="text" style:name="T1380">
      <style:text-properties fo:letter-spacing="-0.1pt"/>
    </style:style>
    <style:style style:family="text" style:name="T1381">
      <style:text-properties fo:letter-spacing="-0.1pt"/>
    </style:style>
    <style:style style:family="text" style:name="T1382">
      <style:text-properties fo:letter-spacing="-0.1pt"/>
    </style:style>
    <style:style style:family="text" style:name="T1383">
      <style:text-properties fo:letter-spacing="-0.1pt"/>
    </style:style>
    <style:style style:family="text" style:name="T1384">
      <style:text-properties fo:letter-spacing="-0.1pt"/>
    </style:style>
    <style:style style:family="text" style:name="T1385">
      <style:text-properties fo:letter-spacing="-0.1pt"/>
    </style:style>
    <style:style style:family="text" style:name="T1386">
      <style:text-properties fo:letter-spacing="-0.1pt"/>
    </style:style>
    <style:style style:family="text" style:name="T1387">
      <style:text-properties fo:letter-spacing="-0.1pt"/>
    </style:style>
    <style:style style:family="text" style:name="T1388">
      <style:text-properties fo:letter-spacing="-0.1pt"/>
    </style:style>
    <style:style style:family="text" style:name="T1389">
      <style:text-properties fo:letter-spacing="-0.1pt"/>
    </style:style>
    <style:style style:family="text" style:name="T1390">
      <style:text-properties fo:letter-spacing="-0.1pt"/>
    </style:style>
    <style:style style:family="text" style:name="T1391">
      <style:text-properties fo:letter-spacing="-0.1pt"/>
    </style:style>
    <style:style style:parent-style-name="716" style:family="paragraph" style:name="P16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70">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392">
      <style:text-properties fo:letter-spacing="-0.15pt"/>
    </style:style>
    <style:style style:family="text" style:name="T1393">
      <style:text-properties fo:letter-spacing="-0.15pt"/>
    </style:style>
    <style:style style:family="text" style:name="T1394">
      <style:text-properties fo:letter-spacing="-0.15pt"/>
    </style:style>
    <style:style style:family="text" style:name="T1395">
      <style:text-properties fo:letter-spacing="-0.15pt"/>
    </style:style>
    <style:style style:family="text" style:name="T1396">
      <style:text-properties fo:letter-spacing="-0.15pt"/>
    </style:style>
    <style:style style:family="text" style:name="T1397">
      <style:text-properties fo:letter-spacing="-0.15pt"/>
    </style:style>
    <style:style style:family="text" style:name="T1398">
      <style:text-properties fo:letter-spacing="-0.15pt"/>
    </style:style>
    <style:style style:family="text" style:name="T1399">
      <style:text-properties fo:letter-spacing="-0.15pt"/>
    </style:style>
    <style:style style:family="text" style:name="T1400">
      <style:text-properties fo:letter-spacing="-0.15pt"/>
    </style:style>
    <style:style style:family="text" style:name="T1401">
      <style:text-properties fo:letter-spacing="-0.15pt"/>
    </style:style>
    <style:style style:family="text" style:name="T1402">
      <style:text-properties fo:letter-spacing="-0.15pt"/>
    </style:style>
    <style:style style:family="text" style:name="T1403">
      <style:text-properties fo:letter-spacing="-0.15pt"/>
    </style:style>
    <style:style style:family="text" style:name="T1404">
      <style:text-properties fo:letter-spacing="-0.1pt"/>
    </style:style>
    <style:style style:parent-style-name="716" style:family="paragraph" style:name="P17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2" style:family="paragraph" style:name="P172">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405">
      <style:text-properties fo:font-size="14pt" fo:font-weight="bold"/>
    </style:style>
    <style:style style:family="text" style:name="T1406">
      <style:text-properties fo:font-size="14pt" fo:letter-spacing="-0.15pt" fo:font-weight="bold"/>
    </style:style>
    <style:style style:family="text" style:name="T1407">
      <style:text-properties fo:font-size="14pt" fo:font-weight="bold"/>
    </style:style>
    <style:style style:family="text" style:name="T1408">
      <style:text-properties fo:font-size="14pt" fo:letter-spacing="-0.15pt" fo:font-weight="bold"/>
    </style:style>
    <style:style style:family="text" style:name="T1409">
      <style:text-properties fo:font-size="14pt" fo:letter-spacing="-0.1pt" fo:font-weight="bold"/>
    </style:style>
    <style:style style:parent-style-name="716" style:family="paragraph" style:name="P17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10">
      <style:text-properties fo:font-weight="bold"/>
    </style:style>
    <style:style style:family="text" style:name="T1411">
      <style:text-properties fo:font-weight="bold"/>
    </style:style>
    <style:style style:parent-style-name="716" style:family="paragraph" style:name="P17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12">
      <style:text-properties fo:letter-spacing="-0.15pt"/>
    </style:style>
    <style:style style:family="text" style:name="T1413">
      <style:text-properties fo:letter-spacing="-0.15pt"/>
    </style:style>
    <style:style style:family="text" style:name="T1414">
      <style:text-properties fo:letter-spacing="-0.15pt"/>
    </style:style>
    <style:style style:family="text" style:name="T1415">
      <style:text-properties fo:letter-spacing="-0.15pt"/>
    </style:style>
    <style:style style:family="text" style:name="T1416">
      <style:text-properties fo:letter-spacing="-0.15pt"/>
    </style:style>
    <style:style style:family="text" style:name="T1417">
      <style:text-properties fo:letter-spacing="-0.15pt"/>
    </style:style>
    <style:style style:family="text" style:name="T1418">
      <style:text-properties fo:letter-spacing="-0.15pt"/>
    </style:style>
    <style:style style:family="text" style:name="T1419">
      <style:text-properties fo:letter-spacing="-0.15pt"/>
    </style:style>
    <style:style style:family="text" style:name="T1420">
      <style:text-properties fo:letter-spacing="-0.15pt"/>
    </style:style>
    <style:style style:family="text" style:name="T1421">
      <style:text-properties fo:letter-spacing="-0.15pt"/>
    </style:style>
    <style:style style:parent-style-name="716" style:family="paragraph" style:name="P17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76">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22">
      <style:text-properties fo:letter-spacing="-0.15pt"/>
    </style:style>
    <style:style style:family="text" style:name="T1423">
      <style:text-properties fo:letter-spacing="-0.15pt"/>
    </style:style>
    <style:style style:family="text" style:name="T1424">
      <style:text-properties fo:letter-spacing="-0.15pt"/>
    </style:style>
    <style:style style:family="text" style:name="T1425">
      <style:text-properties fo:letter-spacing="-0.15pt"/>
    </style:style>
    <style:style style:family="text" style:name="T1426">
      <style:text-properties fo:letter-spacing="-0.15pt"/>
    </style:style>
    <style:style style:family="text" style:name="T1427">
      <style:text-properties fo:letter-spacing="-0.15pt"/>
    </style:style>
    <style:style style:family="text" style:name="T1428">
      <style:text-properties fo:letter-spacing="-0.15pt"/>
    </style:style>
    <style:style style:family="text" style:name="T1429">
      <style:text-properties fo:letter-spacing="-0.15pt"/>
    </style:style>
    <style:style style:family="text" style:name="T1430">
      <style:text-properties fo:letter-spacing="-0.15pt"/>
    </style:style>
    <style:style style:family="text" style:name="T1431">
      <style:text-properties fo:letter-spacing="-0.15pt"/>
    </style:style>
    <style:style style:family="text" style:name="T1432">
      <style:text-properties fo:letter-spacing="-0.15pt"/>
    </style:style>
    <style:style style:family="text" style:name="T1433">
      <style:text-properties fo:letter-spacing="-0.15pt"/>
    </style:style>
    <style:style style:family="text" style:name="T1434">
      <style:text-properties fo:letter-spacing="-0.1pt"/>
    </style:style>
    <style:style style:parent-style-name="708" style:master-page-name="MasterPage9" style:family="paragraph" style:name="P177">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435">
      <style:text-properties fo:letter-spacing="-0.1pt"/>
    </style:style>
    <style:style style:family="text" style:name="T1436">
      <style:text-properties fo:letter-spacing="-0.1pt"/>
    </style:style>
    <style:style style:family="text" style:name="T1437">
      <style:text-properties fo:letter-spacing="-0.1pt"/>
    </style:style>
    <style:style style:family="text" style:name="T1438">
      <style:text-properties fo:letter-spacing="-0.1pt"/>
    </style:style>
    <style:style style:parent-style-name="716" style:family="paragraph" style:name="P178">
      <style:paragraph-properties fo:margin-left="0cm" fo:margin-right="0cm" fo:text-indent="0cm" fo:margin-top="0.1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39">
      <style:text-properties fo:font-size="15.5pt" fo:font-weight="bold"/>
    </style:style>
    <style:style style:family="text" style:name="T1440">
      <style:text-properties fo:font-size="15.5pt" fo:font-weight="bold"/>
    </style:style>
    <style:style style:parent-style-name="716" style:family="paragraph" style:name="P17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41">
      <style:text-properties fo:letter-spacing="-0.15pt"/>
    </style:style>
    <style:style style:family="text" style:name="T1442">
      <style:text-properties fo:letter-spacing="-0.15pt"/>
    </style:style>
    <style:style style:family="text" style:name="T1443">
      <style:text-properties fo:letter-spacing="-0.15pt"/>
    </style:style>
    <style:style style:family="text" style:name="T1444">
      <style:text-properties fo:letter-spacing="-0.15pt"/>
    </style:style>
    <style:style style:family="text" style:name="T1445">
      <style:text-properties fo:letter-spacing="-0.15pt"/>
    </style:style>
    <style:style style:family="text" style:name="T1446">
      <style:text-properties fo:letter-spacing="-0.15pt"/>
    </style:style>
    <style:style style:family="text" style:name="T1447">
      <style:text-properties fo:letter-spacing="-0.15pt"/>
    </style:style>
    <style:style style:family="text" style:name="T1448">
      <style:text-properties fo:letter-spacing="-0.15pt"/>
    </style:style>
    <style:style style:family="text" style:name="T1449">
      <style:text-properties fo:letter-spacing="-0.15pt"/>
    </style:style>
    <style:style style:family="text" style:name="T1450">
      <style:text-properties fo:letter-spacing="-0.15pt"/>
    </style:style>
    <style:style style:parent-style-name="716" style:family="paragraph" style:name="P18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81">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51">
      <style:text-properties fo:letter-spacing="-0.25pt"/>
    </style:style>
    <style:style style:family="text" style:name="T1452">
      <style:text-properties fo:letter-spacing="-0.25pt"/>
    </style:style>
    <style:style style:family="text" style:name="T1453">
      <style:text-properties fo:letter-spacing="-0.25pt"/>
    </style:style>
    <style:style style:family="text" style:name="T1454">
      <style:text-properties fo:letter-spacing="-0.25pt"/>
    </style:style>
    <style:style style:family="text" style:name="T1455">
      <style:text-properties fo:letter-spacing="-0.25pt"/>
    </style:style>
    <style:style style:family="text" style:name="T1456">
      <style:text-properties fo:letter-spacing="-0.25pt"/>
    </style:style>
    <style:style style:family="text" style:name="T1457">
      <style:text-properties fo:letter-spacing="-0.25pt"/>
    </style:style>
    <style:style style:family="text" style:name="T1458">
      <style:text-properties fo:letter-spacing="-0.25pt"/>
    </style:style>
    <style:style style:family="text" style:name="T1459">
      <style:text-properties fo:letter-spacing="-0.25pt"/>
    </style:style>
    <style:style style:parent-style-name="716" style:family="paragraph" style:name="P18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83">
      <style:paragraph-properties fo:margin-left="0cm" fo:margin-right="0.5027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60">
      <style:text-properties fo:letter-spacing="2pt"/>
    </style:style>
    <style:style style:family="text" style:name="T1461">
      <style:text-properties fo:letter-spacing="-0.1pt"/>
    </style:style>
    <style:style style:family="text" style:name="T1462">
      <style:text-properties fo:letter-spacing="-0.1pt"/>
    </style:style>
    <style:style style:family="text" style:name="T1463">
      <style:text-properties fo:letter-spacing="-0.1pt"/>
    </style:style>
    <style:style style:family="text" style:name="T1464">
      <style:text-properties fo:letter-spacing="-0.1pt"/>
    </style:style>
    <style:style style:family="text" style:name="T1465">
      <style:text-properties fo:letter-spacing="-0.1pt"/>
    </style:style>
    <style:style style:family="text" style:name="T1466">
      <style:text-properties fo:letter-spacing="-0.1pt"/>
    </style:style>
    <style:style style:family="text" style:name="T1467">
      <style:text-properties fo:letter-spacing="-0.1pt"/>
    </style:style>
    <style:style style:family="text" style:name="T1468">
      <style:text-properties fo:letter-spacing="-0.1pt"/>
    </style:style>
    <style:style style:family="text" style:name="T1469">
      <style:text-properties fo:letter-spacing="-0.1pt"/>
    </style:style>
    <style:style style:family="text" style:name="T1470">
      <style:text-properties fo:letter-spacing="-0.1pt"/>
    </style:style>
    <style:style style:family="text" style:name="T1471">
      <style:text-properties fo:letter-spacing="-0.1pt"/>
    </style:style>
    <style:style style:family="text" style:name="T1472">
      <style:text-properties fo:letter-spacing="-0.1pt"/>
    </style:style>
    <style:style style:family="text" style:name="T1473">
      <style:text-properties fo:letter-spacing="-0.1pt"/>
    </style:style>
    <style:style style:family="text" style:name="T1474">
      <style:text-properties fo:letter-spacing="-0.1pt"/>
    </style:style>
    <style:style style:family="text" style:name="T1475">
      <style:text-properties fo:letter-spacing="-0.1pt"/>
    </style:style>
    <style:style style:parent-style-name="716" style:family="paragraph" style:name="P18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85">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76">
      <style:text-properties fo:letter-spacing="-0.15pt"/>
    </style:style>
    <style:style style:family="text" style:name="T1477">
      <style:text-properties fo:letter-spacing="-0.15pt"/>
    </style:style>
    <style:style style:family="text" style:name="T1478">
      <style:text-properties fo:letter-spacing="-0.15pt"/>
    </style:style>
    <style:style style:family="text" style:name="T1479">
      <style:text-properties fo:letter-spacing="-0.15pt"/>
    </style:style>
    <style:style style:family="text" style:name="T1480">
      <style:text-properties fo:letter-spacing="-0.15pt"/>
    </style:style>
    <style:style style:family="text" style:name="T1481">
      <style:text-properties fo:letter-spacing="-0.15pt"/>
    </style:style>
    <style:style style:family="text" style:name="T1482">
      <style:text-properties fo:letter-spacing="-0.15pt"/>
    </style:style>
    <style:style style:family="text" style:name="T1483">
      <style:text-properties fo:letter-spacing="-0.15pt"/>
    </style:style>
    <style:style style:family="text" style:name="T1484">
      <style:text-properties fo:letter-spacing="-0.15pt"/>
    </style:style>
    <style:style style:family="text" style:name="T1485">
      <style:text-properties fo:letter-spacing="-0.15pt"/>
    </style:style>
    <style:style style:family="text" style:name="T1486">
      <style:text-properties fo:letter-spacing="-0.15pt"/>
    </style:style>
    <style:style style:family="text" style:name="T1487">
      <style:text-properties fo:letter-spacing="-0.15pt"/>
    </style:style>
    <style:style style:family="text" style:name="T1488">
      <style:text-properties fo:letter-spacing="-0.15pt"/>
    </style:style>
    <style:style style:family="text" style:name="T1489">
      <style:text-properties fo:letter-spacing="-0.15pt"/>
    </style:style>
    <style:style style:family="text" style:name="T1490">
      <style:text-properties fo:letter-spacing="-0.15pt"/>
    </style:style>
    <style:style style:parent-style-name="716" style:family="paragraph" style:name="P18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187">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491">
      <style:text-properties fo:letter-spacing="-0.15pt"/>
    </style:style>
    <style:style style:family="text" style:name="T1492">
      <style:text-properties fo:letter-spacing="-0.15pt"/>
    </style:style>
    <style:style style:family="text" style:name="T1493">
      <style:text-properties fo:letter-spacing="-0.15pt"/>
    </style:style>
    <style:style style:family="text" style:name="T1494">
      <style:text-properties fo:letter-spacing="-0.15pt"/>
    </style:style>
    <style:style style:family="text" style:name="T1495">
      <style:text-properties fo:letter-spacing="-0.15pt"/>
    </style:style>
    <style:style style:family="text" style:name="T1496">
      <style:text-properties fo:letter-spacing="-0.15pt"/>
    </style:style>
    <style:style style:family="text" style:name="T1497">
      <style:text-properties fo:letter-spacing="-0.15pt"/>
    </style:style>
    <style:style style:family="text" style:name="T1498">
      <style:text-properties fo:letter-spacing="-0.15pt"/>
    </style:style>
    <style:style style:family="text" style:name="T1499">
      <style:text-properties fo:letter-spacing="-0.15pt"/>
    </style:style>
    <style:style style:family="text" style:name="T1500">
      <style:text-properties fo:letter-spacing="-0.15pt"/>
    </style:style>
    <style:style style:family="text" style:name="T1501">
      <style:text-properties fo:letter-spacing="-0.15pt"/>
    </style:style>
    <style:style style:parent-style-name="716" style:family="paragraph" style:name="P188">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02">
      <style:text-properties fo:font-size="18pt"/>
    </style:style>
    <style:style style:family="text" style:name="T1503">
      <style:text-properties fo:font-size="18pt"/>
    </style:style>
    <style:style style:parent-style-name="712" style:family="paragraph" style:name="P189">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504">
      <style:text-properties fo:font-size="14pt" fo:font-weight="bold"/>
    </style:style>
    <style:style style:family="text" style:name="T1505">
      <style:text-properties fo:font-size="14pt" fo:letter-spacing="-0.5pt" fo:font-weight="bold"/>
    </style:style>
    <style:style style:family="text" style:name="T1506">
      <style:text-properties fo:font-size="14pt" fo:font-weight="bold"/>
    </style:style>
    <style:style style:family="text" style:name="T1507">
      <style:text-properties fo:font-size="14pt" fo:letter-spacing="-0.3pt" fo:font-weight="bold"/>
    </style:style>
    <style:style style:family="text" style:name="T1508">
      <style:text-properties fo:font-size="14pt" fo:font-weight="bold"/>
    </style:style>
    <style:style style:family="text" style:name="T1509">
      <style:text-properties fo:font-size="14pt" fo:letter-spacing="-0.35pt" fo:font-weight="bold"/>
    </style:style>
    <style:style style:family="text" style:name="T1510">
      <style:text-properties fo:font-size="14pt" fo:font-weight="bold"/>
    </style:style>
    <style:style style:family="text" style:name="T1511">
      <style:text-properties fo:font-size="14pt" fo:letter-spacing="-0.3pt" fo:font-weight="bold"/>
    </style:style>
    <style:style style:family="text" style:name="T1512">
      <style:text-properties fo:font-size="14pt" fo:font-weight="bold"/>
    </style:style>
    <style:style style:family="text" style:name="T1513">
      <style:text-properties fo:font-size="14pt" fo:letter-spacing="-0.35pt" fo:font-weight="bold"/>
    </style:style>
    <style:style style:family="text" style:name="T1514">
      <style:text-properties fo:font-size="14pt" fo:font-weight="bold"/>
    </style:style>
    <style:style style:family="text" style:name="T1515">
      <style:text-properties fo:font-size="14pt" fo:letter-spacing="-0.3pt" fo:font-weight="bold"/>
    </style:style>
    <style:style style:family="text" style:name="T1516">
      <style:text-properties fo:font-size="14pt" fo:letter-spacing="-0.1pt" fo:font-weight="bold"/>
    </style:style>
    <style:style style:parent-style-name="716" style:family="paragraph" style:name="P190">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17">
      <style:text-properties fo:font-size="15.5pt" fo:font-weight="bold"/>
    </style:style>
    <style:style style:family="text" style:name="T1518">
      <style:text-properties fo:font-size="15.5pt" fo:font-weight="bold"/>
    </style:style>
    <style:style style:parent-style-name="716" style:family="paragraph" style:name="P191">
      <style:paragraph-properties fo:line-height="115%"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19">
      <style:text-properties fo:letter-spacing="-0.05pt"/>
    </style:style>
    <style:style style:family="text" style:name="T1520">
      <style:text-properties fo:letter-spacing="-0.05pt"/>
    </style:style>
    <style:style style:family="text" style:name="T1521">
      <style:text-properties fo:letter-spacing="-0.05pt"/>
    </style:style>
    <style:style style:family="text" style:name="T1522">
      <style:text-properties fo:letter-spacing="-0.05pt"/>
    </style:style>
    <style:style style:family="text" style:name="T1523">
      <style:text-properties fo:letter-spacing="-0.05pt"/>
    </style:style>
    <style:style style:family="text" style:name="T1524">
      <style:text-properties fo:letter-spacing="-0.05pt"/>
    </style:style>
    <style:style style:family="text" style:name="T1525">
      <style:text-properties fo:letter-spacing="-0.05pt"/>
    </style:style>
    <style:style style:family="text" style:name="T1526">
      <style:text-properties fo:letter-spacing="-0.05pt"/>
    </style:style>
    <style:style style:family="text" style:name="T1527">
      <style:text-properties fo:letter-spacing="-0.05pt"/>
    </style:style>
    <style:style style:family="text" style:name="T1528">
      <style:text-properties fo:letter-spacing="-0.05pt"/>
    </style:style>
    <style:style style:family="text" style:name="T1529">
      <style:text-properties fo:letter-spacing="-0.05pt"/>
    </style:style>
    <style:style style:family="text" style:name="T1530">
      <style:text-properties fo:letter-spacing="-0.05pt"/>
    </style:style>
    <style:style style:family="text" style:name="T1531">
      <style:text-properties fo:letter-spacing="-0.05pt"/>
    </style:style>
    <style:style style:family="text" style:name="T1532">
      <style:text-properties fo:letter-spacing="-0.05pt"/>
    </style:style>
    <style:style style:family="text" style:name="T1533">
      <style:text-properties fo:letter-spacing="-0.05pt"/>
    </style:style>
    <style:style style:family="text" style:name="T1534">
      <style:text-properties fo:letter-spacing="-0.05pt"/>
    </style:style>
    <style:style style:family="text" style:name="T1535">
      <style:text-properties fo:letter-spacing="-0.05pt"/>
    </style:style>
    <style:style style:family="text" style:name="T1536">
      <style:text-properties fo:letter-spacing="-0.25pt"/>
    </style:style>
    <style:style style:family="text" style:name="T1537">
      <style:text-properties fo:letter-spacing="-0.25pt"/>
    </style:style>
    <style:style style:family="text" style:name="T1538">
      <style:text-properties fo:letter-spacing="-0.25pt"/>
    </style:style>
    <style:style style:family="text" style:name="T1539">
      <style:text-properties fo:letter-spacing="-0.25pt"/>
    </style:style>
    <style:style style:family="text" style:name="T1540">
      <style:text-properties fo:letter-spacing="-0.25pt"/>
    </style:style>
    <style:style style:family="text" style:name="T1541">
      <style:text-properties fo:letter-spacing="-0.25pt"/>
    </style:style>
    <style:style style:family="text" style:name="T1542">
      <style:text-properties fo:letter-spacing="-0.25pt"/>
    </style:style>
    <style:style style:family="text" style:name="T1543">
      <style:text-properties fo:letter-spacing="-0.25pt"/>
    </style:style>
    <style:style style:family="text" style:name="T1544">
      <style:text-properties fo:letter-spacing="-0.25pt"/>
    </style:style>
    <style:style style:family="text" style:name="T1545">
      <style:text-properties fo:letter-spacing="-0.25pt"/>
    </style:style>
    <style:style style:family="text" style:name="T1546">
      <style:text-properties fo:letter-spacing="-0.25pt"/>
    </style:style>
    <style:style style:family="text" style:name="T1547">
      <style:text-properties fo:letter-spacing="-0.25pt"/>
    </style:style>
    <style:style style:parent-style-name="716" style:family="paragraph" style:name="P192">
      <style:paragraph-properties fo:line-height="115%" fo:margin-left="0cm" fo:margin-right="0.52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48">
      <style:text-properties fo:letter-spacing="-0.15pt"/>
    </style:style>
    <style:style style:family="text" style:name="T1549">
      <style:text-properties fo:letter-spacing="-0.15pt"/>
    </style:style>
    <style:style style:family="text" style:name="T1550">
      <style:text-properties fo:letter-spacing="-0.15pt"/>
    </style:style>
    <style:style style:family="text" style:name="T1551">
      <style:text-properties fo:letter-spacing="-0.15pt"/>
    </style:style>
    <style:style style:family="text" style:name="T1552">
      <style:text-properties fo:letter-spacing="-0.15pt"/>
    </style:style>
    <style:style style:family="text" style:name="T1553">
      <style:text-properties fo:letter-spacing="-0.15pt"/>
    </style:style>
    <style:style style:family="text" style:name="T1554">
      <style:text-properties fo:letter-spacing="-0.15pt"/>
    </style:style>
    <style:style style:family="text" style:name="T1555">
      <style:text-properties fo:letter-spacing="-0.15pt"/>
    </style:style>
    <style:style style:family="text" style:name="T1556">
      <style:text-properties fo:letter-spacing="-0.15pt"/>
    </style:style>
    <style:style style:family="text" style:name="T1557">
      <style:text-properties fo:letter-spacing="-0.15pt"/>
    </style:style>
    <style:style style:family="text" style:name="T1558">
      <style:text-properties fo:letter-spacing="-0.15pt"/>
    </style:style>
    <style:style style:family="text" style:name="T1559">
      <style:text-properties fo:letter-spacing="-0.15pt"/>
    </style:style>
    <style:style style:parent-style-name="712" style:master-page-name="MasterPage10" style:family="paragraph" style:name="P193">
      <style:paragraph-properties fo:margin-left="0.1993cm" fo:margin-right="0cm" fo:text-indent="0cm" fo:margin-top="3.2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560">
      <style:text-properties fo:font-size="14pt" fo:font-weight="bold"/>
    </style:style>
    <style:style style:family="text" style:name="T1561">
      <style:text-properties fo:font-size="14pt" fo:letter-spacing="-0.45pt" fo:font-weight="bold"/>
    </style:style>
    <style:style style:family="text" style:name="T1562">
      <style:text-properties fo:font-size="14pt" fo:font-weight="bold"/>
    </style:style>
    <style:style style:family="text" style:name="T1563">
      <style:text-properties fo:font-size="14pt" fo:letter-spacing="-0.3pt" fo:font-weight="bold"/>
    </style:style>
    <style:style style:family="text" style:name="T1564">
      <style:text-properties fo:font-size="14pt" fo:letter-spacing="-0.1pt" fo:font-weight="bold"/>
    </style:style>
    <style:style style:parent-style-name="716" style:family="paragraph" style:name="P19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65">
      <style:text-properties fo:font-size="15pt" fo:font-weight="bold"/>
    </style:style>
    <style:style style:family="text" style:name="T1566">
      <style:text-properties fo:font-size="15pt" fo:font-weight="bold"/>
    </style:style>
    <style:style style:parent-style-name="716" style:family="paragraph" style:name="P195">
      <style:paragraph-properties fo:line-height="115%" fo:margin-left="0cm" fo:margin-right="0.5504cm" fo:text-indent="0cm" fo:margin-top="11.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67">
      <style:text-properties fo:letter-spacing="-0.1pt"/>
    </style:style>
    <style:style style:family="text" style:name="T1568">
      <style:text-properties fo:letter-spacing="-0.1pt"/>
    </style:style>
    <style:style style:family="text" style:name="T1569">
      <style:text-properties fo:letter-spacing="-0.1pt"/>
    </style:style>
    <style:style style:family="text" style:name="T1570">
      <style:text-properties fo:letter-spacing="-0.1pt"/>
    </style:style>
    <style:style style:family="text" style:name="T1571">
      <style:text-properties fo:letter-spacing="-0.1pt"/>
    </style:style>
    <style:style style:family="text" style:name="T1572">
      <style:text-properties fo:letter-spacing="-0.1pt"/>
    </style:style>
    <style:style style:family="text" style:name="T1573">
      <style:text-properties fo:letter-spacing="-0.1pt"/>
    </style:style>
    <style:style style:family="text" style:name="T1574">
      <style:text-properties fo:font-weight="bold"/>
    </style:style>
    <style:style style:family="text" style:name="T1575">
      <style:text-properties fo:letter-spacing="-0.1pt"/>
    </style:style>
    <style:style style:family="text" style:name="T1576">
      <style:text-properties fo:letter-spacing="-0.1pt"/>
    </style:style>
    <style:style style:family="text" style:name="T1577">
      <style:text-properties fo:letter-spacing="-0.1pt"/>
    </style:style>
    <style:style style:family="text" style:name="T1578">
      <style:text-properties fo:letter-spacing="-0.1pt"/>
    </style:style>
    <style:style style:family="text" style:name="T1579">
      <style:text-properties fo:letter-spacing="-0.1pt"/>
    </style:style>
    <style:style style:family="text" style:name="T1580">
      <style:text-properties fo:letter-spacing="-0.1pt"/>
    </style:style>
    <style:style style:family="text" style:name="T1581">
      <style:text-properties fo:letter-spacing="-0.1pt"/>
    </style:style>
    <style:style style:parent-style-name="716" style:family="paragraph" style:name="P196">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582">
      <style:text-properties fo:letter-spacing="-0.25pt"/>
    </style:style>
    <style:style style:family="text" style:name="T1583">
      <style:text-properties fo:letter-spacing="-0.25pt"/>
    </style:style>
    <style:style style:family="text" style:name="T1584">
      <style:text-properties fo:letter-spacing="-0.25pt"/>
    </style:style>
    <style:style style:family="text" style:name="T1585">
      <style:text-properties fo:letter-spacing="-0.25pt"/>
    </style:style>
    <style:style style:family="text" style:name="T1586">
      <style:text-properties fo:letter-spacing="-0.25pt"/>
    </style:style>
    <style:style style:family="text" style:name="T1587">
      <style:text-properties fo:letter-spacing="-0.25pt"/>
    </style:style>
    <style:style style:family="text" style:name="T1588">
      <style:text-properties fo:letter-spacing="-0.25pt"/>
    </style:style>
    <style:style style:family="text" style:name="T1589">
      <style:text-properties fo:letter-spacing="-0.25pt"/>
    </style:style>
    <style:style style:family="text" style:name="T1590">
      <style:text-properties fo:letter-spacing="-0.25pt"/>
    </style:style>
    <style:style style:family="text" style:name="T1591">
      <style:text-properties fo:letter-spacing="-0.25pt"/>
    </style:style>
    <style:style style:family="text" style:name="T1592">
      <style:text-properties fo:letter-spacing="-0.25pt"/>
    </style:style>
    <style:style style:family="text" style:name="T1593">
      <style:text-properties fo:font-weight="bold"/>
    </style:style>
    <style:style style:family="text" style:name="T1594">
      <style:text-properties fo:letter-spacing="-0.25pt" fo:font-weight="bold"/>
    </style:style>
    <style:style style:family="text" style:name="T1595">
      <style:text-properties fo:font-weight="bold"/>
    </style:style>
    <style:style style:family="text" style:name="T1596">
      <style:text-properties fo:letter-spacing="-0.05pt" fo:font-weight="bold"/>
    </style:style>
    <style:style style:family="text" style:name="T1597">
      <style:text-properties fo:letter-spacing="-0.05pt"/>
    </style:style>
    <style:style style:family="text" style:name="T1598">
      <style:text-properties fo:letter-spacing="-0.05pt"/>
    </style:style>
    <style:style style:family="text" style:name="T1599">
      <style:text-properties fo:letter-spacing="-0.05pt"/>
    </style:style>
    <style:style style:family="text" style:name="T1600">
      <style:text-properties fo:letter-spacing="-0.05pt"/>
    </style:style>
    <style:style style:family="text" style:name="T1601">
      <style:text-properties fo:font-weight="bold"/>
    </style:style>
    <style:style style:family="text" style:name="T1602">
      <style:text-properties fo:letter-spacing="-0.05pt" fo:font-weight="bold"/>
    </style:style>
    <style:style style:family="text" style:name="T1603">
      <style:text-properties fo:font-weight="bold"/>
    </style:style>
    <style:style style:family="text" style:name="T1604">
      <style:text-properties fo:letter-spacing="-0.05pt" fo:font-weight="bold"/>
    </style:style>
    <style:style style:family="text" style:name="T1605">
      <style:text-properties fo:font-weight="bold"/>
    </style:style>
    <style:style style:family="text" style:name="T1606">
      <style:text-properties fo:letter-spacing="-0.05pt" fo:font-weight="bold"/>
    </style:style>
    <style:style style:family="text" style:name="T1607">
      <style:text-properties fo:font-weight="bold"/>
    </style:style>
    <style:style style:family="text" style:name="T1608">
      <style:text-properties fo:letter-spacing="-0.05pt"/>
    </style:style>
    <style:style style:family="text" style:name="T1609">
      <style:text-properties fo:letter-spacing="-0.05pt"/>
    </style:style>
    <style:style style:family="text" style:name="T1610">
      <style:text-properties fo:letter-spacing="-0.05pt"/>
    </style:style>
    <style:style style:family="text" style:name="T1611">
      <style:text-properties fo:letter-spacing="-0.05pt"/>
    </style:style>
    <style:style style:family="text" style:name="T1612">
      <style:text-properties fo:letter-spacing="-0.05pt"/>
    </style:style>
    <style:style style:family="text" style:name="T1613">
      <style:text-properties fo:letter-spacing="-0.05pt"/>
    </style:style>
    <style:style style:family="text" style:name="T1614">
      <style:text-properties fo:letter-spacing="-0.05pt"/>
    </style:style>
    <style:style style:parent-style-name="712" style:family="paragraph" style:name="P197">
      <style:paragraph-properties fo:line-height="115%" fo:margin-left="0.1993cm" fo:margin-right="0.5204cm" fo:text-indent="0cm" fo:margin-top="7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615">
      <style:text-properties fo:font-size="12pt"/>
    </style:style>
    <style:style style:family="text" style:name="T1616">
      <style:text-properties fo:font-size="12pt" fo:letter-spacing="-0.1pt"/>
    </style:style>
    <style:style style:family="text" style:name="T1617">
      <style:text-properties fo:font-size="12pt"/>
    </style:style>
    <style:style style:family="text" style:name="T1618">
      <style:text-properties fo:font-size="12pt" fo:letter-spacing="-0.1pt"/>
    </style:style>
    <style:style style:family="text" style:name="T1619">
      <style:text-properties fo:font-size="12pt"/>
    </style:style>
    <style:style style:family="text" style:name="T1620">
      <style:text-properties fo:font-size="12pt" fo:letter-spacing="-0.1pt"/>
    </style:style>
    <style:style style:family="text" style:name="T1621">
      <style:text-properties fo:font-size="12pt"/>
    </style:style>
    <style:style style:family="text" style:name="T1622">
      <style:text-properties fo:font-size="12pt" fo:letter-spacing="-0.1pt"/>
    </style:style>
    <style:style style:family="text" style:name="T1623">
      <style:text-properties fo:font-size="12pt"/>
    </style:style>
    <style:style style:family="text" style:name="T1624">
      <style:text-properties fo:font-size="12pt" fo:letter-spacing="-0.1pt"/>
    </style:style>
    <style:style style:family="text" style:name="T1625">
      <style:text-properties fo:font-size="12pt"/>
    </style:style>
    <style:style style:family="text" style:name="T1626">
      <style:text-properties fo:font-size="12pt" fo:letter-spacing="-0.1pt"/>
    </style:style>
    <style:style style:family="text" style:name="T1627">
      <style:text-properties fo:font-size="12pt"/>
    </style:style>
    <style:style style:family="text" style:name="T1628">
      <style:text-properties fo:font-size="12pt" fo:letter-spacing="-0.1pt"/>
    </style:style>
    <style:style style:family="text" style:name="T1629">
      <style:text-properties fo:font-size="12pt"/>
    </style:style>
    <style:style style:family="text" style:name="T1630">
      <style:text-properties fo:font-size="12pt" fo:letter-spacing="-0.1pt"/>
    </style:style>
    <style:style style:family="text" style:name="T1631">
      <style:text-properties fo:font-size="12pt" fo:font-weight="bold"/>
    </style:style>
    <style:style style:family="text" style:name="T1632">
      <style:text-properties fo:font-size="12pt" fo:letter-spacing="-0.1pt" fo:font-weight="bold"/>
    </style:style>
    <style:style style:family="text" style:name="T1633">
      <style:text-properties fo:font-size="12pt" fo:font-weight="bold"/>
    </style:style>
    <style:style style:family="text" style:name="T1634">
      <style:text-properties fo:font-size="12pt" fo:letter-spacing="-0.1pt" fo:font-weight="bold"/>
    </style:style>
    <style:style style:family="text" style:name="T1635">
      <style:text-properties fo:font-size="12pt" fo:font-weight="bold"/>
    </style:style>
    <style:style style:family="text" style:name="T1636">
      <style:text-properties fo:font-size="12pt" fo:letter-spacing="-0.1pt" fo:font-weight="bold"/>
    </style:style>
    <style:style style:family="text" style:name="T1637">
      <style:text-properties fo:font-size="12pt" fo:font-weight="bold"/>
    </style:style>
    <style:style style:family="text" style:name="T1638">
      <style:text-properties fo:font-size="12pt" fo:letter-spacing="-0.1pt" fo:font-weight="bold"/>
    </style:style>
    <style:style style:family="text" style:name="T1639">
      <style:text-properties fo:font-size="12pt" fo:font-weight="bold"/>
    </style:style>
    <style:style style:family="text" style:name="T1640">
      <style:text-properties fo:font-size="12pt" fo:letter-spacing="-0.1pt" fo:font-weight="bold"/>
    </style:style>
    <style:style style:family="text" style:name="T1641">
      <style:text-properties fo:font-size="12pt"/>
    </style:style>
    <style:style style:family="text" style:name="T1642">
      <style:text-properties fo:font-size="12pt" fo:letter-spacing="-0.1pt"/>
    </style:style>
    <style:style style:family="text" style:name="T1643">
      <style:text-properties fo:font-size="12pt"/>
    </style:style>
    <style:style style:family="text" style:name="T1644">
      <style:text-properties fo:font-size="12pt" fo:font-weight="bold"/>
    </style:style>
    <style:style style:family="text" style:name="T1645">
      <style:text-properties fo:font-size="12pt"/>
    </style:style>
    <style:style style:family="text" style:name="T1646">
      <style:text-properties fo:font-size="12pt" fo:font-weight="bold"/>
    </style:style>
    <style:style style:family="text" style:name="T1647">
      <style:text-properties fo:font-size="12pt"/>
    </style:style>
    <style:style style:parent-style-name="716" style:family="paragraph" style:name="P198">
      <style:paragraph-properties fo:line-height="115%"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648">
      <style:text-properties fo:letter-spacing="-0.1pt"/>
    </style:style>
    <style:style style:family="text" style:name="T1649">
      <style:text-properties fo:letter-spacing="-0.1pt"/>
    </style:style>
    <style:style style:family="text" style:name="T1650">
      <style:text-properties fo:letter-spacing="-0.1pt"/>
    </style:style>
    <style:style style:family="text" style:name="T1651">
      <style:text-properties fo:letter-spacing="-0.1pt"/>
    </style:style>
    <style:style style:family="text" style:name="T1652">
      <style:text-properties fo:letter-spacing="-0.1pt"/>
    </style:style>
    <style:style style:family="text" style:name="T1653">
      <style:text-properties fo:letter-spacing="-0.1pt"/>
    </style:style>
    <style:style style:family="text" style:name="T1654">
      <style:text-properties fo:letter-spacing="-0.1pt"/>
    </style:style>
    <style:style style:family="text" style:name="T1655">
      <style:text-properties fo:letter-spacing="-0.1pt"/>
    </style:style>
    <style:style style:family="text" style:name="T1656">
      <style:text-properties fo:letter-spacing="-0.1pt"/>
    </style:style>
    <style:style style:family="text" style:name="T1657">
      <style:text-properties fo:letter-spacing="-0.1pt"/>
    </style:style>
    <style:style style:family="text" style:name="T1658">
      <style:text-properties fo:letter-spacing="-0.1pt"/>
    </style:style>
    <style:style style:family="text" style:name="T1659">
      <style:text-properties fo:letter-spacing="-0.1pt"/>
    </style:style>
    <style:style style:family="text" style:name="T1660">
      <style:text-properties fo:letter-spacing="-0.1pt"/>
    </style:style>
    <style:style style:family="text" style:name="T1661">
      <style:text-properties fo:font-weight="bold"/>
    </style:style>
    <style:style style:family="text" style:name="T1662">
      <style:text-properties fo:letter-spacing="-0.1pt" fo:font-weight="bold"/>
    </style:style>
    <style:style style:family="text" style:name="T1663">
      <style:text-properties fo:font-weight="bold"/>
    </style:style>
    <style:style style:family="text" style:name="T1664">
      <style:text-properties fo:letter-spacing="-0.1pt" fo:font-weight="bold"/>
    </style:style>
    <style:style style:family="text" style:name="T1665">
      <style:text-properties fo:font-weight="bold"/>
    </style:style>
    <style:style style:family="text" style:name="T1666">
      <style:text-properties fo:letter-spacing="-0.1pt"/>
    </style:style>
    <style:style style:parent-style-name="716" style:family="paragraph" style:name="P199">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667">
      <style:text-properties fo:font-weight="bold"/>
    </style:style>
    <style:style style:family="text" style:name="T1668">
      <style:text-properties fo:letter-spacing="-0.15pt"/>
    </style:style>
    <style:style style:family="text" style:name="T1669">
      <style:text-properties fo:letter-spacing="-0.15pt"/>
    </style:style>
    <style:style style:family="text" style:name="T1670">
      <style:text-properties fo:letter-spacing="-0.15pt"/>
    </style:style>
    <style:style style:family="text" style:name="T1671">
      <style:text-properties fo:letter-spacing="-0.15pt"/>
    </style:style>
    <style:style style:family="text" style:name="T1672">
      <style:text-properties fo:letter-spacing="-0.15pt"/>
    </style:style>
    <style:style style:family="text" style:name="T1673">
      <style:text-properties fo:letter-spacing="-0.15pt"/>
    </style:style>
    <style:style style:family="text" style:name="T1674">
      <style:text-properties fo:letter-spacing="-0.15pt"/>
    </style:style>
    <style:style style:family="text" style:name="T1675">
      <style:text-properties fo:letter-spacing="-0.15pt"/>
    </style:style>
    <style:style style:family="text" style:name="T1676">
      <style:text-properties fo:letter-spacing="-0.15pt"/>
    </style:style>
    <style:style style:family="text" style:name="T1677">
      <style:text-properties fo:letter-spacing="-0.15pt"/>
    </style:style>
    <style:style style:family="text" style:name="T1678">
      <style:text-properties fo:letter-spacing="-0.15pt"/>
    </style:style>
    <style:style style:family="text" style:name="T1679">
      <style:text-properties fo:letter-spacing="-0.15pt"/>
    </style:style>
    <style:style style:family="text" style:name="T1680">
      <style:text-properties fo:letter-spacing="-0.15pt"/>
    </style:style>
    <style:style style:family="text" style:name="T1681">
      <style:text-properties fo:font-weight="bold"/>
    </style:style>
    <style:style style:parent-style-name="708" style:master-page-name="MasterPage11" style:family="paragraph" style:name="P200">
      <style:paragraph-properties/>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682">
      <style:text-properties/>
    </style:style>
    <style:style style:parent-style-name="708" style:family="paragraph" style:name="P201">
      <style:paragraph-properties/>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683">
      <style:text-properties/>
    </style:style>
    <style:style style:family="text" style:name="T1684">
      <style:text-properties/>
    </style:style>
    <style:style style:family="text" style:name="T1685">
      <style:text-properties/>
    </style:style>
    <style:style style:family="paragraph" style:name="P202">
      <style:paragraph-properties fo:margin-left="0cm" fo:margin-right="0cm" fo:text-indent="0cm" fo:border="none"/>
      <style:text-properties fo:font-size="12pt"/>
    </style:style>
    <style:style style:family="text" style:name="T1686">
      <style:text-properties fo:font-size="12pt"/>
    </style:style>
    <style:style style:family="text" style:name="T1687">
      <style:text-properties fo:font-size="12pt"/>
    </style:style>
    <style:style style:family="paragraph" style:name="P203">
      <style:paragraph-properties fo:margin-left="0cm" fo:margin-right="0cm" fo:text-indent="0cm" fo:border="none"/>
      <style:text-properties fo:font-size="12pt"/>
    </style:style>
    <style:style style:family="text" style:name="T1688">
      <style:text-properties fo:font-size="12pt"/>
    </style:style>
    <style:style style:family="text" style:name="T1689">
      <style:text-properties fo:font-size="12pt"/>
    </style:style>
    <style:style style:family="paragraph" style:name="P204">
      <style:paragraph-properties fo:margin-left="0cm" fo:margin-right="0cm" fo:text-indent="0cm" fo:border="none"/>
      <style:text-properties fo:font-size="12pt"/>
    </style:style>
    <style:style style:family="text" style:name="T1690">
      <style:text-properties fo:font-size="12pt"/>
    </style:style>
    <style:style style:family="text" style:name="T1691">
      <style:text-properties fo:font-size="12pt"/>
    </style:style>
    <style:style style:family="text" style:name="T1692">
      <style:text-properties fo:font-size="12pt"/>
    </style:style>
    <style:style style:family="paragraph" style:name="P205">
      <style:paragraph-properties fo:margin-left="0cm" fo:margin-right="0cm" fo:text-indent="0cm" fo:border="none"/>
      <style:text-properties fo:font-family="Times New Roman" style:font-family-asian="Times New Roman" style:font-family-complex="Times New Roman" fo:font-size="14pt"/>
    </style:style>
    <style:style style:family="text" style:name="T1693">
      <style:text-properties fo:font-size="12pt"/>
    </style:style>
    <style:style style:family="text" style:name="T1694">
      <style:text-properties fo:font-size="12pt"/>
    </style:style>
    <style:style style:family="paragraph" style:name="P206">
      <style:paragraph-properties fo:margin-left="0cm" fo:margin-right="0cm" fo:text-indent="0cm" fo:border="none"/>
      <style:text-properties fo:font-size="12pt"/>
    </style:style>
    <style:style style:family="text" style:name="T1695">
      <style:text-properties fo:font-size="12pt"/>
    </style:style>
    <style:style style:family="text" style:name="T1696">
      <style:text-properties fo:font-size="12pt"/>
    </style:style>
    <style:style style:family="text" style:name="T1697">
      <style:text-properties fo:font-size="12pt"/>
    </style:style>
    <style:style style:family="text" style:name="T1698">
      <style:text-properties fo:font-size="12pt"/>
    </style:style>
    <style:style style:family="text" style:name="T1699">
      <style:text-properties fo:font-size="12pt"/>
    </style:style>
    <style:style style:family="text" style:name="T1700">
      <style:text-properties fo:font-size="12pt"/>
    </style:style>
    <style:style style:family="paragraph" style:name="P207">
      <style:paragraph-properties fo:margin-left="0cm" fo:margin-right="0cm" fo:text-indent="0cm" fo:border="none"/>
      <style:text-properties fo:font-family="Times New Roman" style:font-family-asian="Times New Roman" style:font-family-complex="Times New Roman" fo:font-size="14pt"/>
    </style:style>
    <style:style style:family="text" style:name="T1701">
      <style:text-properties fo:font-size="12pt"/>
    </style:style>
    <style:style style:family="text" style:name="T1702">
      <style:text-properties fo:font-size="12pt"/>
    </style:style>
    <style:style style:parent-style-name="717" style:list-style-name="WWNum28" style:family="paragraph" style:name="P208">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03">
      <style:text-properties fo:font-size="12pt"/>
    </style:style>
    <style:style style:family="text" style:name="T1704">
      <style:text-properties fo:font-size="12pt"/>
    </style:style>
    <style:style style:parent-style-name="717" style:list-style-name="WWNum28" style:family="paragraph" style:name="P209">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05">
      <style:text-properties fo:font-size="12pt"/>
    </style:style>
    <style:style style:family="text" style:name="T1706">
      <style:text-properties fo:font-size="12pt"/>
    </style:style>
    <style:style style:parent-style-name="717" style:list-style-name="WWNum28" style:family="paragraph" style:name="P210">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07">
      <style:text-properties fo:font-size="12pt"/>
    </style:style>
    <style:style style:family="text" style:name="T1708">
      <style:text-properties fo:font-size="12pt"/>
    </style:style>
    <style:style style:parent-style-name="717" style:list-style-name="WWNum28" style:family="paragraph" style:name="P211">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09">
      <style:text-properties fo:font-size="12pt"/>
    </style:style>
    <style:style style:family="text" style:name="T1710">
      <style:text-properties fo:font-size="12pt"/>
    </style:style>
    <style:style style:parent-style-name="717" style:list-style-name="WWNum28" style:family="paragraph" style:name="P212">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11">
      <style:text-properties fo:font-size="12pt"/>
    </style:style>
    <style:style style:family="text" style:name="T1712">
      <style:text-properties fo:font-size="12pt"/>
    </style:style>
    <style:style style:parent-style-name="717" style:list-style-name="WWNum28" style:family="paragraph" style:name="P213">
      <style:paragraph-properties fo:margin-right="0cm" fo:border="non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713">
      <style:text-properties fo:font-size="12pt"/>
    </style:style>
    <style:style style:family="text" style:name="T1714">
      <style:text-properties fo:font-size="12pt"/>
    </style:style>
    <style:style style:family="text" style:name="T1715">
      <style:text-properties fo:font-size="12pt"/>
    </style:style>
    <style:style style:family="text" style:name="T1716">
      <style:text-properties fo:font-size="12pt"/>
    </style:style>
    <style:style style:family="text" style:name="T1717">
      <style:text-properties fo:font-size="12pt"/>
    </style:style>
    <style:style style:family="text" style:name="T1718">
      <style:text-properties fo:font-size="12pt"/>
    </style:style>
    <style:style style:family="text" style:name="T1719">
      <style:text-properties fo:font-size="12pt"/>
    </style:style>
    <style:style style:family="text" style:name="T1720">
      <style:text-properties fo:font-size="12pt"/>
    </style:style>
    <style:style style:family="paragraph" style:name="P214">
      <style:paragraph-properties fo:margin-left="1.251cm" fo:margin-right="0cm" fo:text-indent="0cm" fo:border="none"/>
      <style:text-properties fo:font-family="Times New Roman" style:font-family-asian="Times New Roman" style:font-family-complex="Times New Roman" fo:font-size="14pt"/>
    </style:style>
    <style:style style:family="text" style:name="T1721">
      <style:text-properties fo:font-size="12pt"/>
    </style:style>
    <style:style style:family="text" style:name="T1722">
      <style:text-properties fo:font-size="12pt"/>
    </style:style>
    <style:style style:family="paragraph" style:name="P215">
      <style:paragraph-properties fo:margin-left="0cm" fo:margin-right="0cm" fo:text-indent="0cm" fo:border="none"/>
      <style:text-properties fo:font-size="12pt"/>
    </style:style>
    <style:style style:family="text" style:name="T1723">
      <style:text-properties fo:font-size="12pt"/>
    </style:style>
    <style:style style:family="text" style:name="T1724">
      <style:text-properties fo:font-family="Times New Roman" style:font-family-asian="Times New Roman" style:font-family-complex="Times New Roman" fo:font-size="14pt"/>
    </style:style>
    <style:style style:family="paragraph" style:name="P216">
      <style:paragraph-properties fo:margin-left="0cm" fo:margin-right="0cm" fo:text-indent="0cm" fo:border="none"/>
      <style:text-properties fo:font-family="Times New Roman" style:font-family-asian="Times New Roman" style:font-family-complex="Times New Roman" fo:font-size="14pt"/>
    </style:style>
    <style:style style:family="text" style:name="T1725">
      <style:text-properties fo:font-size="12pt"/>
    </style:style>
    <style:style style:family="text" style:name="T1726">
      <style:text-properties fo:font-size="12pt"/>
    </style:style>
    <style:style style:family="paragraph" style:name="P217">
      <style:paragraph-properties fo:margin-left="0cm" fo:margin-right="0cm" fo:text-indent="0cm" fo:border="none"/>
      <style:text-properties fo:font-size="12pt"/>
    </style:style>
    <style:style style:family="text" style:name="T1727">
      <style:text-properties fo:font-size="12pt"/>
    </style:style>
    <style:style style:family="text" style:name="T1728">
      <style:text-properties fo:font-size="12pt"/>
    </style:style>
    <style:style style:family="text" style:name="T1729">
      <style:text-properties fo:font-size="12pt"/>
    </style:style>
    <style:style style:parent-style-name="169" style:family="paragraph" style:name="P218">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30">
      <style:text-properties fo:font-size="12pt"/>
    </style:style>
    <style:style style:family="text" style:name="T1731">
      <style:text-properties/>
    </style:style>
    <style:style style:parent-style-name="169" style:family="paragraph" style:name="P219">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32">
      <style:text-properties/>
    </style:style>
    <style:style style:family="text" style:name="T1733">
      <style:text-properties/>
    </style:style>
    <style:style style:family="text" style:name="T1734">
      <style:text-properties/>
    </style:style>
    <style:style style:family="paragraph" style:name="P220">
      <style:paragraph-properties/>
      <style:text-properties/>
    </style:style>
    <style:style style:family="text" style:name="T1735">
      <style:text-properties/>
    </style:style>
    <style:style style:family="text" style:name="T1736">
      <style:text-properties/>
    </style:style>
    <style:style style:parent-style-name="708" style:family="paragraph" style:name="P221">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parent-style-name="708" style:family="paragraph" style:name="P222">
      <style:paragraph-properties/>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737">
      <style:text-properties/>
    </style:style>
    <style:style style:family="text" style:name="T1738">
      <style:text-properties/>
    </style:style>
    <style:style style:family="paragraph" style:name="P223">
      <style:paragraph-properties fo:margin-left="0cm" fo:margin-right="0cm" fo:text-indent="0cm" fo:border="none"/>
      <style:text-properties fo:font-size="12pt"/>
    </style:style>
    <style:style style:family="text" style:name="T1739">
      <style:text-properties fo:font-size="12pt"/>
    </style:style>
    <style:style style:family="text" style:name="T1740">
      <style:text-properties fo:font-size="12pt"/>
    </style:style>
    <style:style style:family="text" style:name="T1741">
      <style:text-properties fo:font-size="12pt"/>
    </style:style>
    <style:style style:family="paragraph" style:name="P224">
      <style:paragraph-properties fo:margin-left="0cm" fo:margin-right="0cm" fo:text-indent="0cm" fo:border="none"/>
      <style:text-properties fo:font-family="Times New Roman" style:font-family-asian="Times New Roman" style:font-family-complex="Times New Roman" fo:font-size="14pt"/>
    </style:style>
    <style:style style:family="text" style:name="T1742">
      <style:text-properties fo:font-size="12pt"/>
    </style:style>
    <style:style style:family="text" style:name="T1743">
      <style:text-properties fo:font-size="12pt"/>
    </style:style>
    <style:style style:family="paragraph" style:name="P225">
      <style:paragraph-properties fo:margin-left="0cm" fo:margin-right="0cm" fo:text-indent="0cm" fo:border="none"/>
      <style:text-properties fo:font-size="12pt"/>
    </style:style>
    <style:style style:family="text" style:name="T1744">
      <style:text-properties fo:font-size="12pt"/>
    </style:style>
    <style:style style:family="text" style:name="T1745">
      <style:text-properties fo:font-size="12pt"/>
    </style:style>
    <style:style style:family="paragraph" style:name="P226">
      <style:paragraph-properties fo:margin-left="0cm" fo:margin-right="0cm" fo:text-indent="0cm" fo:border="none"/>
      <style:text-properties fo:font-family="Times New Roman" style:font-family-asian="Times New Roman" style:font-family-complex="Times New Roman" fo:font-size="14pt"/>
    </style:style>
    <style:style style:family="text" style:name="T1746">
      <style:text-properties fo:font-size="12pt"/>
    </style:style>
    <style:style style:family="text" style:name="T1747">
      <style:text-properties fo:font-size="12pt"/>
    </style:style>
    <style:style style:family="paragraph" style:name="P227">
      <style:paragraph-properties fo:margin-left="0cm" fo:margin-right="0cm" fo:text-indent="0cm" fo:border="none"/>
      <style:text-properties fo:font-size="12pt"/>
    </style:style>
    <style:style style:family="text" style:name="T1748">
      <style:text-properties fo:font-size="12pt"/>
    </style:style>
    <style:style style:family="text" style:name="T1749">
      <style:text-properties fo:font-size="12pt"/>
    </style:style>
    <style:style style:family="paragraph" style:name="P228">
      <style:paragraph-properties fo:margin-left="0cm" fo:margin-right="0cm" fo:text-indent="0cm" fo:border="none"/>
      <style:text-properties fo:font-family="Times New Roman" style:font-family-asian="Times New Roman" style:font-family-complex="Times New Roman" fo:font-size="14pt"/>
    </style:style>
    <style:style style:family="text" style:name="T1750">
      <style:text-properties fo:font-size="12pt"/>
    </style:style>
    <style:style style:family="text" style:name="T1751">
      <style:text-properties fo:font-size="12pt"/>
    </style:style>
    <style:style style:family="paragraph" style:name="P229">
      <style:paragraph-properties fo:margin-left="0cm" fo:margin-right="0cm" fo:text-indent="0cm" fo:border="none"/>
      <style:text-properties fo:font-size="12pt"/>
    </style:style>
    <style:style style:family="text" style:name="T1752">
      <style:text-properties fo:font-size="12pt"/>
    </style:style>
    <style:style style:family="text" style:name="T1753">
      <style:text-properties fo:font-size="12pt"/>
    </style:style>
    <style:style style:family="text" style:name="T1754">
      <style:text-properties fo:font-size="12pt"/>
    </style:style>
    <style:style style:family="paragraph" style:name="P230">
      <style:paragraph-properties fo:margin-left="0cm" fo:margin-right="0cm" fo:text-indent="0cm" fo:border="none"/>
      <style:text-properties fo:font-family="Times New Roman" style:font-family-asian="Times New Roman" style:font-family-complex="Times New Roman" fo:font-size="14pt"/>
    </style:style>
    <style:style style:family="text" style:name="T1755">
      <style:text-properties fo:font-size="12pt"/>
    </style:style>
    <style:style style:family="text" style:name="T1756">
      <style:text-properties fo:font-size="12pt"/>
    </style:style>
    <style:style style:family="paragraph" style:name="P231">
      <style:paragraph-properties fo:margin-left="0cm" fo:margin-right="0cm" fo:text-indent="0cm" fo:border="none"/>
      <style:text-properties fo:font-size="12pt"/>
    </style:style>
    <style:style style:family="text" style:name="T1757">
      <style:text-properties fo:font-size="12pt"/>
    </style:style>
    <style:style style:family="text" style:name="T1758">
      <style:text-properties fo:font-size="12pt"/>
    </style:style>
    <style:style style:family="text" style:name="T1759">
      <style:text-properties fo:font-size="12pt"/>
    </style:style>
    <style:style style:family="paragraph" style:name="P232">
      <style:paragraph-properties fo:margin-left="0cm" fo:margin-right="0cm" fo:text-indent="0cm" fo:border="none"/>
      <style:text-properties fo:font-family="Times New Roman" style:font-family-asian="Times New Roman" style:font-family-complex="Times New Roman" fo:font-size="14pt"/>
    </style:style>
    <style:style style:family="text" style:name="T1760">
      <style:text-properties fo:font-size="12pt"/>
    </style:style>
    <style:style style:family="text" style:name="T1761">
      <style:text-properties fo:font-size="12pt"/>
    </style:style>
    <style:style style:family="paragraph" style:name="P233">
      <style:paragraph-properties fo:margin-left="0cm" fo:margin-right="0cm" fo:text-indent="0cm" fo:border="none"/>
      <style:text-properties fo:font-size="14pt"/>
    </style:style>
    <style:style style:family="text" style:name="T1762">
      <style:text-properties fo:font-size="12pt"/>
    </style:style>
    <style:style style:family="text" style:name="T1763">
      <style:text-properties fo:font-size="12pt"/>
    </style:style>
    <style:style style:parent-style-name="169" style:family="paragraph" style:name="P234">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64">
      <style:text-properties/>
    </style:style>
    <style:style style:family="text" style:name="T1765">
      <style:text-properties/>
    </style:style>
    <style:style style:parent-style-name="169" style:family="paragraph" style:name="P235">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66">
      <style:text-properties/>
    </style:style>
    <style:style style:family="text" style:name="T1767">
      <style:text-properties/>
    </style:style>
    <style:style style:parent-style-name="169" style:family="paragraph" style:name="P236">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68">
      <style:text-properties/>
    </style:style>
    <style:style style:family="text" style:name="T1769">
      <style:text-properties/>
    </style:style>
    <style:style style:parent-style-name="708" style:family="paragraph" style:name="P237">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770">
      <style:text-properties/>
    </style:style>
    <style:style style:family="text" style:name="T1771">
      <style:text-properties/>
    </style:style>
    <style:style style:family="text" style:name="T1772">
      <style:text-properties fo:letter-spacing="-0.5pt"/>
    </style:style>
    <style:style style:family="text" style:name="T1773">
      <style:text-properties fo:letter-spacing="-0.5pt"/>
    </style:style>
    <style:style style:family="text" style:name="T1774">
      <style:text-properties fo:letter-spacing="-0.5pt"/>
    </style:style>
    <style:style style:family="text" style:name="T1775">
      <style:text-properties fo:letter-spacing="-0.1pt"/>
    </style:style>
    <style:style style:family="text" style:name="T1776">
      <style:text-properties/>
    </style:style>
    <style:style style:parent-style-name="716" style:family="paragraph" style:name="P238">
      <style:paragraph-properties fo:line-height="115%" fo:text-align="justify" fo:margin-left="0cm" fo:margin-right="0.864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777">
      <style:text-properties fo:letter-spacing="-0.15pt"/>
    </style:style>
    <style:style style:family="text" style:name="T1778">
      <style:text-properties fo:letter-spacing="-0.15pt"/>
    </style:style>
    <style:style style:family="text" style:name="T1779">
      <style:text-properties fo:letter-spacing="-0.15pt"/>
    </style:style>
    <style:style style:family="text" style:name="T1780">
      <style:text-properties fo:letter-spacing="-0.15pt"/>
    </style:style>
    <style:style style:family="text" style:name="T1781">
      <style:text-properties fo:letter-spacing="-0.15pt"/>
    </style:style>
    <style:style style:family="text" style:name="T1782">
      <style:text-properties fo:letter-spacing="-0.15pt"/>
    </style:style>
    <style:style style:family="text" style:name="T1783">
      <style:text-properties fo:letter-spacing="-0.15pt"/>
    </style:style>
    <style:style style:family="text" style:name="T1784">
      <style:text-properties fo:letter-spacing="-0.15pt"/>
    </style:style>
    <style:style style:family="text" style:name="T1785">
      <style:text-properties fo:letter-spacing="-0.15pt"/>
    </style:style>
    <style:style style:family="text" style:name="T1786">
      <style:text-properties fo:letter-spacing="-0.15pt"/>
    </style:style>
    <style:style style:family="text" style:name="T1787">
      <style:text-properties fo:letter-spacing="-0.15pt"/>
    </style:style>
    <style:style style:family="text" style:name="T1788">
      <style:text-properties fo:letter-spacing="-0.15pt"/>
    </style:style>
    <style:style style:family="text" style:name="T1789">
      <style:text-properties fo:letter-spacing="-0.1pt"/>
    </style:style>
    <style:style style:family="text" style:name="T1790">
      <style:text-properties fo:letter-spacing="-0.1pt"/>
    </style:style>
    <style:style style:family="text" style:name="T1791">
      <style:text-properties fo:letter-spacing="-0.1pt"/>
    </style:style>
    <style:style style:family="text" style:name="T1792">
      <style:text-properties fo:letter-spacing="-0.1pt"/>
    </style:style>
    <style:style style:family="text" style:name="T1793">
      <style:text-properties fo:letter-spacing="-0.1pt"/>
    </style:style>
    <style:style style:family="text" style:name="T1794">
      <style:text-properties fo:letter-spacing="-0.1pt"/>
    </style:style>
    <style:style style:family="text" style:name="T1795">
      <style:text-properties fo:letter-spacing="-0.1pt"/>
    </style:style>
    <style:style style:family="text" style:name="T1796">
      <style:text-properties fo:letter-spacing="-0.1pt"/>
    </style:style>
    <style:style style:family="text" style:name="T1797">
      <style:text-properties fo:letter-spacing="-0.1pt"/>
    </style:style>
    <style:style style:family="text" style:name="T1798">
      <style:text-properties fo:letter-spacing="-0.1pt"/>
    </style:style>
    <style:style style:family="text" style:name="T1799">
      <style:text-properties fo:letter-spacing="-0.1pt"/>
    </style:style>
    <style:style style:family="text" style:name="T1800">
      <style:text-properties fo:letter-spacing="-0.1pt"/>
    </style:style>
    <style:style style:family="text" style:name="T1801">
      <style:text-properties fo:letter-spacing="-0.1pt"/>
    </style:style>
    <style:style style:parent-style-name="716" style:family="paragraph" style:name="P239">
      <style:paragraph-properties fo:line-height="115%" fo:margin-left="0cm" fo:margin-right="0.52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802">
      <style:text-properties fo:letter-spacing="-0.1pt"/>
    </style:style>
    <style:style style:family="text" style:name="T1803">
      <style:text-properties fo:letter-spacing="-0.1pt"/>
    </style:style>
    <style:style style:family="text" style:name="T1804">
      <style:text-properties fo:letter-spacing="-0.1pt"/>
    </style:style>
    <style:style style:family="text" style:name="T1805">
      <style:text-properties fo:letter-spacing="-0.1pt"/>
    </style:style>
    <style:style style:family="text" style:name="T1806">
      <style:text-properties fo:letter-spacing="-0.1pt"/>
    </style:style>
    <style:style style:family="text" style:name="T1807">
      <style:text-properties fo:letter-spacing="-0.1pt"/>
    </style:style>
    <style:style style:family="text" style:name="T1808">
      <style:text-properties fo:letter-spacing="-0.1pt"/>
    </style:style>
    <style:style style:family="text" style:name="T1809">
      <style:text-properties fo:letter-spacing="-0.1pt"/>
    </style:style>
    <style:style style:family="text" style:name="T1810">
      <style:text-properties fo:letter-spacing="-0.1pt"/>
    </style:style>
    <style:style style:family="text" style:name="T1811">
      <style:text-properties fo:letter-spacing="-0.1pt"/>
    </style:style>
    <style:style style:family="text" style:name="T1812">
      <style:text-properties fo:letter-spacing="-0.1pt"/>
    </style:style>
    <style:style style:family="text" style:name="T1813">
      <style:text-properties fo:letter-spacing="-0.1pt"/>
    </style:style>
    <style:style style:family="text" style:name="T1814">
      <style:text-properties fo:letter-spacing="-0.1pt"/>
    </style:style>
    <style:style style:family="text" style:name="T1815">
      <style:text-properties fo:letter-spacing="-0.1pt"/>
    </style:style>
    <style:style style:family="text" style:name="T1816">
      <style:text-properties fo:letter-spacing="-0.1pt"/>
    </style:style>
    <style:style style:family="text" style:name="T1817">
      <style:text-properties fo:letter-spacing="-0.1pt"/>
    </style:style>
    <style:style style:family="text" style:name="T1818">
      <style:text-properties fo:letter-spacing="-0.1pt"/>
    </style:style>
    <style:style style:parent-style-name="716" style:family="paragraph" style:name="P240">
      <style:paragraph-properties fo:line-height="115%"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819">
      <style:text-properties fo:letter-spacing="-0.3pt"/>
    </style:style>
    <style:style style:family="text" style:name="T1820">
      <style:text-properties fo:letter-spacing="-0.3pt"/>
    </style:style>
    <style:style style:family="text" style:name="T1821">
      <style:text-properties fo:letter-spacing="-0.3pt"/>
    </style:style>
    <style:style style:family="text" style:name="T1822">
      <style:text-properties fo:letter-spacing="-0.3pt"/>
    </style:style>
    <style:style style:family="text" style:name="T1823">
      <style:text-properties fo:letter-spacing="-0.3pt"/>
    </style:style>
    <style:style style:family="text" style:name="T1824">
      <style:text-properties fo:letter-spacing="-0.3pt"/>
    </style:style>
    <style:style style:family="text" style:name="T1825">
      <style:text-properties fo:letter-spacing="-0.3pt"/>
    </style:style>
    <style:style style:family="text" style:name="T1826">
      <style:text-properties/>
    </style:style>
    <style:style style:family="text" style:name="T1827">
      <style:text-properties fo:letter-spacing="-0.3pt"/>
    </style:style>
    <style:style style:family="text" style:name="T1828">
      <style:text-properties fo:letter-spacing="-0.3pt"/>
    </style:style>
    <style:style style:family="text" style:name="T1829">
      <style:text-properties fo:letter-spacing="-0.3pt"/>
    </style:style>
    <style:style style:family="text" style:name="T1830">
      <style:text-properties fo:letter-spacing="-0.3pt"/>
    </style:style>
    <style:style style:parent-style-name="716" style:family="paragraph" style:name="P241">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831">
      <style:text-properties fo:letter-spacing="-0.15pt"/>
    </style:style>
    <style:style style:family="text" style:name="T1832">
      <style:text-properties fo:letter-spacing="-0.15pt"/>
    </style:style>
    <style:style style:family="text" style:name="T1833">
      <style:text-properties fo:letter-spacing="-0.15pt"/>
    </style:style>
    <style:style style:family="text" style:name="T1834">
      <style:text-properties fo:letter-spacing="-0.15pt"/>
    </style:style>
    <style:style style:family="text" style:name="T1835">
      <style:text-properties fo:letter-spacing="-0.15pt"/>
    </style:style>
    <style:style style:family="text" style:name="T1836">
      <style:text-properties fo:letter-spacing="-0.15pt"/>
    </style:style>
    <style:style style:family="text" style:name="T1837">
      <style:text-properties fo:letter-spacing="-0.15pt"/>
    </style:style>
    <style:style style:family="text" style:name="T1838">
      <style:text-properties fo:letter-spacing="-0.15pt"/>
    </style:style>
    <style:style style:family="text" style:name="T1839">
      <style:text-properties fo:letter-spacing="-0.15pt"/>
    </style:style>
    <style:style style:family="text" style:name="T1840">
      <style:text-properties fo:letter-spacing="-0.15pt"/>
    </style:style>
    <style:style style:family="text" style:name="T1841">
      <style:text-properties fo:letter-spacing="-0.15pt"/>
    </style:style>
    <style:style style:family="text" style:name="T1842">
      <style:text-properties fo:letter-spacing="-0.15pt"/>
    </style:style>
    <style:style style:family="text" style:name="T1843">
      <style:text-properties fo:letter-spacing="-0.15pt"/>
    </style:style>
    <style:style style:family="text" style:name="T1844">
      <style:text-properties fo:letter-spacing="-0.15pt"/>
    </style:style>
    <style:style style:family="text" style:name="T1845">
      <style:text-properties fo:letter-spacing="-0.15pt"/>
    </style:style>
    <style:style style:family="text" style:name="T1846">
      <style:text-properties fo:letter-spacing="-0.15pt"/>
    </style:style>
    <style:style style:family="text" style:name="T1847">
      <style:text-properties fo:letter-spacing="-0.15pt"/>
    </style:style>
    <style:style style:parent-style-name="716" style:family="paragraph" style:name="P242">
      <style:paragraph-properties fo:line-height="115%"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848">
      <style:text-properties fo:letter-spacing="-0.1pt"/>
    </style:style>
    <style:style style:family="text" style:name="T1849">
      <style:text-properties fo:letter-spacing="-0.1pt"/>
    </style:style>
    <style:style style:family="text" style:name="T1850">
      <style:text-properties fo:letter-spacing="-0.1pt"/>
    </style:style>
    <style:style style:family="text" style:name="T1851">
      <style:text-properties fo:letter-spacing="-0.1pt"/>
    </style:style>
    <style:style style:family="text" style:name="T1852">
      <style:text-properties fo:letter-spacing="-0.1pt"/>
    </style:style>
    <style:style style:family="text" style:name="T1853">
      <style:text-properties fo:letter-spacing="-0.1pt"/>
    </style:style>
    <style:style style:family="text" style:name="T1854">
      <style:text-properties fo:letter-spacing="-0.1pt"/>
    </style:style>
    <style:style style:family="text" style:name="T1855">
      <style:text-properties fo:letter-spacing="-0.1pt"/>
    </style:style>
    <style:style style:family="text" style:name="T1856">
      <style:text-properties fo:letter-spacing="-0.1pt"/>
    </style:style>
    <style:style style:family="text" style:name="T1857">
      <style:text-properties fo:letter-spacing="-0.1pt"/>
    </style:style>
    <style:style style:family="text" style:name="T1858">
      <style:text-properties fo:letter-spacing="-0.1pt"/>
    </style:style>
    <style:style style:family="text" style:name="T1859">
      <style:text-properties fo:letter-spacing="-0.1pt"/>
    </style:style>
    <style:style style:family="text" style:name="T1860">
      <style:text-properties fo:letter-spacing="-0.1pt"/>
    </style:style>
    <style:style style:family="text" style:name="T1861">
      <style:text-properties fo:letter-spacing="-0.1pt"/>
    </style:style>
    <style:style style:family="text" style:name="T1862">
      <style:text-properties fo:letter-spacing="-0.1pt"/>
    </style:style>
    <style:style style:family="text" style:name="T1863">
      <style:text-properties fo:letter-spacing="-0.1pt"/>
    </style:style>
    <style:style style:parent-style-name="716" style:family="paragraph" style:name="P243">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864">
      <style:text-properties fo:letter-spacing="-0.1pt"/>
    </style:style>
    <style:style style:parent-style-name="717" style:list-style-name="WWNum3" style:family="paragraph" style:name="P244">
      <style:paragraph-properties fo:line-height="115%" fo:margin-left="1.443cm" fo:margin-right="0.9226cm" fo:text-indent="0cm" fo:margin-top="9.05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865">
      <style:text-properties fo:font-size="12pt"/>
    </style:style>
    <style:style style:family="text" style:name="T1866">
      <style:text-properties fo:font-size="12pt" fo:letter-spacing="-0.15pt"/>
    </style:style>
    <style:style style:family="text" style:name="T1867">
      <style:text-properties fo:font-size="12pt"/>
    </style:style>
    <style:style style:family="text" style:name="T1868">
      <style:text-properties fo:font-size="12pt" fo:letter-spacing="-0.15pt"/>
    </style:style>
    <style:style style:family="text" style:name="T1869">
      <style:text-properties fo:font-size="12pt"/>
    </style:style>
    <style:style style:family="text" style:name="T1870">
      <style:text-properties fo:font-size="12pt" fo:letter-spacing="-0.15pt"/>
    </style:style>
    <style:style style:family="text" style:name="T1871">
      <style:text-properties fo:font-size="12pt"/>
    </style:style>
    <style:style style:family="text" style:name="T1872">
      <style:text-properties fo:font-size="12pt" fo:letter-spacing="-0.15pt"/>
    </style:style>
    <style:style style:family="text" style:name="T1873">
      <style:text-properties fo:font-size="12pt"/>
    </style:style>
    <style:style style:family="text" style:name="T1874">
      <style:text-properties fo:font-size="12pt" fo:letter-spacing="-0.15pt"/>
    </style:style>
    <style:style style:family="text" style:name="T1875">
      <style:text-properties fo:font-size="12pt"/>
    </style:style>
    <style:style style:family="text" style:name="T1876">
      <style:text-properties fo:font-size="12pt" fo:letter-spacing="-0.15pt"/>
    </style:style>
    <style:style style:family="text" style:name="T1877">
      <style:text-properties fo:font-size="12pt"/>
    </style:style>
    <style:style style:family="text" style:name="T1878">
      <style:text-properties fo:font-size="12pt" fo:letter-spacing="-0.15pt"/>
    </style:style>
    <style:style style:family="text" style:name="T1879">
      <style:text-properties fo:font-size="12pt"/>
    </style:style>
    <style:style style:family="text" style:name="T1880">
      <style:text-properties fo:font-size="12pt" fo:letter-spacing="-0.15pt"/>
    </style:style>
    <style:style style:family="text" style:name="T1881">
      <style:text-properties fo:font-size="12pt"/>
    </style:style>
    <style:style style:family="text" style:name="T1882">
      <style:text-properties fo:font-size="12pt" fo:letter-spacing="-0.15pt"/>
    </style:style>
    <style:style style:family="text" style:name="T1883">
      <style:text-properties fo:font-size="12pt"/>
    </style:style>
    <style:style style:family="text" style:name="T1884">
      <style:text-properties fo:font-size="12pt" fo:letter-spacing="-0.15pt"/>
    </style:style>
    <style:style style:family="text" style:name="T1885">
      <style:text-properties fo:font-size="12pt"/>
    </style:style>
    <style:style style:family="text" style:name="T1886">
      <style:text-properties fo:font-size="12pt" fo:letter-spacing="-0.15pt"/>
    </style:style>
    <style:style style:family="text" style:name="T1887">
      <style:text-properties fo:font-size="12pt"/>
    </style:style>
    <style:style style:family="text" style:name="T1888">
      <style:text-properties fo:font-size="12pt" fo:letter-spacing="-0.15pt"/>
    </style:style>
    <style:style style:family="text" style:name="T1889">
      <style:text-properties fo:font-size="12pt"/>
    </style:style>
    <style:style style:family="text" style:name="T1890">
      <style:text-properties fo:font-size="12pt" fo:letter-spacing="-0.15pt"/>
    </style:style>
    <style:style style:family="text" style:name="T1891">
      <style:text-properties fo:font-size="12pt"/>
    </style:style>
    <style:style style:parent-style-name="717" style:list-style-name="WWNum3" style:family="paragraph" style:name="P245">
      <style:paragraph-properties fo:line-height="115%" fo:margin-left="1.443cm" fo:margin-right="2.013cm" fo:text-indent="0cm" fo:margin-top="7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892">
      <style:text-properties fo:font-size="12pt"/>
    </style:style>
    <style:style style:family="text" style:name="T1893">
      <style:text-properties fo:font-size="12pt" fo:letter-spacing="-0.15pt"/>
    </style:style>
    <style:style style:family="text" style:name="T1894">
      <style:text-properties fo:font-size="12pt"/>
    </style:style>
    <style:style style:family="text" style:name="T1895">
      <style:text-properties fo:font-size="12pt" fo:letter-spacing="-0.15pt"/>
    </style:style>
    <style:style style:family="text" style:name="T1896">
      <style:text-properties fo:font-size="12pt"/>
    </style:style>
    <style:style style:family="text" style:name="T1897">
      <style:text-properties fo:font-size="12pt" fo:letter-spacing="-0.15pt"/>
    </style:style>
    <style:style style:family="text" style:name="T1898">
      <style:text-properties fo:font-size="12pt"/>
    </style:style>
    <style:style style:family="text" style:name="T1899">
      <style:text-properties fo:font-size="12pt" fo:letter-spacing="-0.15pt"/>
    </style:style>
    <style:style style:family="text" style:name="T1900">
      <style:text-properties fo:font-size="12pt"/>
    </style:style>
    <style:style style:family="text" style:name="T1901">
      <style:text-properties fo:font-size="12pt" fo:letter-spacing="-0.15pt"/>
    </style:style>
    <style:style style:family="text" style:name="T1902">
      <style:text-properties fo:font-size="12pt"/>
    </style:style>
    <style:style style:family="text" style:name="T1903">
      <style:text-properties fo:font-size="12pt" fo:letter-spacing="-0.15pt"/>
    </style:style>
    <style:style style:family="text" style:name="T1904">
      <style:text-properties fo:font-size="12pt"/>
    </style:style>
    <style:style style:family="text" style:name="T1905">
      <style:text-properties fo:font-size="12pt" fo:letter-spacing="-0.15pt"/>
    </style:style>
    <style:style style:family="text" style:name="T1906">
      <style:text-properties fo:font-size="12pt"/>
    </style:style>
    <style:style style:family="text" style:name="T1907">
      <style:text-properties fo:font-size="12pt" fo:letter-spacing="-0.15pt"/>
    </style:style>
    <style:style style:family="text" style:name="T1908">
      <style:text-properties fo:font-size="12pt"/>
    </style:style>
    <style:style style:family="text" style:name="T1909">
      <style:text-properties fo:font-size="12pt" fo:letter-spacing="-0.15pt"/>
    </style:style>
    <style:style style:family="text" style:name="T1910">
      <style:text-properties fo:font-size="12pt"/>
    </style:style>
    <style:style style:family="text" style:name="T1911">
      <style:text-properties fo:font-size="12pt" fo:letter-spacing="-0.15pt"/>
    </style:style>
    <style:style style:family="text" style:name="T1912">
      <style:text-properties fo:font-size="12pt"/>
    </style:style>
    <style:style style:family="text" style:name="T1913">
      <style:text-properties fo:font-size="12pt" fo:letter-spacing="-0.15pt"/>
    </style:style>
    <style:style style:family="text" style:name="T1914">
      <style:text-properties fo:font-size="12pt"/>
    </style:style>
    <style:style style:parent-style-name="717" style:list-style-name="WWNum3" style:family="paragraph" style:name="P246">
      <style:paragraph-properties fo:margin-left="0cm" fo:margin-right="0cm" fo:text-indent="-0.6368cm" fo:margin-top="7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915">
      <style:text-properties fo:font-size="12pt"/>
    </style:style>
    <style:style style:family="text" style:name="T1916">
      <style:text-properties fo:font-size="12pt" fo:letter-spacing="-0.1pt"/>
    </style:style>
    <style:style style:parent-style-name="717" style:list-style-name="WWNum3" style:family="paragraph" style:name="P247">
      <style:paragraph-properties fo:line-height="115%" fo:margin-left="1.443cm" fo:margin-right="0.5539cm" fo:text-indent="0cm" fo:margin-top="9.05pt" fo:margin-bottom="0pt">
        <style:tab-stops>
          <style:tab-stop style:position="0.9984cm" style:type="left"/>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917">
      <style:text-properties fo:font-size="12pt"/>
    </style:style>
    <style:style style:family="text" style:name="T1918">
      <style:text-properties fo:font-size="12pt" fo:letter-spacing="-0.1pt"/>
    </style:style>
    <style:style style:family="text" style:name="T1919">
      <style:text-properties fo:font-size="12pt"/>
    </style:style>
    <style:style style:family="text" style:name="T1920">
      <style:text-properties fo:font-size="12pt" fo:letter-spacing="-0.1pt"/>
    </style:style>
    <style:style style:family="text" style:name="T1921">
      <style:text-properties fo:font-size="12pt"/>
    </style:style>
    <style:style style:family="text" style:name="T1922">
      <style:text-properties fo:font-size="12pt" fo:letter-spacing="-0.1pt"/>
    </style:style>
    <style:style style:family="text" style:name="T1923">
      <style:text-properties fo:font-size="12pt"/>
    </style:style>
    <style:style style:family="text" style:name="T1924">
      <style:text-properties fo:font-size="12pt" fo:letter-spacing="-0.1pt"/>
    </style:style>
    <style:style style:family="text" style:name="T1925">
      <style:text-properties fo:font-size="12pt"/>
    </style:style>
    <style:style style:family="text" style:name="T1926">
      <style:text-properties fo:font-size="12pt" fo:letter-spacing="-0.1pt"/>
    </style:style>
    <style:style style:family="text" style:name="T1927">
      <style:text-properties fo:font-size="12pt"/>
    </style:style>
    <style:style style:family="text" style:name="T1928">
      <style:text-properties fo:font-size="12pt" fo:letter-spacing="-0.1pt"/>
    </style:style>
    <style:style style:family="text" style:name="T1929">
      <style:text-properties fo:font-size="12pt"/>
    </style:style>
    <style:style style:family="text" style:name="T1930">
      <style:text-properties fo:font-size="12pt" fo:letter-spacing="-0.1pt"/>
    </style:style>
    <style:style style:family="text" style:name="T1931">
      <style:text-properties fo:font-size="12pt"/>
    </style:style>
    <style:style style:family="text" style:name="T1932">
      <style:text-properties fo:font-size="12pt" fo:letter-spacing="-0.1pt"/>
    </style:style>
    <style:style style:family="text" style:name="T1933">
      <style:text-properties fo:font-size="12pt"/>
    </style:style>
    <style:style style:family="text" style:name="T1934">
      <style:text-properties fo:font-size="12pt" fo:letter-spacing="-0.1pt"/>
    </style:style>
    <style:style style:family="text" style:name="T1935">
      <style:text-properties fo:font-size="12pt"/>
    </style:style>
    <style:style style:family="text" style:name="T1936">
      <style:text-properties fo:font-size="12pt" fo:letter-spacing="-0.1pt"/>
    </style:style>
    <style:style style:family="text" style:name="T1937">
      <style:text-properties fo:font-size="12pt"/>
    </style:style>
    <style:style style:family="text" style:name="T1938">
      <style:text-properties fo:font-size="12pt" fo:letter-spacing="-0.1pt"/>
    </style:style>
    <style:style style:family="text" style:name="T1939">
      <style:text-properties fo:font-size="12pt"/>
    </style:style>
    <style:style style:family="text" style:name="T1940">
      <style:text-properties fo:font-size="12pt" fo:letter-spacing="-0.1pt"/>
    </style:style>
    <style:style style:family="text" style:name="T1941">
      <style:text-properties fo:font-size="12pt"/>
    </style:style>
    <style:style style:family="text" style:name="T1942">
      <style:text-properties fo:font-size="12pt" fo:letter-spacing="-0.1pt"/>
    </style:style>
    <style:style style:family="text" style:name="T1943">
      <style:text-properties fo:font-size="12pt"/>
    </style:style>
    <style:style style:family="text" style:name="T1944">
      <style:text-properties fo:font-size="12pt" fo:letter-spacing="-0.1pt"/>
    </style:style>
    <style:style style:family="text" style:name="T1945">
      <style:text-properties fo:font-size="12pt"/>
    </style:style>
    <style:style style:parent-style-name="716" style:family="paragraph" style:name="P248">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46">
      <style:text-properties fo:letter-spacing="-0.1pt"/>
    </style:style>
    <style:style style:family="text" style:name="T1947">
      <style:text-properties fo:letter-spacing="-0.05pt"/>
    </style:style>
    <style:style style:family="text" style:name="T1948">
      <style:text-properties fo:letter-spacing="-0.1pt"/>
    </style:style>
    <style:style style:family="text" style:name="T1949">
      <style:text-properties fo:letter-spacing="-0.05pt"/>
    </style:style>
    <style:style style:family="text" style:name="T1950">
      <style:text-properties fo:letter-spacing="-0.1pt"/>
    </style:style>
    <style:style style:family="text" style:name="T1951">
      <style:text-properties fo:letter-spacing="-0.05pt"/>
    </style:style>
    <style:style style:family="text" style:name="T1952">
      <style:text-properties fo:letter-spacing="-0.1pt"/>
    </style:style>
    <style:style style:family="text" style:name="T1953">
      <style:text-properties fo:letter-spacing="-0.05pt"/>
    </style:style>
    <style:style style:family="text" style:name="T1954">
      <style:text-properties fo:letter-spacing="-0.1pt"/>
    </style:style>
    <style:style style:family="text" style:name="T1955">
      <style:text-properties fo:letter-spacing="-0.05pt"/>
    </style:style>
    <style:style style:family="text" style:name="T1956">
      <style:text-properties fo:letter-spacing="-0.1pt"/>
    </style:style>
    <style:style style:family="text" style:name="T1957">
      <style:text-properties fo:letter-spacing="-0.05pt"/>
    </style:style>
    <style:style style:family="text" style:name="T1958">
      <style:text-properties fo:letter-spacing="-0.25pt"/>
    </style:style>
    <style:style style:parent-style-name="707" style:master-page-name="MasterPage12" style:family="paragraph" style:name="P249">
      <style:paragraph-properties fo:margin-top="3.5pt" fo:margin-bottom="0pt"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1959">
      <style:text-properties fo:letter-spacing="-0.1pt"/>
    </style:style>
    <style:style style:parent-style-name="716" style:family="paragraph" style:name="P250">
      <style:paragraph-properties fo:margin-left="0cm" fo:margin-right="0cm" fo:text-indent="0cm" fo:margin-top="0.4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60">
      <style:text-properties fo:font-size="25.5pt" fo:font-weight="bold"/>
    </style:style>
    <style:style style:family="text" style:name="T1961">
      <style:text-properties fo:font-size="25.5pt" fo:font-weight="bold"/>
    </style:style>
    <style:style style:parent-style-name="708" style:family="paragraph" style:name="P251">
      <style:paragraph-properties fo:margin-top="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1962">
      <style:text-properties fo:letter-spacing="-0.5pt"/>
    </style:style>
    <style:style style:family="text" style:name="T1963">
      <style:text-properties fo:letter-spacing="-0.5pt"/>
    </style:style>
    <style:style style:family="text" style:name="T1964">
      <style:text-properties fo:letter-spacing="-0.5pt"/>
    </style:style>
    <style:style style:family="text" style:name="T1965">
      <style:text-properties fo:letter-spacing="-0.1pt"/>
    </style:style>
    <style:style style:parent-style-name="716" style:family="paragraph" style:name="P252">
      <style:paragraph-properties fo:margin-left="0cm" fo:margin-right="0cm" fo:text-indent="0cm" fo:margin-top="0.3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66">
      <style:text-properties fo:font-size="23pt" fo:font-weight="bold"/>
    </style:style>
    <style:style style:family="text" style:name="T1967">
      <style:text-properties fo:font-size="23pt" fo:font-weight="bold"/>
    </style:style>
    <style:style style:parent-style-name="712" style:family="paragraph" style:name="P253">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968">
      <style:text-properties fo:font-size="14pt" fo:letter-spacing="-0.1pt" fo:font-weight="bold"/>
    </style:style>
    <style:style style:parent-style-name="716" style:family="paragraph" style:name="P254">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69">
      <style:text-properties fo:font-size="17pt" fo:font-weight="bold"/>
    </style:style>
    <style:style style:family="text" style:name="T1970">
      <style:text-properties fo:font-size="17pt" fo:font-weight="bold"/>
    </style:style>
    <style:style style:parent-style-name="716" style:family="paragraph" style:name="P255">
      <style:paragraph-properties fo:margin-left="0cm" fo:margin-right="0.4569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71">
      <style:text-properties fo:letter-spacing="-0.15pt"/>
    </style:style>
    <style:style style:family="text" style:name="T1972">
      <style:text-properties fo:letter-spacing="-0.15pt"/>
    </style:style>
    <style:style style:family="text" style:name="T1973">
      <style:text-properties fo:letter-spacing="-0.15pt"/>
    </style:style>
    <style:style style:family="text" style:name="T1974">
      <style:text-properties fo:letter-spacing="-0.15pt"/>
    </style:style>
    <style:style style:family="text" style:name="T1975">
      <style:text-properties fo:letter-spacing="-0.15pt"/>
    </style:style>
    <style:style style:family="text" style:name="T1976">
      <style:text-properties fo:letter-spacing="-0.15pt"/>
    </style:style>
    <style:style style:family="text" style:name="T1977">
      <style:text-properties fo:letter-spacing="-0.15pt"/>
    </style:style>
    <style:style style:family="text" style:name="T1978">
      <style:text-properties fo:letter-spacing="-0.15pt"/>
    </style:style>
    <style:style style:family="text" style:name="T1979">
      <style:text-properties fo:letter-spacing="-0.15pt"/>
    </style:style>
    <style:style style:family="text" style:name="T1980">
      <style:text-properties fo:letter-spacing="-0.15pt"/>
    </style:style>
    <style:style style:family="text" style:name="T1981">
      <style:text-properties fo:letter-spacing="-0.25pt"/>
    </style:style>
    <style:style style:family="text" style:name="T1982">
      <style:text-properties fo:letter-spacing="-0.25pt"/>
    </style:style>
    <style:style style:family="text" style:name="T1983">
      <style:text-properties fo:letter-spacing="-0.25pt"/>
    </style:style>
    <style:style style:family="text" style:name="T1984">
      <style:text-properties fo:letter-spacing="-0.25pt"/>
    </style:style>
    <style:style style:family="text" style:name="T1985">
      <style:text-properties fo:letter-spacing="-0.25pt"/>
    </style:style>
    <style:style style:family="text" style:name="T1986">
      <style:text-properties fo:letter-spacing="-0.25pt"/>
    </style:style>
    <style:style style:family="text" style:name="T1987">
      <style:text-properties fo:letter-spacing="-0.25pt"/>
    </style:style>
    <style:style style:family="text" style:name="T1988">
      <style:text-properties fo:letter-spacing="-0.25pt"/>
    </style:style>
    <style:style style:family="text" style:name="T1989">
      <style:text-properties fo:letter-spacing="-0.25pt"/>
    </style:style>
    <style:style style:family="text" style:name="T1990">
      <style:text-properties/>
    </style:style>
    <style:style style:parent-style-name="716" style:family="paragraph" style:name="P256">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91">
      <style:text-properties fo:font-size="18pt"/>
    </style:style>
    <style:style style:family="text" style:name="T1992">
      <style:text-properties fo:font-size="18pt"/>
    </style:style>
    <style:style style:parent-style-name="712" style:family="paragraph" style:name="P257">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1993">
      <style:text-properties fo:font-size="14pt" fo:letter-spacing="-0.1pt" fo:font-weight="bold"/>
    </style:style>
    <style:style style:parent-style-name="716" style:family="paragraph" style:name="P258">
      <style:paragraph-properties fo:margin-left="0cm" fo:margin-right="0cm" fo:text-indent="0cm" fo:margin-top="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1994">
      <style:text-properties fo:font-size="22pt" fo:font-weight="bold"/>
    </style:style>
    <style:style style:family="text" style:name="T1995">
      <style:text-properties fo:font-size="22pt" fo:font-weight="bold"/>
    </style:style>
    <style:style style:parent-style-name="710" style:list-style-name="WWNum4" style:family="paragraph" style:name="P259">
      <style:paragraph-properties fo:margin-left="0cm" fo:margin-right="0cm" fo:text-indent="-0.5116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1996">
      <style:text-properties fo:letter-spacing="-0.3pt"/>
    </style:style>
    <style:style style:family="text" style:name="T1997">
      <style:text-properties fo:letter-spacing="-0.3pt"/>
    </style:style>
    <style:style style:family="text" style:name="T1998">
      <style:text-properties fo:letter-spacing="-0.3pt"/>
    </style:style>
    <style:style style:family="text" style:name="T1999">
      <style:text-properties fo:letter-spacing="-0.15pt"/>
    </style:style>
    <style:style style:parent-style-name="716" style:family="paragraph" style:name="P260">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00">
      <style:text-properties fo:font-size="17pt" fo:font-style="italic" fo:font-weight="bold"/>
    </style:style>
    <style:style style:family="text" style:name="T2001">
      <style:text-properties fo:font-size="17pt" fo:font-style="italic" fo:font-weight="bold"/>
    </style:style>
    <style:style style:parent-style-name="716" style:family="paragraph" style:name="P261">
      <style:paragraph-properties fo:margin-left="0cm" fo:margin-right="0.4569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02">
      <style:text-properties fo:letter-spacing="-0.15pt"/>
    </style:style>
    <style:style style:family="text" style:name="T2003">
      <style:text-properties fo:letter-spacing="-0.15pt"/>
    </style:style>
    <style:style style:family="text" style:name="T2004">
      <style:text-properties fo:letter-spacing="-0.15pt"/>
    </style:style>
    <style:style style:family="text" style:name="T2005">
      <style:text-properties fo:letter-spacing="-0.15pt"/>
    </style:style>
    <style:style style:family="text" style:name="T2006">
      <style:text-properties fo:letter-spacing="-0.15pt"/>
    </style:style>
    <style:style style:family="text" style:name="T2007">
      <style:text-properties fo:letter-spacing="-0.15pt"/>
    </style:style>
    <style:style style:family="text" style:name="T2008">
      <style:text-properties fo:letter-spacing="-0.15pt"/>
    </style:style>
    <style:style style:family="text" style:name="T2009">
      <style:text-properties fo:letter-spacing="-0.15pt"/>
    </style:style>
    <style:style style:family="text" style:name="T2010">
      <style:text-properties fo:letter-spacing="-0.15pt"/>
    </style:style>
    <style:style style:family="text" style:name="T2011">
      <style:text-properties fo:letter-spacing="-0.15pt"/>
    </style:style>
    <style:style style:family="text" style:name="T2012">
      <style:text-properties fo:letter-spacing="-0.15pt"/>
    </style:style>
    <style:style style:family="text" style:name="T2013">
      <style:text-properties fo:letter-spacing="-0.15pt"/>
    </style:style>
    <style:style style:family="text" style:name="T2014">
      <style:text-properties fo:letter-spacing="-0.15pt"/>
    </style:style>
    <style:style style:family="text" style:name="T2015">
      <style:text-properties fo:letter-spacing="-0.15pt"/>
    </style:style>
    <style:style style:family="text" style:name="T2016">
      <style:text-properties fo:letter-spacing="-0.15pt"/>
    </style:style>
    <style:style style:family="text" style:name="T2017">
      <style:text-properties fo:letter-spacing="-0.15pt"/>
    </style:style>
    <style:style style:family="text" style:name="T2018">
      <style:text-properties fo:letter-spacing="-0.15pt"/>
    </style:style>
    <style:style style:family="text" style:name="T2019">
      <style:text-properties fo:letter-spacing="-0.15pt"/>
    </style:style>
    <style:style style:family="text" style:name="T2020">
      <style:text-properties fo:letter-spacing="-0.15pt"/>
    </style:style>
    <style:style style:family="text" style:name="T2021">
      <style:text-properties fo:letter-spacing="-0.15pt"/>
    </style:style>
    <style:style style:family="text" style:name="T2022">
      <style:text-properties fo:letter-spacing="-0.15pt"/>
    </style:style>
    <style:style style:family="text" style:name="T2023">
      <style:text-properties fo:letter-spacing="-0.15pt"/>
    </style:style>
    <style:style style:family="text" style:name="T2024">
      <style:text-properties fo:letter-spacing="-0.15pt"/>
    </style:style>
    <style:style style:family="text" style:name="T2025">
      <style:text-properties fo:letter-spacing="-0.15pt"/>
    </style:style>
    <style:style style:family="text" style:name="T2026">
      <style:text-properties fo:letter-spacing="-0.15pt"/>
    </style:style>
    <style:style style:family="text" style:name="T2027">
      <style:text-properties fo:letter-spacing="-0.15pt"/>
    </style:style>
    <style:style style:family="text" style:name="T2028">
      <style:text-properties fo:letter-spacing="-0.15pt"/>
    </style:style>
    <style:style style:family="text" style:name="T2029">
      <style:text-properties fo:letter-spacing="-0.15pt"/>
    </style:style>
    <style:style style:family="text" style:name="T2030">
      <style:text-properties fo:letter-spacing="-0.15pt"/>
    </style:style>
    <style:style style:family="text" style:name="T2031">
      <style:text-properties fo:letter-spacing="-0.15pt"/>
    </style:style>
    <style:style style:family="text" style:name="T2032">
      <style:text-properties fo:letter-spacing="-0.15pt"/>
    </style:style>
    <style:style style:parent-style-name="716" style:family="paragraph" style:name="P26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33">
      <style:text-properties fo:font-size="13pt"/>
    </style:style>
    <style:style style:family="text" style:name="T2034">
      <style:text-properties fo:font-size="13pt"/>
    </style:style>
    <style:style style:parent-style-name="716" style:family="paragraph" style:name="P263">
      <style:paragraph-properties fo:margin-left="0cm" fo:margin-right="0cm" fo:text-indent="0cm" fo:margin-top="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35">
      <style:text-properties fo:font-size="10pt"/>
    </style:style>
    <style:style style:family="text" style:name="T2036">
      <style:text-properties fo:font-size="10pt"/>
    </style:style>
    <style:style style:parent-style-name="710" style:list-style-name="WWNum4" style:family="paragraph" style:name="P264">
      <style:paragraph-properties fo:margin-left="0cm" fo:margin-right="0cm" fo:text-indent="-0.5116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2037">
      <style:text-properties fo:letter-spacing="-0.7pt"/>
    </style:style>
    <style:style style:family="text" style:name="T2038">
      <style:text-properties fo:letter-spacing="-0.65pt"/>
    </style:style>
    <style:style style:family="text" style:name="T2039">
      <style:text-properties fo:letter-spacing="-0.65pt"/>
    </style:style>
    <style:style style:family="text" style:name="T2040">
      <style:text-properties fo:letter-spacing="-0.65pt"/>
    </style:style>
    <style:style style:family="text" style:name="T2041">
      <style:text-properties fo:letter-spacing="-0.55pt"/>
    </style:style>
    <style:style style:family="text" style:name="T2042">
      <style:text-properties fo:letter-spacing="-0.15pt"/>
    </style:style>
    <style:style style:parent-style-name="716" style:family="paragraph" style:name="P265">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43">
      <style:text-properties fo:font-size="17pt" fo:font-style="italic" fo:font-weight="bold"/>
    </style:style>
    <style:style style:family="text" style:name="T2044">
      <style:text-properties fo:font-size="17pt" fo:font-style="italic" fo:font-weight="bold"/>
    </style:style>
    <style:style style:parent-style-name="716" style:family="paragraph" style:name="P266">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45">
      <style:text-properties fo:letter-spacing="-0.1pt"/>
    </style:style>
    <style:style style:parent-style-name="716" style:family="paragraph" style:name="P267">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46">
      <style:text-properties fo:letter-spacing="-0.35pt"/>
    </style:style>
    <style:style style:family="text" style:name="T2047">
      <style:text-properties fo:letter-spacing="-0.35pt"/>
    </style:style>
    <style:style style:family="text" style:name="T2048">
      <style:text-properties fo:letter-spacing="-0.35pt"/>
    </style:style>
    <style:style style:family="text" style:name="T2049">
      <style:text-properties fo:letter-spacing="-0.35pt"/>
    </style:style>
    <style:style style:family="text" style:name="T2050">
      <style:text-properties fo:letter-spacing="-0.35pt"/>
    </style:style>
    <style:style style:family="text" style:name="T2051">
      <style:text-properties fo:letter-spacing="-0.35pt"/>
    </style:style>
    <style:style style:family="text" style:name="T2052">
      <style:text-properties fo:letter-spacing="-0.35pt"/>
    </style:style>
    <style:style style:family="text" style:name="T2053">
      <style:text-properties fo:letter-spacing="-0.35pt"/>
    </style:style>
    <style:style style:family="text" style:name="T2054">
      <style:text-properties fo:letter-spacing="-0.35pt"/>
    </style:style>
    <style:style style:parent-style-name="716" style:family="paragraph" style:name="P26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55">
      <style:text-properties fo:letter-spacing="-0.35pt"/>
    </style:style>
    <style:style style:family="text" style:name="T2056">
      <style:text-properties fo:letter-spacing="-0.35pt"/>
    </style:style>
    <style:style style:family="text" style:name="T2057">
      <style:text-properties fo:letter-spacing="-0.35pt"/>
    </style:style>
    <style:style style:family="text" style:name="T2058">
      <style:text-properties fo:letter-spacing="-0.35pt"/>
    </style:style>
    <style:style style:family="text" style:name="T2059">
      <style:text-properties fo:letter-spacing="-0.35pt"/>
    </style:style>
    <style:style style:family="text" style:name="T2060">
      <style:text-properties fo:letter-spacing="-0.35pt"/>
    </style:style>
    <style:style style:family="text" style:name="T2061">
      <style:text-properties fo:letter-spacing="-0.35pt"/>
    </style:style>
    <style:style style:family="text" style:name="T2062">
      <style:text-properties fo:letter-spacing="-0.35pt"/>
    </style:style>
    <style:style style:family="text" style:name="T2063">
      <style:text-properties fo:letter-spacing="-0.35pt"/>
    </style:style>
    <style:style style:parent-style-name="716" style:family="paragraph" style:name="P269">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64">
      <style:text-properties fo:font-size="17pt"/>
    </style:style>
    <style:style style:family="text" style:name="T2065">
      <style:text-properties fo:font-size="17pt"/>
    </style:style>
    <style:style style:parent-style-name="710" style:list-style-name="WWNum4" style:family="paragraph" style:name="P270">
      <style:paragraph-properties fo:margin-left="0cm" fo:margin-right="0cm" fo:text-indent="-0.5116cm" fo:margin-top="3.7pt" fo:margin-bottom="0pt" fo:break-before="page">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2066">
      <style:text-properties fo:letter-spacing="-0.5pt"/>
    </style:style>
    <style:style style:family="text" style:name="T2067">
      <style:text-properties fo:letter-spacing="-0.5pt"/>
    </style:style>
    <style:style style:family="text" style:name="T2068">
      <style:text-properties fo:letter-spacing="-0.5pt"/>
    </style:style>
    <style:style style:family="text" style:name="T2069">
      <style:text-properties fo:letter-spacing="-0.15pt"/>
    </style:style>
    <style:style style:parent-style-name="716" style:family="paragraph" style:name="P271">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70">
      <style:text-properties fo:font-size="17pt" fo:font-style="italic" fo:font-weight="bold"/>
    </style:style>
    <style:style style:family="text" style:name="T2071">
      <style:text-properties fo:font-size="17pt" fo:font-style="italic" fo:font-weight="bold"/>
    </style:style>
    <style:style style:parent-style-name="716" style:family="paragraph" style:name="P272">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72">
      <style:text-properties fo:letter-spacing="-0.15pt"/>
    </style:style>
    <style:style style:family="text" style:name="T2073">
      <style:text-properties fo:letter-spacing="-0.15pt"/>
    </style:style>
    <style:style style:family="text" style:name="T2074">
      <style:text-properties fo:letter-spacing="-0.15pt"/>
    </style:style>
    <style:style style:family="text" style:name="T2075">
      <style:text-properties fo:letter-spacing="-0.15pt"/>
    </style:style>
    <style:style style:family="text" style:name="T2076">
      <style:text-properties fo:letter-spacing="-0.15pt"/>
    </style:style>
    <style:style style:family="text" style:name="T2077">
      <style:text-properties fo:letter-spacing="-0.15pt"/>
    </style:style>
    <style:style style:family="text" style:name="T2078">
      <style:text-properties fo:letter-spacing="-0.15pt"/>
    </style:style>
    <style:style style:family="text" style:name="T2079">
      <style:text-properties fo:letter-spacing="-0.15pt"/>
    </style:style>
    <style:style style:family="text" style:name="T2080">
      <style:text-properties fo:letter-spacing="-0.15pt"/>
    </style:style>
    <style:style style:family="text" style:name="T2081">
      <style:text-properties fo:letter-spacing="-0.15pt"/>
    </style:style>
    <style:style style:parent-style-name="716" style:family="paragraph" style:name="P273">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82">
      <style:text-properties fo:font-size="18pt"/>
    </style:style>
    <style:style style:family="text" style:name="T2083">
      <style:text-properties fo:font-size="18pt"/>
    </style:style>
    <style:style style:parent-style-name="712" style:family="paragraph" style:name="P274">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084">
      <style:text-properties fo:font-size="14pt" fo:letter-spacing="-0.1pt" fo:font-weight="bold"/>
    </style:style>
    <style:style style:parent-style-name="716" style:family="paragraph" style:name="P275">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085">
      <style:text-properties fo:font-size="17pt" fo:font-weight="bold"/>
    </style:style>
    <style:style style:family="text" style:name="T2086">
      <style:text-properties fo:font-size="17pt" fo:font-weight="bold"/>
    </style:style>
    <style:style style:parent-style-name="717" style:list-style-name="WWNum5" style:family="paragraph" style:name="P276">
      <style:paragraph-properties fo:margin-left="0.1993cm" fo:margin-right="0.5592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087">
      <style:text-properties fo:font-size="12pt" fo:font-weight="bold"/>
    </style:style>
    <style:style style:family="text" style:name="T2088">
      <style:text-properties fo:font-size="12pt" fo:letter-spacing="-0.3pt" fo:font-weight="bold"/>
    </style:style>
    <style:style style:family="text" style:name="T2089">
      <style:text-properties fo:font-size="12pt" fo:font-weight="bold"/>
    </style:style>
    <style:style style:family="text" style:name="T2090">
      <style:text-properties fo:font-size="12pt"/>
    </style:style>
    <style:style style:family="text" style:name="T2091">
      <style:text-properties fo:font-size="12pt" fo:letter-spacing="-0.3pt"/>
    </style:style>
    <style:style style:family="text" style:name="T2092">
      <style:text-properties fo:font-size="12pt"/>
    </style:style>
    <style:style style:family="text" style:name="T2093">
      <style:text-properties fo:font-size="12pt" fo:letter-spacing="-0.3pt"/>
    </style:style>
    <style:style style:family="text" style:name="T2094">
      <style:text-properties fo:font-size="12pt"/>
    </style:style>
    <style:style style:family="text" style:name="T2095">
      <style:text-properties fo:font-size="12pt" fo:letter-spacing="-0.3pt"/>
    </style:style>
    <style:style style:family="text" style:name="T2096">
      <style:text-properties fo:font-size="12pt"/>
    </style:style>
    <style:style style:family="text" style:name="T2097">
      <style:text-properties fo:font-size="12pt" fo:letter-spacing="-0.3pt"/>
    </style:style>
    <style:style style:family="text" style:name="T2098">
      <style:text-properties fo:font-size="12pt"/>
    </style:style>
    <style:style style:family="text" style:name="T2099">
      <style:text-properties fo:font-size="12pt" fo:letter-spacing="-0.3pt"/>
    </style:style>
    <style:style style:family="text" style:name="T2100">
      <style:text-properties fo:font-size="12pt"/>
    </style:style>
    <style:style style:family="text" style:name="T2101">
      <style:text-properties fo:font-size="12pt" fo:letter-spacing="-0.3pt"/>
    </style:style>
    <style:style style:family="text" style:name="T2102">
      <style:text-properties fo:font-size="12pt"/>
    </style:style>
    <style:style style:family="text" style:name="T2103">
      <style:text-properties fo:font-size="12pt" fo:letter-spacing="-0.3pt"/>
    </style:style>
    <style:style style:family="text" style:name="T2104">
      <style:text-properties fo:font-size="12pt"/>
    </style:style>
    <style:style style:family="text" style:name="T2105">
      <style:text-properties fo:font-size="12pt" fo:letter-spacing="-0.3pt"/>
    </style:style>
    <style:style style:family="text" style:name="T2106">
      <style:text-properties fo:font-size="12pt"/>
    </style:style>
    <style:style style:family="text" style:name="T2107">
      <style:text-properties fo:font-size="12pt"/>
    </style:style>
    <style:style style:parent-style-name="716" style:family="paragraph" style:name="P27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5" style:family="paragraph" style:name="P278">
      <style:paragraph-properties fo:margin-left="0.1993cm" fo:margin-right="1.071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108">
      <style:text-properties fo:font-size="12pt" fo:font-weight="bold"/>
    </style:style>
    <style:style style:family="text" style:name="T2109">
      <style:text-properties fo:font-size="12pt" fo:letter-spacing="-0.3pt" fo:font-weight="bold"/>
    </style:style>
    <style:style style:family="text" style:name="T2110">
      <style:text-properties fo:font-size="12pt" fo:font-weight="bold"/>
    </style:style>
    <style:style style:family="text" style:name="T2111">
      <style:text-properties fo:font-size="12pt"/>
    </style:style>
    <style:style style:family="text" style:name="T2112">
      <style:text-properties fo:font-size="12pt" fo:letter-spacing="-0.3pt"/>
    </style:style>
    <style:style style:family="text" style:name="T2113">
      <style:text-properties fo:font-size="12pt"/>
    </style:style>
    <style:style style:family="text" style:name="T2114">
      <style:text-properties fo:font-size="12pt" fo:letter-spacing="-0.3pt"/>
    </style:style>
    <style:style style:family="text" style:name="T2115">
      <style:text-properties fo:font-size="12pt"/>
    </style:style>
    <style:style style:family="text" style:name="T2116">
      <style:text-properties fo:font-size="12pt" fo:letter-spacing="-0.3pt"/>
    </style:style>
    <style:style style:family="text" style:name="T2117">
      <style:text-properties fo:font-size="12pt"/>
    </style:style>
    <style:style style:family="text" style:name="T2118">
      <style:text-properties fo:font-size="12pt" fo:letter-spacing="-0.3pt"/>
    </style:style>
    <style:style style:family="text" style:name="T2119">
      <style:text-properties fo:font-size="12pt"/>
    </style:style>
    <style:style style:family="text" style:name="T2120">
      <style:text-properties fo:font-size="12pt" fo:letter-spacing="-0.3pt"/>
    </style:style>
    <style:style style:family="text" style:name="T2121">
      <style:text-properties fo:font-size="12pt"/>
    </style:style>
    <style:style style:family="text" style:name="T2122">
      <style:text-properties fo:font-size="12pt" fo:letter-spacing="-0.3pt"/>
    </style:style>
    <style:style style:family="text" style:name="T2123">
      <style:text-properties fo:font-size="12pt"/>
    </style:style>
    <style:style style:family="text" style:name="T2124">
      <style:text-properties fo:font-size="12pt" fo:letter-spacing="-0.3pt"/>
    </style:style>
    <style:style style:family="text" style:name="T2125">
      <style:text-properties fo:font-size="12pt"/>
    </style:style>
    <style:style style:family="text" style:name="T2126">
      <style:text-properties fo:font-size="12pt" fo:letter-spacing="-0.3pt"/>
    </style:style>
    <style:style style:family="text" style:name="T2127">
      <style:text-properties fo:font-size="12pt"/>
    </style:style>
    <style:style style:family="text" style:name="T2128">
      <style:text-properties fo:font-size="12pt" fo:letter-spacing="-0.3pt"/>
    </style:style>
    <style:style style:family="text" style:name="T2129">
      <style:text-properties fo:font-size="12pt"/>
    </style:style>
    <style:style style:family="text" style:name="T2130">
      <style:text-properties fo:font-size="12pt"/>
    </style:style>
    <style:style style:parent-style-name="716" style:family="paragraph" style:name="P27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5" style:family="paragraph" style:name="P280">
      <style:paragraph-properties fo:margin-left="0.1993cm" fo:margin-right="0.5892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131">
      <style:text-properties fo:font-size="12pt" fo:font-weight="bold"/>
    </style:style>
    <style:style style:family="text" style:name="T2132">
      <style:text-properties fo:font-size="12pt"/>
    </style:style>
    <style:style style:family="text" style:name="T2133">
      <style:text-properties fo:font-size="12pt" fo:letter-spacing="-0.3pt"/>
    </style:style>
    <style:style style:family="text" style:name="T2134">
      <style:text-properties fo:font-size="12pt"/>
    </style:style>
    <style:style style:family="text" style:name="T2135">
      <style:text-properties fo:font-size="12pt" fo:letter-spacing="-0.3pt"/>
    </style:style>
    <style:style style:family="text" style:name="T2136">
      <style:text-properties fo:font-size="12pt"/>
    </style:style>
    <style:style style:family="text" style:name="T2137">
      <style:text-properties fo:font-size="12pt" fo:letter-spacing="-0.3pt"/>
    </style:style>
    <style:style style:family="text" style:name="T2138">
      <style:text-properties fo:font-size="12pt"/>
    </style:style>
    <style:style style:family="text" style:name="T2139">
      <style:text-properties fo:font-size="12pt" fo:letter-spacing="-0.3pt"/>
    </style:style>
    <style:style style:family="text" style:name="T2140">
      <style:text-properties fo:font-size="12pt"/>
    </style:style>
    <style:style style:family="text" style:name="T2141">
      <style:text-properties fo:font-size="12pt" fo:letter-spacing="-0.3pt"/>
    </style:style>
    <style:style style:family="text" style:name="T2142">
      <style:text-properties fo:font-size="12pt"/>
    </style:style>
    <style:style style:family="text" style:name="T2143">
      <style:text-properties fo:font-size="12pt" fo:letter-spacing="-0.3pt"/>
    </style:style>
    <style:style style:family="text" style:name="T2144">
      <style:text-properties fo:font-size="12pt"/>
    </style:style>
    <style:style style:family="text" style:name="T2145">
      <style:text-properties fo:font-size="12pt" fo:letter-spacing="-0.3pt"/>
    </style:style>
    <style:style style:family="text" style:name="T2146">
      <style:text-properties fo:font-size="12pt"/>
    </style:style>
    <style:style style:family="text" style:name="T2147">
      <style:text-properties fo:font-size="12pt" fo:letter-spacing="-0.3pt"/>
    </style:style>
    <style:style style:family="text" style:name="T2148">
      <style:text-properties fo:font-size="12pt"/>
    </style:style>
    <style:style style:family="text" style:name="T2149">
      <style:text-properties fo:font-size="12pt" fo:letter-spacing="-0.3pt"/>
    </style:style>
    <style:style style:family="text" style:name="T2150">
      <style:text-properties fo:font-size="12pt"/>
    </style:style>
    <style:style style:family="text" style:name="T2151">
      <style:text-properties fo:font-size="12pt" fo:letter-spacing="-0.3pt"/>
    </style:style>
    <style:style style:family="text" style:name="T2152">
      <style:text-properties fo:font-size="12pt"/>
    </style:style>
    <style:style style:family="text" style:name="T2153">
      <style:text-properties fo:font-size="12pt" fo:letter-spacing="-0.3pt"/>
    </style:style>
    <style:style style:family="text" style:name="T2154">
      <style:text-properties fo:font-size="12pt"/>
    </style:style>
    <style:style style:family="text" style:name="T2155">
      <style:text-properties fo:font-size="12pt" fo:letter-spacing="-0.1pt"/>
    </style:style>
    <style:style style:parent-style-name="716" style:family="paragraph" style:name="P28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5" style:family="paragraph" style:name="P282">
      <style:paragraph-properties fo:margin-left="0.1993cm" fo:margin-right="0.5521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156">
      <style:text-properties fo:font-size="12pt" fo:font-weight="bold"/>
    </style:style>
    <style:style style:family="text" style:name="T2157">
      <style:text-properties fo:font-size="12pt" fo:letter-spacing="-0.25pt" fo:font-weight="bold"/>
    </style:style>
    <style:style style:family="text" style:name="T2158">
      <style:text-properties fo:font-size="12pt" fo:font-weight="bold"/>
    </style:style>
    <style:style style:family="text" style:name="T2159">
      <style:text-properties fo:font-size="12pt"/>
    </style:style>
    <style:style style:family="text" style:name="T2160">
      <style:text-properties fo:font-size="12pt" fo:letter-spacing="-0.25pt"/>
    </style:style>
    <style:style style:family="text" style:name="T2161">
      <style:text-properties fo:font-size="12pt"/>
    </style:style>
    <style:style style:family="text" style:name="T2162">
      <style:text-properties fo:font-size="12pt"/>
    </style:style>
    <style:style style:family="text" style:name="T2163">
      <style:text-properties fo:font-size="12pt"/>
    </style:style>
    <style:style style:family="text" style:name="T2164">
      <style:text-properties fo:font-size="12pt"/>
    </style:style>
    <style:style style:family="text" style:name="T2165">
      <style:text-properties fo:font-size="12pt"/>
    </style:style>
    <style:style style:family="text" style:name="T2166">
      <style:text-properties fo:font-size="14pt"/>
    </style:style>
    <style:style style:parent-style-name="708" style:family="paragraph" style:name="P283">
      <style:paragraph-properties fo:margin-top="3.5pt" fo:margin-bottom="0pt"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2167">
      <style:text-properties fo:letter-spacing="-0.3pt"/>
    </style:style>
    <style:style style:family="text" style:name="T2168">
      <style:text-properties fo:letter-spacing="-0.3pt"/>
    </style:style>
    <style:style style:family="text" style:name="T2169">
      <style:text-properties fo:letter-spacing="-0.3pt"/>
    </style:style>
    <style:style style:family="text" style:name="T2170">
      <style:text-properties fo:letter-spacing="-0.25pt"/>
    </style:style>
    <style:style style:family="text" style:name="T2171">
      <style:text-properties fo:letter-spacing="-0.1pt"/>
    </style:style>
    <style:style style:parent-style-name="716" style:family="paragraph" style:name="P284">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172">
      <style:text-properties fo:font-size="17pt" fo:font-weight="bold"/>
    </style:style>
    <style:style style:family="text" style:name="T2173">
      <style:text-properties fo:font-size="17pt" fo:font-weight="bold"/>
    </style:style>
    <style:style style:parent-style-name="716" style:family="paragraph" style:name="P285">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174">
      <style:text-properties fo:letter-spacing="-0.1pt"/>
    </style:style>
    <style:style style:family="text" style:name="T2175">
      <style:text-properties fo:letter-spacing="-0.1pt"/>
    </style:style>
    <style:style style:family="text" style:name="T2176">
      <style:text-properties fo:letter-spacing="-0.1pt"/>
    </style:style>
    <style:style style:family="text" style:name="T2177">
      <style:text-properties fo:letter-spacing="-0.1pt"/>
    </style:style>
    <style:style style:family="text" style:name="T2178">
      <style:text-properties fo:letter-spacing="-0.1pt"/>
    </style:style>
    <style:style style:family="text" style:name="T2179">
      <style:text-properties fo:letter-spacing="-0.1pt"/>
    </style:style>
    <style:style style:family="text" style:name="T2180">
      <style:text-properties fo:letter-spacing="-0.1pt"/>
    </style:style>
    <style:style style:family="text" style:name="T2181">
      <style:text-properties fo:letter-spacing="-0.1pt"/>
    </style:style>
    <style:style style:family="text" style:name="T2182">
      <style:text-properties fo:letter-spacing="-0.1pt"/>
    </style:style>
    <style:style style:family="text" style:name="T2183">
      <style:text-properties fo:letter-spacing="-0.1pt"/>
    </style:style>
    <style:style style:family="text" style:name="T2184">
      <style:text-properties fo:letter-spacing="-0.1pt"/>
    </style:style>
    <style:style style:family="text" style:name="T2185">
      <style:text-properties fo:letter-spacing="-0.1pt"/>
    </style:style>
    <style:style style:family="text" style:name="T2186">
      <style:text-properties fo:letter-spacing="-0.1pt"/>
    </style:style>
    <style:style style:family="text" style:name="T2187">
      <style:text-properties fo:letter-spacing="-0.1pt"/>
    </style:style>
    <style:style style:parent-style-name="716" style:family="paragraph" style:name="P286">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188">
      <style:text-properties fo:font-size="18pt"/>
    </style:style>
    <style:style style:family="text" style:name="T2189">
      <style:text-properties fo:font-size="18pt"/>
    </style:style>
    <style:style style:parent-style-name="712" style:family="paragraph" style:name="P287">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190">
      <style:text-properties fo:font-size="14pt" fo:letter-spacing="-0.1pt" fo:font-weight="bold"/>
    </style:style>
    <style:style style:parent-style-name="716" style:family="paragraph" style:name="P288">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191">
      <style:text-properties fo:font-size="17pt" fo:font-weight="bold"/>
    </style:style>
    <style:style style:family="text" style:name="T2192">
      <style:text-properties fo:font-size="17pt" fo:font-weight="bold"/>
    </style:style>
    <style:style style:parent-style-name="717" style:list-style-name="WWNum6" style:family="paragraph" style:name="P289">
      <style:paragraph-properties fo:margin-left="0.1993cm" fo:margin-right="0.8873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193">
      <style:text-properties fo:font-size="12pt"/>
    </style:style>
    <style:style style:family="text" style:name="T2194">
      <style:text-properties fo:font-size="12pt"/>
    </style:style>
    <style:style style:family="text" style:name="T2195">
      <style:text-properties fo:font-size="12pt" fo:letter-spacing="-0.25pt"/>
    </style:style>
    <style:style style:family="text" style:name="T2196">
      <style:text-properties fo:font-size="12pt"/>
    </style:style>
    <style:style style:family="text" style:name="T2197">
      <style:text-properties fo:font-size="12pt" fo:letter-spacing="-0.25pt"/>
    </style:style>
    <style:style style:family="text" style:name="T2198">
      <style:text-properties fo:font-size="12pt"/>
    </style:style>
    <style:style style:family="text" style:name="T2199">
      <style:text-properties fo:font-size="12pt" fo:letter-spacing="-0.25pt"/>
    </style:style>
    <style:style style:family="text" style:name="T2200">
      <style:text-properties fo:font-size="12pt"/>
    </style:style>
    <style:style style:family="text" style:name="T2201">
      <style:text-properties fo:font-size="12pt" fo:letter-spacing="-0.25pt"/>
    </style:style>
    <style:style style:family="text" style:name="T2202">
      <style:text-properties fo:font-size="12pt"/>
    </style:style>
    <style:style style:family="text" style:name="T2203">
      <style:text-properties fo:font-size="12pt" fo:letter-spacing="-0.25pt"/>
    </style:style>
    <style:style style:family="text" style:name="T2204">
      <style:text-properties fo:font-size="12pt"/>
    </style:style>
    <style:style style:family="text" style:name="T2205">
      <style:text-properties fo:font-size="12pt" fo:letter-spacing="-0.25pt"/>
    </style:style>
    <style:style style:family="text" style:name="T2206">
      <style:text-properties fo:font-size="12pt"/>
    </style:style>
    <style:style style:family="text" style:name="T2207">
      <style:text-properties fo:font-size="12pt" fo:letter-spacing="-0.25pt"/>
    </style:style>
    <style:style style:family="text" style:name="T2208">
      <style:text-properties fo:font-size="12pt"/>
    </style:style>
    <style:style style:family="text" style:name="T2209">
      <style:text-properties fo:font-size="12pt" fo:letter-spacing="-0.25pt"/>
    </style:style>
    <style:style style:family="text" style:name="T2210">
      <style:text-properties fo:font-size="12pt"/>
    </style:style>
    <style:style style:family="text" style:name="T2211">
      <style:text-properties fo:font-size="12pt" fo:letter-spacing="-0.25pt"/>
    </style:style>
    <style:style style:family="text" style:name="T2212">
      <style:text-properties fo:font-size="12pt"/>
    </style:style>
    <style:style style:family="text" style:name="T2213">
      <style:text-properties fo:font-size="12pt" fo:letter-spacing="-0.25pt"/>
    </style:style>
    <style:style style:family="text" style:name="T2214">
      <style:text-properties fo:font-size="12pt"/>
    </style:style>
    <style:style style:family="text" style:name="T2215">
      <style:text-properties fo:font-size="12pt" fo:letter-spacing="-0.25pt"/>
    </style:style>
    <style:style style:family="text" style:name="T2216">
      <style:text-properties fo:font-size="12pt"/>
    </style:style>
    <style:style style:family="text" style:name="T2217">
      <style:text-properties fo:font-size="12pt" fo:letter-spacing="-0.25pt"/>
    </style:style>
    <style:style style:family="text" style:name="T2218">
      <style:text-properties fo:font-size="12pt"/>
    </style:style>
    <style:style style:family="text" style:name="T2219">
      <style:text-properties fo:font-size="12pt" fo:letter-spacing="-0.25pt"/>
    </style:style>
    <style:style style:family="text" style:name="T2220">
      <style:text-properties fo:font-size="12pt"/>
    </style:style>
    <style:style style:family="text" style:name="T2221">
      <style:text-properties fo:font-size="12pt"/>
    </style:style>
    <style:style style:family="text" style:name="T2222">
      <style:text-properties/>
    </style:style>
    <style:style style:family="paragraph" style:name="P290">
      <style:paragraph-properties fo:margin-left="0.1993cm" fo:margin-right="0.8873cm" fo:text-indent="0cm">
        <style:tab-stops>
          <style:tab-stop style:position="0.9984cm" style:type="left"/>
        </style:tab-stops>
      </style:paragraph-properties>
      <style:text-properties fo:font-size="12pt"/>
    </style:style>
    <style:style style:family="text" style:name="T2223">
      <style:text-properties fo:font-size="12pt"/>
    </style:style>
    <style:style style:family="text" style:name="T2224">
      <style:text-properties fo:font-size="12pt"/>
    </style:style>
    <style:style style:parent-style-name="717" style:list-style-name="WWNum6" style:family="paragraph" style:name="P291">
      <style:paragraph-properties fo:margin-left="0.1993cm" fo:margin-right="0.8873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225">
      <style:text-properties fo:font-size="12pt"/>
    </style:style>
    <style:style style:family="text" style:name="T2226">
      <style:text-properties fo:font-size="12pt"/>
    </style:style>
    <style:style style:family="text" style:name="T2227">
      <style:text-properties fo:font-size="12pt"/>
    </style:style>
    <style:style style:family="text" style:name="T2228">
      <style:text-properties fo:font-size="14pt"/>
    </style:style>
    <style:style style:family="text" style:name="T2229">
      <style:text-properties fo:font-size="14pt"/>
    </style:style>
    <style:style style:parent-style-name="716" style:family="paragraph" style:name="P29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6" style:family="paragraph" style:name="P293">
      <style:paragraph-properties fo:margin-left="0.1993cm" fo:margin-right="0.7162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230">
      <style:text-properties fo:font-size="12pt"/>
    </style:style>
    <style:style style:family="text" style:name="T2231">
      <style:text-properties fo:font-size="12pt" fo:letter-spacing="-0.15pt"/>
    </style:style>
    <style:style style:family="text" style:name="T2232">
      <style:text-properties fo:font-size="12pt"/>
    </style:style>
    <style:style style:family="text" style:name="T2233">
      <style:text-properties fo:font-size="12pt" fo:letter-spacing="-0.15pt"/>
    </style:style>
    <style:style style:family="text" style:name="T2234">
      <style:text-properties fo:font-size="12pt"/>
    </style:style>
    <style:style style:family="text" style:name="T2235">
      <style:text-properties fo:font-size="12pt" fo:letter-spacing="-0.15pt"/>
    </style:style>
    <style:style style:family="text" style:name="T2236">
      <style:text-properties fo:font-size="12pt"/>
    </style:style>
    <style:style style:family="text" style:name="T2237">
      <style:text-properties fo:font-size="12pt" fo:letter-spacing="-0.15pt"/>
    </style:style>
    <style:style style:family="text" style:name="T2238">
      <style:text-properties fo:font-size="12pt"/>
    </style:style>
    <style:style style:family="text" style:name="T2239">
      <style:text-properties fo:font-size="12pt" fo:letter-spacing="-0.15pt"/>
    </style:style>
    <style:style style:family="text" style:name="T2240">
      <style:text-properties fo:font-size="12pt"/>
    </style:style>
    <style:style style:family="text" style:name="T2241">
      <style:text-properties fo:font-size="12pt" fo:letter-spacing="-0.15pt"/>
    </style:style>
    <style:style style:family="text" style:name="T2242">
      <style:text-properties fo:font-size="12pt"/>
    </style:style>
    <style:style style:family="text" style:name="T2243">
      <style:text-properties fo:font-size="12pt" fo:letter-spacing="-0.15pt"/>
    </style:style>
    <style:style style:family="text" style:name="T2244">
      <style:text-properties fo:font-size="12pt"/>
    </style:style>
    <style:style style:family="text" style:name="T2245">
      <style:text-properties fo:font-size="12pt" fo:letter-spacing="-0.15pt"/>
    </style:style>
    <style:style style:family="text" style:name="T2246">
      <style:text-properties fo:font-size="12pt"/>
    </style:style>
    <style:style style:family="text" style:name="T2247">
      <style:text-properties fo:font-size="12pt" fo:letter-spacing="-0.15pt"/>
    </style:style>
    <style:style style:family="text" style:name="T2248">
      <style:text-properties fo:font-size="12pt"/>
    </style:style>
    <style:style style:family="text" style:name="T2249">
      <style:text-properties fo:font-size="12pt" fo:letter-spacing="-0.15pt"/>
    </style:style>
    <style:style style:family="text" style:name="T2250">
      <style:text-properties fo:font-size="12pt"/>
    </style:style>
    <style:style style:parent-style-name="716" style:family="paragraph" style:name="P29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6" style:family="paragraph" style:name="P295">
      <style:paragraph-properties fo:margin-left="0.1993cm" fo:margin-right="1.067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251">
      <style:text-properties fo:font-size="12pt"/>
    </style:style>
    <style:style style:family="text" style:name="T2252">
      <style:text-properties fo:font-size="12pt" fo:letter-spacing="-0.15pt"/>
    </style:style>
    <style:style style:family="text" style:name="T2253">
      <style:text-properties fo:font-size="12pt"/>
    </style:style>
    <style:style style:family="text" style:name="T2254">
      <style:text-properties fo:font-size="12pt" fo:letter-spacing="-0.15pt"/>
    </style:style>
    <style:style style:family="text" style:name="T2255">
      <style:text-properties fo:font-size="12pt"/>
    </style:style>
    <style:style style:family="text" style:name="T2256">
      <style:text-properties fo:font-size="12pt" fo:letter-spacing="-0.15pt"/>
    </style:style>
    <style:style style:family="text" style:name="T2257">
      <style:text-properties fo:font-size="12pt"/>
    </style:style>
    <style:style style:family="text" style:name="T2258">
      <style:text-properties fo:font-size="12pt" fo:letter-spacing="-0.15pt"/>
    </style:style>
    <style:style style:family="text" style:name="T2259">
      <style:text-properties fo:font-size="12pt"/>
    </style:style>
    <style:style style:family="text" style:name="T2260">
      <style:text-properties fo:font-size="12pt" fo:letter-spacing="-0.15pt"/>
    </style:style>
    <style:style style:family="text" style:name="T2261">
      <style:text-properties fo:font-size="12pt"/>
    </style:style>
    <style:style style:family="text" style:name="T2262">
      <style:text-properties fo:font-size="12pt" fo:letter-spacing="-0.15pt"/>
    </style:style>
    <style:style style:family="text" style:name="T2263">
      <style:text-properties fo:font-size="12pt"/>
    </style:style>
    <style:style style:family="text" style:name="T2264">
      <style:text-properties fo:font-size="12pt" fo:letter-spacing="-0.15pt"/>
    </style:style>
    <style:style style:family="text" style:name="T2265">
      <style:text-properties fo:font-size="12pt"/>
    </style:style>
    <style:style style:family="text" style:name="T2266">
      <style:text-properties fo:font-size="12pt" fo:letter-spacing="-0.15pt"/>
    </style:style>
    <style:style style:family="text" style:name="T2267">
      <style:text-properties fo:font-size="12pt"/>
    </style:style>
    <style:style style:family="text" style:name="T2268">
      <style:text-properties fo:font-size="12pt" fo:letter-spacing="-0.15pt"/>
    </style:style>
    <style:style style:family="text" style:name="T2269">
      <style:text-properties fo:font-size="12pt"/>
    </style:style>
    <style:style style:family="text" style:name="T2270">
      <style:text-properties fo:font-size="12pt" fo:letter-spacing="-0.15pt"/>
    </style:style>
    <style:style style:family="text" style:name="T2271">
      <style:text-properties fo:font-size="12pt"/>
    </style:style>
    <style:style style:family="text" style:name="T2272">
      <style:text-properties fo:font-size="12pt" fo:letter-spacing="-0.15pt"/>
    </style:style>
    <style:style style:family="text" style:name="T2273">
      <style:text-properties fo:font-size="12pt"/>
    </style:style>
    <style:style style:family="text" style:name="T2274">
      <style:text-properties fo:font-size="12pt" fo:letter-spacing="-0.15pt"/>
    </style:style>
    <style:style style:family="text" style:name="T2275">
      <style:text-properties fo:font-size="12pt"/>
    </style:style>
    <style:style style:parent-style-name="716" style:family="paragraph" style:name="P29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7" style:list-style-name="WWNum6" style:family="paragraph" style:name="P297">
      <style:paragraph-properties fo:margin-left="0.1993cm" fo:margin-right="2.246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276">
      <style:text-properties fo:font-size="12pt"/>
    </style:style>
    <style:style style:family="text" style:name="T2277">
      <style:text-properties fo:font-size="12pt" fo:letter-spacing="-0.1pt"/>
    </style:style>
    <style:style style:family="text" style:name="T2278">
      <style:text-properties fo:font-size="12pt"/>
    </style:style>
    <style:style style:family="text" style:name="T2279">
      <style:text-properties fo:font-size="12pt" fo:letter-spacing="-0.1pt"/>
    </style:style>
    <style:style style:family="text" style:name="T2280">
      <style:text-properties fo:font-size="12pt"/>
    </style:style>
    <style:style style:family="text" style:name="T2281">
      <style:text-properties fo:font-size="12pt" fo:letter-spacing="-0.1pt"/>
    </style:style>
    <style:style style:family="text" style:name="T2282">
      <style:text-properties fo:font-size="12pt"/>
    </style:style>
    <style:style style:family="text" style:name="T2283">
      <style:text-properties fo:font-size="12pt" fo:letter-spacing="-0.1pt"/>
    </style:style>
    <style:style style:family="text" style:name="T2284">
      <style:text-properties fo:font-size="12pt"/>
    </style:style>
    <style:style style:family="text" style:name="T2285">
      <style:text-properties fo:font-size="12pt" fo:letter-spacing="-0.1pt"/>
    </style:style>
    <style:style style:family="text" style:name="T2286">
      <style:text-properties fo:font-size="12pt"/>
    </style:style>
    <style:style style:family="text" style:name="T2287">
      <style:text-properties fo:font-size="12pt" fo:letter-spacing="-0.1pt"/>
    </style:style>
    <style:style style:family="text" style:name="T2288">
      <style:text-properties fo:font-size="12pt"/>
    </style:style>
    <style:style style:family="text" style:name="T2289">
      <style:text-properties fo:font-size="12pt" fo:letter-spacing="-0.1pt"/>
    </style:style>
    <style:style style:family="text" style:name="T2290">
      <style:text-properties fo:font-size="12pt"/>
    </style:style>
    <style:style style:family="text" style:name="T2291">
      <style:text-properties fo:font-size="12pt" fo:letter-spacing="-0.1pt"/>
    </style:style>
    <style:style style:family="text" style:name="T2292">
      <style:text-properties fo:font-size="12pt"/>
    </style:style>
    <style:style style:family="text" style:name="T2293">
      <style:text-properties fo:font-size="12pt" fo:letter-spacing="-0.1pt"/>
    </style:style>
    <style:style style:family="text" style:name="T2294">
      <style:text-properties fo:font-size="12pt"/>
    </style:style>
    <style:style style:family="text" style:name="T2295">
      <style:text-properties fo:font-size="12pt" fo:letter-spacing="-0.1pt"/>
    </style:style>
    <style:style style:family="text" style:name="T2296">
      <style:text-properties fo:font-size="12pt"/>
    </style:style>
    <style:style style:family="text" style:name="T2297">
      <style:text-properties fo:font-size="12pt" fo:letter-spacing="-0.1pt"/>
    </style:style>
    <style:style style:family="text" style:name="T2298">
      <style:text-properties fo:font-size="12pt"/>
    </style:style>
    <style:style style:family="text" style:name="T2299">
      <style:text-properties fo:font-size="12pt" fo:letter-spacing="-0.1pt"/>
    </style:style>
    <style:style style:family="text" style:name="T2300">
      <style:text-properties fo:font-size="12pt"/>
    </style:style>
    <style:style style:family="text" style:name="T2301">
      <style:text-properties fo:font-size="12pt" fo:letter-spacing="-0.1pt"/>
    </style:style>
    <style:style style:family="text" style:name="T2302">
      <style:text-properties fo:font-size="12pt"/>
    </style:style>
    <style:style style:family="text" style:name="T2303">
      <style:text-properties fo:font-size="12pt" fo:letter-spacing="-0.1pt"/>
    </style:style>
    <style:style style:family="text" style:name="T2304">
      <style:text-properties fo:font-size="12pt"/>
    </style:style>
    <style:style style:parent-style-name="716" style:family="paragraph" style:name="P298">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05">
      <style:text-properties fo:font-size="18pt"/>
    </style:style>
    <style:style style:family="text" style:name="T2306">
      <style:text-properties fo:font-size="18pt"/>
    </style:style>
    <style:style style:parent-style-name="712" style:family="paragraph" style:name="P299">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307">
      <style:text-properties fo:font-size="14pt" fo:font-weight="bold"/>
    </style:style>
    <style:style style:family="text" style:name="T2308">
      <style:text-properties fo:font-size="14pt" fo:letter-spacing="-0.25pt" fo:font-weight="bold"/>
    </style:style>
    <style:style style:family="text" style:name="T2309">
      <style:text-properties fo:font-size="14pt" fo:font-weight="bold"/>
    </style:style>
    <style:style style:family="text" style:name="T2310">
      <style:text-properties fo:font-size="14pt" fo:letter-spacing="-0.25pt" fo:font-weight="bold"/>
    </style:style>
    <style:style style:family="text" style:name="T2311">
      <style:text-properties fo:font-size="14pt" fo:font-weight="bold"/>
    </style:style>
    <style:style style:family="text" style:name="T2312">
      <style:text-properties fo:font-size="14pt" fo:letter-spacing="-0.15pt" fo:font-weight="bold"/>
    </style:style>
    <style:style style:family="text" style:name="T2313">
      <style:text-properties fo:font-size="14pt" fo:letter-spacing="-0.1pt" fo:font-weight="bold"/>
    </style:style>
    <style:style style:parent-style-name="716" style:family="paragraph" style:name="P300">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14">
      <style:text-properties fo:font-size="17pt" fo:font-weight="bold"/>
    </style:style>
    <style:style style:family="text" style:name="T2315">
      <style:text-properties fo:font-size="17pt" fo:font-weight="bold"/>
    </style:style>
    <style:style style:parent-style-name="711" style:list-style-name="WWNum7" style:family="paragraph" style:name="P301">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316">
      <style:text-properties fo:letter-spacing="-0.3pt"/>
    </style:style>
    <style:style style:family="text" style:name="T2317">
      <style:text-properties fo:letter-spacing="-0.3pt"/>
    </style:style>
    <style:style style:family="text" style:name="T2318">
      <style:text-properties fo:letter-spacing="-0.1pt"/>
    </style:style>
    <style:style style:parent-style-name="716" style:family="paragraph" style:name="P30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19">
      <style:text-properties fo:font-weight="bold"/>
    </style:style>
    <style:style style:family="text" style:name="T2320">
      <style:text-properties fo:font-weight="bold"/>
    </style:style>
    <style:style style:parent-style-name="716" style:family="paragraph" style:name="P303">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21">
      <style:text-properties fo:letter-spacing="-0.25pt"/>
    </style:style>
    <style:style style:parent-style-name="716" style:family="paragraph" style:name="P304">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22">
      <style:text-properties fo:letter-spacing="-0.1pt"/>
    </style:style>
    <style:style style:family="text" style:name="T2323">
      <style:text-properties fo:letter-spacing="-0.1pt"/>
    </style:style>
    <style:style style:family="text" style:name="T2324">
      <style:text-properties fo:letter-spacing="-0.1pt"/>
    </style:style>
    <style:style style:family="text" style:name="T2325">
      <style:text-properties fo:letter-spacing="-0.1pt"/>
    </style:style>
    <style:style style:family="text" style:name="T2326">
      <style:text-properties fo:letter-spacing="-0.1pt"/>
    </style:style>
    <style:style style:family="text" style:name="T2327">
      <style:text-properties fo:letter-spacing="-0.1pt"/>
    </style:style>
    <style:style style:family="text" style:name="T2328">
      <style:text-properties fo:letter-spacing="-0.1pt"/>
    </style:style>
    <style:style style:family="text" style:name="T2329">
      <style:text-properties fo:letter-spacing="-0.1pt"/>
    </style:style>
    <style:style style:family="text" style:name="T2330">
      <style:text-properties fo:letter-spacing="-0.1pt"/>
    </style:style>
    <style:style style:family="text" style:name="T2331">
      <style:text-properties fo:letter-spacing="-0.1pt"/>
    </style:style>
    <style:style style:family="text" style:name="T2332">
      <style:text-properties fo:letter-spacing="-0.1pt"/>
    </style:style>
    <style:style style:family="text" style:name="T2333">
      <style:text-properties fo:letter-spacing="-0.1pt"/>
    </style:style>
    <style:style style:family="text" style:name="T2334">
      <style:text-properties fo:letter-spacing="-0.1pt"/>
    </style:style>
    <style:style style:family="text" style:name="T2335">
      <style:text-properties fo:letter-spacing="-0.1pt"/>
    </style:style>
    <style:style style:family="text" style:name="T2336">
      <style:text-properties fo:letter-spacing="-0.1pt"/>
    </style:style>
    <style:style style:parent-style-name="716" style:family="paragraph" style:name="P30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1" style:list-style-name="WWNum7" style:family="paragraph" style:name="P306">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337">
      <style:text-properties fo:letter-spacing="-0.1pt"/>
    </style:style>
    <style:style style:parent-style-name="716" style:family="paragraph" style:name="P30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38">
      <style:text-properties fo:font-weight="bold"/>
    </style:style>
    <style:style style:family="text" style:name="T2339">
      <style:text-properties fo:font-weight="bold"/>
    </style:style>
    <style:style style:parent-style-name="716" style:family="paragraph" style:name="P308">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40">
      <style:text-properties fo:letter-spacing="-0.25pt"/>
    </style:style>
    <style:style style:parent-style-name="716" style:family="paragraph" style:name="P309">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41">
      <style:text-properties fo:letter-spacing="-0.1pt"/>
    </style:style>
    <style:style style:family="text" style:name="T2342">
      <style:text-properties fo:letter-spacing="-0.1pt"/>
    </style:style>
    <style:style style:family="text" style:name="T2343">
      <style:text-properties fo:letter-spacing="-0.1pt"/>
    </style:style>
    <style:style style:family="text" style:name="T2344">
      <style:text-properties fo:letter-spacing="-0.1pt"/>
    </style:style>
    <style:style style:family="text" style:name="T2345">
      <style:text-properties fo:letter-spacing="-0.1pt"/>
    </style:style>
    <style:style style:family="text" style:name="T2346">
      <style:text-properties fo:letter-spacing="-0.1pt"/>
    </style:style>
    <style:style style:family="text" style:name="T2347">
      <style:text-properties fo:letter-spacing="-0.1pt"/>
    </style:style>
    <style:style style:family="text" style:name="T2348">
      <style:text-properties fo:letter-spacing="-0.1pt"/>
    </style:style>
    <style:style style:family="text" style:name="T2349">
      <style:text-properties fo:letter-spacing="-0.1pt"/>
    </style:style>
    <style:style style:family="text" style:name="T2350">
      <style:text-properties fo:letter-spacing="-0.1pt"/>
    </style:style>
    <style:style style:family="text" style:name="T2351">
      <style:text-properties fo:letter-spacing="-0.1pt"/>
    </style:style>
    <style:style style:family="text" style:name="T2352">
      <style:text-properties fo:letter-spacing="-0.1pt"/>
    </style:style>
    <style:style style:family="text" style:name="T2353">
      <style:text-properties fo:letter-spacing="-0.1pt"/>
    </style:style>
    <style:style style:family="text" style:name="T2354">
      <style:text-properties fo:letter-spacing="-0.1pt"/>
    </style:style>
    <style:style style:family="text" style:name="T2355">
      <style:text-properties fo:letter-spacing="-0.1pt"/>
    </style:style>
    <style:style style:family="text" style:name="T2356">
      <style:text-properties fo:letter-spacing="-0.1pt"/>
    </style:style>
    <style:style style:parent-style-name="712" style:master-page-name="MasterPage13" style:family="paragraph" style:name="P310">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357">
      <style:text-properties fo:font-size="14pt" fo:letter-spacing="-0.1pt" fo:font-weight="bold"/>
    </style:style>
    <style:style style:parent-style-name="716" style:family="paragraph" style:name="P311">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58">
      <style:text-properties fo:font-size="17pt" fo:font-weight="bold"/>
    </style:style>
    <style:style style:family="text" style:name="T2359">
      <style:text-properties fo:font-size="17pt" fo:font-weight="bold"/>
    </style:style>
    <style:style style:parent-style-name="711" style:list-style-name="WWNum8" style:family="paragraph" style:name="P312">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360">
      <style:text-properties fo:letter-spacing="-0.1pt"/>
    </style:style>
    <style:style style:parent-style-name="716" style:family="paragraph" style:name="P31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61">
      <style:text-properties fo:font-weight="bold"/>
    </style:style>
    <style:style style:family="text" style:name="T2362">
      <style:text-properties fo:font-weight="bold"/>
    </style:style>
    <style:style style:parent-style-name="716" style:family="paragraph" style:name="P31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63">
      <style:text-properties fo:letter-spacing="-0.15pt"/>
    </style:style>
    <style:style style:family="text" style:name="T2364">
      <style:text-properties fo:letter-spacing="-0.15pt"/>
    </style:style>
    <style:style style:family="text" style:name="T2365">
      <style:text-properties fo:letter-spacing="-0.15pt"/>
    </style:style>
    <style:style style:family="text" style:name="T2366">
      <style:text-properties fo:letter-spacing="-0.15pt"/>
    </style:style>
    <style:style style:family="text" style:name="T2367">
      <style:text-properties fo:letter-spacing="-0.15pt"/>
    </style:style>
    <style:style style:family="text" style:name="T2368">
      <style:text-properties fo:letter-spacing="-0.15pt"/>
    </style:style>
    <style:style style:family="text" style:name="T2369">
      <style:text-properties fo:letter-spacing="-0.15pt"/>
    </style:style>
    <style:style style:family="text" style:name="T2370">
      <style:text-properties fo:letter-spacing="-0.15pt"/>
    </style:style>
    <style:style style:family="text" style:name="T2371">
      <style:text-properties fo:letter-spacing="-0.15pt"/>
    </style:style>
    <style:style style:family="text" style:name="T2372">
      <style:text-properties fo:letter-spacing="-0.15pt"/>
    </style:style>
    <style:style style:family="text" style:name="T2373">
      <style:text-properties fo:letter-spacing="-0.1pt"/>
    </style:style>
    <style:style style:parent-style-name="716" style:family="paragraph" style:name="P31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1" style:list-style-name="WWNum8" style:family="paragraph" style:name="P316">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374">
      <style:text-properties fo:letter-spacing="-0.1pt"/>
    </style:style>
    <style:style style:parent-style-name="716" style:family="paragraph" style:name="P31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75">
      <style:text-properties fo:font-weight="bold"/>
    </style:style>
    <style:style style:family="text" style:name="T2376">
      <style:text-properties fo:font-weight="bold"/>
    </style:style>
    <style:style style:parent-style-name="716" style:family="paragraph" style:name="P318">
      <style:paragraph-properties fo:margin-left="0cm" fo:margin-right="2.193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77">
      <style:text-properties fo:letter-spacing="-0.15pt"/>
    </style:style>
    <style:style style:family="text" style:name="T2378">
      <style:text-properties fo:letter-spacing="-0.15pt"/>
    </style:style>
    <style:style style:family="text" style:name="T2379">
      <style:text-properties fo:letter-spacing="-0.15pt"/>
    </style:style>
    <style:style style:family="text" style:name="T2380">
      <style:text-properties fo:letter-spacing="-0.15pt"/>
    </style:style>
    <style:style style:family="text" style:name="T2381">
      <style:text-properties fo:letter-spacing="-0.15pt"/>
    </style:style>
    <style:style style:family="text" style:name="T2382">
      <style:text-properties fo:letter-spacing="-0.15pt"/>
    </style:style>
    <style:style style:family="text" style:name="T2383">
      <style:text-properties fo:letter-spacing="-0.15pt"/>
    </style:style>
    <style:style style:family="text" style:name="T2384">
      <style:text-properties fo:letter-spacing="-0.15pt"/>
    </style:style>
    <style:style style:family="text" style:name="T2385">
      <style:text-properties fo:letter-spacing="-0.15pt"/>
    </style:style>
    <style:style style:family="text" style:name="T2386">
      <style:text-properties fo:letter-spacing="-0.15pt"/>
    </style:style>
    <style:style style:family="text" style:name="T2387">
      <style:text-properties fo:letter-spacing="-0.15pt"/>
    </style:style>
    <style:style style:parent-style-name="716" style:family="paragraph" style:name="P31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1" style:list-style-name="WWNum8" style:family="paragraph" style:name="P320">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388">
      <style:text-properties fo:letter-spacing="-0.1pt"/>
    </style:style>
    <style:style style:parent-style-name="716" style:family="paragraph" style:name="P32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89">
      <style:text-properties fo:font-weight="bold"/>
    </style:style>
    <style:style style:family="text" style:name="T2390">
      <style:text-properties fo:font-weight="bold"/>
    </style:style>
    <style:style style:parent-style-name="716" style:family="paragraph" style:name="P322">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91">
      <style:text-properties fo:letter-spacing="-0.25pt"/>
    </style:style>
    <style:style style:parent-style-name="716" style:family="paragraph" style:name="P32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392">
      <style:text-properties fo:letter-spacing="-0.15pt"/>
    </style:style>
    <style:style style:family="text" style:name="T2393">
      <style:text-properties fo:letter-spacing="-0.15pt"/>
    </style:style>
    <style:style style:family="text" style:name="T2394">
      <style:text-properties fo:letter-spacing="-0.15pt"/>
    </style:style>
    <style:style style:family="text" style:name="T2395">
      <style:text-properties fo:letter-spacing="-0.15pt"/>
    </style:style>
    <style:style style:family="text" style:name="T2396">
      <style:text-properties fo:letter-spacing="-0.15pt"/>
    </style:style>
    <style:style style:family="text" style:name="T2397">
      <style:text-properties fo:letter-spacing="-0.15pt"/>
    </style:style>
    <style:style style:family="text" style:name="T2398">
      <style:text-properties fo:letter-spacing="-0.15pt"/>
    </style:style>
    <style:style style:family="text" style:name="T2399">
      <style:text-properties fo:letter-spacing="-0.15pt"/>
    </style:style>
    <style:style style:family="text" style:name="T2400">
      <style:text-properties fo:letter-spacing="-0.15pt"/>
    </style:style>
    <style:style style:family="text" style:name="T2401">
      <style:text-properties fo:letter-spacing="-0.15pt"/>
    </style:style>
    <style:style style:family="text" style:name="T2402">
      <style:text-properties fo:letter-spacing="-0.15pt"/>
    </style:style>
    <style:style style:parent-style-name="716" style:family="paragraph" style:name="P32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1" style:list-style-name="WWNum8" style:family="paragraph" style:name="P325">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403">
      <style:text-properties fo:letter-spacing="-0.1pt"/>
    </style:style>
    <style:style style:parent-style-name="716" style:family="paragraph" style:name="P32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04">
      <style:text-properties fo:font-weight="bold"/>
    </style:style>
    <style:style style:family="text" style:name="T2405">
      <style:text-properties fo:font-weight="bold"/>
    </style:style>
    <style:style style:parent-style-name="716" style:family="paragraph" style:name="P327">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06">
      <style:text-properties fo:letter-spacing="-0.25pt"/>
    </style:style>
    <style:style style:family="text" style:name="T2407">
      <style:text-properties fo:letter-spacing="-0.25pt"/>
    </style:style>
    <style:style style:family="text" style:name="T2408">
      <style:text-properties fo:letter-spacing="-0.25pt"/>
    </style:style>
    <style:style style:family="text" style:name="T2409">
      <style:text-properties fo:letter-spacing="-0.25pt"/>
    </style:style>
    <style:style style:family="text" style:name="T2410">
      <style:text-properties fo:letter-spacing="-0.25pt"/>
    </style:style>
    <style:style style:family="text" style:name="T2411">
      <style:text-properties fo:letter-spacing="-0.25pt"/>
    </style:style>
    <style:style style:family="text" style:name="T2412">
      <style:text-properties fo:letter-spacing="-0.25pt"/>
    </style:style>
    <style:style style:family="text" style:name="T2413">
      <style:text-properties fo:letter-spacing="-0.25pt"/>
    </style:style>
    <style:style style:family="text" style:name="T2414">
      <style:text-properties fo:letter-spacing="-0.25pt"/>
    </style:style>
    <style:style style:family="text" style:name="T2415">
      <style:text-properties fo:letter-spacing="-0.25pt"/>
    </style:style>
    <style:style style:family="text" style:name="T2416">
      <style:text-properties fo:letter-spacing="-0.25pt"/>
    </style:style>
    <style:style style:family="text" style:name="T2417">
      <style:text-properties fo:letter-spacing="-0.25pt"/>
    </style:style>
    <style:style style:parent-style-name="708" style:master-page-name="MasterPage14" style:family="paragraph" style:name="P328">
      <style:paragraph-properties fo:margin-left="0cm" fo:margin-right="2.515cm" fo:text-indent="0cm"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2418">
      <style:text-properties fo:letter-spacing="-0.75pt"/>
    </style:style>
    <style:style style:family="text" style:name="T2419">
      <style:text-properties fo:letter-spacing="-0.75pt"/>
    </style:style>
    <style:style style:family="text" style:name="T2420">
      <style:text-properties fo:letter-spacing="-0.75pt"/>
    </style:style>
    <style:style style:family="text" style:name="T2421">
      <style:text-properties fo:letter-spacing="-0.75pt"/>
    </style:style>
    <style:style style:family="text" style:name="T2422">
      <style:text-properties fo:letter-spacing="-0.1pt"/>
    </style:style>
    <style:style style:parent-style-name="716" style:family="paragraph" style:name="P329">
      <style:paragraph-properties fo:margin-left="0cm" fo:margin-right="0cm" fo:text-indent="0cm" fo:margin-top="0.4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23">
      <style:text-properties fo:font-size="15.5pt" fo:font-weight="bold"/>
    </style:style>
    <style:style style:family="text" style:name="T2424">
      <style:text-properties fo:font-size="15.5pt" fo:font-weight="bold"/>
    </style:style>
    <style:style style:parent-style-name="712" style:family="paragraph" style:name="P330">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425">
      <style:text-properties fo:color="#999999" fo:font-size="12pt" fo:font-style="italic"/>
    </style:style>
    <style:style style:family="text" style:name="T2426">
      <style:text-properties fo:color="#999999" fo:font-size="12pt" fo:letter-spacing="-0.1pt" fo:font-style="italic"/>
    </style:style>
    <style:style style:parent-style-name="716" style:family="paragraph" style:name="P33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Graphics" style:family="graphic" style:name="gr4">
      <style:graphic-properties draw:image-opacity="100%" style:repeat="stretch" fo:margin-left="0cm" fo:margin-right="0cm" fo:margin-top="0cm" fo:margin-bottom="0cm" style:horizontal-pos="from-left" style:horizontal-rel="page" style:vertical-pos="from-top" style:vertical-rel="paragraph" fo:background-color="transparent"/>
    </style:style>
    <style:style style:parent-style-name="716" style:family="paragraph" style:name="P33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27">
      <style:text-properties fo:font-size="14pt" fo:font-style="italic"/>
    </style:style>
    <style:style style:family="text" style:name="T2428">
      <style:text-properties fo:font-size="14pt" fo:font-style="italic"/>
    </style:style>
    <style:style style:parent-style-name="716" style:family="paragraph" style:name="P33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29">
      <style:text-properties fo:font-size="12.5pt" fo:font-style="italic"/>
    </style:style>
    <style:style style:family="text" style:name="T2430">
      <style:text-properties fo:font-size="12.5pt" fo:font-style="italic"/>
    </style:style>
    <style:style style:parent-style-name="716" style:family="paragraph" style:name="P334">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31">
      <style:text-properties fo:letter-spacing="-0.45pt"/>
    </style:style>
    <style:style style:family="text" style:name="T2432">
      <style:text-properties fo:letter-spacing="-0.45pt"/>
    </style:style>
    <style:style style:family="text" style:name="T2433">
      <style:text-properties fo:letter-spacing="-0.45pt"/>
    </style:style>
    <style:style style:family="text" style:name="T2434">
      <style:text-properties fo:letter-spacing="-0.45pt"/>
    </style:style>
    <style:style style:family="text" style:name="T2435">
      <style:text-properties fo:letter-spacing="-0.45pt"/>
    </style:style>
    <style:style style:family="text" style:name="T2436">
      <style:text-properties fo:letter-spacing="-0.45pt"/>
    </style:style>
    <style:style style:family="text" style:name="T2437">
      <style:text-properties fo:letter-spacing="-0.45pt"/>
    </style:style>
    <style:style style:family="text" style:name="T2438">
      <style:text-properties fo:letter-spacing="-0.45pt"/>
    </style:style>
    <style:style style:family="text" style:name="T2439">
      <style:text-properties fo:letter-spacing="-0.45pt"/>
    </style:style>
    <style:style style:family="text" style:name="T2440">
      <style:text-properties fo:letter-spacing="-0.45pt"/>
    </style:style>
    <style:style style:parent-style-name="716" style:family="paragraph" style:name="P33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336">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41">
      <style:text-properties fo:letter-spacing="-0.15pt"/>
    </style:style>
    <style:style style:family="text" style:name="T2442">
      <style:text-properties fo:letter-spacing="-0.15pt"/>
    </style:style>
    <style:style style:family="text" style:name="T2443">
      <style:text-properties fo:letter-spacing="-0.15pt"/>
    </style:style>
    <style:style style:family="text" style:name="T2444">
      <style:text-properties fo:letter-spacing="-0.15pt"/>
    </style:style>
    <style:style style:family="text" style:name="T2445">
      <style:text-properties fo:letter-spacing="-0.15pt"/>
    </style:style>
    <style:style style:family="text" style:name="T2446">
      <style:text-properties fo:letter-spacing="-0.15pt"/>
    </style:style>
    <style:style style:family="text" style:name="T2447">
      <style:text-properties fo:letter-spacing="-0.15pt"/>
    </style:style>
    <style:style style:family="text" style:name="T2448">
      <style:text-properties fo:letter-spacing="-0.15pt"/>
    </style:style>
    <style:style style:family="text" style:name="T2449">
      <style:text-properties fo:letter-spacing="-0.15pt"/>
    </style:style>
    <style:style style:parent-style-name="716" style:family="paragraph" style:name="P33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33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50">
      <style:text-properties fo:letter-spacing="-0.1pt"/>
    </style:style>
    <style:style style:family="text" style:name="T2451">
      <style:text-properties fo:letter-spacing="-0.1pt"/>
    </style:style>
    <style:style style:family="text" style:name="T2452">
      <style:text-properties fo:letter-spacing="-0.1pt"/>
    </style:style>
    <style:style style:family="text" style:name="T2453">
      <style:text-properties fo:letter-spacing="-0.1pt"/>
    </style:style>
    <style:style style:family="text" style:name="T2454">
      <style:text-properties fo:letter-spacing="-0.1pt"/>
    </style:style>
    <style:style style:family="text" style:name="T2455">
      <style:text-properties fo:letter-spacing="-0.1pt"/>
    </style:style>
    <style:style style:family="text" style:name="T2456">
      <style:text-properties fo:letter-spacing="-0.1pt"/>
    </style:style>
    <style:style style:family="text" style:name="T2457">
      <style:text-properties fo:letter-spacing="-0.1pt"/>
    </style:style>
    <style:style style:family="text" style:name="T2458">
      <style:text-properties fo:letter-spacing="-0.1pt"/>
    </style:style>
    <style:style style:family="text" style:name="T2459">
      <style:text-properties fo:letter-spacing="-0.1pt"/>
    </style:style>
    <style:style style:family="text" style:name="T2460">
      <style:text-properties fo:letter-spacing="-0.1pt"/>
    </style:style>
    <style:style style:family="text" style:name="T2461">
      <style:text-properties fo:letter-spacing="-0.1pt"/>
    </style:style>
    <style:style style:family="text" style:name="T2462">
      <style:text-properties fo:letter-spacing="-0.1pt"/>
    </style:style>
    <style:style style:family="text" style:name="T2463">
      <style:text-properties fo:letter-spacing="-0.1pt"/>
    </style:style>
    <style:style style:parent-style-name="712" style:master-page-name="MasterPage15" style:family="paragraph" style:name="P339">
      <style:paragraph-properties fo:margin-left="0.1993cm" fo:margin-right="0cm" fo:text-indent="0cm" fo:margin-top="3.8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464">
      <style:text-properties fo:font-size="14pt" fo:font-weight="bold"/>
    </style:style>
    <style:style style:family="text" style:name="T2465">
      <style:text-properties fo:font-size="14pt" fo:letter-spacing="-0.55pt" fo:font-weight="bold"/>
    </style:style>
    <style:style style:family="text" style:name="T2466">
      <style:text-properties fo:font-size="14pt" fo:font-weight="bold"/>
    </style:style>
    <style:style style:family="text" style:name="T2467">
      <style:text-properties fo:font-size="14pt" fo:letter-spacing="-0.55pt" fo:font-weight="bold"/>
    </style:style>
    <style:style style:family="text" style:name="T2468">
      <style:text-properties fo:font-size="14pt" fo:font-weight="bold"/>
    </style:style>
    <style:style style:family="text" style:name="T2469">
      <style:text-properties fo:font-size="14pt" fo:letter-spacing="-0.5pt" fo:font-weight="bold"/>
    </style:style>
    <style:style style:family="text" style:name="T2470">
      <style:text-properties fo:font-size="14pt" fo:letter-spacing="-0.15pt" fo:font-weight="bold"/>
    </style:style>
    <style:style style:parent-style-name="716" style:family="paragraph" style:name="P340">
      <style:paragraph-properties fo:margin-left="0cm" fo:margin-right="0cm" fo:text-indent="0cm" fo:margin-top="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71">
      <style:text-properties fo:font-size="22pt" fo:font-weight="bold"/>
    </style:style>
    <style:style style:family="text" style:name="T2472">
      <style:text-properties fo:font-size="22pt" fo:font-weight="bold"/>
    </style:style>
    <style:style style:parent-style-name="710" style:list-style-name="WWNum9" style:family="paragraph" style:name="P341">
      <style:paragraph-properties fo:margin-left="0cm" fo:margin-right="0cm" fo:text-indent="-0.5116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2473">
      <style:text-properties fo:letter-spacing="-0.5pt"/>
    </style:style>
    <style:style style:family="text" style:name="T2474">
      <style:text-properties fo:letter-spacing="-0.3pt"/>
    </style:style>
    <style:style style:family="text" style:name="T2475">
      <style:text-properties fo:letter-spacing="-0.3pt"/>
    </style:style>
    <style:style style:family="text" style:name="T2476">
      <style:text-properties fo:letter-spacing="-0.35pt"/>
    </style:style>
    <style:style style:family="text" style:name="T2477">
      <style:text-properties fo:letter-spacing="-0.3pt"/>
    </style:style>
    <style:style style:family="text" style:name="T2478">
      <style:text-properties fo:letter-spacing="-0.3pt"/>
    </style:style>
    <style:style style:family="text" style:name="T2479">
      <style:text-properties fo:letter-spacing="-0.1pt"/>
    </style:style>
    <style:style style:parent-style-name="716" style:family="paragraph" style:name="P34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80">
      <style:text-properties fo:font-size="17pt" fo:font-style="italic" fo:font-weight="bold"/>
    </style:style>
    <style:style style:family="text" style:name="T2481">
      <style:text-properties fo:font-size="17pt" fo:font-style="italic" fo:font-weight="bold"/>
    </style:style>
    <style:style style:parent-style-name="716" style:family="paragraph" style:name="P34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82">
      <style:text-properties fo:letter-spacing="-0.1pt"/>
    </style:style>
    <style:style style:family="text" style:name="T2483">
      <style:text-properties fo:letter-spacing="-0.1pt"/>
    </style:style>
    <style:style style:family="text" style:name="T2484">
      <style:text-properties fo:letter-spacing="-0.1pt"/>
    </style:style>
    <style:style style:family="text" style:name="T2485">
      <style:text-properties fo:letter-spacing="-0.1pt"/>
    </style:style>
    <style:style style:family="text" style:name="T2486">
      <style:text-properties fo:letter-spacing="-0.1pt"/>
    </style:style>
    <style:style style:family="text" style:name="T2487">
      <style:text-properties fo:letter-spacing="-0.1pt"/>
    </style:style>
    <style:style style:family="text" style:name="T2488">
      <style:text-properties fo:letter-spacing="-0.1pt"/>
    </style:style>
    <style:style style:family="text" style:name="T2489">
      <style:text-properties fo:letter-spacing="-0.1pt"/>
    </style:style>
    <style:style style:family="text" style:name="T2490">
      <style:text-properties fo:letter-spacing="-0.1pt"/>
    </style:style>
    <style:style style:family="text" style:name="T2491">
      <style:text-properties fo:letter-spacing="-0.1pt"/>
    </style:style>
    <style:style style:family="text" style:name="T2492">
      <style:text-properties fo:letter-spacing="-0.1pt"/>
    </style:style>
    <style:style style:family="text" style:name="T2493">
      <style:text-properties fo:letter-spacing="-0.1pt"/>
    </style:style>
    <style:style style:family="text" style:name="T2494">
      <style:text-properties fo:letter-spacing="-0.1pt"/>
    </style:style>
    <style:style style:family="text" style:name="T2495">
      <style:text-properties fo:letter-spacing="-0.1pt"/>
    </style:style>
    <style:style style:parent-style-name="716" style:family="paragraph" style:name="P344">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496">
      <style:text-properties fo:font-size="17pt"/>
    </style:style>
    <style:style style:family="text" style:name="T2497">
      <style:text-properties fo:font-size="17pt"/>
    </style:style>
    <style:style style:parent-style-name="710" style:list-style-name="WWNum9" style:family="paragraph" style:name="P345">
      <style:paragraph-properties fo:margin-left="0cm" fo:margin-right="0cm" fo:text-indent="-0.5116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2498">
      <style:text-properties fo:letter-spacing="-0.55pt"/>
    </style:style>
    <style:style style:family="text" style:name="T2499">
      <style:text-properties fo:letter-spacing="-0.45pt"/>
    </style:style>
    <style:style style:family="text" style:name="T2500">
      <style:text-properties fo:letter-spacing="-0.45pt"/>
    </style:style>
    <style:style style:family="text" style:name="T2501">
      <style:text-properties fo:letter-spacing="-0.45pt"/>
    </style:style>
    <style:style style:family="text" style:name="T2502">
      <style:text-properties fo:letter-spacing="-0.45pt"/>
    </style:style>
    <style:style style:family="text" style:name="T2503">
      <style:text-properties fo:letter-spacing="-0.1pt"/>
    </style:style>
    <style:style style:parent-style-name="716" style:family="paragraph" style:name="P346">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04">
      <style:text-properties fo:font-size="17pt" fo:font-style="italic" fo:font-weight="bold"/>
    </style:style>
    <style:style style:family="text" style:name="T2505">
      <style:text-properties fo:font-size="17pt" fo:font-style="italic" fo:font-weight="bold"/>
    </style:style>
    <style:style style:parent-style-name="716" style:family="paragraph" style:name="P347">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06">
      <style:text-properties fo:letter-spacing="-0.15pt"/>
    </style:style>
    <style:style style:family="text" style:name="T2507">
      <style:text-properties fo:letter-spacing="-0.15pt"/>
    </style:style>
    <style:style style:family="text" style:name="T2508">
      <style:text-properties fo:letter-spacing="-0.15pt"/>
    </style:style>
    <style:style style:family="text" style:name="T2509">
      <style:text-properties fo:letter-spacing="-0.15pt"/>
    </style:style>
    <style:style style:family="text" style:name="T2510">
      <style:text-properties fo:letter-spacing="-0.15pt"/>
    </style:style>
    <style:style style:family="text" style:name="T2511">
      <style:text-properties fo:letter-spacing="-0.15pt"/>
    </style:style>
    <style:style style:family="text" style:name="T2512">
      <style:text-properties fo:letter-spacing="-0.15pt"/>
    </style:style>
    <style:style style:family="text" style:name="T2513">
      <style:text-properties fo:letter-spacing="-0.15pt"/>
    </style:style>
    <style:style style:family="text" style:name="T2514">
      <style:text-properties fo:letter-spacing="-0.15pt"/>
    </style:style>
    <style:style style:family="text" style:name="T2515">
      <style:text-properties fo:letter-spacing="-0.15pt"/>
    </style:style>
    <style:style style:parent-style-name="716" style:family="paragraph" style:name="P34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349">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16">
      <style:text-properties fo:letter-spacing="-0.1pt"/>
    </style:style>
    <style:style style:family="text" style:name="T2517">
      <style:text-properties fo:letter-spacing="-0.1pt"/>
    </style:style>
    <style:style style:family="text" style:name="T2518">
      <style:text-properties fo:letter-spacing="-0.1pt"/>
    </style:style>
    <style:style style:family="text" style:name="T2519">
      <style:text-properties fo:letter-spacing="-0.1pt"/>
    </style:style>
    <style:style style:family="text" style:name="T2520">
      <style:text-properties fo:letter-spacing="-0.1pt"/>
    </style:style>
    <style:style style:family="text" style:name="T2521">
      <style:text-properties fo:letter-spacing="-0.1pt"/>
    </style:style>
    <style:style style:family="text" style:name="T2522">
      <style:text-properties fo:letter-spacing="-0.1pt"/>
    </style:style>
    <style:style style:family="text" style:name="T2523">
      <style:text-properties fo:letter-spacing="-0.1pt"/>
    </style:style>
    <style:style style:family="text" style:name="T2524">
      <style:text-properties fo:letter-spacing="-0.1pt"/>
    </style:style>
    <style:style style:family="text" style:name="T2525">
      <style:text-properties fo:letter-spacing="-0.1pt"/>
    </style:style>
    <style:style style:family="text" style:name="T2526">
      <style:text-properties fo:letter-spacing="-0.1pt"/>
    </style:style>
    <style:style style:family="text" style:name="T2527">
      <style:text-properties fo:letter-spacing="-0.1pt"/>
    </style:style>
    <style:style style:family="text" style:name="T2528">
      <style:text-properties fo:color="#1154cc" style:text-underline-type="single" style:text-underline-style="solid" style:text-underline-width="auto" style:text-underline-color="font-color"/>
    </style:style>
    <style:style style:family="text" style:name="T2529">
      <style:text-properties fo:color="#1154cc" fo:letter-spacing="-0.1pt" style:text-underline-type="single" style:text-underline-style="solid" style:text-underline-width="auto" style:text-underline-color="font-color"/>
    </style:style>
    <style:style style:family="text" style:name="T2530">
      <style:text-properties fo:color="#1154cc" style:text-underline-type="single" style:text-underline-style="solid" style:text-underline-width="auto" style:text-underline-color="font-color"/>
    </style:style>
    <style:style style:family="text" style:name="T2531">
      <style:text-properties fo:color="#1154cc" fo:letter-spacing="-0.1pt" style:text-underline-type="single" style:text-underline-style="solid" style:text-underline-width="auto" style:text-underline-color="font-color"/>
    </style:style>
    <style:style style:family="text" style:name="T2532">
      <style:text-properties fo:color="#1154cc" style:text-underline-type="single" style:text-underline-style="solid" style:text-underline-width="auto" style:text-underline-color="font-color"/>
    </style:style>
    <style:style style:family="text" style:name="T2533">
      <style:text-properties fo:color="#1154cc"/>
    </style:style>
    <style:style style:family="text" style:name="T2534">
      <style:text-properties fo:color="#1154cc" style:text-underline-type="single" style:text-underline-style="solid" style:text-underline-width="auto" style:text-underline-color="font-color"/>
    </style:style>
    <style:style style:parent-style-name="716" style:family="paragraph" style:name="P35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35">
      <style:text-properties fo:font-size="13pt"/>
    </style:style>
    <style:style style:family="text" style:name="T2536">
      <style:text-properties fo:font-size="13pt"/>
    </style:style>
    <style:style style:parent-style-name="716" style:family="paragraph" style:name="P351">
      <style:paragraph-properties fo:margin-left="0cm" fo:margin-right="0cm" fo:text-indent="0cm" fo:margin-top="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37">
      <style:text-properties fo:font-size="10pt"/>
    </style:style>
    <style:style style:family="text" style:name="T2538">
      <style:text-properties fo:font-size="10pt"/>
    </style:style>
    <style:style style:parent-style-name="710" style:family="paragraph" style:name="P352">
      <style:paragraph-properties fo:margin-left="0.1993cm" fo:margin-right="0cm" fo:text-indent="0cm"/>
      <style:text-properties fo:font-variant="normal" fo:text-transform="none" fo:color="#000000" style:text-line-through-type="none" fo:font-family="Arial" style:font-family-asian="Arial" style:font-family-complex="Arial" fo:font-size="13pt" fo:letter-spacing="0pt" fo:language="en" fo:country="US" fo:font-style="italic" style:text-underline-type="none" style:text-underline-width="auto" fo:font-weight="bold"/>
    </style:style>
    <style:style style:family="text" style:name="T2539">
      <style:text-properties fo:letter-spacing="-0.1pt"/>
    </style:style>
    <style:style style:family="text" style:name="T2540">
      <style:text-properties fo:letter-spacing="-0.1pt"/>
    </style:style>
    <style:style style:parent-style-name="716" style:family="paragraph" style:name="P353">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41">
      <style:text-properties fo:font-size="17pt" fo:font-style="italic" fo:font-weight="bold"/>
    </style:style>
    <style:style style:family="text" style:name="T2542">
      <style:text-properties fo:font-size="17pt" fo:font-style="italic" fo:font-weight="bold"/>
    </style:style>
    <style:style style:parent-style-name="711" style:list-style-name="WWNum10" style:family="paragraph" style:name="P354">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543">
      <style:text-properties fo:letter-spacing="-0.1pt"/>
    </style:style>
    <style:style style:parent-style-name="716" style:family="paragraph" style:name="P35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44">
      <style:text-properties fo:font-weight="bold"/>
    </style:style>
    <style:style style:family="text" style:name="T2545">
      <style:text-properties fo:font-weight="bold"/>
    </style:style>
    <style:style style:parent-style-name="716" style:family="paragraph" style:name="P356">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46">
      <style:text-properties fo:letter-spacing="-0.25pt"/>
    </style:style>
    <style:style style:family="text" style:name="T2547">
      <style:text-properties fo:letter-spacing="-0.25pt"/>
    </style:style>
    <style:style style:family="text" style:name="T2548">
      <style:text-properties fo:letter-spacing="-0.25pt"/>
    </style:style>
    <style:style style:family="text" style:name="T2549">
      <style:text-properties fo:letter-spacing="-0.25pt"/>
    </style:style>
    <style:style style:family="text" style:name="T2550">
      <style:text-properties fo:letter-spacing="-0.25pt"/>
    </style:style>
    <style:style style:family="text" style:name="T2551">
      <style:text-properties fo:letter-spacing="-0.25pt"/>
    </style:style>
    <style:style style:family="text" style:name="T2552">
      <style:text-properties fo:letter-spacing="-0.25pt"/>
    </style:style>
    <style:style style:family="text" style:name="T2553">
      <style:text-properties fo:letter-spacing="-0.25pt"/>
    </style:style>
    <style:style style:family="text" style:name="T2554">
      <style:text-properties fo:letter-spacing="-0.1pt"/>
    </style:style>
    <style:style style:parent-style-name="716" style:family="paragraph" style:name="P35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55">
      <style:text-properties fo:font-size="13pt"/>
    </style:style>
    <style:style style:family="text" style:name="T2556">
      <style:text-properties fo:font-size="13pt"/>
    </style:style>
    <style:style style:parent-style-name="716" style:family="paragraph" style:name="P35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57">
      <style:text-properties fo:font-size="11pt"/>
    </style:style>
    <style:style style:family="text" style:name="T2558">
      <style:text-properties fo:font-size="11pt"/>
    </style:style>
    <style:style style:parent-style-name="711" style:list-style-name="WWNum10" style:family="paragraph" style:name="P359">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559">
      <style:text-properties fo:letter-spacing="-0.1pt"/>
    </style:style>
    <style:style style:parent-style-name="716" style:family="paragraph" style:name="P36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60">
      <style:text-properties fo:font-weight="bold"/>
    </style:style>
    <style:style style:family="text" style:name="T2561">
      <style:text-properties fo:font-weight="bold"/>
    </style:style>
    <style:style style:parent-style-name="716" style:family="paragraph" style:name="P361">
      <style:paragraph-properties fo:margin-left="0cm" fo:margin-right="2.193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62">
      <style:text-properties fo:letter-spacing="-0.15pt"/>
    </style:style>
    <style:style style:family="text" style:name="T2563">
      <style:text-properties fo:letter-spacing="-0.15pt"/>
    </style:style>
    <style:style style:family="text" style:name="T2564">
      <style:text-properties fo:letter-spacing="-0.15pt"/>
    </style:style>
    <style:style style:family="text" style:name="T2565">
      <style:text-properties fo:letter-spacing="-0.15pt"/>
    </style:style>
    <style:style style:family="text" style:name="T2566">
      <style:text-properties fo:letter-spacing="-0.15pt"/>
    </style:style>
    <style:style style:family="text" style:name="T2567">
      <style:text-properties fo:letter-spacing="-0.15pt"/>
    </style:style>
    <style:style style:family="text" style:name="T2568">
      <style:text-properties fo:letter-spacing="-0.15pt"/>
    </style:style>
    <style:style style:family="text" style:name="T2569">
      <style:text-properties fo:letter-spacing="-0.15pt"/>
    </style:style>
    <style:style style:family="text" style:name="T2570">
      <style:text-properties fo:letter-spacing="-0.15pt"/>
    </style:style>
    <style:style style:family="text" style:name="T2571">
      <style:text-properties fo:letter-spacing="-0.15pt"/>
    </style:style>
    <style:style style:parent-style-name="716" style:family="paragraph" style:name="P362">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72">
      <style:text-properties fo:letter-spacing="-0.3pt"/>
    </style:style>
    <style:style style:family="text" style:name="T2573">
      <style:text-properties fo:letter-spacing="-0.3pt"/>
    </style:style>
    <style:style style:family="text" style:name="T2574">
      <style:text-properties fo:letter-spacing="-0.3pt"/>
    </style:style>
    <style:style style:family="text" style:name="T2575">
      <style:text-properties fo:letter-spacing="-0.3pt"/>
    </style:style>
    <style:style style:family="text" style:name="T2576">
      <style:text-properties fo:letter-spacing="-0.3pt"/>
    </style:style>
    <style:style style:family="text" style:name="T2577">
      <style:text-properties fo:letter-spacing="-0.3pt"/>
    </style:style>
    <style:style style:family="text" style:name="T2578">
      <style:text-properties fo:letter-spacing="-0.3pt"/>
    </style:style>
    <style:style style:family="text" style:name="T2579">
      <style:text-properties fo:letter-spacing="-0.3pt"/>
    </style:style>
    <style:style style:family="text" style:name="T2580">
      <style:text-properties fo:letter-spacing="-0.3pt"/>
    </style:style>
    <style:style style:family="text" style:name="T2581">
      <style:text-properties fo:letter-spacing="-0.3pt"/>
    </style:style>
    <style:style style:parent-style-name="711" style:list-style-name="WWNum10" style:master-page-name="MasterPage16" style:family="paragraph" style:name="P363">
      <style:paragraph-properties fo:margin-left="0cm" fo:margin-right="0cm" fo:text-indent="-0.4728cm" fo:margin-top="3.7pt" fo:margin-bottom="0pt" fo:break-before="page">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582">
      <style:text-properties fo:letter-spacing="-0.1pt"/>
    </style:style>
    <style:style style:parent-style-name="716" style:family="paragraph" style:name="P364">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83">
      <style:text-properties fo:font-size="11.5pt" fo:font-weight="bold"/>
    </style:style>
    <style:style style:family="text" style:name="T2584">
      <style:text-properties fo:font-size="11.5pt" fo:font-weight="bold"/>
    </style:style>
    <style:style style:parent-style-name="716" style:family="paragraph" style:name="P365">
      <style:paragraph-properties fo:margin-left="0cm" fo:margin-right="1.58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585">
      <style:text-properties fo:letter-spacing="-0.1pt"/>
    </style:style>
    <style:style style:family="text" style:name="T2586">
      <style:text-properties fo:letter-spacing="-0.1pt"/>
    </style:style>
    <style:style style:family="text" style:name="T2587">
      <style:text-properties fo:letter-spacing="-0.1pt"/>
    </style:style>
    <style:style style:family="text" style:name="T2588">
      <style:text-properties fo:letter-spacing="-0.1pt"/>
    </style:style>
    <style:style style:family="text" style:name="T2589">
      <style:text-properties fo:letter-spacing="-0.1pt"/>
    </style:style>
    <style:style style:family="text" style:name="T2590">
      <style:text-properties fo:letter-spacing="-0.1pt"/>
    </style:style>
    <style:style style:family="text" style:name="T2591">
      <style:text-properties fo:letter-spacing="-0.1pt"/>
    </style:style>
    <style:style style:family="text" style:name="T2592">
      <style:text-properties fo:letter-spacing="-0.1pt"/>
    </style:style>
    <style:style style:family="text" style:name="T2593">
      <style:text-properties fo:letter-spacing="-0.1pt"/>
    </style:style>
    <style:style style:family="text" style:name="T2594">
      <style:text-properties fo:letter-spacing="-0.1pt"/>
    </style:style>
    <style:style style:family="text" style:name="T2595">
      <style:text-properties fo:letter-spacing="-0.1pt"/>
    </style:style>
    <style:style style:family="text" style:name="T2596">
      <style:text-properties fo:letter-spacing="-0.1pt"/>
    </style:style>
    <style:style style:family="text" style:name="T2597">
      <style:text-properties fo:letter-spacing="-0.1pt"/>
    </style:style>
    <style:style style:family="text" style:name="T2598">
      <style:text-properties fo:letter-spacing="-0.05pt"/>
    </style:style>
    <style:style style:family="text" style:name="T2599">
      <style:text-properties fo:letter-spacing="-0.05pt"/>
    </style:style>
    <style:style style:family="text" style:name="T2600">
      <style:text-properties fo:letter-spacing="-0.05pt"/>
    </style:style>
    <style:style style:family="text" style:name="T2601">
      <style:text-properties fo:letter-spacing="-0.05pt"/>
    </style:style>
    <style:style style:family="text" style:name="T2602">
      <style:text-properties fo:letter-spacing="-0.05pt"/>
    </style:style>
    <style:style style:family="text" style:name="T2603">
      <style:text-properties fo:letter-spacing="-0.05pt"/>
    </style:style>
    <style:style style:family="text" style:name="T2604">
      <style:text-properties fo:letter-spacing="-0.05pt"/>
    </style:style>
    <style:style style:family="text" style:name="T2605">
      <style:text-properties fo:letter-spacing="-0.05pt"/>
    </style:style>
    <style:style style:family="text" style:name="T2606">
      <style:text-properties fo:letter-spacing="-0.05pt"/>
    </style:style>
    <style:style style:family="text" style:name="T2607">
      <style:text-properties fo:letter-spacing="-0.05pt"/>
    </style:style>
    <style:style style:family="text" style:name="T2608">
      <style:text-properties fo:letter-spacing="-0.05pt"/>
    </style:style>
    <style:style style:parent-style-name="716" style:family="paragraph" style:name="P36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1" style:list-style-name="WWNum10" style:family="paragraph" style:name="P367">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2609">
      <style:text-properties fo:letter-spacing="-0.1pt"/>
    </style:style>
    <style:style style:parent-style-name="716" style:family="paragraph" style:name="P36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10">
      <style:text-properties fo:font-weight="bold"/>
    </style:style>
    <style:style style:family="text" style:name="T2611">
      <style:text-properties fo:font-weight="bold"/>
    </style:style>
    <style:style style:parent-style-name="716" style:family="paragraph" style:name="P369">
      <style:paragraph-properties fo:margin-left="0cm" fo:margin-right="1.997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12">
      <style:text-properties fo:letter-spacing="-0.25pt"/>
    </style:style>
    <style:style style:parent-style-name="716" style:family="paragraph" style:name="P37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13">
      <style:text-properties fo:letter-spacing="-0.25pt"/>
    </style:style>
    <style:style style:family="text" style:name="T2614">
      <style:text-properties fo:letter-spacing="-0.25pt"/>
    </style:style>
    <style:style style:family="text" style:name="T2615">
      <style:text-properties fo:letter-spacing="-0.25pt"/>
    </style:style>
    <style:style style:family="text" style:name="T2616">
      <style:text-properties fo:letter-spacing="-0.25pt"/>
    </style:style>
    <style:style style:family="text" style:name="T2617">
      <style:text-properties fo:letter-spacing="-0.25pt"/>
    </style:style>
    <style:style style:family="text" style:name="T2618">
      <style:text-properties fo:letter-spacing="-0.25pt"/>
    </style:style>
    <style:style style:family="text" style:name="T2619">
      <style:text-properties fo:letter-spacing="-0.25pt"/>
    </style:style>
    <style:style style:family="text" style:name="T2620">
      <style:text-properties fo:letter-spacing="-0.25pt"/>
    </style:style>
    <style:style style:family="text" style:name="T2621">
      <style:text-properties fo:letter-spacing="-0.25pt"/>
    </style:style>
    <style:style style:family="text" style:name="T2622">
      <style:text-properties fo:letter-spacing="-0.25pt"/>
    </style:style>
    <style:style style:family="text" style:name="T2623">
      <style:text-properties fo:letter-spacing="-0.25pt"/>
    </style:style>
    <style:style style:family="text" style:name="T2624">
      <style:text-properties fo:letter-spacing="-0.1pt"/>
    </style:style>
    <style:style style:parent-style-name="708" style:master-page-name="MasterPage17" style:family="paragraph" style:name="P371">
      <style:paragraph-properties fo:margin-left="0cm" fo:margin-right="0.5504cm" fo:text-indent="0cm"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2625">
      <style:text-properties fo:letter-spacing="-0.35pt"/>
    </style:style>
    <style:style style:family="text" style:name="T2626">
      <style:text-properties fo:letter-spacing="-0.35pt"/>
    </style:style>
    <style:style style:family="text" style:name="T2627">
      <style:text-properties fo:letter-spacing="-0.35pt"/>
    </style:style>
    <style:style style:family="text" style:name="T2628">
      <style:text-properties fo:letter-spacing="-0.35pt"/>
    </style:style>
    <style:style style:family="text" style:name="T2629">
      <style:text-properties fo:letter-spacing="-0.35pt"/>
    </style:style>
    <style:style style:family="text" style:name="T2630">
      <style:text-properties fo:letter-spacing="-0.35pt"/>
    </style:style>
    <style:style style:family="text" style:name="T2631">
      <style:text-properties fo:letter-spacing="-0.35pt"/>
    </style:style>
    <style:style style:parent-style-name="716" style:family="paragraph" style:name="P37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32">
      <style:text-properties fo:font-size="17pt" fo:font-weight="bold"/>
    </style:style>
    <style:style style:family="text" style:name="T2633">
      <style:text-properties fo:font-size="17pt" fo:font-weight="bold"/>
    </style:style>
    <style:style style:parent-style-name="716" style:family="paragraph" style:name="P37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34">
      <style:text-properties fo:letter-spacing="-0.25pt"/>
    </style:style>
    <style:style style:family="text" style:name="T2635">
      <style:text-properties fo:letter-spacing="-0.25pt"/>
    </style:style>
    <style:style style:family="text" style:name="T2636">
      <style:text-properties fo:letter-spacing="-0.25pt"/>
    </style:style>
    <style:style style:family="text" style:name="T2637">
      <style:text-properties fo:letter-spacing="-0.25pt"/>
    </style:style>
    <style:style style:family="text" style:name="T2638">
      <style:text-properties fo:letter-spacing="-0.25pt"/>
    </style:style>
    <style:style style:family="text" style:name="T2639">
      <style:text-properties fo:letter-spacing="-0.25pt"/>
    </style:style>
    <style:style style:family="text" style:name="T2640">
      <style:text-properties fo:letter-spacing="-0.25pt"/>
    </style:style>
    <style:style style:family="text" style:name="T2641">
      <style:text-properties fo:letter-spacing="-0.25pt"/>
    </style:style>
    <style:style style:family="text" style:name="T2642">
      <style:text-properties fo:letter-spacing="-0.25pt"/>
    </style:style>
    <style:style style:family="text" style:name="T2643">
      <style:text-properties fo:letter-spacing="-0.25pt"/>
    </style:style>
    <style:style style:parent-style-name="716" style:family="paragraph" style:name="P37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44">
      <style:text-properties fo:font-size="13pt"/>
    </style:style>
    <style:style style:family="text" style:name="T2645">
      <style:text-properties fo:font-size="13pt"/>
    </style:style>
    <style:style style:parent-style-name="716" style:family="paragraph" style:name="P375">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46">
      <style:text-properties fo:font-size="17pt"/>
    </style:style>
    <style:style style:family="text" style:name="T2647">
      <style:text-properties fo:font-size="17pt"/>
    </style:style>
    <style:style style:parent-style-name="712" style:family="paragraph" style:name="P376">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648">
      <style:text-properties fo:font-size="14pt" fo:font-weight="bold"/>
    </style:style>
    <style:style style:family="text" style:name="T2649">
      <style:text-properties fo:font-size="14pt" fo:letter-spacing="-0.15pt" fo:font-weight="bold"/>
    </style:style>
    <style:style style:family="text" style:name="T2650">
      <style:text-properties fo:font-size="14pt" fo:font-weight="bold"/>
    </style:style>
    <style:style style:family="text" style:name="T2651">
      <style:text-properties fo:font-size="14pt" fo:letter-spacing="-0.15pt" fo:font-weight="bold"/>
    </style:style>
    <style:style style:family="text" style:name="T2652">
      <style:text-properties fo:font-size="14pt" fo:font-weight="bold"/>
    </style:style>
    <style:style style:family="text" style:name="T2653">
      <style:text-properties fo:font-size="14pt" fo:letter-spacing="-0.15pt" fo:font-weight="bold"/>
    </style:style>
    <style:style style:family="text" style:name="T2654">
      <style:text-properties fo:font-size="14pt" fo:font-weight="bold"/>
    </style:style>
    <style:style style:family="text" style:name="T2655">
      <style:text-properties fo:font-size="14pt" fo:letter-spacing="-0.15pt" fo:font-weight="bold"/>
    </style:style>
    <style:style style:family="text" style:name="T2656">
      <style:text-properties fo:font-size="14pt" fo:font-weight="bold"/>
    </style:style>
    <style:style style:family="text" style:name="T2657">
      <style:text-properties fo:font-size="14pt" fo:letter-spacing="-0.1pt" fo:font-weight="bold"/>
    </style:style>
    <style:style style:family="text" style:name="T2658">
      <style:text-properties fo:font-size="14pt" fo:letter-spacing="-0.1pt" fo:font-weight="bold"/>
    </style:style>
    <style:style style:family="text" style:name="T2659">
      <style:text-properties fo:font-size="14pt" fo:letter-spacing="-0.1pt" fo:font-weight="bold"/>
    </style:style>
    <style:style style:parent-style-name="716" style:family="paragraph" style:name="P377">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60">
      <style:text-properties fo:font-size="17pt" fo:font-weight="bold"/>
    </style:style>
    <style:style style:family="text" style:name="T2661">
      <style:text-properties fo:font-size="17pt" fo:font-weight="bold"/>
    </style:style>
    <style:style style:parent-style-name="716" style:family="paragraph" style:name="P37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62">
      <style:text-properties fo:letter-spacing="-0.15pt"/>
    </style:style>
    <style:style style:family="text" style:name="T2663">
      <style:text-properties fo:letter-spacing="-0.15pt"/>
    </style:style>
    <style:style style:family="text" style:name="T2664">
      <style:text-properties fo:letter-spacing="-0.15pt"/>
    </style:style>
    <style:style style:family="text" style:name="T2665">
      <style:text-properties fo:letter-spacing="-0.15pt"/>
    </style:style>
    <style:style style:family="text" style:name="T2666">
      <style:text-properties fo:letter-spacing="-0.15pt"/>
    </style:style>
    <style:style style:family="text" style:name="T2667">
      <style:text-properties fo:letter-spacing="-0.15pt"/>
    </style:style>
    <style:style style:family="text" style:name="T2668">
      <style:text-properties fo:letter-spacing="-0.15pt"/>
    </style:style>
    <style:style style:family="text" style:name="T2669">
      <style:text-properties fo:letter-spacing="-0.15pt"/>
    </style:style>
    <style:style style:family="text" style:name="T2670">
      <style:text-properties fo:letter-spacing="-0.15pt"/>
    </style:style>
    <style:style style:family="text" style:name="T2671">
      <style:text-properties fo:letter-spacing="-0.15pt"/>
    </style:style>
    <style:style style:family="text" style:name="T2672">
      <style:text-properties fo:letter-spacing="-0.15pt"/>
    </style:style>
    <style:style style:family="text" style:name="T2673">
      <style:text-properties fo:letter-spacing="-0.15pt"/>
    </style:style>
    <style:style style:family="text" style:name="T2674">
      <style:text-properties/>
    </style:style>
    <style:style style:family="text" style:name="T2675">
      <style:text-properties/>
    </style:style>
    <style:style style:family="text" style:name="T2676">
      <style:text-properties/>
    </style:style>
    <style:style style:parent-style-name="716" style:family="paragraph" style:name="P379">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77">
      <style:text-properties fo:font-size="18pt"/>
    </style:style>
    <style:style style:family="text" style:name="T2678">
      <style:text-properties fo:font-size="18pt"/>
    </style:style>
    <style:style style:parent-style-name="712" style:family="paragraph" style:name="P380">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679">
      <style:text-properties fo:font-size="14pt" fo:font-weight="bold"/>
    </style:style>
    <style:style style:family="text" style:name="T2680">
      <style:text-properties fo:font-size="14pt" fo:letter-spacing="-0.1pt" fo:font-weight="bold"/>
    </style:style>
    <style:style style:family="text" style:name="T2681">
      <style:text-properties fo:font-size="14pt" fo:font-weight="bold"/>
    </style:style>
    <style:style style:family="text" style:name="T2682">
      <style:text-properties fo:font-size="14pt" fo:letter-spacing="-0.1pt" fo:font-weight="bold"/>
    </style:style>
    <style:style style:family="text" style:name="T2683">
      <style:text-properties fo:font-size="14pt" fo:font-weight="bold"/>
    </style:style>
    <style:style style:family="text" style:name="T2684">
      <style:text-properties fo:font-size="14pt" fo:letter-spacing="-0.1pt" fo:font-weight="bold"/>
    </style:style>
    <style:style style:family="text" style:name="T2685">
      <style:text-properties fo:font-size="14pt" fo:font-weight="bold"/>
    </style:style>
    <style:style style:family="text" style:name="T2686">
      <style:text-properties fo:font-size="14pt" fo:letter-spacing="-0.1pt" fo:font-weight="bold"/>
    </style:style>
    <style:style style:family="text" style:name="T2687">
      <style:text-properties fo:font-size="14pt" fo:letter-spacing="-0.15pt" fo:font-weight="bold"/>
    </style:style>
    <style:style style:parent-style-name="716" style:family="paragraph" style:name="P381">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88">
      <style:text-properties fo:font-size="17pt" fo:font-weight="bold"/>
    </style:style>
    <style:style style:family="text" style:name="T2689">
      <style:text-properties fo:font-size="17pt" fo:font-weight="bold"/>
    </style:style>
    <style:style style:parent-style-name="716" style:family="paragraph" style:name="P382">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690">
      <style:text-properties fo:letter-spacing="-0.1pt"/>
    </style:style>
    <style:style style:family="text" style:name="T2691">
      <style:text-properties fo:letter-spacing="-0.1pt"/>
    </style:style>
    <style:style style:family="text" style:name="T2692">
      <style:text-properties fo:letter-spacing="-0.1pt"/>
    </style:style>
    <style:style style:family="text" style:name="T2693">
      <style:text-properties fo:letter-spacing="-0.1pt"/>
    </style:style>
    <style:style style:family="text" style:name="T2694">
      <style:text-properties fo:letter-spacing="-0.1pt"/>
    </style:style>
    <style:style style:family="text" style:name="T2695">
      <style:text-properties fo:letter-spacing="-0.1pt"/>
    </style:style>
    <style:style style:family="text" style:name="T2696">
      <style:text-properties fo:letter-spacing="-0.1pt"/>
    </style:style>
    <style:style style:family="text" style:name="T2697">
      <style:text-properties fo:letter-spacing="-0.1pt"/>
    </style:style>
    <style:style style:family="text" style:name="T2698">
      <style:text-properties fo:letter-spacing="-0.1pt"/>
    </style:style>
    <style:style style:family="text" style:name="T2699">
      <style:text-properties fo:letter-spacing="-0.1pt"/>
    </style:style>
    <style:style style:family="text" style:name="T2700">
      <style:text-properties fo:letter-spacing="-0.1pt"/>
    </style:style>
    <style:style style:family="text" style:name="T2701">
      <style:text-properties fo:letter-spacing="-0.1pt"/>
    </style:style>
    <style:style style:family="text" style:name="T2702">
      <style:text-properties fo:letter-spacing="-0.1pt"/>
    </style:style>
    <style:style style:parent-style-name="716" style:family="paragraph" style:name="P383">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03">
      <style:text-properties fo:font-size="18pt"/>
    </style:style>
    <style:style style:family="text" style:name="T2704">
      <style:text-properties fo:font-size="18pt"/>
    </style:style>
    <style:style style:parent-style-name="712" style:family="paragraph" style:name="P384">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705">
      <style:text-properties fo:font-size="14pt" fo:font-weight="bold"/>
    </style:style>
    <style:style style:family="text" style:name="T2706">
      <style:text-properties fo:font-size="14pt" fo:letter-spacing="-0.35pt" fo:font-weight="bold"/>
    </style:style>
    <style:style style:family="text" style:name="T2707">
      <style:text-properties fo:font-size="14pt" fo:font-weight="bold"/>
    </style:style>
    <style:style style:family="text" style:name="T2708">
      <style:text-properties fo:font-size="14pt" fo:letter-spacing="-0.3pt" fo:font-weight="bold"/>
    </style:style>
    <style:style style:family="text" style:name="T2709">
      <style:text-properties fo:font-size="14pt" fo:font-weight="bold"/>
    </style:style>
    <style:style style:family="text" style:name="T2710">
      <style:text-properties fo:font-size="14pt" fo:letter-spacing="-0.35pt" fo:font-weight="bold"/>
    </style:style>
    <style:style style:family="text" style:name="T2711">
      <style:text-properties fo:font-size="14pt" fo:font-weight="bold"/>
    </style:style>
    <style:style style:family="text" style:name="T2712">
      <style:text-properties fo:font-size="14pt" fo:letter-spacing="-0.3pt" fo:font-weight="bold"/>
    </style:style>
    <style:style style:family="text" style:name="T2713">
      <style:text-properties fo:font-size="14pt" fo:font-weight="bold"/>
    </style:style>
    <style:style style:family="text" style:name="T2714">
      <style:text-properties fo:font-size="14pt" fo:letter-spacing="-0.3pt" fo:font-weight="bold"/>
    </style:style>
    <style:style style:family="text" style:name="T2715">
      <style:text-properties fo:font-size="14pt" fo:letter-spacing="-0.1pt" fo:font-weight="bold"/>
    </style:style>
    <style:style style:parent-style-name="716" style:family="paragraph" style:name="P385">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16">
      <style:text-properties fo:font-size="17pt" fo:font-weight="bold"/>
    </style:style>
    <style:style style:family="text" style:name="T2717">
      <style:text-properties fo:font-size="17pt" fo:font-weight="bold"/>
    </style:style>
    <style:style style:parent-style-name="716" style:family="paragraph" style:name="P38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18">
      <style:text-properties fo:letter-spacing="-0.15pt"/>
    </style:style>
    <style:style style:family="text" style:name="T2719">
      <style:text-properties fo:letter-spacing="-0.15pt"/>
    </style:style>
    <style:style style:family="text" style:name="T2720">
      <style:text-properties fo:letter-spacing="-0.15pt"/>
    </style:style>
    <style:style style:family="text" style:name="T2721">
      <style:text-properties fo:letter-spacing="-0.15pt"/>
    </style:style>
    <style:style style:family="text" style:name="T2722">
      <style:text-properties fo:letter-spacing="-0.15pt"/>
    </style:style>
    <style:style style:family="text" style:name="T2723">
      <style:text-properties fo:letter-spacing="-0.15pt"/>
    </style:style>
    <style:style style:family="text" style:name="T2724">
      <style:text-properties fo:letter-spacing="-0.15pt"/>
    </style:style>
    <style:style style:family="text" style:name="T2725">
      <style:text-properties fo:letter-spacing="-0.15pt"/>
    </style:style>
    <style:style style:family="text" style:name="T2726">
      <style:text-properties fo:letter-spacing="-0.15pt"/>
    </style:style>
    <style:style style:family="text" style:name="T2727">
      <style:text-properties fo:letter-spacing="-0.15pt"/>
    </style:style>
    <style:style style:family="text" style:name="T2728">
      <style:text-properties fo:letter-spacing="-0.15pt"/>
    </style:style>
    <style:style style:family="text" style:name="T2729">
      <style:text-properties fo:letter-spacing="-0.15pt"/>
    </style:style>
    <style:style style:parent-style-name="716" style:family="paragraph" style:name="P387">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30">
      <style:text-properties fo:font-size="18pt"/>
    </style:style>
    <style:style style:family="text" style:name="T2731">
      <style:text-properties fo:font-size="18pt"/>
    </style:style>
    <style:style style:parent-style-name="712" style:family="paragraph" style:name="P388">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732">
      <style:text-properties fo:font-size="14pt" fo:font-weight="bold"/>
    </style:style>
    <style:style style:family="text" style:name="T2733">
      <style:text-properties fo:font-size="14pt" fo:letter-spacing="-0.1pt" fo:font-weight="bold"/>
    </style:style>
    <style:style style:family="text" style:name="T2734">
      <style:text-properties fo:font-size="14pt" fo:font-weight="bold"/>
    </style:style>
    <style:style style:family="text" style:name="T2735">
      <style:text-properties fo:font-size="14pt" fo:letter-spacing="-0.1pt" fo:font-weight="bold"/>
    </style:style>
    <style:style style:family="text" style:name="T2736">
      <style:text-properties fo:font-size="14pt" fo:font-weight="bold"/>
    </style:style>
    <style:style style:family="text" style:name="T2737">
      <style:text-properties fo:font-size="14pt" fo:letter-spacing="-0.1pt" fo:font-weight="bold"/>
    </style:style>
    <style:style style:family="text" style:name="T2738">
      <style:text-properties fo:font-size="14pt" fo:font-weight="bold"/>
    </style:style>
    <style:style style:family="text" style:name="T2739">
      <style:text-properties fo:font-size="14pt" fo:letter-spacing="-0.1pt" fo:font-weight="bold"/>
    </style:style>
    <style:style style:family="text" style:name="T2740">
      <style:text-properties fo:font-size="14pt" fo:letter-spacing="-0.1pt" fo:font-weight="bold"/>
    </style:style>
    <style:style style:parent-style-name="716" style:family="paragraph" style:name="P389">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41">
      <style:text-properties fo:font-size="17pt" fo:font-weight="bold"/>
    </style:style>
    <style:style style:family="text" style:name="T2742">
      <style:text-properties fo:font-size="17pt" fo:font-weight="bold"/>
    </style:style>
    <style:style style:parent-style-name="716" style:family="paragraph" style:name="P390">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43">
      <style:text-properties fo:letter-spacing="-0.1pt"/>
    </style:style>
    <style:style style:family="text" style:name="T2744">
      <style:text-properties fo:letter-spacing="-0.1pt"/>
    </style:style>
    <style:style style:family="text" style:name="T2745">
      <style:text-properties fo:letter-spacing="-0.1pt"/>
    </style:style>
    <style:style style:family="text" style:name="T2746">
      <style:text-properties fo:letter-spacing="-0.1pt"/>
    </style:style>
    <style:style style:family="text" style:name="T2747">
      <style:text-properties fo:letter-spacing="-0.1pt"/>
    </style:style>
    <style:style style:family="text" style:name="T2748">
      <style:text-properties fo:letter-spacing="-0.1pt"/>
    </style:style>
    <style:style style:family="text" style:name="T2749">
      <style:text-properties fo:letter-spacing="-0.1pt"/>
    </style:style>
    <style:style style:family="text" style:name="T2750">
      <style:text-properties fo:letter-spacing="-0.1pt"/>
    </style:style>
    <style:style style:family="text" style:name="T2751">
      <style:text-properties fo:letter-spacing="-0.1pt"/>
    </style:style>
    <style:style style:family="text" style:name="T2752">
      <style:text-properties fo:letter-spacing="-0.1pt"/>
    </style:style>
    <style:style style:family="text" style:name="T2753">
      <style:text-properties fo:letter-spacing="-0.1pt"/>
    </style:style>
    <style:style style:family="text" style:name="T2754">
      <style:text-properties fo:letter-spacing="-0.1pt"/>
    </style:style>
    <style:style style:family="text" style:name="T2755">
      <style:text-properties fo:letter-spacing="-0.1pt"/>
    </style:style>
    <style:style style:family="text" style:name="T2756">
      <style:text-properties fo:letter-spacing="-0.1pt"/>
    </style:style>
    <style:style style:family="text" style:name="T2757">
      <style:text-properties fo:letter-spacing="-0.1pt"/>
    </style:style>
    <style:style style:family="text" style:name="T2758">
      <style:text-properties fo:letter-spacing="-0.1pt"/>
    </style:style>
    <style:style style:parent-style-name="712" style:master-page-name="MasterPage18" style:family="paragraph" style:name="P391">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759">
      <style:text-properties fo:font-size="14pt" fo:font-weight="bold"/>
    </style:style>
    <style:style style:family="text" style:name="T2760">
      <style:text-properties fo:font-size="14pt" fo:letter-spacing="-0.3pt" fo:font-weight="bold"/>
    </style:style>
    <style:style style:family="text" style:name="T2761">
      <style:text-properties fo:font-size="14pt" fo:font-weight="bold"/>
    </style:style>
    <style:style style:family="text" style:name="T2762">
      <style:text-properties fo:font-size="14pt" fo:letter-spacing="-0.1pt" fo:font-weight="bold"/>
    </style:style>
    <style:style style:family="text" style:name="T2763">
      <style:text-properties fo:font-size="14pt" fo:font-weight="bold"/>
    </style:style>
    <style:style style:family="text" style:name="T2764">
      <style:text-properties fo:font-size="14pt" fo:letter-spacing="-0.15pt" fo:font-weight="bold"/>
    </style:style>
    <style:style style:family="text" style:name="T2765">
      <style:text-properties fo:font-size="14pt" fo:font-weight="bold"/>
    </style:style>
    <style:style style:family="text" style:name="T2766">
      <style:text-properties fo:font-size="14pt" fo:letter-spacing="-0.1pt" fo:font-weight="bold"/>
    </style:style>
    <style:style style:family="text" style:name="T2767">
      <style:text-properties fo:font-size="14pt" fo:font-weight="bold"/>
    </style:style>
    <style:style style:family="text" style:name="T2768">
      <style:text-properties fo:font-size="14pt" fo:letter-spacing="-0.1pt" fo:font-weight="bold"/>
    </style:style>
    <style:style style:family="text" style:name="T2769">
      <style:text-properties fo:font-size="14pt" fo:letter-spacing="-0.1pt" fo:font-weight="bold"/>
    </style:style>
    <style:style style:parent-style-name="716" style:family="paragraph" style:name="P39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70">
      <style:text-properties fo:font-size="17pt" fo:font-weight="bold"/>
    </style:style>
    <style:style style:family="text" style:name="T2771">
      <style:text-properties fo:font-size="17pt" fo:font-weight="bold"/>
    </style:style>
    <style:style style:parent-style-name="716" style:family="paragraph" style:name="P39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72">
      <style:text-properties/>
    </style:style>
    <style:style style:family="text" style:name="T2773">
      <style:text-properties/>
    </style:style>
    <style:style style:family="text" style:name="T2774">
      <style:text-properties/>
    </style:style>
    <style:style style:family="text" style:name="T2775">
      <style:text-properties/>
    </style:style>
    <style:style style:parent-style-name="716" style:family="paragraph" style:name="P39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395">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76">
      <style:text-properties fo:letter-spacing="-0.1pt"/>
    </style:style>
    <style:style style:family="text" style:name="T2777">
      <style:text-properties fo:letter-spacing="-0.1pt"/>
    </style:style>
    <style:style style:family="text" style:name="T2778">
      <style:text-properties fo:letter-spacing="-0.1pt"/>
    </style:style>
    <style:style style:family="text" style:name="T2779">
      <style:text-properties fo:letter-spacing="-0.1pt"/>
    </style:style>
    <style:style style:family="text" style:name="T2780">
      <style:text-properties fo:letter-spacing="-0.1pt"/>
    </style:style>
    <style:style style:family="text" style:name="T2781">
      <style:text-properties fo:letter-spacing="-0.1pt"/>
    </style:style>
    <style:style style:family="text" style:name="T2782">
      <style:text-properties fo:letter-spacing="-0.1pt"/>
    </style:style>
    <style:style style:family="text" style:name="T2783">
      <style:text-properties fo:letter-spacing="-0.1pt"/>
    </style:style>
    <style:style style:family="text" style:name="T2784">
      <style:text-properties fo:letter-spacing="-0.1pt"/>
    </style:style>
    <style:style style:family="text" style:name="T2785">
      <style:text-properties fo:letter-spacing="-0.1pt"/>
    </style:style>
    <style:style style:family="text" style:name="T2786">
      <style:text-properties fo:letter-spacing="-0.1pt"/>
    </style:style>
    <style:style style:family="text" style:name="T2787">
      <style:text-properties fo:letter-spacing="-0.1pt"/>
    </style:style>
    <style:style style:family="text" style:name="T2788">
      <style:text-properties fo:letter-spacing="-0.1pt"/>
    </style:style>
    <style:style style:parent-style-name="716" style:family="paragraph" style:name="P39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89">
      <style:text-properties fo:font-size="13pt"/>
    </style:style>
    <style:style style:family="text" style:name="T2790">
      <style:text-properties fo:font-size="13pt"/>
    </style:style>
    <style:style style:parent-style-name="708" style:family="paragraph" style:name="P397">
      <style:paragraph-properties fo:margin-top="8.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2791">
      <style:text-properties fo:letter-spacing="-0.65pt"/>
    </style:style>
    <style:style style:family="text" style:name="T2792">
      <style:text-properties fo:letter-spacing="-0.65pt"/>
    </style:style>
    <style:style style:family="text" style:name="T2793">
      <style:text-properties fo:letter-spacing="-0.65pt"/>
    </style:style>
    <style:style style:family="text" style:name="T2794">
      <style:text-properties fo:letter-spacing="-0.15pt"/>
    </style:style>
    <style:style style:parent-style-name="716" style:family="paragraph" style:name="P398">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95">
      <style:text-properties fo:font-size="17pt" fo:font-weight="bold"/>
    </style:style>
    <style:style style:family="text" style:name="T2796">
      <style:text-properties fo:font-size="17pt" fo:font-weight="bold"/>
    </style:style>
    <style:style style:parent-style-name="716" style:family="paragraph" style:name="P399">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797">
      <style:text-properties fo:letter-spacing="-0.15pt"/>
    </style:style>
    <style:style style:family="text" style:name="T2798">
      <style:text-properties fo:letter-spacing="-0.15pt"/>
    </style:style>
    <style:style style:family="text" style:name="T2799">
      <style:text-properties fo:letter-spacing="-0.15pt"/>
    </style:style>
    <style:style style:family="text" style:name="T2800">
      <style:text-properties fo:letter-spacing="-0.15pt"/>
    </style:style>
    <style:style style:family="text" style:name="T2801">
      <style:text-properties fo:letter-spacing="-0.15pt"/>
    </style:style>
    <style:style style:family="text" style:name="T2802">
      <style:text-properties fo:letter-spacing="-0.15pt"/>
    </style:style>
    <style:style style:family="text" style:name="T2803">
      <style:text-properties fo:letter-spacing="-0.15pt"/>
    </style:style>
    <style:style style:family="text" style:name="T2804">
      <style:text-properties fo:letter-spacing="-0.15pt"/>
    </style:style>
    <style:style style:family="text" style:name="T2805">
      <style:text-properties fo:letter-spacing="-0.15pt"/>
    </style:style>
    <style:style style:family="text" style:name="T2806">
      <style:text-properties fo:letter-spacing="-0.15pt"/>
    </style:style>
    <style:style style:family="text" style:name="T2807">
      <style:text-properties fo:letter-spacing="-0.15pt"/>
    </style:style>
    <style:style style:family="text" style:name="T2808">
      <style:text-properties fo:letter-spacing="-0.15pt"/>
    </style:style>
    <style:style style:parent-style-name="716" style:family="paragraph" style:name="P400">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09">
      <style:text-properties fo:font-size="18pt"/>
    </style:style>
    <style:style style:family="text" style:name="T2810">
      <style:text-properties fo:font-size="18pt"/>
    </style:style>
    <style:style style:parent-style-name="712" style:family="paragraph" style:name="P401">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811">
      <style:text-properties fo:font-size="14pt" fo:font-weight="bold"/>
    </style:style>
    <style:style style:family="text" style:name="T2812">
      <style:text-properties fo:font-size="14pt" fo:letter-spacing="-0.25pt" fo:font-weight="bold"/>
    </style:style>
    <style:style style:family="text" style:name="T2813">
      <style:text-properties fo:font-size="14pt" fo:font-weight="bold"/>
    </style:style>
    <style:style style:family="text" style:name="T2814">
      <style:text-properties fo:font-size="14pt" fo:letter-spacing="-0.15pt" fo:font-weight="bold"/>
    </style:style>
    <style:style style:family="text" style:name="T2815">
      <style:text-properties fo:font-size="14pt" fo:letter-spacing="-0.1pt" fo:font-weight="bold"/>
    </style:style>
    <style:style style:parent-style-name="716" style:family="paragraph" style:name="P40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16">
      <style:text-properties fo:font-size="17pt" fo:font-weight="bold"/>
    </style:style>
    <style:style style:family="text" style:name="T2817">
      <style:text-properties fo:font-size="17pt" fo:font-weight="bold"/>
    </style:style>
    <style:style style:parent-style-name="717" style:list-style-name="WWNum13" style:family="paragraph" style:name="P403">
      <style:paragraph-properties fo:margin-left="0.1993cm" fo:margin-right="1.092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818">
      <style:text-properties fo:font-size="12pt"/>
    </style:style>
    <style:style style:family="text" style:name="T2819">
      <style:text-properties fo:font-size="12pt"/>
    </style:style>
    <style:style style:family="text" style:name="T2820">
      <style:text-properties fo:font-size="12pt"/>
    </style:style>
    <style:style style:family="text" style:name="T2821">
      <style:text-properties fo:font-size="12pt"/>
    </style:style>
    <style:style style:family="text" style:name="T2822">
      <style:text-properties fo:font-size="12pt" fo:letter-spacing="-0.1pt"/>
    </style:style>
    <style:style style:family="text" style:name="T2823">
      <style:text-properties fo:font-size="12pt"/>
    </style:style>
    <style:style style:family="text" style:name="T2824">
      <style:text-properties fo:font-size="12pt" fo:letter-spacing="-0.1pt"/>
    </style:style>
    <style:style style:family="text" style:name="T2825">
      <style:text-properties fo:font-size="12pt"/>
    </style:style>
    <style:style style:family="text" style:name="T2826">
      <style:text-properties fo:font-size="12pt" fo:letter-spacing="-0.1pt"/>
    </style:style>
    <style:style style:family="text" style:name="T2827">
      <style:text-properties fo:font-size="12pt"/>
    </style:style>
    <style:style style:family="text" style:name="T2828">
      <style:text-properties fo:font-size="12pt" fo:letter-spacing="-0.1pt"/>
    </style:style>
    <style:style style:family="text" style:name="T2829">
      <style:text-properties fo:font-size="12pt"/>
    </style:style>
    <style:style style:family="text" style:name="T2830">
      <style:text-properties fo:font-size="12pt" fo:letter-spacing="-0.1pt"/>
    </style:style>
    <style:style style:family="text" style:name="T2831">
      <style:text-properties fo:font-size="12pt"/>
    </style:style>
    <style:style style:family="text" style:name="T2832">
      <style:text-properties fo:font-size="12pt" fo:letter-spacing="-0.1pt"/>
    </style:style>
    <style:style style:family="text" style:name="T2833">
      <style:text-properties fo:font-size="12pt"/>
    </style:style>
    <style:style style:family="text" style:name="T2834">
      <style:text-properties fo:font-size="12pt" fo:letter-spacing="-0.1pt"/>
    </style:style>
    <style:style style:family="text" style:name="T2835">
      <style:text-properties fo:font-size="12pt"/>
    </style:style>
    <style:style style:family="text" style:name="T2836">
      <style:text-properties fo:font-size="12pt" fo:letter-spacing="-0.1pt"/>
    </style:style>
    <style:style style:family="text" style:name="T2837">
      <style:text-properties fo:font-size="12pt"/>
    </style:style>
    <style:style style:family="text" style:name="T2838">
      <style:text-properties fo:font-size="12pt" fo:letter-spacing="-0.1pt"/>
    </style:style>
    <style:style style:family="text" style:name="T2839">
      <style:text-properties fo:font-size="12pt"/>
    </style:style>
    <style:style style:family="text" style:name="T2840">
      <style:text-properties fo:font-size="12pt" fo:letter-spacing="-0.1pt"/>
    </style:style>
    <style:style style:family="text" style:name="T2841">
      <style:text-properties fo:font-size="12pt"/>
    </style:style>
    <style:style style:family="text" style:name="T2842">
      <style:text-properties fo:font-size="12pt" fo:letter-spacing="-0.1pt"/>
    </style:style>
    <style:style style:family="text" style:name="T2843">
      <style:text-properties fo:font-size="12pt"/>
    </style:style>
    <style:style style:family="text" style:name="T2844">
      <style:text-properties fo:font-size="12pt" fo:letter-spacing="-0.1pt"/>
    </style:style>
    <style:style style:family="text" style:name="T2845">
      <style:text-properties fo:font-size="12pt"/>
    </style:style>
    <style:style style:family="text" style:name="T2846">
      <style:text-properties fo:font-size="12pt" fo:letter-spacing="-0.1pt"/>
    </style:style>
    <style:style style:family="text" style:name="T2847">
      <style:text-properties fo:font-size="12pt"/>
    </style:style>
    <style:style style:family="text" style:name="T2848">
      <style:text-properties fo:font-size="12pt" fo:letter-spacing="-0.1pt"/>
    </style:style>
    <style:style style:family="text" style:name="T2849">
      <style:text-properties fo:font-size="12pt"/>
    </style:style>
    <style:style style:family="text" style:name="T2850">
      <style:text-properties fo:font-size="12pt"/>
    </style:style>
    <style:style style:family="text" style:name="T2851">
      <style:text-properties fo:font-size="12pt"/>
    </style:style>
    <style:style style:parent-style-name="716" style:family="paragraph" style:name="P40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52">
      <style:text-properties fo:font-size="13pt"/>
    </style:style>
    <style:style style:family="text" style:name="T2853">
      <style:text-properties fo:font-size="13pt"/>
    </style:style>
    <style:style style:parent-style-name="716" style:family="paragraph" style:name="P40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54">
      <style:text-properties fo:font-size="11pt"/>
    </style:style>
    <style:style style:family="text" style:name="T2855">
      <style:text-properties fo:font-size="11pt"/>
    </style:style>
    <style:style style:parent-style-name="717" style:list-style-name="WWNum13" style:family="paragraph" style:name="P406">
      <style:paragraph-properties fo:margin-left="0.1993cm" fo:margin-right="0.8308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2856">
      <style:text-properties fo:font-size="12pt"/>
    </style:style>
    <style:style style:family="text" style:name="T2857">
      <style:text-properties fo:font-size="12pt" fo:letter-spacing="-0.15pt"/>
    </style:style>
    <style:style style:family="text" style:name="T2858">
      <style:text-properties fo:font-size="12pt"/>
    </style:style>
    <style:style style:family="text" style:name="T2859">
      <style:text-properties fo:font-size="12pt" fo:letter-spacing="-0.15pt"/>
    </style:style>
    <style:style style:family="text" style:name="T2860">
      <style:text-properties fo:font-size="12pt"/>
    </style:style>
    <style:style style:family="text" style:name="T2861">
      <style:text-properties fo:font-size="12pt" fo:letter-spacing="-0.15pt"/>
    </style:style>
    <style:style style:family="text" style:name="T2862">
      <style:text-properties fo:font-size="12pt"/>
    </style:style>
    <style:style style:family="text" style:name="T2863">
      <style:text-properties fo:font-size="12pt" fo:letter-spacing="-0.15pt"/>
    </style:style>
    <style:style style:family="text" style:name="T2864">
      <style:text-properties fo:font-size="12pt"/>
    </style:style>
    <style:style style:family="text" style:name="T2865">
      <style:text-properties fo:font-size="12pt" fo:letter-spacing="-0.15pt"/>
    </style:style>
    <style:style style:family="text" style:name="T2866">
      <style:text-properties fo:font-size="12pt"/>
    </style:style>
    <style:style style:family="text" style:name="T2867">
      <style:text-properties fo:font-size="12pt" fo:letter-spacing="-0.15pt"/>
    </style:style>
    <style:style style:family="text" style:name="T2868">
      <style:text-properties fo:font-size="12pt"/>
    </style:style>
    <style:style style:family="text" style:name="T2869">
      <style:text-properties fo:font-size="12pt" fo:letter-spacing="-0.15pt"/>
    </style:style>
    <style:style style:family="text" style:name="T2870">
      <style:text-properties fo:font-size="12pt"/>
    </style:style>
    <style:style style:family="text" style:name="T2871">
      <style:text-properties fo:font-size="12pt" fo:letter-spacing="-0.15pt"/>
    </style:style>
    <style:style style:family="text" style:name="T2872">
      <style:text-properties fo:font-size="12pt"/>
    </style:style>
    <style:style style:family="text" style:name="T2873">
      <style:text-properties fo:font-size="12pt" fo:letter-spacing="-0.15pt"/>
    </style:style>
    <style:style style:family="text" style:name="T2874">
      <style:text-properties fo:font-size="12pt"/>
    </style:style>
    <style:style style:family="text" style:name="T2875">
      <style:text-properties fo:font-size="12pt" fo:letter-spacing="-0.15pt"/>
    </style:style>
    <style:style style:family="text" style:name="T2876">
      <style:text-properties fo:font-size="12pt"/>
    </style:style>
    <style:style style:family="text" style:name="T2877">
      <style:text-properties fo:font-size="12pt" fo:letter-spacing="-0.15pt"/>
    </style:style>
    <style:style style:family="text" style:name="T2878">
      <style:text-properties fo:font-size="12pt"/>
    </style:style>
    <style:style style:parent-style-name="708" style:family="paragraph" style:name="P407">
      <style:paragraph-properties fo:margin-top="3.5pt" fo:margin-bottom="0pt"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2879">
      <style:text-properties fo:letter-spacing="-0.1pt"/>
    </style:style>
    <style:style style:parent-style-name="716" style:family="paragraph" style:name="P408">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80">
      <style:text-properties fo:font-size="17pt" fo:font-weight="bold"/>
    </style:style>
    <style:style style:family="text" style:name="T2881">
      <style:text-properties fo:font-size="17pt" fo:font-weight="bold"/>
    </style:style>
    <style:style style:parent-style-name="716" style:family="paragraph" style:name="P409">
      <style:paragraph-properties fo:margin-left="0cm" fo:margin-right="0.5504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82">
      <style:text-properties fo:letter-spacing="-0.15pt"/>
    </style:style>
    <style:style style:family="text" style:name="T2883">
      <style:text-properties fo:letter-spacing="-0.15pt"/>
    </style:style>
    <style:style style:family="text" style:name="T2884">
      <style:text-properties fo:letter-spacing="-0.15pt"/>
    </style:style>
    <style:style style:family="text" style:name="T2885">
      <style:text-properties fo:letter-spacing="-0.15pt"/>
    </style:style>
    <style:style style:family="text" style:name="T2886">
      <style:text-properties fo:letter-spacing="-0.15pt"/>
    </style:style>
    <style:style style:family="text" style:name="T2887">
      <style:text-properties fo:letter-spacing="-0.15pt"/>
    </style:style>
    <style:style style:family="text" style:name="T2888">
      <style:text-properties fo:letter-spacing="-0.15pt"/>
    </style:style>
    <style:style style:family="text" style:name="T2889">
      <style:text-properties fo:letter-spacing="-0.15pt"/>
    </style:style>
    <style:style style:family="text" style:name="T2890">
      <style:text-properties fo:letter-spacing="-0.15pt"/>
    </style:style>
    <style:style style:family="text" style:name="T2891">
      <style:text-properties fo:letter-spacing="-0.15pt"/>
    </style:style>
    <style:style style:parent-style-name="716" style:family="paragraph" style:name="P41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892">
      <style:text-properties fo:letter-spacing="-0.3pt"/>
    </style:style>
    <style:style style:family="text" style:name="T2893">
      <style:text-properties fo:letter-spacing="-0.3pt"/>
    </style:style>
    <style:style style:family="text" style:name="T2894">
      <style:text-properties fo:letter-spacing="-0.3pt"/>
    </style:style>
    <style:style style:family="text" style:name="T2895">
      <style:text-properties fo:letter-spacing="-0.3pt"/>
    </style:style>
    <style:style style:family="text" style:name="T2896">
      <style:text-properties fo:letter-spacing="-0.3pt"/>
    </style:style>
    <style:style style:family="text" style:name="T2897">
      <style:text-properties fo:letter-spacing="-0.3pt"/>
    </style:style>
    <style:style style:family="text" style:name="T2898">
      <style:text-properties fo:letter-spacing="-0.3pt"/>
    </style:style>
    <style:style style:family="text" style:name="T2899">
      <style:text-properties fo:letter-spacing="-0.3pt"/>
    </style:style>
    <style:style style:parent-style-name="716" style:family="paragraph" style:name="P411">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00">
      <style:text-properties fo:font-size="11.5pt"/>
    </style:style>
    <style:style style:family="text" style:name="T2901">
      <style:text-properties fo:font-size="11.5pt"/>
    </style:style>
    <style:style style:parent-style-name="716" style:family="paragraph" style:name="P412">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02">
      <style:text-properties fo:letter-spacing="-0.15pt"/>
    </style:style>
    <style:style style:family="text" style:name="T2903">
      <style:text-properties fo:letter-spacing="-0.15pt"/>
    </style:style>
    <style:style style:family="text" style:name="T2904">
      <style:text-properties fo:letter-spacing="-0.15pt"/>
    </style:style>
    <style:style style:family="text" style:name="T2905">
      <style:text-properties fo:letter-spacing="-0.15pt"/>
    </style:style>
    <style:style style:family="text" style:name="T2906">
      <style:text-properties fo:letter-spacing="-0.15pt"/>
    </style:style>
    <style:style style:family="text" style:name="T2907">
      <style:text-properties fo:letter-spacing="-0.15pt"/>
    </style:style>
    <style:style style:family="text" style:name="T2908">
      <style:text-properties fo:letter-spacing="-0.15pt"/>
    </style:style>
    <style:style style:family="text" style:name="T2909">
      <style:text-properties fo:letter-spacing="-0.15pt"/>
    </style:style>
    <style:style style:family="text" style:name="T2910">
      <style:text-properties fo:letter-spacing="-0.15pt"/>
    </style:style>
    <style:style style:family="text" style:name="T2911">
      <style:text-properties fo:letter-spacing="-0.15pt"/>
    </style:style>
    <style:style style:family="text" style:name="T2912">
      <style:text-properties fo:letter-spacing="-0.15pt"/>
    </style:style>
    <style:style style:family="text" style:name="T2913">
      <style:text-properties fo:letter-spacing="-0.15pt"/>
    </style:style>
    <style:style style:family="text" style:name="T2914">
      <style:text-properties fo:letter-spacing="-0.1pt"/>
    </style:style>
    <style:style style:parent-style-name="716" style:family="paragraph" style:name="P41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1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15">
      <style:text-properties fo:letter-spacing="-0.3pt"/>
    </style:style>
    <style:style style:family="text" style:name="T2916">
      <style:text-properties fo:letter-spacing="-0.3pt"/>
    </style:style>
    <style:style style:family="text" style:name="T2917">
      <style:text-properties fo:letter-spacing="-0.3pt"/>
    </style:style>
    <style:style style:family="text" style:name="T2918">
      <style:text-properties fo:letter-spacing="-0.3pt"/>
    </style:style>
    <style:style style:family="text" style:name="T2919">
      <style:text-properties fo:letter-spacing="-0.3pt"/>
    </style:style>
    <style:style style:family="text" style:name="T2920">
      <style:text-properties fo:letter-spacing="-0.3pt"/>
    </style:style>
    <style:style style:family="text" style:name="T2921">
      <style:text-properties fo:letter-spacing="-0.3pt"/>
    </style:style>
    <style:style style:family="text" style:name="T2922">
      <style:text-properties fo:letter-spacing="-0.3pt"/>
    </style:style>
    <style:style style:family="text" style:name="T2923">
      <style:text-properties fo:letter-spacing="-0.3pt"/>
    </style:style>
    <style:style style:family="text" style:name="T2924">
      <style:text-properties fo:letter-spacing="-0.3pt"/>
    </style:style>
    <style:style style:parent-style-name="716" style:family="paragraph" style:name="P41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1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25">
      <style:text-properties fo:letter-spacing="-0.3pt"/>
    </style:style>
    <style:style style:family="text" style:name="T2926">
      <style:text-properties fo:letter-spacing="-0.3pt"/>
    </style:style>
    <style:style style:family="text" style:name="T2927">
      <style:text-properties fo:letter-spacing="-0.3pt"/>
    </style:style>
    <style:style style:family="text" style:name="T2928">
      <style:text-properties fo:letter-spacing="-0.3pt"/>
    </style:style>
    <style:style style:family="text" style:name="T2929">
      <style:text-properties fo:letter-spacing="-0.3pt"/>
    </style:style>
    <style:style style:family="text" style:name="T2930">
      <style:text-properties fo:letter-spacing="-0.3pt"/>
    </style:style>
    <style:style style:family="text" style:name="T2931">
      <style:text-properties fo:letter-spacing="-0.3pt"/>
    </style:style>
    <style:style style:family="text" style:name="T2932">
      <style:text-properties fo:letter-spacing="-0.3pt"/>
    </style:style>
    <style:style style:family="text" style:name="T2933">
      <style:text-properties fo:letter-spacing="-0.3pt"/>
    </style:style>
    <style:style style:parent-style-name="716" style:family="paragraph" style:name="P41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18">
      <style:paragraph-properties fo:text-align="justify" fo:margin-left="0cm" fo:margin-right="0.4533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34">
      <style:text-properties fo:letter-spacing="-0.15pt"/>
    </style:style>
    <style:style style:family="text" style:name="T2935">
      <style:text-properties fo:letter-spacing="-0.15pt"/>
    </style:style>
    <style:style style:family="text" style:name="T2936">
      <style:text-properties fo:letter-spacing="-0.15pt"/>
    </style:style>
    <style:style style:family="text" style:name="T2937">
      <style:text-properties fo:letter-spacing="-0.15pt"/>
    </style:style>
    <style:style style:family="text" style:name="T2938">
      <style:text-properties fo:letter-spacing="-0.15pt"/>
    </style:style>
    <style:style style:family="text" style:name="T2939">
      <style:text-properties fo:letter-spacing="-0.15pt"/>
    </style:style>
    <style:style style:family="text" style:name="T2940">
      <style:text-properties fo:letter-spacing="-0.15pt"/>
    </style:style>
    <style:style style:family="text" style:name="T2941">
      <style:text-properties fo:letter-spacing="-0.15pt"/>
    </style:style>
    <style:style style:family="text" style:name="T2942">
      <style:text-properties fo:letter-spacing="-0.15pt"/>
    </style:style>
    <style:style style:family="text" style:name="T2943">
      <style:text-properties fo:letter-spacing="-0.15pt"/>
    </style:style>
    <style:style style:family="text" style:name="T2944">
      <style:text-properties fo:letter-spacing="-0.15pt"/>
    </style:style>
    <style:style style:family="text" style:name="T2945">
      <style:text-properties fo:letter-spacing="-0.1pt"/>
    </style:style>
    <style:style style:family="text" style:name="T2946">
      <style:text-properties fo:letter-spacing="-0.1pt"/>
    </style:style>
    <style:style style:family="text" style:name="T2947">
      <style:text-properties fo:letter-spacing="-0.1pt"/>
    </style:style>
    <style:style style:family="text" style:name="T2948">
      <style:text-properties fo:letter-spacing="-0.1pt"/>
    </style:style>
    <style:style style:family="text" style:name="T2949">
      <style:text-properties fo:letter-spacing="-0.1pt"/>
    </style:style>
    <style:style style:family="text" style:name="T2950">
      <style:text-properties fo:letter-spacing="-0.1pt"/>
    </style:style>
    <style:style style:family="text" style:name="T2951">
      <style:text-properties fo:letter-spacing="-0.1pt"/>
    </style:style>
    <style:style style:family="text" style:name="T2952">
      <style:text-properties fo:letter-spacing="-0.1pt"/>
    </style:style>
    <style:style style:family="text" style:name="T2953">
      <style:text-properties fo:letter-spacing="-0.1pt"/>
    </style:style>
    <style:style style:family="text" style:name="T2954">
      <style:text-properties fo:letter-spacing="-0.1pt"/>
    </style:style>
    <style:style style:family="text" style:name="T2955">
      <style:text-properties fo:letter-spacing="-0.1pt"/>
    </style:style>
    <style:style style:family="text" style:name="T2956">
      <style:text-properties fo:letter-spacing="-0.1pt"/>
    </style:style>
    <style:style style:parent-style-name="716" style:family="paragraph" style:name="P41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2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57">
      <style:text-properties fo:letter-spacing="-0.15pt"/>
    </style:style>
    <style:style style:family="text" style:name="T2958">
      <style:text-properties fo:letter-spacing="-0.15pt"/>
    </style:style>
    <style:style style:family="text" style:name="T2959">
      <style:text-properties fo:letter-spacing="-0.15pt"/>
    </style:style>
    <style:style style:family="text" style:name="T2960">
      <style:text-properties fo:letter-spacing="-0.15pt"/>
    </style:style>
    <style:style style:family="text" style:name="T2961">
      <style:text-properties fo:letter-spacing="-0.15pt"/>
    </style:style>
    <style:style style:family="text" style:name="T2962">
      <style:text-properties fo:letter-spacing="-0.15pt"/>
    </style:style>
    <style:style style:family="text" style:name="T2963">
      <style:text-properties fo:letter-spacing="-0.15pt"/>
    </style:style>
    <style:style style:family="text" style:name="T2964">
      <style:text-properties fo:letter-spacing="-0.15pt"/>
    </style:style>
    <style:style style:family="text" style:name="T2965">
      <style:text-properties fo:letter-spacing="-0.15pt"/>
    </style:style>
    <style:style style:family="text" style:name="T2966">
      <style:text-properties fo:letter-spacing="-0.15pt"/>
    </style:style>
    <style:style style:family="text" style:name="T2967">
      <style:text-properties fo:letter-spacing="-0.15pt"/>
    </style:style>
    <style:style style:family="text" style:name="T2968">
      <style:text-properties fo:letter-spacing="-0.15pt"/>
    </style:style>
    <style:style style:family="text" style:name="T2969">
      <style:text-properties fo:letter-spacing="-0.1pt"/>
    </style:style>
    <style:style style:parent-style-name="707" style:master-page-name="MasterPage19" style:family="paragraph" style:name="P421">
      <style:paragraph-properties fo:margin-left="0cm" fo:margin-right="0.5504cm" fo:text-indent="0cm"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2970">
      <style:text-properties fo:letter-spacing="-0.3pt"/>
    </style:style>
    <style:style style:family="text" style:name="T2971">
      <style:text-properties fo:letter-spacing="-0.3pt"/>
    </style:style>
    <style:style style:family="text" style:name="T2972">
      <style:text-properties fo:letter-spacing="-0.3pt"/>
    </style:style>
    <style:style style:family="text" style:name="T2973">
      <style:text-properties fo:letter-spacing="-0.3pt"/>
    </style:style>
    <style:style style:family="text" style:name="T2974">
      <style:text-properties fo:letter-spacing="-0.3pt"/>
    </style:style>
    <style:style style:family="text" style:name="T2975">
      <style:text-properties fo:letter-spacing="-0.3pt"/>
    </style:style>
    <style:style style:family="text" style:name="T2976">
      <style:text-properties fo:letter-spacing="-0.1pt"/>
    </style:style>
    <style:style style:parent-style-name="716" style:family="paragraph" style:name="P422">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77">
      <style:text-properties fo:font-size="25pt" fo:font-weight="bold"/>
    </style:style>
    <style:style style:family="text" style:name="T2978">
      <style:text-properties fo:font-size="25pt" fo:font-weight="bold"/>
    </style:style>
    <style:style style:parent-style-name="716" style:family="paragraph" style:name="P423">
      <style:paragraph-properties fo:line-height="115%"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79">
      <style:text-properties fo:letter-spacing="-0.15pt"/>
    </style:style>
    <style:style style:family="text" style:name="T2980">
      <style:text-properties fo:letter-spacing="-0.15pt"/>
    </style:style>
    <style:style style:family="text" style:name="T2981">
      <style:text-properties fo:letter-spacing="-0.15pt"/>
    </style:style>
    <style:style style:family="text" style:name="T2982">
      <style:text-properties fo:letter-spacing="-0.15pt"/>
    </style:style>
    <style:style style:family="text" style:name="T2983">
      <style:text-properties fo:letter-spacing="-0.15pt"/>
    </style:style>
    <style:style style:family="text" style:name="T2984">
      <style:text-properties fo:letter-spacing="-0.15pt"/>
    </style:style>
    <style:style style:family="text" style:name="T2985">
      <style:text-properties fo:letter-spacing="-0.15pt"/>
    </style:style>
    <style:style style:family="text" style:name="T2986">
      <style:text-properties fo:letter-spacing="-0.15pt"/>
    </style:style>
    <style:style style:family="text" style:name="T2987">
      <style:text-properties fo:letter-spacing="-0.15pt"/>
    </style:style>
    <style:style style:family="text" style:name="T2988">
      <style:text-properties fo:letter-spacing="-0.15pt"/>
    </style:style>
    <style:style style:family="text" style:name="T2989">
      <style:text-properties fo:letter-spacing="-0.15pt"/>
    </style:style>
    <style:style style:family="text" style:name="T2990">
      <style:text-properties fo:letter-spacing="-0.15pt"/>
    </style:style>
    <style:style style:family="text" style:name="T2991">
      <style:text-properties fo:letter-spacing="-0.15pt"/>
    </style:style>
    <style:style style:parent-style-name="716" style:family="paragraph" style:name="P424">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2992">
      <style:text-properties fo:letter-spacing="-0.15pt"/>
    </style:style>
    <style:style style:family="text" style:name="T2993">
      <style:text-properties fo:letter-spacing="-0.15pt"/>
    </style:style>
    <style:style style:family="text" style:name="T2994">
      <style:text-properties fo:letter-spacing="-0.15pt"/>
    </style:style>
    <style:style style:family="text" style:name="T2995">
      <style:text-properties fo:letter-spacing="-0.15pt"/>
    </style:style>
    <style:style style:family="text" style:name="T2996">
      <style:text-properties fo:letter-spacing="-0.15pt"/>
    </style:style>
    <style:style style:family="text" style:name="T2997">
      <style:text-properties fo:letter-spacing="-0.15pt"/>
    </style:style>
    <style:style style:family="text" style:name="T2998">
      <style:text-properties fo:letter-spacing="-0.15pt"/>
    </style:style>
    <style:style style:family="text" style:name="T2999">
      <style:text-properties fo:letter-spacing="-0.15pt"/>
    </style:style>
    <style:style style:family="text" style:name="T3000">
      <style:text-properties fo:letter-spacing="-0.15pt"/>
    </style:style>
    <style:style style:family="text" style:name="T3001">
      <style:text-properties fo:letter-spacing="-0.15pt"/>
    </style:style>
    <style:style style:family="text" style:name="T3002">
      <style:text-properties fo:letter-spacing="-0.15pt"/>
    </style:style>
    <style:style style:family="text" style:name="T3003">
      <style:text-properties fo:letter-spacing="-0.15pt"/>
    </style:style>
    <style:style style:family="text" style:name="T3004">
      <style:text-properties fo:letter-spacing="-0.15pt"/>
    </style:style>
    <style:style style:family="text" style:name="T3005">
      <style:text-properties fo:letter-spacing="-0.15pt"/>
    </style:style>
    <style:style style:parent-style-name="716" style:family="paragraph" style:name="P425">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06">
      <style:text-properties fo:letter-spacing="-0.25pt"/>
    </style:style>
    <style:style style:family="text" style:name="T3007">
      <style:text-properties fo:letter-spacing="-0.25pt"/>
    </style:style>
    <style:style style:family="text" style:name="T3008">
      <style:text-properties fo:letter-spacing="-0.25pt"/>
    </style:style>
    <style:style style:family="text" style:name="T3009">
      <style:text-properties fo:letter-spacing="-0.25pt"/>
    </style:style>
    <style:style style:family="text" style:name="T3010">
      <style:text-properties fo:letter-spacing="-0.25pt"/>
    </style:style>
    <style:style style:family="text" style:name="T3011">
      <style:text-properties fo:letter-spacing="-0.25pt"/>
    </style:style>
    <style:style style:family="text" style:name="T3012">
      <style:text-properties fo:letter-spacing="-0.25pt"/>
    </style:style>
    <style:style style:family="text" style:name="T3013">
      <style:text-properties fo:letter-spacing="-0.25pt"/>
    </style:style>
    <style:style style:family="text" style:name="T3014">
      <style:text-properties fo:letter-spacing="-0.25pt"/>
    </style:style>
    <style:style style:parent-style-name="716" style:family="paragraph" style:name="P426">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15">
      <style:text-properties fo:letter-spacing="-0.1pt"/>
    </style:style>
    <style:style style:family="text" style:name="T3016">
      <style:text-properties fo:letter-spacing="-0.1pt"/>
    </style:style>
    <style:style style:family="text" style:name="T3017">
      <style:text-properties fo:letter-spacing="-0.1pt"/>
    </style:style>
    <style:style style:family="text" style:name="T3018">
      <style:text-properties fo:letter-spacing="-0.1pt"/>
    </style:style>
    <style:style style:family="text" style:name="T3019">
      <style:text-properties fo:letter-spacing="-0.1pt"/>
    </style:style>
    <style:style style:family="text" style:name="T3020">
      <style:text-properties fo:letter-spacing="-0.1pt"/>
    </style:style>
    <style:style style:family="text" style:name="T3021">
      <style:text-properties fo:letter-spacing="-0.1pt"/>
    </style:style>
    <style:style style:family="text" style:name="T3022">
      <style:text-properties fo:letter-spacing="-0.1pt"/>
    </style:style>
    <style:style style:family="text" style:name="T3023">
      <style:text-properties fo:letter-spacing="-0.1pt"/>
    </style:style>
    <style:style style:family="text" style:name="T3024">
      <style:text-properties fo:letter-spacing="-0.1pt"/>
    </style:style>
    <style:style style:family="text" style:name="T3025">
      <style:text-properties fo:letter-spacing="-0.1pt"/>
    </style:style>
    <style:style style:family="text" style:name="T3026">
      <style:text-properties fo:letter-spacing="-0.1pt"/>
    </style:style>
    <style:style style:family="text" style:name="T3027">
      <style:text-properties fo:letter-spacing="-0.1pt"/>
    </style:style>
    <style:style style:family="text" style:name="T3028">
      <style:text-properties fo:letter-spacing="-0.1pt"/>
    </style:style>
    <style:style style:parent-style-name="716" style:family="paragraph" style:name="P427">
      <style:paragraph-properties fo:line-height="115%" fo:margin-left="0cm" fo:margin-right="0.4498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29">
      <style:text-properties fo:letter-spacing="-0.15pt"/>
    </style:style>
    <style:style style:family="text" style:name="T3030">
      <style:text-properties fo:letter-spacing="-0.15pt"/>
    </style:style>
    <style:style style:family="text" style:name="T3031">
      <style:text-properties fo:letter-spacing="-0.15pt"/>
    </style:style>
    <style:style style:family="text" style:name="T3032">
      <style:text-properties fo:letter-spacing="-0.15pt"/>
    </style:style>
    <style:style style:family="text" style:name="T3033">
      <style:text-properties fo:letter-spacing="-0.15pt"/>
    </style:style>
    <style:style style:family="text" style:name="T3034">
      <style:text-properties fo:letter-spacing="-0.15pt"/>
    </style:style>
    <style:style style:family="text" style:name="T3035">
      <style:text-properties fo:letter-spacing="-0.15pt"/>
    </style:style>
    <style:style style:family="text" style:name="T3036">
      <style:text-properties fo:letter-spacing="-0.15pt"/>
    </style:style>
    <style:style style:family="text" style:name="T3037">
      <style:text-properties fo:letter-spacing="-0.15pt"/>
    </style:style>
    <style:style style:family="text" style:name="T3038">
      <style:text-properties fo:letter-spacing="-0.15pt"/>
    </style:style>
    <style:style style:parent-style-name="716" style:family="paragraph" style:name="P428">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39">
      <style:text-properties fo:letter-spacing="-0.15pt"/>
    </style:style>
    <style:style style:family="text" style:name="T3040">
      <style:text-properties fo:letter-spacing="-0.15pt"/>
    </style:style>
    <style:style style:family="text" style:name="T3041">
      <style:text-properties fo:letter-spacing="-0.15pt"/>
    </style:style>
    <style:style style:family="text" style:name="T3042">
      <style:text-properties fo:letter-spacing="-0.15pt"/>
    </style:style>
    <style:style style:family="text" style:name="T3043">
      <style:text-properties fo:letter-spacing="-0.15pt"/>
    </style:style>
    <style:style style:family="text" style:name="T3044">
      <style:text-properties fo:letter-spacing="-0.15pt"/>
    </style:style>
    <style:style style:family="text" style:name="T3045">
      <style:text-properties fo:letter-spacing="-0.15pt"/>
    </style:style>
    <style:style style:family="text" style:name="T3046">
      <style:text-properties fo:letter-spacing="-0.15pt"/>
    </style:style>
    <style:style style:family="text" style:name="T3047">
      <style:text-properties fo:letter-spacing="-0.15pt"/>
    </style:style>
    <style:style style:family="text" style:name="T3048">
      <style:text-properties fo:letter-spacing="-0.15pt"/>
    </style:style>
    <style:style style:parent-style-name="716" style:family="paragraph" style:name="P429">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49">
      <style:text-properties/>
    </style:style>
    <style:style style:family="text" style:name="T3050">
      <style:text-properties/>
    </style:style>
    <style:style style:family="text" style:name="T3051">
      <style:text-properties/>
    </style:style>
    <style:style style:family="text" style:name="T3052">
      <style:text-properties fo:letter-spacing="-0.15pt"/>
    </style:style>
    <style:style style:family="text" style:name="T3053">
      <style:text-properties fo:letter-spacing="-0.15pt"/>
    </style:style>
    <style:style style:family="text" style:name="T3054">
      <style:text-properties fo:letter-spacing="-0.15pt"/>
    </style:style>
    <style:style style:family="text" style:name="T3055">
      <style:text-properties fo:letter-spacing="-0.15pt"/>
    </style:style>
    <style:style style:family="text" style:name="T3056">
      <style:text-properties fo:letter-spacing="-0.15pt"/>
    </style:style>
    <style:style style:family="text" style:name="T3057">
      <style:text-properties fo:letter-spacing="-0.15pt"/>
    </style:style>
    <style:style style:family="text" style:name="T3058">
      <style:text-properties fo:letter-spacing="-0.15pt"/>
    </style:style>
    <style:style style:family="text" style:name="T3059">
      <style:text-properties fo:letter-spacing="-0.15pt"/>
    </style:style>
    <style:style style:family="text" style:name="T3060">
      <style:text-properties fo:letter-spacing="-0.15pt"/>
    </style:style>
    <style:style style:family="text" style:name="T3061">
      <style:text-properties fo:letter-spacing="-0.15pt"/>
    </style:style>
    <style:style style:family="text" style:name="T3062">
      <style:text-properties fo:letter-spacing="-0.15pt"/>
    </style:style>
    <style:style style:family="text" style:name="T3063">
      <style:text-properties fo:letter-spacing="-0.15pt"/>
    </style:style>
    <style:style style:family="text" style:name="T3064">
      <style:text-properties fo:letter-spacing="-0.15pt"/>
    </style:style>
    <style:style style:family="text" style:name="T3065">
      <style:text-properties/>
    </style:style>
    <style:style style:parent-style-name="716" style:family="paragraph" style:name="P430">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66">
      <style:text-properties fo:letter-spacing="-0.1pt"/>
    </style:style>
    <style:style style:family="text" style:name="T3067">
      <style:text-properties fo:letter-spacing="-0.1pt"/>
    </style:style>
    <style:style style:family="text" style:name="T3068">
      <style:text-properties fo:letter-spacing="-0.1pt"/>
    </style:style>
    <style:style style:family="text" style:name="T3069">
      <style:text-properties fo:letter-spacing="-0.1pt"/>
    </style:style>
    <style:style style:family="text" style:name="T3070">
      <style:text-properties fo:letter-spacing="-0.1pt"/>
    </style:style>
    <style:style style:family="text" style:name="T3071">
      <style:text-properties fo:letter-spacing="-0.1pt"/>
    </style:style>
    <style:style style:family="text" style:name="T3072">
      <style:text-properties fo:letter-spacing="-0.1pt"/>
    </style:style>
    <style:style style:family="text" style:name="T3073">
      <style:text-properties fo:letter-spacing="-0.1pt"/>
    </style:style>
    <style:style style:family="text" style:name="T3074">
      <style:text-properties fo:letter-spacing="-0.1pt"/>
    </style:style>
    <style:style style:family="text" style:name="T3075">
      <style:text-properties fo:letter-spacing="-0.1pt"/>
    </style:style>
    <style:style style:family="text" style:name="T3076">
      <style:text-properties fo:letter-spacing="-0.1pt"/>
    </style:style>
    <style:style style:family="text" style:name="T3077">
      <style:text-properties fo:letter-spacing="-0.1pt"/>
    </style:style>
    <style:style style:family="text" style:name="T3078">
      <style:text-properties fo:letter-spacing="-0.1pt"/>
    </style:style>
    <style:style style:parent-style-name="716" style:family="paragraph" style:name="P431">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79">
      <style:text-properties/>
    </style:style>
    <style:style style:family="text" style:name="T3080">
      <style:text-properties/>
    </style:style>
    <style:style style:family="text" style:name="T3081">
      <style:text-properties/>
    </style:style>
    <style:style style:parent-style-name="716" style:family="paragraph" style:name="P432">
      <style:paragraph-properties fo:line-height="115%" fo:margin-left="0cm" fo:margin-right="0.4022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082">
      <style:text-properties fo:letter-spacing="-0.1pt"/>
    </style:style>
    <style:style style:family="text" style:name="T3083">
      <style:text-properties fo:letter-spacing="-0.1pt"/>
    </style:style>
    <style:style style:family="text" style:name="T3084">
      <style:text-properties fo:letter-spacing="-0.1pt"/>
    </style:style>
    <style:style style:family="text" style:name="T3085">
      <style:text-properties fo:letter-spacing="-0.1pt"/>
    </style:style>
    <style:style style:family="text" style:name="T3086">
      <style:text-properties/>
    </style:style>
    <style:style style:family="text" style:name="T3087">
      <style:text-properties fo:letter-spacing="-0.1pt"/>
    </style:style>
    <style:style style:family="text" style:name="T3088">
      <style:text-properties fo:letter-spacing="-0.1pt"/>
    </style:style>
    <style:style style:family="text" style:name="T3089">
      <style:text-properties fo:letter-spacing="-0.1pt"/>
    </style:style>
    <style:style style:family="text" style:name="T3090">
      <style:text-properties fo:letter-spacing="-0.1pt"/>
    </style:style>
    <style:style style:family="text" style:name="T3091">
      <style:text-properties fo:letter-spacing="-0.1pt"/>
    </style:style>
    <style:style style:family="text" style:name="T3092">
      <style:text-properties fo:letter-spacing="-0.1pt"/>
    </style:style>
    <style:style style:family="text" style:name="T3093">
      <style:text-properties fo:letter-spacing="-0.1pt"/>
    </style:style>
    <style:style style:family="text" style:name="T3094">
      <style:text-properties fo:letter-spacing="-0.1pt"/>
    </style:style>
    <style:style style:family="text" style:name="T3095">
      <style:text-properties fo:letter-spacing="-0.1pt"/>
    </style:style>
    <style:style style:family="text" style:name="T3096">
      <style:text-properties fo:letter-spacing="-0.1pt"/>
    </style:style>
    <style:style style:parent-style-name="708" style:master-page-name="MasterPage20" style:family="paragraph" style:name="P433">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3097">
      <style:text-properties fo:letter-spacing="-0.15pt"/>
    </style:style>
    <style:style style:family="text" style:name="T3098">
      <style:text-properties fo:letter-spacing="-0.15pt"/>
    </style:style>
    <style:style style:family="text" style:name="T3099">
      <style:text-properties fo:letter-spacing="-0.1pt"/>
    </style:style>
    <style:style style:family="text" style:name="T3100">
      <style:text-properties fo:letter-spacing="-0.1pt"/>
    </style:style>
    <style:style style:parent-style-name="716" style:family="paragraph" style:name="P434">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01">
      <style:text-properties fo:font-size="25pt" fo:font-weight="bold"/>
    </style:style>
    <style:style style:family="text" style:name="T3102">
      <style:text-properties fo:font-size="25pt" fo:font-weight="bold"/>
    </style:style>
    <style:style style:parent-style-name="716" style:family="paragraph" style:name="P435">
      <style:paragraph-properties fo:line-height="115%"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03">
      <style:text-properties/>
    </style:style>
    <style:style style:family="text" style:name="T3104">
      <style:text-properties/>
    </style:style>
    <style:style style:parent-style-name="716" style:family="paragraph" style:name="P436">
      <style:paragraph-properties fo:line-height="115%"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37">
      <style:paragraph-properties fo:line-height="115%"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05">
      <style:text-properties/>
    </style:style>
    <style:style style:family="text" style:name="T3106">
      <style:text-properties/>
    </style:style>
    <style:style style:parent-style-name="716" style:list-style-name="WWNum23" style:family="paragraph" style:name="P438">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07">
      <style:text-properties/>
    </style:style>
    <style:style style:family="text" style:name="T3108">
      <style:text-properties/>
    </style:style>
    <style:style style:parent-style-name="716" style:list-style-name="WWNum23" style:family="paragraph" style:name="P439">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09">
      <style:text-properties/>
    </style:style>
    <style:style style:family="text" style:name="T3110">
      <style:text-properties/>
    </style:style>
    <style:style style:parent-style-name="716" style:list-style-name="WWNum23" style:family="paragraph" style:name="P440">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11">
      <style:text-properties/>
    </style:style>
    <style:style style:family="text" style:name="T3112">
      <style:text-properties/>
    </style:style>
    <style:style style:parent-style-name="716" style:family="paragraph" style:name="P441">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42">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13">
      <style:text-properties/>
    </style:style>
    <style:style style:family="text" style:name="T3114">
      <style:text-properties/>
    </style:style>
    <style:style style:parent-style-name="716" style:family="paragraph" style:name="P443">
      <style:paragraph-properties fo:line-height="115%" fo:margin-right="0.5504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09" style:family="paragraph" style:name="P444">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family="text" style:name="T3115">
      <style:text-properties/>
    </style:style>
    <style:style style:family="text" style:name="T3116">
      <style:text-properties/>
    </style:style>
    <style:style style:parent-style-name="709" style:family="paragraph" style:name="P445">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parent-style-name="169" style:family="paragraph" style:name="P446">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17">
      <style:text-properties/>
    </style:style>
    <style:style style:parent-style-name="169" style:family="paragraph" style:name="P447">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18">
      <style:text-properties/>
    </style:style>
    <style:style style:family="text" style:name="T3119">
      <style:text-properties/>
    </style:style>
    <style:style style:family="table" style:name="ta1">
      <style:paragraph-properties fo:line-height="100%" fo:margin-bottom="0pt"/>
      <style:table-properties style:width="17.61cm" fo:margin-left="0cm" table:align="left" style:use-optimal-column-width="true"/>
    </style:style>
    <style:style style:family="table-column" style:name="co1">
      <style:table-column-properties style:column-width="5.869cm" style:use-optimal-column-width="true"/>
    </style:style>
    <style:style style:family="table-column" style:name="co2">
      <style:table-column-properties style:column-width="5.869cm" style:use-optimal-column-width="true"/>
    </style:style>
    <style:style style:family="table-column" style:name="co3">
      <style:table-column-properties style:column-width="5.869cm" style:use-optimal-column-width="true"/>
    </style:style>
    <style:style style:family="table-row" style:name="ro1">
      <style:table-row-properties/>
    </style:style>
    <style:style style:family="table-cell" style:name="ce2">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48">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20">
      <style:text-properties fo:font-weight="bold"/>
    </style:style>
    <style:style style:family="text" style:name="T3121">
      <style:text-properties fo:font-weight="bold"/>
    </style:style>
    <style:style style:family="table-cell" style:name="ce3">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49">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22">
      <style:text-properties fo:font-weight="bold"/>
    </style:style>
    <style:style style:family="text" style:name="T3123">
      <style:text-properties fo:font-weight="bold"/>
    </style:style>
    <style:style style:family="table-cell" style:name="ce4">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50">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24">
      <style:text-properties fo:font-weight="bold"/>
    </style:style>
    <style:style style:family="text" style:name="T3125">
      <style:text-properties fo:font-weight="bold"/>
    </style:style>
    <style:style style:family="table-row" style:name="ro2">
      <style:table-row-properties/>
    </style:style>
    <style:style style:family="table-cell" style:name="ce5">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51">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26">
      <style:text-properties/>
    </style:style>
    <style:style style:family="text" style:name="T3127">
      <style:text-properties/>
    </style:style>
    <style:style style:family="table-cell" style:name="ce6">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52">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28">
      <style:text-properties/>
    </style:style>
    <style:style style:family="text" style:name="T3129">
      <style:text-properties/>
    </style:style>
    <style:style style:family="table-cell" style:name="ce7">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53">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30">
      <style:text-properties/>
    </style:style>
    <style:style style:family="text" style:name="T3131">
      <style:text-properties/>
    </style:style>
    <style:style style:parent-style-name="169" style:family="paragraph" style:name="P454">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55">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56">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57">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32">
      <style:text-properties/>
    </style:style>
    <style:style style:family="text" style:name="T3133">
      <style:text-properties/>
    </style:style>
    <style:style style:parent-style-name="186" style:family="text" style:name="T3134">
      <style:text-properties/>
    </style:style>
    <style:style style:parent-style-name="186" style:family="text" style:name="T3135">
      <style:text-properties/>
    </style:style>
    <style:style style:family="text" style:name="T3136">
      <style:text-properties/>
    </style:style>
    <style:style style:parent-style-name="709" style:family="paragraph" style:name="P458">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parent-style-name="709" style:family="paragraph" style:name="P459">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family="text" style:name="T3137">
      <style:text-properties/>
    </style:style>
    <style:style style:family="text" style:name="T3138">
      <style:text-properties/>
    </style:style>
    <style:style style:parent-style-name="709" style:family="paragraph" style:name="P460">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parent-style-name="716" style:family="paragraph" style:name="P461">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39">
      <style:text-properties/>
    </style:style>
    <style:style style:family="text" style:name="T3140">
      <style:text-properties/>
    </style:style>
    <style:style style:parent-style-name="716" style:family="paragraph" style:name="P462">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able" style:name="ta2">
      <style:paragraph-properties fo:line-height="100%" fo:margin-bottom="0pt"/>
      <style:table-properties style:width="17.61cm" fo:margin-left="0cm" table:align="left" style:use-optimal-column-width="true"/>
    </style:style>
    <style:style style:family="table-column" style:name="co4">
      <style:table-column-properties style:column-width="5.869cm" style:use-optimal-column-width="true"/>
    </style:style>
    <style:style style:family="table-column" style:name="co5">
      <style:table-column-properties style:column-width="5.869cm" style:use-optimal-column-width="true"/>
    </style:style>
    <style:style style:family="table-column" style:name="co6">
      <style:table-column-properties style:column-width="5.869cm" style:use-optimal-column-width="true"/>
    </style:style>
    <style:style style:family="table-row" style:name="ro3">
      <style:table-row-properties/>
    </style:style>
    <style:style style:family="table-cell" style:name="ce9">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3">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41">
      <style:text-properties fo:font-weight="bold"/>
    </style:style>
    <style:style style:family="text" style:name="T3142">
      <style:text-properties fo:font-weight="bold"/>
    </style:style>
    <style:style style:family="table-cell" style:name="ce10">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4">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43">
      <style:text-properties fo:font-weight="bold"/>
    </style:style>
    <style:style style:family="text" style:name="T3144">
      <style:text-properties fo:font-weight="bold"/>
    </style:style>
    <style:style style:family="table-cell" style:name="ce11">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5">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45">
      <style:text-properties fo:font-weight="bold"/>
    </style:style>
    <style:style style:family="text" style:name="T3146">
      <style:text-properties fo:font-weight="bold"/>
    </style:style>
    <style:style style:family="table-row" style:name="ro4">
      <style:table-row-properties/>
    </style:style>
    <style:style style:family="table-cell" style:name="ce12">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6">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47">
      <style:text-properties/>
    </style:style>
    <style:style style:family="text" style:name="T3148">
      <style:text-properties/>
    </style:style>
    <style:style style:family="table-cell" style:name="ce13">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7">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49">
      <style:text-properties/>
    </style:style>
    <style:style style:family="text" style:name="T3150">
      <style:text-properties/>
    </style:style>
    <style:style style:family="table-cell" style:name="ce14">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716" style:family="paragraph" style:name="P468">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51">
      <style:text-properties/>
    </style:style>
    <style:style style:family="text" style:name="T3152">
      <style:text-properties/>
    </style:style>
    <style:style style:parent-style-name="716" style:family="paragraph" style:name="P469">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70">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53">
      <style:text-properties/>
    </style:style>
    <style:style style:family="text" style:name="T3154">
      <style:text-properties/>
    </style:style>
    <style:style style:parent-style-name="716" style:family="paragraph" style:name="P471">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472">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55">
      <style:text-properties/>
    </style:style>
    <style:style style:family="text" style:name="T3156">
      <style:text-properties/>
    </style:style>
    <style:style style:parent-style-name="186" style:family="text" style:name="T3157">
      <style:text-properties/>
    </style:style>
    <style:style style:parent-style-name="186" style:family="text" style:name="T3158">
      <style:text-properties/>
    </style:style>
    <style:style style:family="text" style:name="T3159">
      <style:text-properties/>
    </style:style>
    <style:style style:family="text" style:name="T3160">
      <style:text-properties/>
    </style:style>
    <style:style style:parent-style-name="709" style:family="paragraph" style:name="P473">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family="paragraph" style:name="P474">
      <style:paragraph-properties/>
      <style:text-properties/>
    </style:style>
    <style:style style:family="text" style:name="T3161">
      <style:text-properties/>
    </style:style>
    <style:style style:family="text" style:name="T3162">
      <style:text-properties/>
    </style:style>
    <style:style style:parent-style-name="709" style:family="paragraph" style:name="P475">
      <style:paragraph-properties fo:break-before="page"/>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family="text" style:name="T3163">
      <style:text-properties/>
    </style:style>
    <style:style style:family="text" style:name="T3164">
      <style:text-properties/>
    </style:style>
    <style:style style:parent-style-name="709" style:family="paragraph" style:name="P476">
      <style:paragraph-properties/>
      <style:text-properties fo:font-variant="normal" fo:text-transform="none" fo:color="#000000" style:text-line-through-type="none" fo:font-family="Arial" style:font-family-asian="Arial" style:font-family-complex="Arial" fo:font-size="14pt" fo:letter-spacing="0pt" fo:language="en" fo:country="US" fo:font-style="normal" style:text-underline-type="none" style:text-underline-width="auto" fo:font-weight="bold"/>
    </style:style>
    <style:style style:parent-style-name="169" style:family="paragraph" style:name="P477">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65">
      <style:text-properties/>
    </style:style>
    <style:style style:family="text" style:name="T3166">
      <style:text-properties/>
    </style:style>
    <style:style style:parent-style-name="169" style:family="paragraph" style:name="P478">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67">
      <style:text-properties/>
    </style:style>
    <style:style style:family="text" style:name="T3168">
      <style:text-properties/>
    </style:style>
    <style:style style:parent-style-name="169" style:family="paragraph" style:name="P479">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69">
      <style:text-properties/>
    </style:style>
    <style:style style:family="text" style:name="T3170">
      <style:text-properties/>
    </style:style>
    <style:style style:family="table" style:name="ta3">
      <style:paragraph-properties fo:line-height="100%" fo:margin-bottom="0pt"/>
      <style:table-properties style:width="17.6cm" fo:margin-left="0cm" table:align="left" style:use-optimal-column-width="true"/>
    </style:style>
    <style:style style:family="table-column" style:name="co7">
      <style:table-column-properties style:column-width="3.521cm" style:use-optimal-column-width="true"/>
    </style:style>
    <style:style style:family="table-column" style:name="co8">
      <style:table-column-properties style:column-width="3.521cm" style:use-optimal-column-width="true"/>
    </style:style>
    <style:style style:family="table-column" style:name="co9">
      <style:table-column-properties style:column-width="3.521cm" style:use-optimal-column-width="true"/>
    </style:style>
    <style:style style:family="table-column" style:name="co10">
      <style:table-column-properties style:column-width="3.521cm" style:use-optimal-column-width="true"/>
    </style:style>
    <style:style style:family="table-column" style:name="co11">
      <style:table-column-properties style:column-width="3.521cm" style:use-optimal-column-width="true"/>
    </style:style>
    <style:style style:family="table-row" style:name="ro5">
      <style:table-row-properties/>
    </style:style>
    <style:style style:family="table-cell" style:name="ce16">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0">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71">
      <style:text-properties fo:font-weight="bold"/>
    </style:style>
    <style:style style:family="text" style:name="T3172">
      <style:text-properties fo:font-weight="bold"/>
    </style:style>
    <style:style style:family="table-cell" style:name="ce17">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1">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73">
      <style:text-properties fo:font-weight="bold"/>
    </style:style>
    <style:style style:family="text" style:name="T3174">
      <style:text-properties fo:font-weight="bold"/>
    </style:style>
    <style:style style:family="table-cell" style:name="ce18">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2">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75">
      <style:text-properties fo:font-weight="bold"/>
    </style:style>
    <style:style style:family="text" style:name="T3176">
      <style:text-properties fo:font-weight="bold"/>
    </style:style>
    <style:style style:family="table-cell" style:name="ce19">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3">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77">
      <style:text-properties fo:font-weight="bold"/>
    </style:style>
    <style:style style:family="text" style:name="T3178">
      <style:text-properties fo:font-weight="bold"/>
    </style:style>
    <style:style style:family="table-cell" style:name="ce20">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4">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79">
      <style:text-properties fo:font-weight="bold"/>
    </style:style>
    <style:style style:family="text" style:name="T3180">
      <style:text-properties fo:font-weight="bold"/>
    </style:style>
    <style:style style:family="table-row" style:name="ro6">
      <style:table-row-properties/>
    </style:style>
    <style:style style:family="table-cell" style:name="ce21">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5">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able-cell" style:name="ce22">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6">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able-cell" style:name="ce23">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7">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able-cell" style:name="ce24">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8">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able-cell" style:name="ce25">
      <style:table-cell-properties style:direction="ltr" fo:border-top="0.01764cm solid #000000" fo:border-bottom="0.01764cm solid #000000" fo:border-left="0.01764cm solid #000000" fo:border-right="0.01764cm solid #000000" loext:writing-mode="lr-tb" fo:padding-top="0pt" fo:padding-bottom="0pt" fo:padding-left="5.4pt" fo:padding-right="5.4pt" fo:wrap-option="wrap"/>
      <style:paragraph-properties fo:line-height="100%" fo:margin-bottom="0pt"/>
      <style:text-properties/>
    </style:style>
    <style:style style:parent-style-name="169" style:family="paragraph" style:name="P489">
      <style:paragraph-properties fo:text-align="center"/>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90">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91">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81">
      <style:text-properties/>
    </style:style>
    <style:style style:family="text" style:name="T3182">
      <style:text-properties/>
    </style:style>
    <style:style style:parent-style-name="169" style:family="paragraph" style:name="P492">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93">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83">
      <style:text-properties/>
    </style:style>
    <style:style style:family="text" style:name="T3184">
      <style:text-properties/>
    </style:style>
    <style:style style:parent-style-name="186" style:family="text" style:name="T3185">
      <style:text-properties/>
    </style:style>
    <style:style style:parent-style-name="186" style:family="text" style:name="T3186">
      <style:text-properties/>
    </style:style>
    <style:style style:family="text" style:name="T3187">
      <style:text-properties/>
    </style:style>
    <style:style style:family="text" style:name="T3188">
      <style:text-properties/>
    </style:style>
    <style:style style:parent-style-name="169" style:family="paragraph" style:name="P494">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169" style:family="paragraph" style:name="P495">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89">
      <style:text-properties/>
    </style:style>
    <style:style style:parent-style-name="707" style:family="paragraph" style:name="P496">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3190">
      <style:text-properties fo:letter-spacing="-0.1pt"/>
    </style:style>
    <style:style style:parent-style-name="716" style:family="paragraph" style:name="P497">
      <style:paragraph-properties fo:line-height="115%" fo:margin-left="0cm" fo:margin-right="1.432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91">
      <style:text-properties fo:letter-spacing="-0.25pt"/>
    </style:style>
    <style:style style:parent-style-name="716" style:family="paragraph" style:name="P498">
      <style:paragraph-properties fo:line-height="115%" fo:margin-left="0cm" fo:margin-right="0.1446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192">
      <style:text-properties fo:letter-spacing="-0.1pt"/>
    </style:style>
    <style:style style:family="text" style:name="T3193">
      <style:text-properties fo:letter-spacing="-0.1pt"/>
    </style:style>
    <style:style style:family="text" style:name="T3194">
      <style:text-properties fo:letter-spacing="-0.1pt"/>
    </style:style>
    <style:style style:family="text" style:name="T3195">
      <style:text-properties fo:letter-spacing="-0.1pt"/>
    </style:style>
    <style:style style:family="text" style:name="T3196">
      <style:text-properties fo:letter-spacing="-0.1pt"/>
    </style:style>
    <style:style style:family="text" style:name="T3197">
      <style:text-properties fo:letter-spacing="-0.1pt"/>
    </style:style>
    <style:style style:family="text" style:name="T3198">
      <style:text-properties fo:letter-spacing="-0.1pt"/>
    </style:style>
    <style:style style:family="text" style:name="T3199">
      <style:text-properties fo:letter-spacing="-0.1pt"/>
    </style:style>
    <style:style style:family="text" style:name="T3200">
      <style:text-properties fo:letter-spacing="-0.1pt"/>
    </style:style>
    <style:style style:family="text" style:name="T3201">
      <style:text-properties fo:letter-spacing="-0.1pt"/>
    </style:style>
    <style:style style:family="text" style:name="T3202">
      <style:text-properties fo:letter-spacing="-0.1pt"/>
    </style:style>
    <style:style style:family="text" style:name="T3203">
      <style:text-properties fo:letter-spacing="-0.1pt"/>
    </style:style>
    <style:style style:family="text" style:name="T3204">
      <style:text-properties fo:letter-spacing="-0.1pt"/>
    </style:style>
    <style:style style:family="text" style:name="T3205">
      <style:text-properties fo:letter-spacing="-0.1pt"/>
    </style:style>
    <style:style style:family="text" style:name="T3206">
      <style:text-properties fo:letter-spacing="-0.1pt"/>
    </style:style>
    <style:style style:parent-style-name="716" style:family="paragraph" style:name="P499">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07">
      <style:text-properties fo:letter-spacing="-0.1pt"/>
    </style:style>
    <style:style style:family="text" style:name="T3208">
      <style:text-properties fo:letter-spacing="-0.1pt"/>
    </style:style>
    <style:style style:family="text" style:name="T3209">
      <style:text-properties fo:letter-spacing="-0.1pt"/>
    </style:style>
    <style:style style:family="text" style:name="T3210">
      <style:text-properties fo:letter-spacing="-0.1pt"/>
    </style:style>
    <style:style style:family="text" style:name="T3211">
      <style:text-properties fo:letter-spacing="-0.1pt"/>
    </style:style>
    <style:style style:family="text" style:name="T3212">
      <style:text-properties fo:letter-spacing="-0.1pt"/>
    </style:style>
    <style:style style:family="text" style:name="T3213">
      <style:text-properties fo:letter-spacing="-0.1pt"/>
    </style:style>
    <style:style style:family="text" style:name="T3214">
      <style:text-properties fo:letter-spacing="-0.1pt"/>
    </style:style>
    <style:style style:family="text" style:name="T3215">
      <style:text-properties fo:letter-spacing="-0.1pt"/>
    </style:style>
    <style:style style:family="text" style:name="T3216">
      <style:text-properties fo:letter-spacing="-0.1pt"/>
    </style:style>
    <style:style style:family="text" style:name="T3217">
      <style:text-properties fo:letter-spacing="-0.1pt"/>
    </style:style>
    <style:style style:family="text" style:name="T3218">
      <style:text-properties fo:letter-spacing="-0.1pt"/>
    </style:style>
    <style:style style:family="text" style:name="T3219">
      <style:text-properties fo:letter-spacing="-0.1pt"/>
    </style:style>
    <style:style style:family="text" style:name="T3220">
      <style:text-properties fo:letter-spacing="-0.1pt"/>
    </style:style>
    <style:style style:parent-style-name="711" style:family="paragraph" style:name="P500">
      <style:paragraph-properties fo:margin-left="0.1993cm" fo:margin-right="0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3221">
      <style:text-properties fo:letter-spacing="-0.1pt"/>
    </style:style>
    <style:style style:parent-style-name="716" style:family="paragraph" style:name="P501">
      <style:paragraph-properties fo:line-height="115%" fo:margin-left="0cm" fo:margin-right="0.4498cm" fo:text-indent="0cm" fo:margin-top="9.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22">
      <style:text-properties fo:letter-spacing="-0.1pt"/>
    </style:style>
    <style:style style:family="text" style:name="T3223">
      <style:text-properties fo:letter-spacing="-0.1pt"/>
    </style:style>
    <style:style style:family="text" style:name="T3224">
      <style:text-properties fo:letter-spacing="-0.1pt"/>
    </style:style>
    <style:style style:family="text" style:name="T3225">
      <style:text-properties fo:letter-spacing="-0.1pt"/>
    </style:style>
    <style:style style:family="text" style:name="T3226">
      <style:text-properties fo:letter-spacing="-0.1pt"/>
    </style:style>
    <style:style style:family="text" style:name="T3227">
      <style:text-properties fo:letter-spacing="-0.1pt"/>
    </style:style>
    <style:style style:family="text" style:name="T3228">
      <style:text-properties fo:letter-spacing="-0.1pt"/>
    </style:style>
    <style:style style:family="text" style:name="T3229">
      <style:text-properties fo:letter-spacing="-0.1pt"/>
    </style:style>
    <style:style style:family="text" style:name="T3230">
      <style:text-properties fo:letter-spacing="-0.1pt"/>
    </style:style>
    <style:style style:family="text" style:name="T3231">
      <style:text-properties fo:letter-spacing="-0.1pt"/>
    </style:style>
    <style:style style:family="text" style:name="T3232">
      <style:text-properties fo:letter-spacing="-0.1pt"/>
    </style:style>
    <style:style style:family="text" style:name="T3233">
      <style:text-properties fo:letter-spacing="-0.1pt"/>
    </style:style>
    <style:style style:family="text" style:name="T3234">
      <style:text-properties fo:letter-spacing="-0.1pt"/>
    </style:style>
    <style:style style:family="text" style:name="T3235">
      <style:text-properties fo:letter-spacing="-0.1pt"/>
    </style:style>
    <style:style style:parent-style-name="716" style:family="paragraph" style:name="P502">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36">
      <style:text-properties fo:letter-spacing="-0.1pt"/>
    </style:style>
    <style:style style:family="text" style:name="T3237">
      <style:text-properties fo:letter-spacing="-0.1pt"/>
    </style:style>
    <style:style style:family="text" style:name="T3238">
      <style:text-properties fo:letter-spacing="-0.1pt"/>
    </style:style>
    <style:style style:family="text" style:name="T3239">
      <style:text-properties fo:letter-spacing="-0.1pt"/>
    </style:style>
    <style:style style:family="text" style:name="T3240">
      <style:text-properties fo:letter-spacing="-0.1pt"/>
    </style:style>
    <style:style style:family="text" style:name="T3241">
      <style:text-properties fo:letter-spacing="-0.1pt"/>
    </style:style>
    <style:style style:family="text" style:name="T3242">
      <style:text-properties fo:letter-spacing="-0.1pt"/>
    </style:style>
    <style:style style:family="text" style:name="T3243">
      <style:text-properties fo:letter-spacing="-0.1pt"/>
    </style:style>
    <style:style style:family="text" style:name="T3244">
      <style:text-properties fo:letter-spacing="-0.1pt"/>
    </style:style>
    <style:style style:family="text" style:name="T3245">
      <style:text-properties fo:letter-spacing="-0.1pt"/>
    </style:style>
    <style:style style:family="text" style:name="T3246">
      <style:text-properties fo:letter-spacing="-0.1pt"/>
    </style:style>
    <style:style style:family="text" style:name="T3247">
      <style:text-properties fo:letter-spacing="-0.1pt"/>
    </style:style>
    <style:style style:family="text" style:name="T3248">
      <style:text-properties fo:letter-spacing="-0.1pt"/>
    </style:style>
    <style:style style:parent-style-name="711" style:family="paragraph" style:name="P503">
      <style:paragraph-properties fo:margin-left="0.1993cm" fo:margin-right="0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3249">
      <style:text-properties fo:letter-spacing="-0.1pt"/>
    </style:style>
    <style:style style:parent-style-name="716" style:family="paragraph" style:name="P504">
      <style:paragraph-properties fo:line-height="115%" fo:margin-left="0cm" fo:margin-right="0.5504cm" fo:text-indent="0cm" fo:margin-top="9.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50">
      <style:text-properties fo:letter-spacing="-0.25pt"/>
    </style:style>
    <style:style style:family="text" style:name="T3251">
      <style:text-properties fo:letter-spacing="-0.25pt"/>
    </style:style>
    <style:style style:family="text" style:name="T3252">
      <style:text-properties fo:letter-spacing="-0.25pt"/>
    </style:style>
    <style:style style:family="text" style:name="T3253">
      <style:text-properties fo:letter-spacing="-0.25pt"/>
    </style:style>
    <style:style style:family="text" style:name="T3254">
      <style:text-properties fo:letter-spacing="-0.25pt"/>
    </style:style>
    <style:style style:family="text" style:name="T3255">
      <style:text-properties fo:letter-spacing="-0.25pt"/>
    </style:style>
    <style:style style:family="text" style:name="T3256">
      <style:text-properties fo:letter-spacing="-0.25pt"/>
    </style:style>
    <style:style style:family="text" style:name="T3257">
      <style:text-properties fo:letter-spacing="-0.25pt"/>
    </style:style>
    <style:style style:family="text" style:name="T3258">
      <style:text-properties fo:letter-spacing="-0.25pt"/>
    </style:style>
    <style:style style:family="text" style:name="T3259">
      <style:text-properties fo:letter-spacing="-0.25pt"/>
    </style:style>
    <style:style style:family="text" style:name="T3260">
      <style:text-properties fo:letter-spacing="-0.25pt"/>
    </style:style>
    <style:style style:family="text" style:name="T3261">
      <style:text-properties fo:letter-spacing="-0.25pt"/>
    </style:style>
    <style:style style:family="text" style:name="T3262">
      <style:text-properties fo:letter-spacing="-0.1pt"/>
    </style:style>
    <style:style style:family="text" style:name="T3263">
      <style:text-properties fo:letter-spacing="-0.1pt"/>
    </style:style>
    <style:style style:family="text" style:name="T3264">
      <style:text-properties fo:letter-spacing="-0.1pt"/>
    </style:style>
    <style:style style:family="text" style:name="T3265">
      <style:text-properties fo:letter-spacing="-0.1pt"/>
    </style:style>
    <style:style style:family="text" style:name="T3266">
      <style:text-properties fo:letter-spacing="-0.1pt"/>
    </style:style>
    <style:style style:family="text" style:name="T3267">
      <style:text-properties fo:letter-spacing="-0.1pt"/>
    </style:style>
    <style:style style:family="text" style:name="T3268">
      <style:text-properties fo:letter-spacing="-0.1pt"/>
    </style:style>
    <style:style style:family="text" style:name="T3269">
      <style:text-properties fo:letter-spacing="-0.1pt"/>
    </style:style>
    <style:style style:family="text" style:name="T3270">
      <style:text-properties fo:letter-spacing="-0.1pt"/>
    </style:style>
    <style:style style:family="text" style:name="T3271">
      <style:text-properties fo:letter-spacing="-0.1pt"/>
    </style:style>
    <style:style style:family="text" style:name="T3272">
      <style:text-properties fo:letter-spacing="-0.1pt"/>
    </style:style>
    <style:style style:family="text" style:name="T3273">
      <style:text-properties fo:letter-spacing="-0.1pt"/>
    </style:style>
    <style:style style:family="text" style:name="T3274">
      <style:text-properties fo:letter-spacing="-0.1pt"/>
    </style:style>
    <style:style style:family="text" style:name="T3275">
      <style:text-properties fo:letter-spacing="-0.1pt"/>
    </style:style>
    <style:style style:parent-style-name="707" style:master-page-name="MasterPage21" style:family="paragraph" style:name="P505">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3276">
      <style:text-properties fo:letter-spacing="-0.15pt"/>
    </style:style>
    <style:style style:parent-style-name="716" style:family="paragraph" style:name="P506">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77">
      <style:text-properties fo:font-size="17pt" fo:font-weight="bold"/>
    </style:style>
    <style:style style:family="text" style:name="T3278">
      <style:text-properties fo:font-size="17pt" fo:font-weight="bold"/>
    </style:style>
    <style:style style:parent-style-name="716" style:family="paragraph" style:name="P507">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79">
      <style:text-properties fo:letter-spacing="-0.15pt"/>
    </style:style>
    <style:style style:family="text" style:name="T3280">
      <style:text-properties fo:letter-spacing="-0.15pt"/>
    </style:style>
    <style:style style:family="text" style:name="T3281">
      <style:text-properties fo:letter-spacing="-0.15pt"/>
    </style:style>
    <style:style style:family="text" style:name="T3282">
      <style:text-properties fo:letter-spacing="-0.15pt"/>
    </style:style>
    <style:style style:family="text" style:name="T3283">
      <style:text-properties fo:letter-spacing="-0.15pt"/>
    </style:style>
    <style:style style:family="text" style:name="T3284">
      <style:text-properties fo:letter-spacing="-0.15pt"/>
    </style:style>
    <style:style style:family="text" style:name="T3285">
      <style:text-properties fo:letter-spacing="-0.15pt"/>
    </style:style>
    <style:style style:family="text" style:name="T3286">
      <style:text-properties fo:letter-spacing="-0.15pt"/>
    </style:style>
    <style:style style:family="text" style:name="T3287">
      <style:text-properties fo:letter-spacing="-0.15pt"/>
    </style:style>
    <style:style style:family="text" style:name="T3288">
      <style:text-properties fo:letter-spacing="-0.15pt"/>
    </style:style>
    <style:style style:family="text" style:name="T3289">
      <style:text-properties fo:letter-spacing="-0.15pt"/>
    </style:style>
    <style:style style:family="text" style:name="T3290">
      <style:text-properties fo:letter-spacing="-0.15pt"/>
    </style:style>
    <style:style style:family="text" style:name="T3291">
      <style:text-properties fo:letter-spacing="-0.15pt"/>
    </style:style>
    <style:style style:parent-style-name="716" style:family="paragraph" style:name="P50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09">
      <style:paragraph-properties fo:text-align="justify" fo:margin-left="0cm" fo:margin-right="1.422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292">
      <style:text-properties fo:letter-spacing="-0.25pt"/>
    </style:style>
    <style:style style:family="text" style:name="T3293">
      <style:text-properties fo:letter-spacing="-0.25pt"/>
    </style:style>
    <style:style style:family="text" style:name="T3294">
      <style:text-properties fo:letter-spacing="-0.25pt"/>
    </style:style>
    <style:style style:family="text" style:name="T3295">
      <style:text-properties fo:letter-spacing="-0.25pt"/>
    </style:style>
    <style:style style:family="text" style:name="T3296">
      <style:text-properties fo:letter-spacing="-0.25pt"/>
    </style:style>
    <style:style style:family="text" style:name="T3297">
      <style:text-properties fo:letter-spacing="-0.25pt"/>
    </style:style>
    <style:style style:family="text" style:name="T3298">
      <style:text-properties fo:letter-spacing="-0.25pt"/>
    </style:style>
    <style:style style:family="text" style:name="T3299">
      <style:text-properties fo:letter-spacing="-0.25pt"/>
    </style:style>
    <style:style style:parent-style-name="716" style:family="paragraph" style:name="P51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00">
      <style:text-properties fo:font-size="13pt"/>
    </style:style>
    <style:style style:family="text" style:name="T3301">
      <style:text-properties fo:font-size="13pt"/>
    </style:style>
    <style:style style:parent-style-name="708" style:family="paragraph" style:name="P511">
      <style:paragraph-properties fo:text-align="justify" fo:margin-top="8.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3302">
      <style:text-properties fo:letter-spacing="-0.3pt"/>
    </style:style>
    <style:style style:family="text" style:name="T3303">
      <style:text-properties fo:letter-spacing="-0.15pt"/>
    </style:style>
    <style:style style:family="text" style:name="T3304">
      <style:text-properties fo:letter-spacing="-0.1pt"/>
    </style:style>
    <style:style style:parent-style-name="716" style:family="paragraph" style:name="P51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05">
      <style:text-properties fo:font-size="17pt" fo:font-weight="bold"/>
    </style:style>
    <style:style style:family="text" style:name="T3306">
      <style:text-properties fo:font-size="17pt" fo:font-weight="bold"/>
    </style:style>
    <style:style style:parent-style-name="716" style:family="paragraph" style:name="P513">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07">
      <style:text-properties fo:letter-spacing="-0.1pt"/>
    </style:style>
    <style:style style:family="text" style:name="T3308">
      <style:text-properties fo:letter-spacing="-0.1pt"/>
    </style:style>
    <style:style style:family="text" style:name="T3309">
      <style:text-properties fo:letter-spacing="-0.1pt"/>
    </style:style>
    <style:style style:family="text" style:name="T3310">
      <style:text-properties fo:letter-spacing="-0.1pt"/>
    </style:style>
    <style:style style:family="text" style:name="T3311">
      <style:text-properties fo:letter-spacing="-0.1pt"/>
    </style:style>
    <style:style style:family="text" style:name="T3312">
      <style:text-properties fo:letter-spacing="-0.1pt"/>
    </style:style>
    <style:style style:family="text" style:name="T3313">
      <style:text-properties fo:letter-spacing="-0.1pt"/>
    </style:style>
    <style:style style:family="text" style:name="T3314">
      <style:text-properties fo:letter-spacing="-0.1pt"/>
    </style:style>
    <style:style style:family="text" style:name="T3315">
      <style:text-properties fo:letter-spacing="-0.1pt"/>
    </style:style>
    <style:style style:family="text" style:name="T3316">
      <style:text-properties fo:letter-spacing="-0.1pt"/>
    </style:style>
    <style:style style:family="text" style:name="T3317">
      <style:text-properties fo:letter-spacing="-0.1pt"/>
    </style:style>
    <style:style style:family="text" style:name="T3318">
      <style:text-properties fo:letter-spacing="-0.1pt"/>
    </style:style>
    <style:style style:family="text" style:name="T3319">
      <style:text-properties fo:letter-spacing="-0.1pt"/>
    </style:style>
    <style:style style:family="text" style:name="T3320">
      <style:text-properties fo:letter-spacing="-0.1pt"/>
    </style:style>
    <style:style style:family="text" style:name="T3321">
      <style:text-properties fo:letter-spacing="-0.1pt"/>
    </style:style>
    <style:style style:parent-style-name="716" style:family="paragraph" style:name="P51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15">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22">
      <style:text-properties fo:letter-spacing="-0.1pt"/>
    </style:style>
    <style:style style:family="text" style:name="T3323">
      <style:text-properties fo:letter-spacing="-0.1pt"/>
    </style:style>
    <style:style style:family="text" style:name="T3324">
      <style:text-properties fo:letter-spacing="-0.1pt"/>
    </style:style>
    <style:style style:family="text" style:name="T3325">
      <style:text-properties fo:letter-spacing="-0.1pt"/>
    </style:style>
    <style:style style:family="text" style:name="T3326">
      <style:text-properties fo:letter-spacing="-0.1pt"/>
    </style:style>
    <style:style style:family="text" style:name="T3327">
      <style:text-properties fo:letter-spacing="-0.1pt"/>
    </style:style>
    <style:style style:family="text" style:name="T3328">
      <style:text-properties fo:letter-spacing="-0.1pt"/>
    </style:style>
    <style:style style:family="text" style:name="T3329">
      <style:text-properties fo:letter-spacing="-0.1pt"/>
    </style:style>
    <style:style style:family="text" style:name="T3330">
      <style:text-properties fo:letter-spacing="-0.1pt"/>
    </style:style>
    <style:style style:family="text" style:name="T3331">
      <style:text-properties fo:letter-spacing="-0.1pt"/>
    </style:style>
    <style:style style:family="text" style:name="T3332">
      <style:text-properties fo:letter-spacing="-0.1pt"/>
    </style:style>
    <style:style style:family="text" style:name="T3333">
      <style:text-properties fo:letter-spacing="-0.1pt"/>
    </style:style>
    <style:style style:family="text" style:name="T3334">
      <style:text-properties fo:letter-spacing="-0.1pt"/>
    </style:style>
    <style:style style:parent-style-name="716" style:family="paragraph" style:name="P51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17">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35">
      <style:text-properties fo:letter-spacing="-0.15pt"/>
    </style:style>
    <style:style style:family="text" style:name="T3336">
      <style:text-properties fo:letter-spacing="-0.15pt"/>
    </style:style>
    <style:style style:family="text" style:name="T3337">
      <style:text-properties fo:letter-spacing="-0.15pt"/>
    </style:style>
    <style:style style:family="text" style:name="T3338">
      <style:text-properties fo:letter-spacing="-0.15pt"/>
    </style:style>
    <style:style style:family="text" style:name="T3339">
      <style:text-properties fo:letter-spacing="-0.15pt"/>
    </style:style>
    <style:style style:family="text" style:name="T3340">
      <style:text-properties fo:letter-spacing="-0.15pt"/>
    </style:style>
    <style:style style:family="text" style:name="T3341">
      <style:text-properties fo:letter-spacing="-0.15pt"/>
    </style:style>
    <style:style style:family="text" style:name="T3342">
      <style:text-properties fo:letter-spacing="-0.15pt"/>
    </style:style>
    <style:style style:family="text" style:name="T3343">
      <style:text-properties fo:letter-spacing="-0.15pt"/>
    </style:style>
    <style:style style:family="text" style:name="T3344">
      <style:text-properties fo:letter-spacing="-0.15pt"/>
    </style:style>
    <style:style style:family="text" style:name="T3345">
      <style:text-properties fo:letter-spacing="-0.15pt"/>
    </style:style>
    <style:style style:family="text" style:name="T3346">
      <style:text-properties fo:letter-spacing="-0.15pt"/>
    </style:style>
    <style:style style:family="text" style:name="T3347">
      <style:text-properties fo:letter-spacing="-0.15pt"/>
    </style:style>
    <style:style style:family="text" style:name="T3348">
      <style:text-properties fo:letter-spacing="-0.15pt"/>
    </style:style>
    <style:style style:family="text" style:name="T3349">
      <style:text-properties fo:letter-spacing="-0.15pt"/>
    </style:style>
    <style:style style:family="text" style:name="T3350">
      <style:text-properties fo:letter-spacing="-0.15pt"/>
    </style:style>
    <style:style style:family="text" style:name="T3351">
      <style:text-properties fo:letter-spacing="-0.05pt"/>
    </style:style>
    <style:style style:family="text" style:name="T3352">
      <style:text-properties fo:letter-spacing="-0.05pt"/>
    </style:style>
    <style:style style:family="text" style:name="T3353">
      <style:text-properties fo:letter-spacing="-0.05pt"/>
    </style:style>
    <style:style style:family="text" style:name="T3354">
      <style:text-properties fo:letter-spacing="-0.05pt"/>
    </style:style>
    <style:style style:family="text" style:name="T3355">
      <style:text-properties fo:letter-spacing="-0.05pt"/>
    </style:style>
    <style:style style:family="text" style:name="T3356">
      <style:text-properties fo:letter-spacing="-0.05pt"/>
    </style:style>
    <style:style style:family="text" style:name="T3357">
      <style:text-properties fo:letter-spacing="-0.05pt"/>
    </style:style>
    <style:style style:family="text" style:name="T3358">
      <style:text-properties fo:letter-spacing="-0.05pt"/>
    </style:style>
    <style:style style:family="text" style:name="T3359">
      <style:text-properties fo:letter-spacing="-0.05pt"/>
    </style:style>
    <style:style style:family="text" style:name="T3360">
      <style:text-properties fo:letter-spacing="-0.05pt"/>
    </style:style>
    <style:style style:family="text" style:name="T3361">
      <style:text-properties fo:letter-spacing="-0.05pt"/>
    </style:style>
    <style:style style:family="text" style:name="T3362">
      <style:text-properties fo:letter-spacing="-0.05pt"/>
    </style:style>
    <style:style style:family="text" style:name="T3363">
      <style:text-properties fo:letter-spacing="-0.05pt"/>
    </style:style>
    <style:style style:parent-style-name="716" style:family="paragraph" style:name="P51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1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64">
      <style:text-properties fo:letter-spacing="-0.15pt"/>
    </style:style>
    <style:style style:family="text" style:name="T3365">
      <style:text-properties fo:letter-spacing="-0.15pt"/>
    </style:style>
    <style:style style:family="text" style:name="T3366">
      <style:text-properties fo:letter-spacing="-0.15pt"/>
    </style:style>
    <style:style style:family="text" style:name="T3367">
      <style:text-properties fo:letter-spacing="-0.15pt"/>
    </style:style>
    <style:style style:family="text" style:name="T3368">
      <style:text-properties fo:letter-spacing="-0.15pt"/>
    </style:style>
    <style:style style:family="text" style:name="T3369">
      <style:text-properties fo:letter-spacing="-0.15pt"/>
    </style:style>
    <style:style style:family="text" style:name="T3370">
      <style:text-properties fo:letter-spacing="-0.15pt"/>
    </style:style>
    <style:style style:family="text" style:name="T3371">
      <style:text-properties fo:letter-spacing="-0.15pt"/>
    </style:style>
    <style:style style:family="text" style:name="T3372">
      <style:text-properties fo:letter-spacing="-0.15pt"/>
    </style:style>
    <style:style style:family="text" style:name="T3373">
      <style:text-properties fo:letter-spacing="-0.15pt"/>
    </style:style>
    <style:style style:family="text" style:name="T3374">
      <style:text-properties fo:letter-spacing="-0.15pt"/>
    </style:style>
    <style:style style:family="text" style:name="T3375">
      <style:text-properties fo:letter-spacing="-0.15pt"/>
    </style:style>
    <style:style style:parent-style-name="716" style:family="paragraph" style:name="P52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21">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376">
      <style:text-properties fo:letter-spacing="-0.1pt"/>
    </style:style>
    <style:style style:family="text" style:name="T3377">
      <style:text-properties fo:letter-spacing="-0.1pt"/>
    </style:style>
    <style:style style:family="text" style:name="T3378">
      <style:text-properties fo:letter-spacing="-0.1pt"/>
    </style:style>
    <style:style style:family="text" style:name="T3379">
      <style:text-properties fo:letter-spacing="-0.1pt"/>
    </style:style>
    <style:style style:family="text" style:name="T3380">
      <style:text-properties fo:letter-spacing="-0.1pt"/>
    </style:style>
    <style:style style:family="text" style:name="T3381">
      <style:text-properties fo:letter-spacing="-0.1pt"/>
    </style:style>
    <style:style style:family="text" style:name="T3382">
      <style:text-properties fo:letter-spacing="-0.1pt"/>
    </style:style>
    <style:style style:family="text" style:name="T3383">
      <style:text-properties fo:letter-spacing="-0.1pt"/>
    </style:style>
    <style:style style:family="text" style:name="T3384">
      <style:text-properties fo:letter-spacing="-0.1pt"/>
    </style:style>
    <style:style style:family="text" style:name="T3385">
      <style:text-properties fo:letter-spacing="-0.1pt"/>
    </style:style>
    <style:style style:family="text" style:name="T3386">
      <style:text-properties fo:letter-spacing="-0.1pt"/>
    </style:style>
    <style:style style:family="text" style:name="T3387">
      <style:text-properties fo:letter-spacing="-0.1pt"/>
    </style:style>
    <style:style style:family="text" style:name="T3388">
      <style:text-properties fo:letter-spacing="-0.1pt"/>
    </style:style>
    <style:style style:family="text" style:name="T3389">
      <style:text-properties fo:letter-spacing="-0.1pt"/>
    </style:style>
    <style:style style:parent-style-name="712" style:master-page-name="MasterPage22" style:family="paragraph" style:name="P522">
      <style:paragraph-properties fo:margin-left="0.1993cm" fo:margin-right="0cm" fo:text-indent="0cm" fo:margin-top="3.2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390">
      <style:text-properties fo:font-size="14pt" fo:font-weight="bold"/>
    </style:style>
    <style:style style:family="text" style:name="T3391">
      <style:text-properties fo:font-size="14pt" fo:letter-spacing="-0.45pt" fo:font-weight="bold"/>
    </style:style>
    <style:style style:family="text" style:name="T3392">
      <style:text-properties fo:font-size="14pt" fo:font-weight="bold"/>
    </style:style>
    <style:style style:family="text" style:name="T3393">
      <style:text-properties fo:font-size="14pt" fo:letter-spacing="-0.3pt" fo:font-weight="bold"/>
    </style:style>
    <style:style style:family="text" style:name="T3394">
      <style:text-properties fo:font-size="14pt" fo:font-weight="bold"/>
    </style:style>
    <style:style style:family="text" style:name="T3395">
      <style:text-properties fo:font-size="14pt" fo:letter-spacing="-0.3pt" fo:font-weight="bold"/>
    </style:style>
    <style:style style:family="text" style:name="T3396">
      <style:text-properties fo:font-size="14pt" fo:font-weight="bold"/>
    </style:style>
    <style:style style:family="text" style:name="T3397">
      <style:text-properties fo:font-size="14pt" fo:letter-spacing="-0.3pt" fo:font-weight="bold"/>
    </style:style>
    <style:style style:family="text" style:name="T3398">
      <style:text-properties fo:font-size="14pt" fo:font-weight="bold"/>
    </style:style>
    <style:style style:family="text" style:name="T3399">
      <style:text-properties fo:font-size="14pt" fo:letter-spacing="-0.3pt" fo:font-weight="bold"/>
    </style:style>
    <style:style style:family="text" style:name="T3400">
      <style:text-properties fo:font-size="14pt" fo:font-weight="bold"/>
    </style:style>
    <style:style style:family="text" style:name="T3401">
      <style:text-properties fo:font-size="14pt" fo:letter-spacing="-0.3pt" fo:font-weight="bold"/>
    </style:style>
    <style:style style:family="text" style:name="T3402">
      <style:text-properties fo:font-size="14pt" fo:font-weight="bold"/>
    </style:style>
    <style:style style:family="text" style:name="T3403">
      <style:text-properties fo:font-size="14pt" fo:letter-spacing="-0.3pt" fo:font-weight="bold"/>
    </style:style>
    <style:style style:family="text" style:name="T3404">
      <style:text-properties fo:font-size="14pt" fo:letter-spacing="-0.1pt" fo:font-weight="bold"/>
    </style:style>
    <style:style style:parent-style-name="716" style:family="paragraph" style:name="P523">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405">
      <style:text-properties fo:letter-spacing="-0.1pt"/>
    </style:style>
    <style:style style:family="text" style:name="T3406">
      <style:text-properties fo:letter-spacing="-0.1pt"/>
    </style:style>
    <style:style style:family="text" style:name="T3407">
      <style:text-properties fo:letter-spacing="-0.1pt"/>
    </style:style>
    <style:style style:family="text" style:name="T3408">
      <style:text-properties fo:letter-spacing="-0.1pt"/>
    </style:style>
    <style:style style:family="text" style:name="T3409">
      <style:text-properties fo:letter-spacing="-0.1pt"/>
    </style:style>
    <style:style style:family="text" style:name="T3410">
      <style:text-properties fo:letter-spacing="-0.1pt"/>
    </style:style>
    <style:style style:family="text" style:name="T3411">
      <style:text-properties fo:letter-spacing="-0.1pt"/>
    </style:style>
    <style:style style:family="text" style:name="T3412">
      <style:text-properties fo:letter-spacing="-0.1pt"/>
    </style:style>
    <style:style style:family="text" style:name="T3413">
      <style:text-properties fo:letter-spacing="-0.1pt"/>
    </style:style>
    <style:style style:family="text" style:name="T3414">
      <style:text-properties fo:letter-spacing="-0.1pt"/>
    </style:style>
    <style:style style:family="text" style:name="T3415">
      <style:text-properties fo:letter-spacing="-0.1pt"/>
    </style:style>
    <style:style style:family="text" style:name="T3416">
      <style:text-properties fo:letter-spacing="-0.1pt"/>
    </style:style>
    <style:style style:family="text" style:name="T3417">
      <style:text-properties fo:letter-spacing="-0.1pt"/>
    </style:style>
    <style:style style:family="text" style:name="T3418">
      <style:text-properties fo:letter-spacing="-0.1pt"/>
    </style:style>
    <style:style style:parent-style-name="716" style:family="paragraph" style:name="P524">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419">
      <style:text-properties fo:letter-spacing="-0.1pt"/>
    </style:style>
    <style:style style:family="text" style:name="T3420">
      <style:text-properties fo:letter-spacing="-0.1pt"/>
    </style:style>
    <style:style style:family="text" style:name="T3421">
      <style:text-properties fo:letter-spacing="-0.1pt"/>
    </style:style>
    <style:style style:family="text" style:name="T3422">
      <style:text-properties fo:letter-spacing="-0.1pt"/>
    </style:style>
    <style:style style:family="text" style:name="T3423">
      <style:text-properties fo:letter-spacing="-0.1pt"/>
    </style:style>
    <style:style style:family="text" style:name="T3424">
      <style:text-properties fo:letter-spacing="-0.1pt"/>
    </style:style>
    <style:style style:family="text" style:name="T3425">
      <style:text-properties fo:letter-spacing="-0.1pt"/>
    </style:style>
    <style:style style:family="text" style:name="T3426">
      <style:text-properties fo:letter-spacing="-0.1pt"/>
    </style:style>
    <style:style style:family="text" style:name="T3427">
      <style:text-properties fo:letter-spacing="-0.1pt"/>
    </style:style>
    <style:style style:family="text" style:name="T3428">
      <style:text-properties fo:letter-spacing="-0.1pt"/>
    </style:style>
    <style:style style:family="text" style:name="T3429">
      <style:text-properties fo:letter-spacing="-0.1pt"/>
    </style:style>
    <style:style style:family="text" style:name="T3430">
      <style:text-properties fo:letter-spacing="-0.1pt"/>
    </style:style>
    <style:style style:family="text" style:name="T3431">
      <style:text-properties fo:letter-spacing="-0.1pt"/>
    </style:style>
    <style:style style:family="text" style:name="T3432">
      <style:text-properties fo:letter-spacing="-0.1pt"/>
    </style:style>
    <style:style style:parent-style-name="716" style:family="paragraph" style:name="P525">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433">
      <style:text-properties fo:letter-spacing="-0.3pt"/>
    </style:style>
    <style:style style:family="text" style:name="T3434">
      <style:text-properties fo:letter-spacing="-0.3pt"/>
    </style:style>
    <style:style style:family="text" style:name="T3435">
      <style:text-properties fo:letter-spacing="-0.3pt"/>
    </style:style>
    <style:style style:family="text" style:name="T3436">
      <style:text-properties fo:letter-spacing="-0.3pt"/>
    </style:style>
    <style:style style:family="text" style:name="T3437">
      <style:text-properties fo:letter-spacing="-0.3pt"/>
    </style:style>
    <style:style style:family="text" style:name="T3438">
      <style:text-properties fo:letter-spacing="-0.3pt"/>
    </style:style>
    <style:style style:family="text" style:name="T3439">
      <style:text-properties fo:letter-spacing="-0.3pt"/>
    </style:style>
    <style:style style:family="text" style:name="T3440">
      <style:text-properties fo:letter-spacing="-0.3pt"/>
    </style:style>
    <style:style style:family="text" style:name="T3441">
      <style:text-properties fo:letter-spacing="-0.3pt"/>
    </style:style>
    <style:style style:family="text" style:name="T3442">
      <style:text-properties fo:letter-spacing="-0.3pt"/>
    </style:style>
    <style:style style:family="text" style:name="T3443">
      <style:text-properties fo:letter-spacing="-0.3pt"/>
    </style:style>
    <style:style style:family="text" style:name="T3444">
      <style:text-properties fo:letter-spacing="-0.3pt"/>
    </style:style>
    <style:style style:family="text" style:name="T3445">
      <style:text-properties fo:letter-spacing="-0.3pt"/>
    </style:style>
    <style:style style:family="text" style:name="T3446">
      <style:text-properties fo:letter-spacing="-0.1pt"/>
    </style:style>
    <style:style style:parent-style-name="717" style:list-style-name="WWNum15" style:family="paragraph" style:name="P526">
      <style:paragraph-properties fo:line-height="115%" fo:margin-left="1.443cm" fo:margin-right="1.196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447">
      <style:text-properties fo:font-size="12pt"/>
    </style:style>
    <style:style style:family="text" style:name="T3448">
      <style:text-properties fo:font-size="12pt" fo:letter-spacing="-0.15pt"/>
    </style:style>
    <style:style style:family="text" style:name="T3449">
      <style:text-properties fo:font-size="12pt"/>
    </style:style>
    <style:style style:family="text" style:name="T3450">
      <style:text-properties fo:font-size="12pt" fo:letter-spacing="-0.15pt"/>
    </style:style>
    <style:style style:family="text" style:name="T3451">
      <style:text-properties fo:font-size="12pt"/>
    </style:style>
    <style:style style:family="text" style:name="T3452">
      <style:text-properties fo:font-size="12pt" fo:letter-spacing="-0.15pt"/>
    </style:style>
    <style:style style:family="text" style:name="T3453">
      <style:text-properties fo:font-size="12pt"/>
    </style:style>
    <style:style style:family="text" style:name="T3454">
      <style:text-properties fo:font-size="12pt" fo:letter-spacing="-0.15pt"/>
    </style:style>
    <style:style style:family="text" style:name="T3455">
      <style:text-properties fo:font-size="12pt"/>
    </style:style>
    <style:style style:family="text" style:name="T3456">
      <style:text-properties fo:font-size="12pt" fo:letter-spacing="-0.15pt"/>
    </style:style>
    <style:style style:family="text" style:name="T3457">
      <style:text-properties fo:font-size="12pt"/>
    </style:style>
    <style:style style:family="text" style:name="T3458">
      <style:text-properties fo:font-size="12pt" fo:letter-spacing="-0.15pt"/>
    </style:style>
    <style:style style:family="text" style:name="T3459">
      <style:text-properties fo:font-size="12pt"/>
    </style:style>
    <style:style style:family="text" style:name="T3460">
      <style:text-properties fo:font-size="12pt" fo:letter-spacing="-0.15pt"/>
    </style:style>
    <style:style style:family="text" style:name="T3461">
      <style:text-properties fo:font-size="12pt"/>
    </style:style>
    <style:style style:family="text" style:name="T3462">
      <style:text-properties fo:font-size="12pt" fo:letter-spacing="-0.15pt"/>
    </style:style>
    <style:style style:family="text" style:name="T3463">
      <style:text-properties fo:font-size="12pt"/>
    </style:style>
    <style:style style:family="text" style:name="T3464">
      <style:text-properties fo:font-size="12pt" fo:letter-spacing="-0.15pt"/>
    </style:style>
    <style:style style:family="text" style:name="T3465">
      <style:text-properties fo:font-size="12pt"/>
    </style:style>
    <style:style style:family="text" style:name="T3466">
      <style:text-properties fo:font-size="12pt" fo:letter-spacing="-0.15pt"/>
    </style:style>
    <style:style style:family="text" style:name="T3467">
      <style:text-properties fo:font-size="12pt"/>
    </style:style>
    <style:style style:family="text" style:name="T3468">
      <style:text-properties fo:font-size="12pt" fo:letter-spacing="-0.15pt"/>
    </style:style>
    <style:style style:family="text" style:name="T3469">
      <style:text-properties fo:font-size="12pt"/>
    </style:style>
    <style:style style:family="text" style:name="T3470">
      <style:text-properties fo:font-size="12pt" fo:letter-spacing="-0.15pt"/>
    </style:style>
    <style:style style:family="text" style:name="T3471">
      <style:text-properties fo:font-size="12pt"/>
    </style:style>
    <style:style style:family="text" style:name="T3472">
      <style:text-properties fo:font-size="12pt" fo:letter-spacing="-0.15pt"/>
    </style:style>
    <style:style style:family="text" style:name="T3473">
      <style:text-properties fo:font-size="12pt"/>
    </style:style>
    <style:style style:family="text" style:name="T3474">
      <style:text-properties fo:font-size="12pt" fo:letter-spacing="-0.15pt"/>
    </style:style>
    <style:style style:parent-style-name="717" style:list-style-name="WWNum15" style:family="paragraph" style:name="P527">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475">
      <style:text-properties fo:font-size="12pt"/>
    </style:style>
    <style:style style:family="text" style:name="T3476">
      <style:text-properties fo:font-size="12pt" fo:font-weight="bold"/>
    </style:style>
    <style:style style:family="text" style:name="T3477">
      <style:text-properties fo:font-size="12pt" fo:letter-spacing="-0.1pt" fo:font-weight="bold"/>
    </style:style>
    <style:style style:parent-style-name="716" style:family="paragraph" style:name="P528">
      <style:paragraph-properties fo:margin-left="1.443cm" fo:margin-right="0cm" fo:text-indent="0cm" fo:margin-top="2.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478">
      <style:text-properties fo:letter-spacing="-0.1pt"/>
    </style:style>
    <style:style style:parent-style-name="717" style:list-style-name="WWNum15" style:family="paragraph" style:name="P529">
      <style:paragraph-properties fo:line-height="115%" fo:margin-left="1.443cm" fo:margin-right="0.9314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479">
      <style:text-properties fo:font-size="12pt"/>
    </style:style>
    <style:style style:family="text" style:name="T3480">
      <style:text-properties fo:font-size="12pt" fo:letter-spacing="-0.1pt"/>
    </style:style>
    <style:style style:family="text" style:name="T3481">
      <style:text-properties fo:font-size="12pt"/>
    </style:style>
    <style:style style:family="text" style:name="T3482">
      <style:text-properties fo:font-size="12pt" fo:letter-spacing="-0.1pt"/>
    </style:style>
    <style:style style:family="text" style:name="T3483">
      <style:text-properties fo:font-size="12pt"/>
    </style:style>
    <style:style style:family="text" style:name="T3484">
      <style:text-properties fo:font-size="12pt" fo:letter-spacing="-0.1pt"/>
    </style:style>
    <style:style style:family="text" style:name="T3485">
      <style:text-properties fo:font-size="12pt"/>
    </style:style>
    <style:style style:family="text" style:name="T3486">
      <style:text-properties fo:font-size="12pt" fo:letter-spacing="-0.1pt"/>
    </style:style>
    <style:style style:family="text" style:name="T3487">
      <style:text-properties fo:font-size="12pt"/>
    </style:style>
    <style:style style:family="text" style:name="T3488">
      <style:text-properties fo:font-size="12pt" fo:letter-spacing="-0.1pt"/>
    </style:style>
    <style:style style:family="text" style:name="T3489">
      <style:text-properties fo:font-size="12pt"/>
    </style:style>
    <style:style style:family="text" style:name="T3490">
      <style:text-properties fo:font-size="12pt" fo:letter-spacing="-0.1pt"/>
    </style:style>
    <style:style style:family="text" style:name="T3491">
      <style:text-properties fo:font-size="12pt"/>
    </style:style>
    <style:style style:family="text" style:name="T3492">
      <style:text-properties fo:font-size="12pt" fo:letter-spacing="-0.1pt"/>
    </style:style>
    <style:style style:family="text" style:name="T3493">
      <style:text-properties fo:font-size="12pt"/>
    </style:style>
    <style:style style:family="text" style:name="T3494">
      <style:text-properties fo:font-size="12pt" fo:letter-spacing="-0.1pt"/>
    </style:style>
    <style:style style:family="text" style:name="T3495">
      <style:text-properties fo:font-size="12pt"/>
    </style:style>
    <style:style style:family="text" style:name="T3496">
      <style:text-properties fo:font-size="12pt" fo:letter-spacing="-0.1pt"/>
    </style:style>
    <style:style style:family="text" style:name="T3497">
      <style:text-properties fo:font-size="12pt"/>
    </style:style>
    <style:style style:family="text" style:name="T3498">
      <style:text-properties fo:font-size="12pt" fo:letter-spacing="-0.1pt"/>
    </style:style>
    <style:style style:family="text" style:name="T3499">
      <style:text-properties fo:font-size="12pt"/>
    </style:style>
    <style:style style:family="text" style:name="T3500">
      <style:text-properties fo:font-size="12pt" fo:letter-spacing="-0.1pt"/>
    </style:style>
    <style:style style:family="text" style:name="T3501">
      <style:text-properties fo:font-size="12pt"/>
    </style:style>
    <style:style style:family="text" style:name="T3502">
      <style:text-properties fo:font-size="12pt" fo:letter-spacing="-0.1pt"/>
    </style:style>
    <style:style style:family="text" style:name="T3503">
      <style:text-properties fo:font-size="12pt"/>
    </style:style>
    <style:style style:family="text" style:name="T3504">
      <style:text-properties fo:font-size="12pt" fo:letter-spacing="-0.1pt"/>
    </style:style>
    <style:style style:family="text" style:name="T3505">
      <style:text-properties fo:font-size="12pt"/>
    </style:style>
    <style:style style:parent-style-name="717" style:list-style-name="WWNum15" style:family="paragraph" style:name="P530">
      <style:paragraph-properties fo:line-height="115%" fo:margin-left="1.443cm" fo:margin-right="1.589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506">
      <style:text-properties fo:font-size="12pt"/>
    </style:style>
    <style:style style:family="text" style:name="T3507">
      <style:text-properties fo:font-size="12pt" fo:letter-spacing="-0.15pt"/>
    </style:style>
    <style:style style:family="text" style:name="T3508">
      <style:text-properties fo:font-size="12pt"/>
    </style:style>
    <style:style style:family="text" style:name="T3509">
      <style:text-properties fo:font-size="12pt" fo:letter-spacing="-0.15pt"/>
    </style:style>
    <style:style style:family="text" style:name="T3510">
      <style:text-properties fo:font-size="12pt"/>
    </style:style>
    <style:style style:family="text" style:name="T3511">
      <style:text-properties fo:font-size="12pt" fo:letter-spacing="-0.15pt"/>
    </style:style>
    <style:style style:family="text" style:name="T3512">
      <style:text-properties fo:font-size="12pt"/>
    </style:style>
    <style:style style:family="text" style:name="T3513">
      <style:text-properties fo:font-size="12pt" fo:letter-spacing="-0.15pt"/>
    </style:style>
    <style:style style:family="text" style:name="T3514">
      <style:text-properties fo:font-size="12pt"/>
    </style:style>
    <style:style style:family="text" style:name="T3515">
      <style:text-properties fo:font-size="12pt" fo:letter-spacing="-0.15pt"/>
    </style:style>
    <style:style style:family="text" style:name="T3516">
      <style:text-properties fo:font-size="12pt"/>
    </style:style>
    <style:style style:family="text" style:name="T3517">
      <style:text-properties fo:font-size="12pt" fo:letter-spacing="-0.15pt"/>
    </style:style>
    <style:style style:family="text" style:name="T3518">
      <style:text-properties fo:font-size="12pt"/>
    </style:style>
    <style:style style:family="text" style:name="T3519">
      <style:text-properties fo:font-size="12pt" fo:letter-spacing="-0.15pt"/>
    </style:style>
    <style:style style:family="text" style:name="T3520">
      <style:text-properties fo:font-size="12pt"/>
    </style:style>
    <style:style style:family="text" style:name="T3521">
      <style:text-properties fo:font-size="12pt" fo:letter-spacing="-0.15pt"/>
    </style:style>
    <style:style style:family="text" style:name="T3522">
      <style:text-properties fo:font-size="12pt"/>
    </style:style>
    <style:style style:family="text" style:name="T3523">
      <style:text-properties fo:font-size="12pt" fo:letter-spacing="-0.15pt"/>
    </style:style>
    <style:style style:family="text" style:name="T3524">
      <style:text-properties fo:font-size="12pt"/>
    </style:style>
    <style:style style:family="text" style:name="T3525">
      <style:text-properties fo:font-size="12pt" fo:letter-spacing="-0.15pt"/>
    </style:style>
    <style:style style:family="text" style:name="T3526">
      <style:text-properties fo:font-size="12pt"/>
    </style:style>
    <style:style style:family="text" style:name="T3527">
      <style:text-properties fo:font-size="12pt" fo:letter-spacing="-0.15pt"/>
    </style:style>
    <style:style style:family="text" style:name="T3528">
      <style:text-properties fo:font-size="12pt"/>
    </style:style>
    <style:style style:family="text" style:name="T3529">
      <style:text-properties fo:font-size="12pt" fo:letter-spacing="-0.15pt"/>
    </style:style>
    <style:style style:family="text" style:name="T3530">
      <style:text-properties fo:font-size="12pt"/>
    </style:style>
    <style:style style:parent-style-name="717" style:list-style-name="WWNum15" style:family="paragraph" style:name="P531">
      <style:paragraph-properties fo:line-height="115%" fo:margin-left="1.443cm" fo:margin-right="0.7197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531">
      <style:text-properties fo:font-size="12pt"/>
    </style:style>
    <style:style style:family="text" style:name="T3532">
      <style:text-properties fo:font-size="12pt" fo:letter-spacing="-0.15pt"/>
    </style:style>
    <style:style style:family="text" style:name="T3533">
      <style:text-properties fo:font-size="12pt"/>
    </style:style>
    <style:style style:family="text" style:name="T3534">
      <style:text-properties fo:font-size="12pt" fo:letter-spacing="-0.15pt"/>
    </style:style>
    <style:style style:family="text" style:name="T3535">
      <style:text-properties fo:font-size="12pt"/>
    </style:style>
    <style:style style:family="text" style:name="T3536">
      <style:text-properties fo:font-size="12pt" fo:letter-spacing="-0.15pt"/>
    </style:style>
    <style:style style:family="text" style:name="T3537">
      <style:text-properties fo:font-size="12pt"/>
    </style:style>
    <style:style style:family="text" style:name="T3538">
      <style:text-properties fo:font-size="12pt" fo:letter-spacing="-0.15pt"/>
    </style:style>
    <style:style style:family="text" style:name="T3539">
      <style:text-properties fo:font-size="12pt"/>
    </style:style>
    <style:style style:family="text" style:name="T3540">
      <style:text-properties fo:font-size="12pt" fo:letter-spacing="-0.15pt"/>
    </style:style>
    <style:style style:family="text" style:name="T3541">
      <style:text-properties fo:font-size="12pt"/>
    </style:style>
    <style:style style:family="text" style:name="T3542">
      <style:text-properties fo:font-size="12pt" fo:letter-spacing="-0.15pt"/>
    </style:style>
    <style:style style:family="text" style:name="T3543">
      <style:text-properties fo:font-size="12pt"/>
    </style:style>
    <style:style style:family="text" style:name="T3544">
      <style:text-properties fo:font-size="12pt" fo:letter-spacing="-0.15pt"/>
    </style:style>
    <style:style style:family="text" style:name="T3545">
      <style:text-properties fo:font-size="12pt"/>
    </style:style>
    <style:style style:family="text" style:name="T3546">
      <style:text-properties fo:font-size="12pt" fo:letter-spacing="-0.15pt"/>
    </style:style>
    <style:style style:family="text" style:name="T3547">
      <style:text-properties fo:font-size="12pt"/>
    </style:style>
    <style:style style:family="text" style:name="T3548">
      <style:text-properties fo:font-size="12pt" fo:letter-spacing="-0.15pt"/>
    </style:style>
    <style:style style:family="text" style:name="T3549">
      <style:text-properties fo:font-size="12pt"/>
    </style:style>
    <style:style style:family="text" style:name="T3550">
      <style:text-properties fo:font-size="12pt" fo:letter-spacing="-0.15pt"/>
    </style:style>
    <style:style style:family="text" style:name="T3551">
      <style:text-properties fo:font-size="12pt"/>
    </style:style>
    <style:style style:family="text" style:name="T3552">
      <style:text-properties fo:font-size="12pt" fo:letter-spacing="-0.15pt"/>
    </style:style>
    <style:style style:family="text" style:name="T3553">
      <style:text-properties fo:font-size="12pt"/>
    </style:style>
    <style:style style:family="text" style:name="T3554">
      <style:text-properties fo:font-size="12pt" fo:letter-spacing="-0.15pt"/>
    </style:style>
    <style:style style:family="text" style:name="T3555">
      <style:text-properties fo:font-size="12pt"/>
    </style:style>
    <style:style style:parent-style-name="717" style:list-style-name="WWNum15" style:family="paragraph" style:name="P532">
      <style:paragraph-properties fo:line-height="115%" fo:margin-left="1.443cm" fo:margin-right="1.057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556">
      <style:text-properties fo:font-size="12pt"/>
    </style:style>
    <style:style style:family="text" style:name="T3557">
      <style:text-properties fo:font-size="12pt" fo:letter-spacing="-0.25pt"/>
    </style:style>
    <style:style style:family="text" style:name="T3558">
      <style:text-properties fo:font-size="12pt"/>
    </style:style>
    <style:style style:family="text" style:name="T3559">
      <style:text-properties fo:font-size="12pt" fo:letter-spacing="-0.25pt"/>
    </style:style>
    <style:style style:family="text" style:name="T3560">
      <style:text-properties fo:font-size="12pt"/>
    </style:style>
    <style:style style:family="text" style:name="T3561">
      <style:text-properties fo:font-size="12pt" fo:letter-spacing="-0.25pt"/>
    </style:style>
    <style:style style:family="text" style:name="T3562">
      <style:text-properties fo:font-size="12pt"/>
    </style:style>
    <style:style style:family="text" style:name="T3563">
      <style:text-properties fo:font-size="12pt" fo:letter-spacing="-0.25pt"/>
    </style:style>
    <style:style style:family="text" style:name="T3564">
      <style:text-properties fo:font-size="12pt"/>
    </style:style>
    <style:style style:family="text" style:name="T3565">
      <style:text-properties fo:font-size="12pt" fo:letter-spacing="-0.25pt"/>
    </style:style>
    <style:style style:family="text" style:name="T3566">
      <style:text-properties fo:font-size="12pt"/>
    </style:style>
    <style:style style:family="text" style:name="T3567">
      <style:text-properties fo:font-size="12pt" fo:letter-spacing="-0.25pt"/>
    </style:style>
    <style:style style:family="text" style:name="T3568">
      <style:text-properties fo:font-size="12pt"/>
    </style:style>
    <style:style style:family="text" style:name="T3569">
      <style:text-properties fo:font-size="12pt" fo:letter-spacing="-0.25pt"/>
    </style:style>
    <style:style style:family="text" style:name="T3570">
      <style:text-properties fo:font-size="12pt"/>
    </style:style>
    <style:style style:family="text" style:name="T3571">
      <style:text-properties fo:font-size="12pt" fo:letter-spacing="-0.25pt"/>
    </style:style>
    <style:style style:family="text" style:name="T3572">
      <style:text-properties fo:font-size="12pt"/>
    </style:style>
    <style:style style:family="text" style:name="T3573">
      <style:text-properties fo:font-size="12pt" fo:letter-spacing="-0.25pt"/>
    </style:style>
    <style:style style:family="text" style:name="T3574">
      <style:text-properties fo:font-size="12pt"/>
    </style:style>
    <style:style style:family="text" style:name="T3575">
      <style:text-properties fo:font-size="12pt" fo:letter-spacing="-0.25pt"/>
    </style:style>
    <style:style style:family="text" style:name="T3576">
      <style:text-properties fo:font-size="12pt"/>
    </style:style>
    <style:style style:family="text" style:name="T3577">
      <style:text-properties fo:font-size="12pt" fo:letter-spacing="-0.25pt"/>
    </style:style>
    <style:style style:family="text" style:name="T3578">
      <style:text-properties fo:font-size="12pt"/>
    </style:style>
    <style:style style:family="text" style:name="T3579">
      <style:text-properties fo:font-size="12pt" fo:letter-spacing="-0.25pt"/>
    </style:style>
    <style:style style:family="text" style:name="T3580">
      <style:text-properties fo:font-size="12pt"/>
    </style:style>
    <style:style style:parent-style-name="717" style:list-style-name="WWNum15" style:family="paragraph" style:name="P533">
      <style:paragraph-properties fo:line-height="115%" fo:margin-left="1.443cm" fo:margin-right="0.531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581">
      <style:text-properties fo:font-size="12pt"/>
    </style:style>
    <style:style style:family="text" style:name="T3582">
      <style:text-properties fo:font-size="12pt" fo:letter-spacing="-0.1pt"/>
    </style:style>
    <style:style style:family="text" style:name="T3583">
      <style:text-properties fo:font-size="12pt"/>
    </style:style>
    <style:style style:family="text" style:name="T3584">
      <style:text-properties fo:font-size="12pt" fo:letter-spacing="-0.1pt"/>
    </style:style>
    <style:style style:family="text" style:name="T3585">
      <style:text-properties fo:font-size="12pt"/>
    </style:style>
    <style:style style:family="text" style:name="T3586">
      <style:text-properties fo:font-size="12pt" fo:letter-spacing="-0.1pt"/>
    </style:style>
    <style:style style:family="text" style:name="T3587">
      <style:text-properties fo:font-size="12pt"/>
    </style:style>
    <style:style style:family="text" style:name="T3588">
      <style:text-properties fo:font-size="12pt" fo:letter-spacing="-0.1pt"/>
    </style:style>
    <style:style style:family="text" style:name="T3589">
      <style:text-properties fo:font-size="12pt"/>
    </style:style>
    <style:style style:family="text" style:name="T3590">
      <style:text-properties fo:font-size="12pt" fo:letter-spacing="-0.1pt"/>
    </style:style>
    <style:style style:family="text" style:name="T3591">
      <style:text-properties fo:font-size="12pt"/>
    </style:style>
    <style:style style:family="text" style:name="T3592">
      <style:text-properties fo:font-size="12pt" fo:letter-spacing="-0.1pt"/>
    </style:style>
    <style:style style:family="text" style:name="T3593">
      <style:text-properties fo:font-size="12pt"/>
    </style:style>
    <style:style style:family="text" style:name="T3594">
      <style:text-properties fo:font-size="12pt" fo:letter-spacing="-0.1pt"/>
    </style:style>
    <style:style style:family="text" style:name="T3595">
      <style:text-properties fo:font-size="12pt"/>
    </style:style>
    <style:style style:family="text" style:name="T3596">
      <style:text-properties fo:font-size="12pt" fo:letter-spacing="-0.1pt"/>
    </style:style>
    <style:style style:family="text" style:name="T3597">
      <style:text-properties fo:font-size="12pt"/>
    </style:style>
    <style:style style:family="text" style:name="T3598">
      <style:text-properties fo:font-size="12pt" fo:letter-spacing="-0.1pt"/>
    </style:style>
    <style:style style:family="text" style:name="T3599">
      <style:text-properties fo:font-size="12pt"/>
    </style:style>
    <style:style style:family="text" style:name="T3600">
      <style:text-properties fo:font-size="12pt" fo:letter-spacing="-0.1pt"/>
    </style:style>
    <style:style style:family="text" style:name="T3601">
      <style:text-properties fo:font-size="12pt"/>
    </style:style>
    <style:style style:family="text" style:name="T3602">
      <style:text-properties fo:font-size="12pt" fo:letter-spacing="-0.1pt"/>
    </style:style>
    <style:style style:family="text" style:name="T3603">
      <style:text-properties fo:font-size="12pt"/>
    </style:style>
    <style:style style:family="text" style:name="T3604">
      <style:text-properties fo:font-size="12pt" fo:letter-spacing="-0.1pt"/>
    </style:style>
    <style:style style:family="text" style:name="T3605">
      <style:text-properties fo:font-size="12pt"/>
    </style:style>
    <style:style style:family="text" style:name="T3606">
      <style:text-properties fo:font-size="12pt" fo:letter-spacing="-0.1pt"/>
    </style:style>
    <style:style style:family="text" style:name="T3607">
      <style:text-properties fo:font-size="12pt"/>
    </style:style>
    <style:style style:family="text" style:name="T3608">
      <style:text-properties fo:font-size="12pt" fo:letter-spacing="-0.1pt"/>
    </style:style>
    <style:style style:family="text" style:name="T3609">
      <style:text-properties fo:font-size="12pt"/>
    </style:style>
    <style:style style:parent-style-name="716" style:family="paragraph" style:name="P534">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10">
      <style:text-properties fo:letter-spacing="-0.3pt"/>
    </style:style>
    <style:style style:family="text" style:name="T3611">
      <style:text-properties fo:letter-spacing="-0.3pt"/>
    </style:style>
    <style:style style:family="text" style:name="T3612">
      <style:text-properties fo:letter-spacing="-0.3pt"/>
    </style:style>
    <style:style style:family="text" style:name="T3613">
      <style:text-properties fo:letter-spacing="-0.3pt"/>
    </style:style>
    <style:style style:family="text" style:name="T3614">
      <style:text-properties fo:letter-spacing="-0.3pt"/>
    </style:style>
    <style:style style:family="text" style:name="T3615">
      <style:text-properties fo:letter-spacing="-0.3pt"/>
    </style:style>
    <style:style style:family="text" style:name="T3616">
      <style:text-properties fo:letter-spacing="-0.3pt"/>
    </style:style>
    <style:style style:family="text" style:name="T3617">
      <style:text-properties fo:letter-spacing="-0.3pt"/>
    </style:style>
    <style:style style:family="text" style:name="T3618">
      <style:text-properties fo:letter-spacing="-0.3pt"/>
    </style:style>
    <style:style style:family="text" style:name="T3619">
      <style:text-properties fo:letter-spacing="-0.3pt"/>
    </style:style>
    <style:style style:family="text" style:name="T3620">
      <style:text-properties fo:letter-spacing="-0.3pt"/>
    </style:style>
    <style:style style:family="text" style:name="T3621">
      <style:text-properties fo:letter-spacing="-0.3pt"/>
    </style:style>
    <style:style style:family="text" style:name="T3622">
      <style:text-properties fo:letter-spacing="-0.3pt"/>
    </style:style>
    <style:style style:family="text" style:name="T3623">
      <style:text-properties fo:letter-spacing="-0.3pt"/>
    </style:style>
    <style:style style:parent-style-name="716" style:family="paragraph" style:name="P535">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24">
      <style:text-properties fo:letter-spacing="-0.15pt"/>
    </style:style>
    <style:style style:family="text" style:name="T3625">
      <style:text-properties fo:letter-spacing="-0.15pt"/>
    </style:style>
    <style:style style:family="text" style:name="T3626">
      <style:text-properties fo:letter-spacing="-0.15pt"/>
    </style:style>
    <style:style style:family="text" style:name="T3627">
      <style:text-properties fo:letter-spacing="-0.15pt"/>
    </style:style>
    <style:style style:family="text" style:name="T3628">
      <style:text-properties fo:letter-spacing="-0.15pt"/>
    </style:style>
    <style:style style:family="text" style:name="T3629">
      <style:text-properties fo:letter-spacing="-0.15pt"/>
    </style:style>
    <style:style style:family="text" style:name="T3630">
      <style:text-properties fo:letter-spacing="-0.15pt"/>
    </style:style>
    <style:style style:family="text" style:name="T3631">
      <style:text-properties fo:letter-spacing="-0.15pt"/>
    </style:style>
    <style:style style:family="text" style:name="T3632">
      <style:text-properties fo:letter-spacing="-0.15pt"/>
    </style:style>
    <style:style style:family="text" style:name="T3633">
      <style:text-properties fo:letter-spacing="-0.15pt"/>
    </style:style>
    <style:style style:family="text" style:name="T3634">
      <style:text-properties fo:letter-spacing="-0.15pt"/>
    </style:style>
    <style:style style:family="text" style:name="T3635">
      <style:text-properties fo:letter-spacing="-0.15pt"/>
    </style:style>
    <style:style style:family="text" style:name="T3636">
      <style:text-properties fo:letter-spacing="-0.15pt"/>
    </style:style>
    <style:style style:parent-style-name="712" style:master-page-name="MasterPage23" style:family="paragraph" style:name="P536">
      <style:paragraph-properties fo:margin-left="0.1993cm" fo:margin-right="0cm" fo:text-indent="0cm" fo:margin-top="3.7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637">
      <style:text-properties fo:color="#999999" fo:font-size="12pt" fo:font-style="italic"/>
    </style:style>
    <style:style style:family="text" style:name="T3638">
      <style:text-properties fo:color="#999999" fo:font-size="12pt" fo:letter-spacing="-0.1pt" fo:font-style="italic"/>
    </style:style>
    <style:style style:parent-style-name="716" style:family="paragraph" style:name="P537">
      <style:paragraph-properties fo:margin-left="0cm" fo:margin-right="0cm" fo:text-indent="0cm" fo:margin-top="0.3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Graphics" style:family="graphic" style:name="gr5">
      <style:graphic-properties draw:image-opacity="100%" style:repeat="stretch" fo:margin-left="0cm" fo:margin-right="0cm" fo:margin-top="0cm" fo:margin-bottom="0cm" style:horizontal-pos="from-left" style:horizontal-rel="page" style:vertical-pos="from-top" style:vertical-rel="paragraph" fo:background-color="transparent"/>
    </style:style>
    <style:style style:parent-style-name="708" style:master-page-name="MasterPage24" style:family="paragraph" style:name="P538">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3639">
      <style:text-properties fo:letter-spacing="-0.3pt"/>
    </style:style>
    <style:style style:family="text" style:name="T3640">
      <style:text-properties fo:letter-spacing="-0.3pt"/>
    </style:style>
    <style:style style:family="text" style:name="T3641">
      <style:text-properties fo:letter-spacing="-0.3pt"/>
    </style:style>
    <style:style style:family="text" style:name="T3642">
      <style:text-properties fo:letter-spacing="-0.1pt"/>
    </style:style>
    <style:style style:parent-style-name="716" style:family="paragraph" style:name="P539">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43">
      <style:text-properties fo:font-size="17pt" fo:font-weight="bold"/>
    </style:style>
    <style:style style:family="text" style:name="T3644">
      <style:text-properties fo:font-size="17pt" fo:font-weight="bold"/>
    </style:style>
    <style:style style:parent-style-name="716" style:family="paragraph" style:name="P54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45">
      <style:text-properties fo:letter-spacing="-0.3pt"/>
    </style:style>
    <style:style style:family="text" style:name="T3646">
      <style:text-properties fo:letter-spacing="-0.3pt"/>
    </style:style>
    <style:style style:family="text" style:name="T3647">
      <style:text-properties fo:letter-spacing="-0.3pt"/>
    </style:style>
    <style:style style:family="text" style:name="T3648">
      <style:text-properties fo:letter-spacing="-0.3pt"/>
    </style:style>
    <style:style style:family="text" style:name="T3649">
      <style:text-properties fo:letter-spacing="-0.3pt"/>
    </style:style>
    <style:style style:family="text" style:name="T3650">
      <style:text-properties fo:letter-spacing="-0.3pt"/>
    </style:style>
    <style:style style:family="text" style:name="T3651">
      <style:text-properties fo:letter-spacing="-0.3pt"/>
    </style:style>
    <style:style style:family="text" style:name="T3652">
      <style:text-properties fo:letter-spacing="-0.3pt"/>
    </style:style>
    <style:style style:family="text" style:name="T3653">
      <style:text-properties fo:letter-spacing="-0.3pt"/>
    </style:style>
    <style:style style:family="text" style:name="T3654">
      <style:text-properties fo:letter-spacing="-0.3pt"/>
    </style:style>
    <style:style style:family="text" style:name="T3655">
      <style:text-properties fo:letter-spacing="-0.3pt"/>
    </style:style>
    <style:style style:family="text" style:name="T3656">
      <style:text-properties fo:letter-spacing="-0.3pt"/>
    </style:style>
    <style:style style:parent-style-name="716" style:family="paragraph" style:name="P541">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57">
      <style:text-properties fo:font-size="18pt"/>
    </style:style>
    <style:style style:family="text" style:name="T3658">
      <style:text-properties fo:font-size="18pt"/>
    </style:style>
    <style:style style:parent-style-name="712" style:family="paragraph" style:name="P542">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659">
      <style:text-properties fo:font-size="14pt" fo:font-weight="bold"/>
    </style:style>
    <style:style style:family="text" style:name="T3660">
      <style:text-properties fo:font-size="14pt" fo:letter-spacing="-0.3pt" fo:font-weight="bold"/>
    </style:style>
    <style:style style:family="text" style:name="T3661">
      <style:text-properties fo:font-size="14pt" fo:letter-spacing="-0.1pt" fo:font-weight="bold"/>
    </style:style>
    <style:style style:parent-style-name="716" style:family="paragraph" style:name="P543">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62">
      <style:text-properties fo:font-size="17pt" fo:font-weight="bold"/>
    </style:style>
    <style:style style:family="text" style:name="T3663">
      <style:text-properties fo:font-size="17pt" fo:font-weight="bold"/>
    </style:style>
    <style:style style:parent-style-name="716" style:family="paragraph" style:name="P54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64">
      <style:text-properties fo:letter-spacing="-0.1pt"/>
    </style:style>
    <style:style style:family="text" style:name="T3665">
      <style:text-properties fo:letter-spacing="-0.1pt"/>
    </style:style>
    <style:style style:family="text" style:name="T3666">
      <style:text-properties fo:letter-spacing="-0.1pt"/>
    </style:style>
    <style:style style:family="text" style:name="T3667">
      <style:text-properties fo:letter-spacing="-0.1pt"/>
    </style:style>
    <style:style style:family="text" style:name="T3668">
      <style:text-properties fo:letter-spacing="-0.1pt"/>
    </style:style>
    <style:style style:family="text" style:name="T3669">
      <style:text-properties fo:letter-spacing="-0.1pt"/>
    </style:style>
    <style:style style:family="text" style:name="T3670">
      <style:text-properties fo:letter-spacing="-0.1pt"/>
    </style:style>
    <style:style style:family="text" style:name="T3671">
      <style:text-properties fo:letter-spacing="-0.1pt"/>
    </style:style>
    <style:style style:family="text" style:name="T3672">
      <style:text-properties fo:letter-spacing="-0.1pt"/>
    </style:style>
    <style:style style:family="text" style:name="T3673">
      <style:text-properties fo:letter-spacing="-0.1pt"/>
    </style:style>
    <style:style style:family="text" style:name="T3674">
      <style:text-properties fo:letter-spacing="-0.1pt"/>
    </style:style>
    <style:style style:family="text" style:name="T3675">
      <style:text-properties fo:letter-spacing="-0.1pt"/>
    </style:style>
    <style:style style:family="text" style:name="T3676">
      <style:text-properties fo:letter-spacing="-0.1pt"/>
    </style:style>
    <style:style style:family="text" style:name="T3677">
      <style:text-properties fo:letter-spacing="-0.1pt"/>
    </style:style>
    <style:style style:parent-style-name="716" style:family="paragraph" style:name="P54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4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78">
      <style:text-properties fo:letter-spacing="-0.15pt"/>
    </style:style>
    <style:style style:family="text" style:name="T3679">
      <style:text-properties fo:letter-spacing="-0.15pt"/>
    </style:style>
    <style:style style:family="text" style:name="T3680">
      <style:text-properties fo:letter-spacing="-0.15pt"/>
    </style:style>
    <style:style style:family="text" style:name="T3681">
      <style:text-properties fo:letter-spacing="-0.15pt"/>
    </style:style>
    <style:style style:family="text" style:name="T3682">
      <style:text-properties fo:letter-spacing="-0.15pt"/>
    </style:style>
    <style:style style:family="text" style:name="T3683">
      <style:text-properties fo:letter-spacing="-0.15pt"/>
    </style:style>
    <style:style style:family="text" style:name="T3684">
      <style:text-properties fo:letter-spacing="-0.15pt"/>
    </style:style>
    <style:style style:family="text" style:name="T3685">
      <style:text-properties fo:letter-spacing="-0.15pt"/>
    </style:style>
    <style:style style:family="text" style:name="T3686">
      <style:text-properties fo:letter-spacing="-0.15pt"/>
    </style:style>
    <style:style style:family="text" style:name="T3687">
      <style:text-properties fo:letter-spacing="-0.15pt"/>
    </style:style>
    <style:style style:family="text" style:name="T3688">
      <style:text-properties fo:letter-spacing="-0.15pt"/>
    </style:style>
    <style:style style:parent-style-name="716" style:family="paragraph" style:name="P547">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89">
      <style:text-properties fo:font-size="18pt"/>
    </style:style>
    <style:style style:family="text" style:name="T3690">
      <style:text-properties fo:font-size="18pt"/>
    </style:style>
    <style:style style:parent-style-name="712" style:family="paragraph" style:name="P548">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691">
      <style:text-properties fo:font-size="14pt" fo:font-weight="bold"/>
    </style:style>
    <style:style style:family="text" style:name="T3692">
      <style:text-properties fo:font-size="14pt" fo:letter-spacing="-0.5pt" fo:font-weight="bold"/>
    </style:style>
    <style:style style:family="text" style:name="T3693">
      <style:text-properties fo:font-size="14pt" fo:letter-spacing="-0.1pt" fo:font-weight="bold"/>
    </style:style>
    <style:style style:parent-style-name="716" style:family="paragraph" style:name="P549">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94">
      <style:text-properties fo:font-size="17pt" fo:font-weight="bold"/>
    </style:style>
    <style:style style:family="text" style:name="T3695">
      <style:text-properties fo:font-size="17pt" fo:font-weight="bold"/>
    </style:style>
    <style:style style:parent-style-name="716" style:family="paragraph" style:name="P55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696">
      <style:text-properties fo:letter-spacing="-0.1pt"/>
    </style:style>
    <style:style style:family="text" style:name="T3697">
      <style:text-properties fo:letter-spacing="-0.1pt"/>
    </style:style>
    <style:style style:family="text" style:name="T3698">
      <style:text-properties fo:letter-spacing="-0.1pt"/>
    </style:style>
    <style:style style:family="text" style:name="T3699">
      <style:text-properties fo:letter-spacing="-0.1pt"/>
    </style:style>
    <style:style style:family="text" style:name="T3700">
      <style:text-properties fo:letter-spacing="-0.1pt"/>
    </style:style>
    <style:style style:family="text" style:name="T3701">
      <style:text-properties fo:letter-spacing="-0.1pt"/>
    </style:style>
    <style:style style:family="text" style:name="T3702">
      <style:text-properties fo:letter-spacing="-0.1pt"/>
    </style:style>
    <style:style style:family="text" style:name="T3703">
      <style:text-properties fo:letter-spacing="-0.1pt"/>
    </style:style>
    <style:style style:family="text" style:name="T3704">
      <style:text-properties fo:letter-spacing="-0.1pt"/>
    </style:style>
    <style:style style:family="text" style:name="T3705">
      <style:text-properties fo:letter-spacing="-0.1pt"/>
    </style:style>
    <style:style style:family="text" style:name="T3706">
      <style:text-properties fo:letter-spacing="-0.1pt"/>
    </style:style>
    <style:style style:family="text" style:name="T3707">
      <style:text-properties fo:letter-spacing="-0.1pt"/>
    </style:style>
    <style:style style:family="text" style:name="T3708">
      <style:text-properties fo:letter-spacing="-0.1pt"/>
    </style:style>
    <style:style style:parent-style-name="716" style:family="paragraph" style:name="P551">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09">
      <style:text-properties fo:letter-spacing="-0.1pt"/>
    </style:style>
    <style:style style:parent-style-name="716" style:family="paragraph" style:name="P55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53">
      <style:paragraph-properties fo:margin-left="0cm" fo:margin-right="1.005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10">
      <style:text-properties fo:letter-spacing="-0.25pt"/>
    </style:style>
    <style:style style:family="text" style:name="T3711">
      <style:text-properties fo:letter-spacing="-0.25pt"/>
    </style:style>
    <style:style style:family="text" style:name="T3712">
      <style:text-properties fo:letter-spacing="-0.25pt"/>
    </style:style>
    <style:style style:family="text" style:name="T3713">
      <style:text-properties fo:letter-spacing="-0.25pt"/>
    </style:style>
    <style:style style:family="text" style:name="T3714">
      <style:text-properties fo:letter-spacing="-0.25pt"/>
    </style:style>
    <style:style style:family="text" style:name="T3715">
      <style:text-properties fo:letter-spacing="-0.25pt"/>
    </style:style>
    <style:style style:family="text" style:name="T3716">
      <style:text-properties fo:letter-spacing="-0.25pt"/>
    </style:style>
    <style:style style:family="text" style:name="T3717">
      <style:text-properties fo:letter-spacing="-0.25pt"/>
    </style:style>
    <style:style style:family="text" style:name="T3718">
      <style:text-properties fo:letter-spacing="-0.25pt"/>
    </style:style>
    <style:style style:family="text" style:name="T3719">
      <style:text-properties fo:letter-spacing="-0.25pt"/>
    </style:style>
    <style:style style:parent-style-name="716" style:family="paragraph" style:name="P55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20">
      <style:text-properties fo:font-size="13pt"/>
    </style:style>
    <style:style style:family="text" style:name="T3721">
      <style:text-properties fo:font-size="13pt"/>
    </style:style>
    <style:style style:parent-style-name="716" style:family="paragraph" style:name="P555">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22">
      <style:text-properties fo:font-size="13pt"/>
    </style:style>
    <style:style style:family="text" style:name="T3723">
      <style:text-properties fo:font-size="13pt"/>
    </style:style>
    <style:style style:parent-style-name="712" style:family="paragraph" style:name="P556">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724">
      <style:text-properties fo:font-size="14pt" fo:font-weight="bold"/>
    </style:style>
    <style:style style:family="text" style:name="T3725">
      <style:text-properties fo:font-size="14pt" fo:letter-spacing="-0.3pt" fo:font-weight="bold"/>
    </style:style>
    <style:style style:family="text" style:name="T3726">
      <style:text-properties fo:font-size="14pt" fo:font-weight="bold"/>
    </style:style>
    <style:style style:family="text" style:name="T3727">
      <style:text-properties fo:font-size="14pt" fo:letter-spacing="-0.3pt" fo:font-weight="bold"/>
    </style:style>
    <style:style style:family="text" style:name="T3728">
      <style:text-properties fo:font-size="14pt" fo:letter-spacing="-0.1pt" fo:font-weight="bold"/>
    </style:style>
    <style:style style:parent-style-name="716" style:family="paragraph" style:name="P557">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29">
      <style:text-properties fo:font-size="17pt" fo:font-weight="bold"/>
    </style:style>
    <style:style style:family="text" style:name="T3730">
      <style:text-properties fo:font-size="17pt" fo:font-weight="bold"/>
    </style:style>
    <style:style style:parent-style-name="716" style:family="paragraph" style:name="P558">
      <style:paragraph-properties fo:margin-left="0cm" fo:margin-right="0.5027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31">
      <style:text-properties fo:letter-spacing="-0.15pt"/>
    </style:style>
    <style:style style:family="text" style:name="T3732">
      <style:text-properties fo:letter-spacing="-0.15pt"/>
    </style:style>
    <style:style style:family="text" style:name="T3733">
      <style:text-properties fo:letter-spacing="-0.15pt"/>
    </style:style>
    <style:style style:family="text" style:name="T3734">
      <style:text-properties fo:letter-spacing="-0.15pt"/>
    </style:style>
    <style:style style:family="text" style:name="T3735">
      <style:text-properties fo:letter-spacing="-0.15pt"/>
    </style:style>
    <style:style style:family="text" style:name="T3736">
      <style:text-properties fo:letter-spacing="-0.15pt"/>
    </style:style>
    <style:style style:family="text" style:name="T3737">
      <style:text-properties fo:letter-spacing="-0.15pt"/>
    </style:style>
    <style:style style:family="text" style:name="T3738">
      <style:text-properties fo:letter-spacing="-0.15pt"/>
    </style:style>
    <style:style style:family="text" style:name="T3739">
      <style:text-properties fo:letter-spacing="-0.15pt"/>
    </style:style>
    <style:style style:family="text" style:name="T3740">
      <style:text-properties fo:letter-spacing="-0.15pt"/>
    </style:style>
    <style:style style:family="text" style:name="T3741">
      <style:text-properties fo:letter-spacing="-0.15pt"/>
    </style:style>
    <style:style style:family="text" style:name="T3742">
      <style:text-properties fo:letter-spacing="-0.15pt"/>
    </style:style>
    <style:style style:family="text" style:name="T3743">
      <style:text-properties fo:letter-spacing="-0.15pt"/>
    </style:style>
    <style:style style:parent-style-name="716" style:family="paragraph" style:name="P55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60">
      <style:paragraph-properties fo:text-align="justify" fo:margin-left="0cm" fo:margin-right="1.351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44">
      <style:text-properties fo:letter-spacing="-0.05pt"/>
    </style:style>
    <style:style style:family="text" style:name="T3745">
      <style:text-properties fo:letter-spacing="-0.05pt"/>
    </style:style>
    <style:style style:family="text" style:name="T3746">
      <style:text-properties fo:letter-spacing="-0.05pt"/>
    </style:style>
    <style:style style:family="text" style:name="T3747">
      <style:text-properties fo:letter-spacing="-0.05pt"/>
    </style:style>
    <style:style style:family="text" style:name="T3748">
      <style:text-properties fo:letter-spacing="-0.05pt"/>
    </style:style>
    <style:style style:family="text" style:name="T3749">
      <style:text-properties fo:letter-spacing="-0.05pt"/>
    </style:style>
    <style:style style:family="text" style:name="T3750">
      <style:text-properties fo:letter-spacing="-0.05pt"/>
    </style:style>
    <style:style style:family="text" style:name="T3751">
      <style:text-properties fo:letter-spacing="-0.05pt"/>
    </style:style>
    <style:style style:family="text" style:name="T3752">
      <style:text-properties fo:letter-spacing="-0.05pt"/>
    </style:style>
    <style:style style:family="text" style:name="T3753">
      <style:text-properties fo:letter-spacing="-0.05pt"/>
    </style:style>
    <style:style style:family="text" style:name="T3754">
      <style:text-properties fo:letter-spacing="-0.05pt"/>
    </style:style>
    <style:style style:family="text" style:name="T3755">
      <style:text-properties fo:letter-spacing="-0.05pt"/>
    </style:style>
    <style:style style:family="text" style:name="T3756">
      <style:text-properties fo:letter-spacing="-0.05pt"/>
    </style:style>
    <style:style style:family="text" style:name="T3757">
      <style:text-properties fo:letter-spacing="-0.05pt"/>
    </style:style>
    <style:style style:family="text" style:name="T3758">
      <style:text-properties fo:letter-spacing="-0.05pt"/>
    </style:style>
    <style:style style:family="text" style:name="T3759">
      <style:text-properties fo:letter-spacing="-0.05pt"/>
    </style:style>
    <style:style style:family="text" style:name="T3760">
      <style:text-properties fo:letter-spacing="-0.05pt"/>
    </style:style>
    <style:style style:family="text" style:name="T3761">
      <style:text-properties fo:letter-spacing="-0.1pt"/>
    </style:style>
    <style:style style:family="text" style:name="T3762">
      <style:text-properties fo:letter-spacing="-0.1pt"/>
    </style:style>
    <style:style style:family="text" style:name="T3763">
      <style:text-properties fo:letter-spacing="-0.1pt"/>
    </style:style>
    <style:style style:family="text" style:name="T3764">
      <style:text-properties fo:letter-spacing="-0.1pt"/>
    </style:style>
    <style:style style:family="text" style:name="T3765">
      <style:text-properties fo:letter-spacing="-0.1pt"/>
    </style:style>
    <style:style style:family="text" style:name="T3766">
      <style:text-properties fo:letter-spacing="-0.1pt"/>
    </style:style>
    <style:style style:family="text" style:name="T3767">
      <style:text-properties fo:letter-spacing="-0.1pt"/>
    </style:style>
    <style:style style:family="text" style:name="T3768">
      <style:text-properties fo:letter-spacing="-0.1pt"/>
    </style:style>
    <style:style style:family="text" style:name="T3769">
      <style:text-properties fo:letter-spacing="-0.1pt"/>
    </style:style>
    <style:style style:family="text" style:name="T3770">
      <style:text-properties fo:letter-spacing="-0.1pt"/>
    </style:style>
    <style:style style:family="text" style:name="T3771">
      <style:text-properties fo:letter-spacing="-0.1pt"/>
    </style:style>
    <style:style style:family="text" style:name="T3772">
      <style:text-properties fo:letter-spacing="-0.1pt"/>
    </style:style>
    <style:style style:family="text" style:name="T3773">
      <style:text-properties fo:letter-spacing="-0.1pt"/>
    </style:style>
    <style:style style:family="text" style:name="T3774">
      <style:text-properties fo:letter-spacing="-0.1pt"/>
    </style:style>
    <style:style style:family="text" style:name="T3775">
      <style:text-properties fo:letter-spacing="-0.1pt"/>
    </style:style>
    <style:style style:parent-style-name="707" style:master-page-name="MasterPage25" style:family="paragraph" style:name="P561">
      <style:paragraph-properties fo:margin-left="1.469cm" fo:margin-right="0cm" fo:text-indent="0cm"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3776">
      <style:text-properties fo:letter-spacing="-0.45pt"/>
    </style:style>
    <style:style style:family="text" style:name="T3777">
      <style:text-properties fo:letter-spacing="-0.3pt"/>
    </style:style>
    <style:style style:family="text" style:name="T3778">
      <style:text-properties fo:letter-spacing="-0.3pt"/>
    </style:style>
    <style:style style:family="text" style:name="T3779">
      <style:text-properties fo:letter-spacing="-0.3pt"/>
    </style:style>
    <style:style style:family="text" style:name="T3780">
      <style:text-properties fo:letter-spacing="-0.1pt"/>
    </style:style>
    <style:style style:parent-style-name="712" style:family="paragraph" style:name="P562">
      <style:paragraph-properties fo:margin-left="1.469cm" fo:margin-right="0cm" fo:text-indent="0cm" fo:margin-top="6.25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781">
      <style:text-properties fo:color="#999999" fo:font-size="12pt" fo:font-style="italic"/>
    </style:style>
    <style:style style:family="text" style:name="T3782">
      <style:text-properties fo:color="#999999" fo:font-size="12pt" fo:letter-spacing="-0.1pt" fo:font-style="italic"/>
    </style:style>
    <style:style style:parent-style-name="716" style:family="paragraph" style:name="P56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Graphics" style:family="graphic" style:name="gr6">
      <style:graphic-properties draw:image-opacity="100%" style:repeat="stretch" fo:margin-left="0cm" fo:margin-right="0cm" fo:margin-top="0cm" fo:margin-bottom="0cm" style:horizontal-pos="from-left" style:horizontal-rel="page" style:vertical-pos="from-top" style:vertical-rel="paragraph" fo:background-color="transparent"/>
    </style:style>
    <style:style style:parent-style-name="716" style:master-page-name="MasterPage26" style:family="paragraph" style:name="P564">
      <style:paragraph-properties fo:line-height="115%" fo:margin-left="0cm" fo:margin-right="0.4498cm" fo:text-indent="0cm" fo:margin-top="3.5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83">
      <style:text-properties fo:letter-spacing="-0.15pt"/>
    </style:style>
    <style:style style:family="text" style:name="T3784">
      <style:text-properties fo:letter-spacing="-0.15pt"/>
    </style:style>
    <style:style style:family="text" style:name="T3785">
      <style:text-properties fo:letter-spacing="-0.15pt"/>
    </style:style>
    <style:style style:family="text" style:name="T3786">
      <style:text-properties fo:letter-spacing="-0.15pt"/>
    </style:style>
    <style:style style:family="text" style:name="T3787">
      <style:text-properties fo:letter-spacing="-0.15pt"/>
    </style:style>
    <style:style style:family="text" style:name="T3788">
      <style:text-properties fo:letter-spacing="-0.15pt"/>
    </style:style>
    <style:style style:family="text" style:name="T3789">
      <style:text-properties fo:letter-spacing="-0.15pt"/>
    </style:style>
    <style:style style:family="text" style:name="T3790">
      <style:text-properties fo:letter-spacing="-0.15pt"/>
    </style:style>
    <style:style style:family="text" style:name="T3791">
      <style:text-properties fo:letter-spacing="-0.15pt"/>
    </style:style>
    <style:style style:family="text" style:name="T3792">
      <style:text-properties fo:letter-spacing="-0.15pt"/>
    </style:style>
    <style:style style:family="text" style:name="T3793">
      <style:text-properties fo:letter-spacing="-0.15pt"/>
    </style:style>
    <style:style style:family="text" style:name="T3794">
      <style:text-properties fo:letter-spacing="-0.15pt"/>
    </style:style>
    <style:style style:parent-style-name="716" style:family="paragraph" style:name="P565">
      <style:paragraph-properties fo:line-height="115%" fo:margin-left="0cm" fo:margin-right="0.52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795">
      <style:text-properties fo:letter-spacing="-0.15pt"/>
    </style:style>
    <style:style style:family="text" style:name="T3796">
      <style:text-properties fo:letter-spacing="-0.15pt"/>
    </style:style>
    <style:style style:family="text" style:name="T3797">
      <style:text-properties fo:letter-spacing="-0.15pt"/>
    </style:style>
    <style:style style:family="text" style:name="T3798">
      <style:text-properties fo:letter-spacing="-0.15pt"/>
    </style:style>
    <style:style style:family="text" style:name="T3799">
      <style:text-properties fo:letter-spacing="-0.15pt"/>
    </style:style>
    <style:style style:family="text" style:name="T3800">
      <style:text-properties fo:letter-spacing="-0.15pt"/>
    </style:style>
    <style:style style:family="text" style:name="T3801">
      <style:text-properties fo:letter-spacing="-0.15pt"/>
    </style:style>
    <style:style style:family="text" style:name="T3802">
      <style:text-properties fo:letter-spacing="-0.15pt"/>
    </style:style>
    <style:style style:family="text" style:name="T3803">
      <style:text-properties fo:letter-spacing="-0.15pt"/>
    </style:style>
    <style:style style:family="text" style:name="T3804">
      <style:text-properties fo:letter-spacing="-0.15pt"/>
    </style:style>
    <style:style style:family="text" style:name="T3805">
      <style:text-properties fo:letter-spacing="-0.15pt"/>
    </style:style>
    <style:style style:family="text" style:name="T3806">
      <style:text-properties fo:letter-spacing="-0.15pt"/>
    </style:style>
    <style:style style:parent-style-name="716" style:family="paragraph" style:name="P566">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07">
      <style:text-properties fo:letter-spacing="-0.15pt"/>
    </style:style>
    <style:style style:family="text" style:name="T3808">
      <style:text-properties fo:letter-spacing="-0.15pt"/>
    </style:style>
    <style:style style:family="text" style:name="T3809">
      <style:text-properties fo:letter-spacing="-0.15pt"/>
    </style:style>
    <style:style style:family="text" style:name="T3810">
      <style:text-properties fo:letter-spacing="-0.15pt"/>
    </style:style>
    <style:style style:family="text" style:name="T3811">
      <style:text-properties fo:letter-spacing="-0.15pt"/>
    </style:style>
    <style:style style:family="text" style:name="T3812">
      <style:text-properties fo:letter-spacing="-0.15pt"/>
    </style:style>
    <style:style style:family="text" style:name="T3813">
      <style:text-properties fo:letter-spacing="-0.15pt"/>
    </style:style>
    <style:style style:family="text" style:name="T3814">
      <style:text-properties fo:letter-spacing="-0.15pt"/>
    </style:style>
    <style:style style:family="text" style:name="T3815">
      <style:text-properties fo:letter-spacing="-0.15pt"/>
    </style:style>
    <style:style style:family="text" style:name="T3816">
      <style:text-properties fo:letter-spacing="-0.15pt"/>
    </style:style>
    <style:style style:family="text" style:name="T3817">
      <style:text-properties fo:letter-spacing="-0.15pt"/>
    </style:style>
    <style:style style:parent-style-name="716" style:family="paragraph" style:name="P567">
      <style:paragraph-properties fo:margin-left="0cm" fo:margin-right="0.598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18">
      <style:text-properties fo:letter-spacing="-0.15pt"/>
    </style:style>
    <style:style style:family="text" style:name="T3819">
      <style:text-properties fo:letter-spacing="-0.15pt"/>
    </style:style>
    <style:style style:family="text" style:name="T3820">
      <style:text-properties fo:letter-spacing="-0.15pt"/>
    </style:style>
    <style:style style:family="text" style:name="T3821">
      <style:text-properties fo:letter-spacing="-0.15pt"/>
    </style:style>
    <style:style style:family="text" style:name="T3822">
      <style:text-properties fo:letter-spacing="-0.15pt"/>
    </style:style>
    <style:style style:family="text" style:name="T3823">
      <style:text-properties fo:letter-spacing="-0.15pt"/>
    </style:style>
    <style:style style:family="text" style:name="T3824">
      <style:text-properties fo:letter-spacing="-0.15pt"/>
    </style:style>
    <style:style style:family="text" style:name="T3825">
      <style:text-properties fo:letter-spacing="-0.15pt"/>
    </style:style>
    <style:style style:family="text" style:name="T3826">
      <style:text-properties fo:letter-spacing="-0.15pt"/>
    </style:style>
    <style:style style:family="text" style:name="T3827">
      <style:text-properties fo:letter-spacing="-0.15pt"/>
    </style:style>
    <style:style style:family="text" style:name="T3828">
      <style:text-properties fo:letter-spacing="-0.15pt"/>
    </style:style>
    <style:style style:family="text" style:name="T3829">
      <style:text-properties fo:letter-spacing="-0.15pt"/>
    </style:style>
    <style:style style:parent-style-name="716" style:family="paragraph" style:name="P568">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30">
      <style:text-properties fo:font-size="11.5pt"/>
    </style:style>
    <style:style style:family="text" style:name="T3831">
      <style:text-properties fo:font-size="11.5pt"/>
    </style:style>
    <style:style style:parent-style-name="716" style:family="paragraph" style:name="P56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32">
      <style:text-properties fo:letter-spacing="-0.1pt"/>
    </style:style>
    <style:style style:family="text" style:name="T3833">
      <style:text-properties fo:letter-spacing="-0.1pt"/>
    </style:style>
    <style:style style:family="text" style:name="T3834">
      <style:text-properties fo:letter-spacing="-0.1pt"/>
    </style:style>
    <style:style style:family="text" style:name="T3835">
      <style:text-properties fo:letter-spacing="-0.1pt"/>
    </style:style>
    <style:style style:family="text" style:name="T3836">
      <style:text-properties fo:letter-spacing="-0.1pt"/>
    </style:style>
    <style:style style:family="text" style:name="T3837">
      <style:text-properties fo:letter-spacing="-0.1pt"/>
    </style:style>
    <style:style style:family="text" style:name="T3838">
      <style:text-properties fo:letter-spacing="-0.1pt"/>
    </style:style>
    <style:style style:family="text" style:name="T3839">
      <style:text-properties fo:letter-spacing="-0.1pt"/>
    </style:style>
    <style:style style:family="text" style:name="T3840">
      <style:text-properties fo:letter-spacing="-0.1pt"/>
    </style:style>
    <style:style style:family="text" style:name="T3841">
      <style:text-properties fo:letter-spacing="-0.1pt"/>
    </style:style>
    <style:style style:family="text" style:name="T3842">
      <style:text-properties fo:letter-spacing="-0.1pt"/>
    </style:style>
    <style:style style:family="text" style:name="T3843">
      <style:text-properties fo:letter-spacing="-0.1pt"/>
    </style:style>
    <style:style style:family="text" style:name="T3844">
      <style:text-properties fo:letter-spacing="-0.1pt"/>
    </style:style>
    <style:style style:family="text" style:name="T3845">
      <style:text-properties fo:letter-spacing="-0.1pt"/>
    </style:style>
    <style:style style:parent-style-name="716" style:family="paragraph" style:name="P57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71">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46">
      <style:text-properties fo:letter-spacing="-0.1pt"/>
    </style:style>
    <style:style style:family="text" style:name="T3847">
      <style:text-properties fo:letter-spacing="-0.1pt"/>
    </style:style>
    <style:style style:family="text" style:name="T3848">
      <style:text-properties fo:letter-spacing="-0.1pt"/>
    </style:style>
    <style:style style:family="text" style:name="T3849">
      <style:text-properties fo:letter-spacing="-0.1pt"/>
    </style:style>
    <style:style style:family="text" style:name="T3850">
      <style:text-properties fo:letter-spacing="-0.1pt"/>
    </style:style>
    <style:style style:family="text" style:name="T3851">
      <style:text-properties fo:letter-spacing="-0.1pt"/>
    </style:style>
    <style:style style:family="text" style:name="T3852">
      <style:text-properties fo:letter-spacing="-0.1pt"/>
    </style:style>
    <style:style style:family="text" style:name="T3853">
      <style:text-properties fo:letter-spacing="-0.1pt"/>
    </style:style>
    <style:style style:family="text" style:name="T3854">
      <style:text-properties fo:letter-spacing="-0.1pt"/>
    </style:style>
    <style:style style:family="text" style:name="T3855">
      <style:text-properties fo:letter-spacing="-0.1pt"/>
    </style:style>
    <style:style style:family="text" style:name="T3856">
      <style:text-properties fo:letter-spacing="-0.1pt"/>
    </style:style>
    <style:style style:family="text" style:name="T3857">
      <style:text-properties fo:letter-spacing="-0.1pt"/>
    </style:style>
    <style:style style:family="text" style:name="T3858">
      <style:text-properties fo:letter-spacing="-0.1pt"/>
    </style:style>
    <style:style style:family="text" style:name="T3859">
      <style:text-properties fo:letter-spacing="-0.1pt"/>
    </style:style>
    <style:style style:parent-style-name="716" style:family="paragraph" style:name="P57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73">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60">
      <style:text-properties fo:letter-spacing="-0.25pt"/>
    </style:style>
    <style:style style:family="text" style:name="T3861">
      <style:text-properties fo:letter-spacing="-0.25pt"/>
    </style:style>
    <style:style style:family="text" style:name="T3862">
      <style:text-properties fo:letter-spacing="-0.25pt"/>
    </style:style>
    <style:style style:family="text" style:name="T3863">
      <style:text-properties fo:letter-spacing="-0.25pt"/>
    </style:style>
    <style:style style:family="text" style:name="T3864">
      <style:text-properties fo:letter-spacing="-0.25pt"/>
    </style:style>
    <style:style style:family="text" style:name="T3865">
      <style:text-properties fo:letter-spacing="-0.25pt"/>
    </style:style>
    <style:style style:family="text" style:name="T3866">
      <style:text-properties fo:letter-spacing="-0.25pt"/>
    </style:style>
    <style:style style:family="text" style:name="T3867">
      <style:text-properties fo:letter-spacing="-0.25pt"/>
    </style:style>
    <style:style style:family="text" style:name="T3868">
      <style:text-properties fo:letter-spacing="-0.25pt"/>
    </style:style>
    <style:style style:family="text" style:name="T3869">
      <style:text-properties fo:letter-spacing="-0.25pt"/>
    </style:style>
    <style:style style:family="text" style:name="T3870">
      <style:text-properties fo:letter-spacing="-0.25pt"/>
    </style:style>
    <style:style style:parent-style-name="716" style:family="paragraph" style:name="P57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575">
      <style:paragraph-properties fo:line-height="115%" fo:text-align="justify" fo:margin-left="0cm" fo:margin-right="2.189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71">
      <style:text-properties fo:letter-spacing="-0.25pt"/>
    </style:style>
    <style:style style:family="text" style:name="T3872">
      <style:text-properties fo:letter-spacing="-0.25pt"/>
    </style:style>
    <style:style style:family="text" style:name="T3873">
      <style:text-properties fo:letter-spacing="-0.25pt"/>
    </style:style>
    <style:style style:family="text" style:name="T3874">
      <style:text-properties fo:letter-spacing="-0.25pt"/>
    </style:style>
    <style:style style:family="text" style:name="T3875">
      <style:text-properties fo:letter-spacing="-0.25pt"/>
    </style:style>
    <style:style style:family="text" style:name="T3876">
      <style:text-properties fo:letter-spacing="-0.25pt"/>
    </style:style>
    <style:style style:family="text" style:name="T3877">
      <style:text-properties fo:letter-spacing="-0.25pt"/>
    </style:style>
    <style:style style:family="text" style:name="T3878">
      <style:text-properties fo:letter-spacing="-0.25pt"/>
    </style:style>
    <style:style style:family="text" style:name="T3879">
      <style:text-properties fo:letter-spacing="-0.25pt"/>
    </style:style>
    <style:style style:family="text" style:name="T3880">
      <style:text-properties fo:letter-spacing="-0.25pt"/>
    </style:style>
    <style:style style:family="text" style:name="T3881">
      <style:text-properties fo:letter-spacing="-0.25pt"/>
    </style:style>
    <style:style style:family="text" style:name="T3882">
      <style:text-properties fo:letter-spacing="-0.25pt"/>
    </style:style>
    <style:style style:family="text" style:name="T3883">
      <style:text-properties fo:letter-spacing="-0.1pt"/>
    </style:style>
    <style:style style:parent-style-name="716" style:family="paragraph" style:name="P576">
      <style:paragraph-properties fo:line-height="115%" fo:text-align="justify" fo:margin-left="0cm" fo:margin-right="0.998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884">
      <style:text-properties fo:letter-spacing="-0.25pt"/>
    </style:style>
    <style:style style:family="text" style:name="T3885">
      <style:text-properties fo:letter-spacing="-0.25pt"/>
    </style:style>
    <style:style style:family="text" style:name="T3886">
      <style:text-properties fo:letter-spacing="-0.25pt"/>
    </style:style>
    <style:style style:family="text" style:name="T3887">
      <style:text-properties fo:letter-spacing="-0.25pt"/>
    </style:style>
    <style:style style:family="text" style:name="T3888">
      <style:text-properties fo:letter-spacing="-0.25pt"/>
    </style:style>
    <style:style style:family="text" style:name="T3889">
      <style:text-properties fo:letter-spacing="-0.25pt"/>
    </style:style>
    <style:style style:family="text" style:name="T3890">
      <style:text-properties fo:letter-spacing="-0.25pt"/>
    </style:style>
    <style:style style:family="text" style:name="T3891">
      <style:text-properties fo:letter-spacing="-0.25pt"/>
    </style:style>
    <style:style style:family="text" style:name="T3892">
      <style:text-properties fo:letter-spacing="-0.25pt"/>
    </style:style>
    <style:style style:family="text" style:name="T3893">
      <style:text-properties fo:letter-spacing="-0.25pt"/>
    </style:style>
    <style:style style:family="text" style:name="T3894">
      <style:text-properties fo:letter-spacing="-0.25pt"/>
    </style:style>
    <style:style style:family="text" style:name="T3895">
      <style:text-properties fo:letter-spacing="-0.25pt"/>
    </style:style>
    <style:style style:family="text" style:name="T3896">
      <style:text-properties fo:letter-spacing="-0.25pt"/>
    </style:style>
    <style:style style:family="text" style:name="T3897">
      <style:text-properties fo:letter-spacing="-0.25pt"/>
    </style:style>
    <style:style style:family="text" style:name="T3898">
      <style:text-properties fo:letter-spacing="-0.25pt"/>
    </style:style>
    <style:style style:family="text" style:name="T3899">
      <style:text-properties fo:letter-spacing="-0.25pt"/>
    </style:style>
    <style:style style:family="text" style:name="T3900">
      <style:text-properties fo:letter-spacing="-0.25pt"/>
    </style:style>
    <style:style style:family="text" style:name="T3901">
      <style:text-properties fo:letter-spacing="-0.25pt"/>
    </style:style>
    <style:style style:family="text" style:name="T3902">
      <style:text-properties fo:letter-spacing="-0.25pt"/>
    </style:style>
    <style:style style:family="text" style:name="T3903">
      <style:text-properties fo:letter-spacing="-0.25pt"/>
    </style:style>
    <style:style style:family="text" style:name="T3904">
      <style:text-properties fo:letter-spacing="-0.25pt"/>
    </style:style>
    <style:style style:family="text" style:name="T3905">
      <style:text-properties fo:letter-spacing="-0.25pt"/>
    </style:style>
    <style:style style:family="text" style:name="T3906">
      <style:text-properties fo:letter-spacing="-0.25pt"/>
    </style:style>
    <style:style style:family="text" style:name="T3907">
      <style:text-properties fo:letter-spacing="-0.25pt"/>
    </style:style>
    <style:style style:family="text" style:name="T3908">
      <style:text-properties fo:letter-spacing="-0.25pt"/>
    </style:style>
    <style:style style:parent-style-name="716" style:master-page-name="MasterPage27" style:family="paragraph" style:name="P577">
      <style:paragraph-properties fo:margin-top="3.7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909">
      <style:text-properties fo:letter-spacing="-0.1pt"/>
    </style:style>
    <style:style style:family="text" style:name="T3910">
      <style:text-properties fo:letter-spacing="-0.05pt"/>
    </style:style>
    <style:style style:family="text" style:name="T3911">
      <style:text-properties fo:letter-spacing="-0.05pt"/>
    </style:style>
    <style:style style:family="text" style:name="T3912">
      <style:text-properties fo:letter-spacing="-0.05pt"/>
    </style:style>
    <style:style style:family="text" style:name="T3913">
      <style:text-properties fo:letter-spacing="-0.1pt"/>
    </style:style>
    <style:style style:parent-style-name="717" style:list-style-name="WWNum16" style:family="paragraph" style:name="P578">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914">
      <style:text-properties fo:font-size="12pt"/>
    </style:style>
    <style:style style:family="text" style:name="T3915">
      <style:text-properties fo:font-size="12pt" fo:letter-spacing="-0.1pt"/>
    </style:style>
    <style:style style:parent-style-name="717" style:list-style-name="WWNum16" style:family="paragraph" style:name="P579">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916">
      <style:text-properties fo:font-size="12pt"/>
    </style:style>
    <style:style style:family="text" style:name="T3917">
      <style:text-properties fo:font-size="12pt" fo:letter-spacing="-0.1pt"/>
    </style:style>
    <style:style style:parent-style-name="717" style:list-style-name="WWNum16" style:family="paragraph" style:name="P580">
      <style:paragraph-properties fo:line-height="115%" fo:margin-left="1.443cm" fo:margin-right="1.455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918">
      <style:text-properties fo:font-size="12pt"/>
    </style:style>
    <style:style style:family="text" style:name="T3919">
      <style:text-properties fo:font-size="12pt" fo:letter-spacing="-0.15pt"/>
    </style:style>
    <style:style style:family="text" style:name="T3920">
      <style:text-properties fo:font-size="12pt"/>
    </style:style>
    <style:style style:family="text" style:name="T3921">
      <style:text-properties fo:font-size="12pt" fo:letter-spacing="-0.15pt"/>
    </style:style>
    <style:style style:family="text" style:name="T3922">
      <style:text-properties fo:font-size="12pt"/>
    </style:style>
    <style:style style:family="text" style:name="T3923">
      <style:text-properties fo:font-size="12pt" fo:letter-spacing="-0.15pt"/>
    </style:style>
    <style:style style:family="text" style:name="T3924">
      <style:text-properties fo:font-size="12pt"/>
    </style:style>
    <style:style style:family="text" style:name="T3925">
      <style:text-properties fo:font-size="12pt" fo:letter-spacing="-0.15pt"/>
    </style:style>
    <style:style style:family="text" style:name="T3926">
      <style:text-properties fo:font-size="12pt"/>
    </style:style>
    <style:style style:family="text" style:name="T3927">
      <style:text-properties fo:font-size="12pt" fo:letter-spacing="-0.15pt"/>
    </style:style>
    <style:style style:family="text" style:name="T3928">
      <style:text-properties fo:font-size="12pt"/>
    </style:style>
    <style:style style:family="text" style:name="T3929">
      <style:text-properties fo:font-size="12pt" fo:letter-spacing="-0.15pt"/>
    </style:style>
    <style:style style:family="text" style:name="T3930">
      <style:text-properties fo:font-size="12pt"/>
    </style:style>
    <style:style style:family="text" style:name="T3931">
      <style:text-properties fo:font-size="12pt" fo:letter-spacing="-0.15pt"/>
    </style:style>
    <style:style style:family="text" style:name="T3932">
      <style:text-properties fo:font-size="12pt"/>
    </style:style>
    <style:style style:family="text" style:name="T3933">
      <style:text-properties fo:font-size="12pt" fo:letter-spacing="-0.15pt"/>
    </style:style>
    <style:style style:family="text" style:name="T3934">
      <style:text-properties fo:font-size="12pt"/>
    </style:style>
    <style:style style:family="text" style:name="T3935">
      <style:text-properties fo:font-size="12pt" fo:letter-spacing="-0.15pt"/>
    </style:style>
    <style:style style:family="text" style:name="T3936">
      <style:text-properties fo:font-size="12pt"/>
    </style:style>
    <style:style style:family="text" style:name="T3937">
      <style:text-properties fo:font-size="12pt" fo:letter-spacing="-0.15pt"/>
    </style:style>
    <style:style style:family="text" style:name="T3938">
      <style:text-properties fo:font-size="12pt"/>
    </style:style>
    <style:style style:family="text" style:name="T3939">
      <style:text-properties fo:font-size="12pt" fo:letter-spacing="-0.15pt"/>
    </style:style>
    <style:style style:family="text" style:name="T3940">
      <style:text-properties fo:font-size="12pt"/>
    </style:style>
    <style:style style:parent-style-name="717" style:list-style-name="WWNum16" style:family="paragraph" style:name="P581">
      <style:paragraph-properties fo:line-height="115%" fo:margin-left="1.443cm" fo:margin-right="0.5768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3941">
      <style:text-properties fo:font-size="12pt"/>
    </style:style>
    <style:style style:family="text" style:name="T3942">
      <style:text-properties fo:font-size="12pt" fo:letter-spacing="-0.1pt"/>
    </style:style>
    <style:style style:family="text" style:name="T3943">
      <style:text-properties fo:font-size="12pt"/>
    </style:style>
    <style:style style:family="text" style:name="T3944">
      <style:text-properties fo:font-size="12pt" fo:letter-spacing="-0.1pt"/>
    </style:style>
    <style:style style:family="text" style:name="T3945">
      <style:text-properties fo:font-size="12pt"/>
    </style:style>
    <style:style style:family="text" style:name="T3946">
      <style:text-properties fo:font-size="12pt" fo:letter-spacing="-0.1pt"/>
    </style:style>
    <style:style style:family="text" style:name="T3947">
      <style:text-properties fo:font-size="12pt"/>
    </style:style>
    <style:style style:family="text" style:name="T3948">
      <style:text-properties fo:font-size="12pt" fo:letter-spacing="-0.1pt"/>
    </style:style>
    <style:style style:family="text" style:name="T3949">
      <style:text-properties fo:font-size="12pt"/>
    </style:style>
    <style:style style:family="text" style:name="T3950">
      <style:text-properties fo:font-size="12pt" fo:letter-spacing="-0.1pt"/>
    </style:style>
    <style:style style:family="text" style:name="T3951">
      <style:text-properties fo:font-size="12pt"/>
    </style:style>
    <style:style style:family="text" style:name="T3952">
      <style:text-properties fo:font-size="12pt" fo:letter-spacing="-0.1pt"/>
    </style:style>
    <style:style style:family="text" style:name="T3953">
      <style:text-properties fo:font-size="12pt"/>
    </style:style>
    <style:style style:family="text" style:name="T3954">
      <style:text-properties fo:font-size="12pt" fo:letter-spacing="-0.1pt"/>
    </style:style>
    <style:style style:family="text" style:name="T3955">
      <style:text-properties fo:font-size="12pt"/>
    </style:style>
    <style:style style:family="text" style:name="T3956">
      <style:text-properties fo:font-size="12pt" fo:letter-spacing="-0.1pt"/>
    </style:style>
    <style:style style:family="text" style:name="T3957">
      <style:text-properties fo:font-size="12pt"/>
    </style:style>
    <style:style style:family="text" style:name="T3958">
      <style:text-properties fo:font-size="12pt" fo:letter-spacing="-0.1pt"/>
    </style:style>
    <style:style style:family="text" style:name="T3959">
      <style:text-properties fo:font-size="12pt"/>
    </style:style>
    <style:style style:family="text" style:name="T3960">
      <style:text-properties fo:font-size="12pt" fo:letter-spacing="-0.1pt"/>
    </style:style>
    <style:style style:family="text" style:name="T3961">
      <style:text-properties fo:font-size="12pt"/>
    </style:style>
    <style:style style:family="text" style:name="T3962">
      <style:text-properties fo:font-size="12pt" fo:letter-spacing="-0.1pt"/>
    </style:style>
    <style:style style:family="text" style:name="T3963">
      <style:text-properties fo:font-size="12pt"/>
    </style:style>
    <style:style style:family="text" style:name="T3964">
      <style:text-properties fo:font-size="12pt" fo:letter-spacing="-0.1pt"/>
    </style:style>
    <style:style style:family="text" style:name="T3965">
      <style:text-properties fo:font-size="12pt"/>
    </style:style>
    <style:style style:family="text" style:name="T3966">
      <style:text-properties fo:font-size="12pt" fo:letter-spacing="-0.1pt"/>
    </style:style>
    <style:style style:family="text" style:name="T3967">
      <style:text-properties fo:font-size="12pt"/>
    </style:style>
    <style:style style:family="text" style:name="T3968">
      <style:text-properties fo:font-size="12pt" fo:letter-spacing="-0.1pt"/>
    </style:style>
    <style:style style:family="text" style:name="T3969">
      <style:text-properties fo:font-size="12pt"/>
    </style:style>
    <style:style style:family="text" style:name="T3970">
      <style:text-properties fo:font-size="12pt" fo:letter-spacing="-0.1pt"/>
    </style:style>
    <style:style style:family="text" style:name="T3971">
      <style:text-properties fo:font-size="12pt"/>
    </style:style>
    <style:style style:parent-style-name="716" style:family="paragraph" style:name="P582">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972">
      <style:text-properties fo:letter-spacing="-0.15pt"/>
    </style:style>
    <style:style style:family="text" style:name="T3973">
      <style:text-properties fo:letter-spacing="-0.15pt"/>
    </style:style>
    <style:style style:family="text" style:name="T3974">
      <style:text-properties fo:letter-spacing="-0.15pt"/>
    </style:style>
    <style:style style:family="text" style:name="T3975">
      <style:text-properties fo:letter-spacing="-0.15pt"/>
    </style:style>
    <style:style style:family="text" style:name="T3976">
      <style:text-properties fo:letter-spacing="-0.15pt"/>
    </style:style>
    <style:style style:family="text" style:name="T3977">
      <style:text-properties fo:letter-spacing="-0.15pt"/>
    </style:style>
    <style:style style:family="text" style:name="T3978">
      <style:text-properties fo:letter-spacing="-0.15pt"/>
    </style:style>
    <style:style style:family="text" style:name="T3979">
      <style:text-properties fo:letter-spacing="-0.15pt"/>
    </style:style>
    <style:style style:family="text" style:name="T3980">
      <style:text-properties fo:letter-spacing="-0.15pt"/>
    </style:style>
    <style:style style:family="text" style:name="T3981">
      <style:text-properties fo:letter-spacing="-0.15pt"/>
    </style:style>
    <style:style style:family="text" style:name="T3982">
      <style:text-properties fo:letter-spacing="-0.15pt"/>
    </style:style>
    <style:style style:family="text" style:name="T3983">
      <style:text-properties fo:letter-spacing="-0.15pt"/>
    </style:style>
    <style:style style:parent-style-name="716" style:family="paragraph" style:name="P583">
      <style:paragraph-properties fo:margin-left="0cm" fo:margin-right="0.4498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3984">
      <style:text-properties fo:letter-spacing="-0.15pt"/>
    </style:style>
    <style:style style:family="text" style:name="T3985">
      <style:text-properties fo:letter-spacing="-0.15pt"/>
    </style:style>
    <style:style style:family="text" style:name="T3986">
      <style:text-properties fo:letter-spacing="-0.15pt"/>
    </style:style>
    <style:style style:family="text" style:name="T3987">
      <style:text-properties fo:letter-spacing="-0.15pt"/>
    </style:style>
    <style:style style:family="text" style:name="T3988">
      <style:text-properties fo:letter-spacing="-0.15pt"/>
    </style:style>
    <style:style style:family="text" style:name="T3989">
      <style:text-properties fo:letter-spacing="-0.15pt"/>
    </style:style>
    <style:style style:family="text" style:name="T3990">
      <style:text-properties fo:letter-spacing="-0.15pt"/>
    </style:style>
    <style:style style:family="text" style:name="T3991">
      <style:text-properties fo:letter-spacing="-0.15pt"/>
    </style:style>
    <style:style style:family="text" style:name="T3992">
      <style:text-properties fo:letter-spacing="-0.15pt"/>
    </style:style>
    <style:style style:family="text" style:name="T3993">
      <style:text-properties fo:letter-spacing="-0.15pt"/>
    </style:style>
    <style:style style:family="text" style:name="T3994">
      <style:text-properties fo:letter-spacing="-0.15pt"/>
    </style:style>
    <style:style style:family="text" style:name="T3995">
      <style:text-properties fo:letter-spacing="-0.1pt"/>
    </style:style>
    <style:style style:parent-style-name="707" style:master-page-name="MasterPage28" style:family="paragraph" style:name="P584">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3996">
      <style:text-properties fo:letter-spacing="-0.05pt"/>
    </style:style>
    <style:style style:family="text" style:name="T3997">
      <style:text-properties fo:letter-spacing="-0.05pt"/>
    </style:style>
    <style:style style:family="text" style:name="T3998">
      <style:text-properties fo:letter-spacing="-0.05pt"/>
    </style:style>
    <style:style style:family="text" style:name="T3999">
      <style:text-properties fo:letter-spacing="-0.05pt"/>
    </style:style>
    <style:style style:family="text" style:name="T4000">
      <style:text-properties fo:letter-spacing="-0.05pt"/>
    </style:style>
    <style:style style:family="text" style:name="T4001">
      <style:text-properties fo:letter-spacing="-0.05pt"/>
    </style:style>
    <style:style style:family="text" style:name="T4002">
      <style:text-properties fo:letter-spacing="-0.05pt"/>
    </style:style>
    <style:style style:family="text" style:name="T4003">
      <style:text-properties fo:letter-spacing="-0.1pt"/>
    </style:style>
    <style:style style:parent-style-name="716" style:family="paragraph" style:name="P585">
      <style:paragraph-properties fo:line-height="115%" fo:margin-left="0cm" fo:margin-right="0.4569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04">
      <style:text-properties fo:letter-spacing="-0.3pt"/>
    </style:style>
    <style:style style:family="text" style:name="T4005">
      <style:text-properties fo:letter-spacing="-0.3pt"/>
    </style:style>
    <style:style style:family="text" style:name="T4006">
      <style:text-properties fo:letter-spacing="-0.3pt"/>
    </style:style>
    <style:style style:family="text" style:name="T4007">
      <style:text-properties fo:letter-spacing="-0.3pt"/>
    </style:style>
    <style:style style:family="text" style:name="T4008">
      <style:text-properties fo:letter-spacing="-0.3pt"/>
    </style:style>
    <style:style style:family="text" style:name="T4009">
      <style:text-properties fo:letter-spacing="-0.3pt"/>
    </style:style>
    <style:style style:family="text" style:name="T4010">
      <style:text-properties fo:letter-spacing="-0.3pt"/>
    </style:style>
    <style:style style:family="text" style:name="T4011">
      <style:text-properties fo:letter-spacing="-0.3pt"/>
    </style:style>
    <style:style style:family="text" style:name="T4012">
      <style:text-properties fo:letter-spacing="-0.3pt"/>
    </style:style>
    <style:style style:family="text" style:name="T4013">
      <style:text-properties fo:letter-spacing="-0.3pt"/>
    </style:style>
    <style:style style:parent-style-name="716" style:family="paragraph" style:name="P586">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14">
      <style:text-properties fo:letter-spacing="-0.3pt"/>
    </style:style>
    <style:style style:family="text" style:name="T4015">
      <style:text-properties fo:letter-spacing="-0.3pt"/>
    </style:style>
    <style:style style:family="text" style:name="T4016">
      <style:text-properties fo:letter-spacing="-0.3pt"/>
    </style:style>
    <style:style style:family="text" style:name="T4017">
      <style:text-properties fo:letter-spacing="-0.3pt"/>
    </style:style>
    <style:style style:family="text" style:name="T4018">
      <style:text-properties fo:letter-spacing="-0.3pt"/>
    </style:style>
    <style:style style:family="text" style:name="T4019">
      <style:text-properties fo:letter-spacing="-0.3pt"/>
    </style:style>
    <style:style style:family="text" style:name="T4020">
      <style:text-properties fo:letter-spacing="-0.3pt"/>
    </style:style>
    <style:style style:family="text" style:name="T4021">
      <style:text-properties fo:letter-spacing="-0.3pt"/>
    </style:style>
    <style:style style:family="text" style:name="T4022">
      <style:text-properties fo:letter-spacing="-0.3pt"/>
    </style:style>
    <style:style style:family="text" style:name="T4023">
      <style:text-properties fo:letter-spacing="-0.3pt"/>
    </style:style>
    <style:style style:family="text" style:name="T4024">
      <style:text-properties fo:letter-spacing="-0.3pt"/>
    </style:style>
    <style:style style:family="text" style:name="T4025">
      <style:text-properties fo:letter-spacing="-0.3pt"/>
    </style:style>
    <style:style style:family="text" style:name="T4026">
      <style:text-properties fo:letter-spacing="-0.3pt"/>
    </style:style>
    <style:style style:parent-style-name="716" style:family="paragraph" style:name="P587">
      <style:paragraph-properties fo:line-height="115%" fo:margin-left="0cm" fo:margin-right="1.005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27">
      <style:text-properties fo:letter-spacing="-0.15pt"/>
    </style:style>
    <style:style style:family="text" style:name="T4028">
      <style:text-properties fo:letter-spacing="-0.15pt"/>
    </style:style>
    <style:style style:family="text" style:name="T4029">
      <style:text-properties fo:letter-spacing="-0.15pt"/>
    </style:style>
    <style:style style:family="text" style:name="T4030">
      <style:text-properties fo:letter-spacing="-0.15pt"/>
    </style:style>
    <style:style style:family="text" style:name="T4031">
      <style:text-properties fo:letter-spacing="-0.15pt"/>
    </style:style>
    <style:style style:family="text" style:name="T4032">
      <style:text-properties fo:letter-spacing="-0.15pt"/>
    </style:style>
    <style:style style:family="text" style:name="T4033">
      <style:text-properties fo:letter-spacing="-0.15pt"/>
    </style:style>
    <style:style style:family="text" style:name="T4034">
      <style:text-properties fo:letter-spacing="-0.15pt"/>
    </style:style>
    <style:style style:family="text" style:name="T4035">
      <style:text-properties fo:letter-spacing="-0.15pt"/>
    </style:style>
    <style:style style:family="text" style:name="T4036">
      <style:text-properties fo:letter-spacing="-0.15pt"/>
    </style:style>
    <style:style style:family="text" style:name="T4037">
      <style:text-properties fo:letter-spacing="-0.15pt"/>
    </style:style>
    <style:style style:parent-style-name="716" style:family="paragraph" style:name="P58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38">
      <style:text-properties fo:font-size="13pt"/>
    </style:style>
    <style:style style:family="text" style:name="T4039">
      <style:text-properties fo:font-size="13pt"/>
    </style:style>
    <style:style style:parent-style-name="716" style:family="paragraph" style:name="P58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40">
      <style:text-properties fo:font-size="13pt"/>
    </style:style>
    <style:style style:family="text" style:name="T4041">
      <style:text-properties fo:font-size="13pt"/>
    </style:style>
    <style:style style:parent-style-name="708" style:family="paragraph" style:name="P590">
      <style:paragraph-properties fo:margin-top="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4042">
      <style:text-properties fo:letter-spacing="-0.35pt"/>
    </style:style>
    <style:style style:family="text" style:name="T4043">
      <style:text-properties fo:letter-spacing="-0.25pt"/>
    </style:style>
    <style:style style:family="text" style:name="T4044">
      <style:text-properties fo:letter-spacing="-0.25pt"/>
    </style:style>
    <style:style style:family="text" style:name="T4045">
      <style:text-properties fo:letter-spacing="-0.3pt"/>
    </style:style>
    <style:style style:family="text" style:name="T4046">
      <style:text-properties fo:letter-spacing="-0.25pt"/>
    </style:style>
    <style:style style:family="text" style:name="T4047">
      <style:text-properties fo:letter-spacing="-0.25pt"/>
    </style:style>
    <style:style style:family="text" style:name="T4048">
      <style:text-properties fo:letter-spacing="-0.1pt"/>
    </style:style>
    <style:style style:parent-style-name="716" style:family="paragraph" style:name="P591">
      <style:paragraph-properties fo:line-height="115%" fo:margin-left="0cm" fo:margin-right="0.52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49">
      <style:text-properties fo:letter-spacing="-0.25pt"/>
    </style:style>
    <style:style style:family="text" style:name="T4050">
      <style:text-properties fo:letter-spacing="-0.25pt"/>
    </style:style>
    <style:style style:family="text" style:name="T4051">
      <style:text-properties fo:letter-spacing="-0.25pt"/>
    </style:style>
    <style:style style:family="text" style:name="T4052">
      <style:text-properties fo:letter-spacing="-0.25pt"/>
    </style:style>
    <style:style style:family="text" style:name="T4053">
      <style:text-properties fo:letter-spacing="-0.25pt"/>
    </style:style>
    <style:style style:family="text" style:name="T4054">
      <style:text-properties fo:letter-spacing="-0.25pt"/>
    </style:style>
    <style:style style:family="text" style:name="T4055">
      <style:text-properties fo:letter-spacing="-0.25pt"/>
    </style:style>
    <style:style style:family="text" style:name="T4056">
      <style:text-properties fo:letter-spacing="-0.25pt"/>
    </style:style>
    <style:style style:family="text" style:name="T4057">
      <style:text-properties fo:letter-spacing="-0.25pt"/>
    </style:style>
    <style:style style:family="text" style:name="T4058">
      <style:text-properties fo:letter-spacing="-0.25pt"/>
    </style:style>
    <style:style style:parent-style-name="716" style:family="paragraph" style:name="P592">
      <style:paragraph-properties fo:line-height="115%" fo:margin-left="0cm" fo:margin-right="0.774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59">
      <style:text-properties fo:letter-spacing="-0.3pt"/>
    </style:style>
    <style:style style:family="text" style:name="T4060">
      <style:text-properties fo:letter-spacing="-0.3pt"/>
    </style:style>
    <style:style style:family="text" style:name="T4061">
      <style:text-properties fo:letter-spacing="-0.3pt"/>
    </style:style>
    <style:style style:family="text" style:name="T4062">
      <style:text-properties fo:letter-spacing="-0.3pt"/>
    </style:style>
    <style:style style:family="text" style:name="T4063">
      <style:text-properties fo:letter-spacing="-0.3pt"/>
    </style:style>
    <style:style style:family="text" style:name="T4064">
      <style:text-properties fo:letter-spacing="-0.3pt"/>
    </style:style>
    <style:style style:family="text" style:name="T4065">
      <style:text-properties fo:letter-spacing="-0.3pt"/>
    </style:style>
    <style:style style:family="text" style:name="T4066">
      <style:text-properties fo:letter-spacing="-0.3pt"/>
    </style:style>
    <style:style style:parent-style-name="716" style:family="paragraph" style:name="P593">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67">
      <style:text-properties fo:letter-spacing="-0.25pt"/>
    </style:style>
    <style:style style:family="text" style:name="T4068">
      <style:text-properties fo:letter-spacing="-0.25pt"/>
    </style:style>
    <style:style style:family="text" style:name="T4069">
      <style:text-properties fo:letter-spacing="-0.25pt"/>
    </style:style>
    <style:style style:family="text" style:name="T4070">
      <style:text-properties fo:letter-spacing="-0.25pt"/>
    </style:style>
    <style:style style:family="text" style:name="T4071">
      <style:text-properties fo:letter-spacing="-0.25pt"/>
    </style:style>
    <style:style style:family="text" style:name="T4072">
      <style:text-properties fo:letter-spacing="-0.25pt"/>
    </style:style>
    <style:style style:family="text" style:name="T4073">
      <style:text-properties fo:letter-spacing="-0.25pt"/>
    </style:style>
    <style:style style:family="text" style:name="T4074">
      <style:text-properties fo:letter-spacing="-0.25pt"/>
    </style:style>
    <style:style style:family="text" style:name="T4075">
      <style:text-properties fo:letter-spacing="-0.25pt"/>
    </style:style>
    <style:style style:family="text" style:name="T4076">
      <style:text-properties fo:letter-spacing="-0.25pt"/>
    </style:style>
    <style:style style:family="text" style:name="T4077">
      <style:text-properties fo:letter-spacing="-0.25pt"/>
    </style:style>
    <style:style style:family="text" style:name="T4078">
      <style:text-properties fo:letter-spacing="-0.25pt"/>
    </style:style>
    <style:style style:parent-style-name="716" style:family="paragraph" style:name="P594">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079">
      <style:text-properties fo:letter-spacing="-0.05pt"/>
    </style:style>
    <style:style style:family="text" style:name="T4080">
      <style:text-properties fo:letter-spacing="-0.05pt"/>
    </style:style>
    <style:style style:family="text" style:name="T4081">
      <style:text-properties fo:letter-spacing="-0.05pt"/>
    </style:style>
    <style:style style:family="text" style:name="T4082">
      <style:text-properties fo:letter-spacing="-0.05pt"/>
    </style:style>
    <style:style style:family="text" style:name="T4083">
      <style:text-properties fo:letter-spacing="-0.05pt"/>
    </style:style>
    <style:style style:family="text" style:name="T4084">
      <style:text-properties fo:letter-spacing="-0.05pt"/>
    </style:style>
    <style:style style:family="text" style:name="T4085">
      <style:text-properties fo:letter-spacing="-0.05pt"/>
    </style:style>
    <style:style style:family="text" style:name="T4086">
      <style:text-properties fo:letter-spacing="-0.05pt"/>
    </style:style>
    <style:style style:family="text" style:name="T4087">
      <style:text-properties fo:letter-spacing="-0.05pt"/>
    </style:style>
    <style:style style:family="text" style:name="T4088">
      <style:text-properties fo:letter-spacing="-0.05pt"/>
    </style:style>
    <style:style style:family="text" style:name="T4089">
      <style:text-properties fo:letter-spacing="-0.1pt"/>
    </style:style>
    <style:style style:parent-style-name="717" style:list-style-name="WWNum16" style:family="paragraph" style:name="P595">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090">
      <style:text-properties fo:font-size="12pt"/>
    </style:style>
    <style:style style:family="text" style:name="T4091">
      <style:text-properties fo:font-size="12pt" fo:letter-spacing="-0.1pt"/>
    </style:style>
    <style:style style:family="text" style:name="T4092">
      <style:text-properties fo:font-size="12pt"/>
    </style:style>
    <style:style style:family="text" style:name="T4093">
      <style:text-properties fo:font-size="12pt" fo:letter-spacing="-0.05pt"/>
    </style:style>
    <style:style style:family="text" style:name="T4094">
      <style:text-properties fo:font-size="12pt"/>
    </style:style>
    <style:style style:family="text" style:name="T4095">
      <style:text-properties fo:font-size="12pt" fo:letter-spacing="-0.1pt"/>
    </style:style>
    <style:style style:family="text" style:name="T4096">
      <style:text-properties fo:font-size="12pt"/>
    </style:style>
    <style:style style:family="text" style:name="T4097">
      <style:text-properties fo:font-size="12pt" fo:letter-spacing="-0.05pt"/>
    </style:style>
    <style:style style:family="text" style:name="T4098">
      <style:text-properties fo:font-size="12pt"/>
    </style:style>
    <style:style style:family="text" style:name="T4099">
      <style:text-properties fo:font-size="12pt" fo:letter-spacing="-0.1pt"/>
    </style:style>
    <style:style style:family="text" style:name="T4100">
      <style:text-properties fo:font-size="12pt"/>
    </style:style>
    <style:style style:family="text" style:name="T4101">
      <style:text-properties fo:font-size="12pt" fo:letter-spacing="-0.05pt"/>
    </style:style>
    <style:style style:family="text" style:name="T4102">
      <style:text-properties fo:font-size="12pt"/>
    </style:style>
    <style:style style:family="text" style:name="T4103">
      <style:text-properties fo:font-size="12pt" fo:letter-spacing="-0.1pt"/>
    </style:style>
    <style:style style:family="text" style:name="T4104">
      <style:text-properties fo:font-size="12pt"/>
    </style:style>
    <style:style style:family="text" style:name="T4105">
      <style:text-properties fo:font-size="12pt" fo:letter-spacing="-0.05pt"/>
    </style:style>
    <style:style style:family="text" style:name="T4106">
      <style:text-properties fo:font-size="12pt"/>
    </style:style>
    <style:style style:family="text" style:name="T4107">
      <style:text-properties fo:font-size="12pt" fo:letter-spacing="-0.1pt"/>
    </style:style>
    <style:style style:family="text" style:name="T4108">
      <style:text-properties fo:font-size="12pt"/>
    </style:style>
    <style:style style:family="text" style:name="T4109">
      <style:text-properties fo:font-size="12pt" fo:letter-spacing="-0.05pt"/>
    </style:style>
    <style:style style:family="text" style:name="T4110">
      <style:text-properties fo:font-size="12pt"/>
    </style:style>
    <style:style style:family="text" style:name="T4111">
      <style:text-properties fo:font-size="12pt" fo:letter-spacing="-0.1pt"/>
    </style:style>
    <style:style style:family="text" style:name="T4112">
      <style:text-properties fo:font-size="12pt"/>
    </style:style>
    <style:style style:family="text" style:name="T4113">
      <style:text-properties fo:font-size="12pt" fo:letter-spacing="-0.05pt"/>
    </style:style>
    <style:style style:family="text" style:name="T4114">
      <style:text-properties fo:font-size="12pt" fo:letter-spacing="-0.1pt"/>
    </style:style>
    <style:style style:parent-style-name="717" style:list-style-name="WWNum16" style:family="paragraph" style:name="P596">
      <style:paragraph-properties fo:line-height="115%" fo:margin-left="1.443cm" fo:margin-right="1.245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15">
      <style:text-properties fo:font-size="12pt"/>
    </style:style>
    <style:style style:family="text" style:name="T4116">
      <style:text-properties fo:font-size="12pt" fo:letter-spacing="-0.3pt"/>
    </style:style>
    <style:style style:family="text" style:name="T4117">
      <style:text-properties fo:font-size="12pt"/>
    </style:style>
    <style:style style:family="text" style:name="T4118">
      <style:text-properties fo:font-size="12pt" fo:letter-spacing="-0.3pt"/>
    </style:style>
    <style:style style:family="text" style:name="T4119">
      <style:text-properties fo:font-size="12pt"/>
    </style:style>
    <style:style style:family="text" style:name="T4120">
      <style:text-properties fo:font-size="12pt" fo:letter-spacing="-0.3pt"/>
    </style:style>
    <style:style style:family="text" style:name="T4121">
      <style:text-properties fo:font-size="12pt"/>
    </style:style>
    <style:style style:family="text" style:name="T4122">
      <style:text-properties fo:font-size="12pt" fo:letter-spacing="-0.3pt"/>
    </style:style>
    <style:style style:family="text" style:name="T4123">
      <style:text-properties fo:font-size="12pt"/>
    </style:style>
    <style:style style:family="text" style:name="T4124">
      <style:text-properties fo:font-size="12pt" fo:letter-spacing="-0.3pt"/>
    </style:style>
    <style:style style:family="text" style:name="T4125">
      <style:text-properties fo:font-size="12pt"/>
    </style:style>
    <style:style style:family="text" style:name="T4126">
      <style:text-properties fo:font-size="12pt" fo:letter-spacing="-0.3pt"/>
    </style:style>
    <style:style style:family="text" style:name="T4127">
      <style:text-properties fo:font-size="12pt"/>
    </style:style>
    <style:style style:family="text" style:name="T4128">
      <style:text-properties fo:font-size="12pt" fo:letter-spacing="-0.3pt"/>
    </style:style>
    <style:style style:family="text" style:name="T4129">
      <style:text-properties fo:font-size="12pt"/>
    </style:style>
    <style:style style:family="text" style:name="T4130">
      <style:text-properties fo:font-size="12pt" fo:letter-spacing="-0.3pt"/>
    </style:style>
    <style:style style:family="text" style:name="T4131">
      <style:text-properties fo:font-size="12pt"/>
    </style:style>
    <style:style style:family="text" style:name="T4132">
      <style:text-properties fo:font-size="12pt" fo:letter-spacing="-0.3pt"/>
    </style:style>
    <style:style style:family="text" style:name="T4133">
      <style:text-properties fo:font-size="12pt"/>
    </style:style>
    <style:style style:family="text" style:name="T4134">
      <style:text-properties fo:font-size="12pt" fo:letter-spacing="-0.3pt"/>
    </style:style>
    <style:style style:family="text" style:name="T4135">
      <style:text-properties fo:font-size="12pt"/>
    </style:style>
    <style:style style:family="text" style:name="T4136">
      <style:text-properties fo:font-size="12pt" fo:letter-spacing="-0.15pt"/>
    </style:style>
    <style:style style:parent-style-name="717" style:list-style-name="WWNum16" style:family="paragraph" style:name="P597">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37">
      <style:text-properties fo:font-size="12pt"/>
    </style:style>
    <style:style style:family="text" style:name="T4138">
      <style:text-properties fo:font-size="12pt" fo:letter-spacing="-0.1pt"/>
    </style:style>
    <style:style style:parent-style-name="717" style:list-style-name="WWNum16" style:family="paragraph" style:name="P598">
      <style:paragraph-properties fo:line-height="115%" fo:margin-left="1.443cm" fo:margin-right="1.387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39">
      <style:text-properties fo:font-size="12pt"/>
    </style:style>
    <style:style style:family="text" style:name="T4140">
      <style:text-properties fo:font-size="12pt" fo:letter-spacing="-0.15pt"/>
    </style:style>
    <style:style style:family="text" style:name="T4141">
      <style:text-properties fo:font-size="12pt"/>
    </style:style>
    <style:style style:family="text" style:name="T4142">
      <style:text-properties fo:font-size="12pt" fo:letter-spacing="-0.15pt"/>
    </style:style>
    <style:style style:family="text" style:name="T4143">
      <style:text-properties fo:font-size="12pt"/>
    </style:style>
    <style:style style:family="text" style:name="T4144">
      <style:text-properties fo:font-size="12pt" fo:letter-spacing="-0.15pt"/>
    </style:style>
    <style:style style:family="text" style:name="T4145">
      <style:text-properties fo:font-size="12pt"/>
    </style:style>
    <style:style style:family="text" style:name="T4146">
      <style:text-properties fo:font-size="12pt" fo:letter-spacing="-0.15pt"/>
    </style:style>
    <style:style style:family="text" style:name="T4147">
      <style:text-properties fo:font-size="12pt"/>
    </style:style>
    <style:style style:family="text" style:name="T4148">
      <style:text-properties fo:font-size="12pt" fo:letter-spacing="-0.15pt"/>
    </style:style>
    <style:style style:family="text" style:name="T4149">
      <style:text-properties fo:font-size="12pt"/>
    </style:style>
    <style:style style:family="text" style:name="T4150">
      <style:text-properties fo:font-size="12pt" fo:letter-spacing="-0.15pt"/>
    </style:style>
    <style:style style:family="text" style:name="T4151">
      <style:text-properties fo:font-size="12pt"/>
    </style:style>
    <style:style style:family="text" style:name="T4152">
      <style:text-properties fo:font-size="12pt" fo:letter-spacing="-0.15pt"/>
    </style:style>
    <style:style style:family="text" style:name="T4153">
      <style:text-properties fo:font-size="12pt"/>
    </style:style>
    <style:style style:family="text" style:name="T4154">
      <style:text-properties fo:font-size="12pt" fo:letter-spacing="-0.15pt"/>
    </style:style>
    <style:style style:family="text" style:name="T4155">
      <style:text-properties fo:font-size="12pt"/>
    </style:style>
    <style:style style:family="text" style:name="T4156">
      <style:text-properties fo:font-size="12pt" fo:letter-spacing="-0.15pt"/>
    </style:style>
    <style:style style:family="text" style:name="T4157">
      <style:text-properties fo:font-size="12pt"/>
    </style:style>
    <style:style style:family="text" style:name="T4158">
      <style:text-properties fo:font-size="12pt" fo:letter-spacing="-0.15pt"/>
    </style:style>
    <style:style style:family="text" style:name="T4159">
      <style:text-properties fo:font-size="12pt"/>
    </style:style>
    <style:style style:family="text" style:name="T4160">
      <style:text-properties fo:font-size="12pt" fo:letter-spacing="-0.15pt"/>
    </style:style>
    <style:style style:family="text" style:name="T4161">
      <style:text-properties fo:font-size="12pt"/>
    </style:style>
    <style:style style:family="text" style:name="T4162">
      <style:text-properties fo:font-size="12pt" fo:letter-spacing="-0.15pt"/>
    </style:style>
    <style:style style:parent-style-name="717" style:list-style-name="WWNum16" style:family="paragraph" style:name="P599">
      <style:paragraph-properties fo:line-height="115%" fo:margin-left="1.443cm" fo:margin-right="0.5521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63">
      <style:text-properties fo:font-size="12pt"/>
    </style:style>
    <style:style style:family="text" style:name="T4164">
      <style:text-properties fo:font-size="12pt" fo:letter-spacing="-0.1pt"/>
    </style:style>
    <style:style style:family="text" style:name="T4165">
      <style:text-properties fo:font-size="12pt"/>
    </style:style>
    <style:style style:family="text" style:name="T4166">
      <style:text-properties fo:font-size="12pt" fo:letter-spacing="-0.1pt"/>
    </style:style>
    <style:style style:family="text" style:name="T4167">
      <style:text-properties fo:font-size="12pt"/>
    </style:style>
    <style:style style:family="text" style:name="T4168">
      <style:text-properties fo:font-size="12pt" fo:letter-spacing="-0.1pt"/>
    </style:style>
    <style:style style:family="text" style:name="T4169">
      <style:text-properties fo:font-size="12pt"/>
    </style:style>
    <style:style style:family="text" style:name="T4170">
      <style:text-properties fo:font-size="12pt" fo:letter-spacing="-0.1pt"/>
    </style:style>
    <style:style style:family="text" style:name="T4171">
      <style:text-properties fo:font-size="12pt"/>
    </style:style>
    <style:style style:family="text" style:name="T4172">
      <style:text-properties fo:font-size="12pt" fo:letter-spacing="-0.1pt"/>
    </style:style>
    <style:style style:family="text" style:name="T4173">
      <style:text-properties fo:font-size="12pt"/>
    </style:style>
    <style:style style:family="text" style:name="T4174">
      <style:text-properties fo:font-size="12pt" fo:letter-spacing="-0.1pt"/>
    </style:style>
    <style:style style:family="text" style:name="T4175">
      <style:text-properties fo:font-size="12pt"/>
    </style:style>
    <style:style style:family="text" style:name="T4176">
      <style:text-properties fo:font-size="12pt" fo:letter-spacing="-0.1pt"/>
    </style:style>
    <style:style style:family="text" style:name="T4177">
      <style:text-properties fo:font-size="12pt"/>
    </style:style>
    <style:style style:family="text" style:name="T4178">
      <style:text-properties fo:font-size="12pt" fo:letter-spacing="-0.1pt"/>
    </style:style>
    <style:style style:family="text" style:name="T4179">
      <style:text-properties fo:font-size="12pt"/>
    </style:style>
    <style:style style:family="text" style:name="T4180">
      <style:text-properties fo:font-size="12pt" fo:letter-spacing="-0.1pt"/>
    </style:style>
    <style:style style:family="text" style:name="T4181">
      <style:text-properties fo:font-size="12pt"/>
    </style:style>
    <style:style style:family="text" style:name="T4182">
      <style:text-properties fo:font-size="12pt" fo:letter-spacing="-0.1pt"/>
    </style:style>
    <style:style style:family="text" style:name="T4183">
      <style:text-properties fo:font-size="12pt"/>
    </style:style>
    <style:style style:family="text" style:name="T4184">
      <style:text-properties fo:font-size="12pt" fo:letter-spacing="-0.1pt"/>
    </style:style>
    <style:style style:family="text" style:name="T4185">
      <style:text-properties fo:font-size="12pt"/>
    </style:style>
    <style:style style:family="text" style:name="T4186">
      <style:text-properties fo:font-size="12pt" fo:letter-spacing="-0.1pt"/>
    </style:style>
    <style:style style:family="text" style:name="T4187">
      <style:text-properties fo:font-size="12pt"/>
    </style:style>
    <style:style style:family="text" style:name="T4188">
      <style:text-properties fo:font-size="12pt" fo:letter-spacing="-0.1pt"/>
    </style:style>
    <style:style style:family="text" style:name="T4189">
      <style:text-properties fo:font-size="12pt"/>
    </style:style>
    <style:style style:parent-style-name="717" style:list-style-name="WWNum16" style:family="paragraph" style:name="P600">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90">
      <style:text-properties fo:font-size="12pt"/>
    </style:style>
    <style:style style:family="text" style:name="T4191">
      <style:text-properties fo:font-size="12pt" fo:letter-spacing="-0.1pt"/>
    </style:style>
    <style:style style:parent-style-name="717" style:list-style-name="WWNum16" style:family="paragraph" style:name="P601">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192">
      <style:text-properties fo:font-size="12pt"/>
    </style:style>
    <style:style style:family="text" style:name="T4193">
      <style:text-properties fo:font-size="12pt" fo:letter-spacing="-0.1pt"/>
    </style:style>
    <style:style style:parent-style-name="707" style:family="paragraph" style:name="P602">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4194">
      <style:text-properties fo:letter-spacing="-0.1pt"/>
    </style:style>
    <style:style style:parent-style-name="716" style:family="paragraph" style:name="P603">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195">
      <style:text-properties fo:font-size="17pt" fo:font-weight="bold"/>
    </style:style>
    <style:style style:family="text" style:name="T4196">
      <style:text-properties fo:font-size="17pt" fo:font-weight="bold"/>
    </style:style>
    <style:style style:parent-style-name="716" style:family="paragraph" style:name="P60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197">
      <style:text-properties fo:letter-spacing="-0.15pt"/>
    </style:style>
    <style:style style:family="text" style:name="T4198">
      <style:text-properties fo:letter-spacing="-0.15pt"/>
    </style:style>
    <style:style style:family="text" style:name="T4199">
      <style:text-properties fo:letter-spacing="-0.15pt"/>
    </style:style>
    <style:style style:family="text" style:name="T4200">
      <style:text-properties fo:letter-spacing="-0.15pt"/>
    </style:style>
    <style:style style:family="text" style:name="T4201">
      <style:text-properties fo:letter-spacing="-0.15pt"/>
    </style:style>
    <style:style style:family="text" style:name="T4202">
      <style:text-properties fo:letter-spacing="-0.15pt"/>
    </style:style>
    <style:style style:family="text" style:name="T4203">
      <style:text-properties fo:letter-spacing="-0.15pt"/>
    </style:style>
    <style:style style:family="text" style:name="T4204">
      <style:text-properties fo:letter-spacing="-0.15pt"/>
    </style:style>
    <style:style style:family="text" style:name="T4205">
      <style:text-properties fo:letter-spacing="-0.15pt"/>
    </style:style>
    <style:style style:family="text" style:name="T4206">
      <style:text-properties fo:letter-spacing="-0.15pt"/>
    </style:style>
    <style:style style:family="text" style:name="T4207">
      <style:text-properties fo:letter-spacing="-0.15pt"/>
    </style:style>
    <style:style style:parent-style-name="716" style:family="paragraph" style:name="P60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06">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08">
      <style:text-properties fo:letter-spacing="-0.1pt"/>
    </style:style>
    <style:style style:family="text" style:name="T4209">
      <style:text-properties fo:letter-spacing="-0.1pt"/>
    </style:style>
    <style:style style:family="text" style:name="T4210">
      <style:text-properties fo:letter-spacing="-0.1pt"/>
    </style:style>
    <style:style style:family="text" style:name="T4211">
      <style:text-properties fo:letter-spacing="-0.1pt"/>
    </style:style>
    <style:style style:family="text" style:name="T4212">
      <style:text-properties fo:letter-spacing="-0.1pt"/>
    </style:style>
    <style:style style:family="text" style:name="T4213">
      <style:text-properties fo:letter-spacing="-0.1pt"/>
    </style:style>
    <style:style style:family="text" style:name="T4214">
      <style:text-properties fo:letter-spacing="-0.1pt"/>
    </style:style>
    <style:style style:family="text" style:name="T4215">
      <style:text-properties fo:letter-spacing="-0.1pt"/>
    </style:style>
    <style:style style:family="text" style:name="T4216">
      <style:text-properties fo:letter-spacing="-0.1pt"/>
    </style:style>
    <style:style style:family="text" style:name="T4217">
      <style:text-properties fo:letter-spacing="-0.1pt"/>
    </style:style>
    <style:style style:family="text" style:name="T4218">
      <style:text-properties fo:letter-spacing="-0.1pt"/>
    </style:style>
    <style:style style:family="text" style:name="T4219">
      <style:text-properties fo:letter-spacing="-0.1pt"/>
    </style:style>
    <style:style style:family="text" style:name="T4220">
      <style:text-properties fo:letter-spacing="-0.1pt"/>
    </style:style>
    <style:style style:parent-style-name="716" style:family="paragraph" style:name="P60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08">
      <style:paragraph-properties fo:margin-left="0cm" fo:margin-right="0.52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21">
      <style:text-properties fo:letter-spacing="-0.25pt"/>
    </style:style>
    <style:style style:family="text" style:name="T4222">
      <style:text-properties fo:letter-spacing="-0.25pt"/>
    </style:style>
    <style:style style:family="text" style:name="T4223">
      <style:text-properties fo:letter-spacing="-0.25pt"/>
    </style:style>
    <style:style style:family="text" style:name="T4224">
      <style:text-properties fo:letter-spacing="-0.25pt"/>
    </style:style>
    <style:style style:family="text" style:name="T4225">
      <style:text-properties fo:letter-spacing="-0.25pt"/>
    </style:style>
    <style:style style:family="text" style:name="T4226">
      <style:text-properties fo:letter-spacing="-0.25pt"/>
    </style:style>
    <style:style style:family="text" style:name="T4227">
      <style:text-properties fo:letter-spacing="-0.25pt"/>
    </style:style>
    <style:style style:family="text" style:name="T4228">
      <style:text-properties fo:letter-spacing="-0.25pt"/>
    </style:style>
    <style:style style:family="text" style:name="T4229">
      <style:text-properties fo:letter-spacing="-0.25pt"/>
    </style:style>
    <style:style style:parent-style-name="716" style:family="paragraph" style:name="P60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30">
      <style:text-properties fo:font-size="13pt"/>
    </style:style>
    <style:style style:family="text" style:name="T4231">
      <style:text-properties fo:font-size="13pt"/>
    </style:style>
    <style:style style:parent-style-name="708" style:family="paragraph" style:name="P610">
      <style:paragraph-properties fo:margin-top="8.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4232">
      <style:text-properties fo:letter-spacing="-0.25pt"/>
    </style:style>
    <style:style style:family="text" style:name="T4233">
      <style:text-properties fo:letter-spacing="-0.15pt"/>
    </style:style>
    <style:style style:family="text" style:name="T4234">
      <style:text-properties fo:letter-spacing="-0.1pt"/>
    </style:style>
    <style:style style:parent-style-name="716" style:family="paragraph" style:name="P611">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35">
      <style:text-properties fo:font-size="17pt" fo:font-weight="bold"/>
    </style:style>
    <style:style style:family="text" style:name="T4236">
      <style:text-properties fo:font-size="17pt" fo:font-weight="bold"/>
    </style:style>
    <style:style style:parent-style-name="716" style:family="paragraph" style:name="P612">
      <style:paragraph-properties fo:margin-left="0cm" fo:margin-right="0.9437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37">
      <style:text-properties fo:letter-spacing="-0.15pt"/>
    </style:style>
    <style:style style:family="text" style:name="T4238">
      <style:text-properties fo:letter-spacing="-0.15pt"/>
    </style:style>
    <style:style style:family="text" style:name="T4239">
      <style:text-properties fo:letter-spacing="-0.15pt"/>
    </style:style>
    <style:style style:family="text" style:name="T4240">
      <style:text-properties fo:letter-spacing="-0.15pt"/>
    </style:style>
    <style:style style:family="text" style:name="T4241">
      <style:text-properties fo:letter-spacing="-0.15pt"/>
    </style:style>
    <style:style style:family="text" style:name="T4242">
      <style:text-properties fo:letter-spacing="-0.15pt"/>
    </style:style>
    <style:style style:family="text" style:name="T4243">
      <style:text-properties fo:letter-spacing="-0.15pt"/>
    </style:style>
    <style:style style:family="text" style:name="T4244">
      <style:text-properties fo:letter-spacing="-0.15pt"/>
    </style:style>
    <style:style style:family="text" style:name="T4245">
      <style:text-properties fo:letter-spacing="-0.15pt"/>
    </style:style>
    <style:style style:family="text" style:name="T4246">
      <style:text-properties fo:letter-spacing="-0.15pt"/>
    </style:style>
    <style:style style:family="text" style:name="T4247">
      <style:text-properties fo:letter-spacing="-0.15pt"/>
    </style:style>
    <style:style style:parent-style-name="716" style:family="paragraph" style:name="P61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14">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48">
      <style:text-properties fo:letter-spacing="-0.5pt"/>
    </style:style>
    <style:style style:parent-style-name="716" style:family="paragraph" style:name="P615">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49">
      <style:text-properties fo:letter-spacing="-0.15pt"/>
    </style:style>
    <style:style style:family="text" style:name="T4250">
      <style:text-properties fo:letter-spacing="-0.15pt"/>
    </style:style>
    <style:style style:family="text" style:name="T4251">
      <style:text-properties fo:letter-spacing="-0.15pt"/>
    </style:style>
    <style:style style:family="text" style:name="T4252">
      <style:text-properties fo:letter-spacing="-0.15pt"/>
    </style:style>
    <style:style style:family="text" style:name="T4253">
      <style:text-properties fo:letter-spacing="-0.15pt"/>
    </style:style>
    <style:style style:family="text" style:name="T4254">
      <style:text-properties fo:letter-spacing="-0.15pt"/>
    </style:style>
    <style:style style:family="text" style:name="T4255">
      <style:text-properties fo:letter-spacing="-0.15pt"/>
    </style:style>
    <style:style style:family="text" style:name="T4256">
      <style:text-properties fo:letter-spacing="-0.15pt"/>
    </style:style>
    <style:style style:family="text" style:name="T4257">
      <style:text-properties fo:letter-spacing="-0.15pt"/>
    </style:style>
    <style:style style:family="text" style:name="T4258">
      <style:text-properties fo:letter-spacing="-0.15pt"/>
    </style:style>
    <style:style style:family="text" style:name="T4259">
      <style:text-properties fo:letter-spacing="-0.15pt"/>
    </style:style>
    <style:style style:family="text" style:name="T4260">
      <style:text-properties fo:letter-spacing="-0.15pt"/>
    </style:style>
    <style:style style:parent-style-name="716" style:family="paragraph" style:name="P61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17">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61">
      <style:text-properties fo:letter-spacing="-0.15pt"/>
    </style:style>
    <style:style style:family="text" style:name="T4262">
      <style:text-properties fo:letter-spacing="-0.15pt"/>
    </style:style>
    <style:style style:family="text" style:name="T4263">
      <style:text-properties fo:letter-spacing="-0.15pt"/>
    </style:style>
    <style:style style:family="text" style:name="T4264">
      <style:text-properties fo:letter-spacing="-0.15pt"/>
    </style:style>
    <style:style style:family="text" style:name="T4265">
      <style:text-properties fo:letter-spacing="-0.15pt"/>
    </style:style>
    <style:style style:family="text" style:name="T4266">
      <style:text-properties fo:letter-spacing="-0.15pt"/>
    </style:style>
    <style:style style:family="text" style:name="T4267">
      <style:text-properties fo:letter-spacing="-0.15pt"/>
    </style:style>
    <style:style style:family="text" style:name="T4268">
      <style:text-properties fo:letter-spacing="-0.15pt"/>
    </style:style>
    <style:style style:family="text" style:name="T4269">
      <style:text-properties fo:letter-spacing="-0.15pt"/>
    </style:style>
    <style:style style:family="text" style:name="T4270">
      <style:text-properties fo:letter-spacing="-0.15pt"/>
    </style:style>
    <style:style style:parent-style-name="716" style:family="paragraph" style:name="P61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19">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71">
      <style:text-properties fo:letter-spacing="-0.25pt"/>
    </style:style>
    <style:style style:family="text" style:name="T4272">
      <style:text-properties fo:letter-spacing="-0.1pt"/>
    </style:style>
    <style:style style:family="text" style:name="T4273">
      <style:text-properties fo:letter-spacing="-0.1pt"/>
    </style:style>
    <style:style style:family="text" style:name="T4274">
      <style:text-properties fo:letter-spacing="-0.1pt"/>
    </style:style>
    <style:style style:family="text" style:name="T4275">
      <style:text-properties fo:letter-spacing="-0.1pt"/>
    </style:style>
    <style:style style:family="text" style:name="T4276">
      <style:text-properties fo:letter-spacing="-0.1pt"/>
    </style:style>
    <style:style style:family="text" style:name="T4277">
      <style:text-properties fo:letter-spacing="-0.1pt"/>
    </style:style>
    <style:style style:family="text" style:name="T4278">
      <style:text-properties fo:letter-spacing="-0.1pt"/>
    </style:style>
    <style:style style:family="text" style:name="T4279">
      <style:text-properties fo:letter-spacing="-0.1pt"/>
    </style:style>
    <style:style style:family="text" style:name="T4280">
      <style:text-properties fo:letter-spacing="-0.1pt"/>
    </style:style>
    <style:style style:parent-style-name="716" style:family="paragraph" style:name="P620">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81">
      <style:text-properties fo:letter-spacing="-0.25pt"/>
    </style:style>
    <style:style style:family="text" style:name="T4282">
      <style:text-properties fo:letter-spacing="-0.25pt"/>
    </style:style>
    <style:style style:family="text" style:name="T4283">
      <style:text-properties fo:letter-spacing="-0.25pt"/>
    </style:style>
    <style:style style:family="text" style:name="T4284">
      <style:text-properties fo:letter-spacing="-0.25pt"/>
    </style:style>
    <style:style style:family="text" style:name="T4285">
      <style:text-properties fo:letter-spacing="-0.25pt"/>
    </style:style>
    <style:style style:family="text" style:name="T4286">
      <style:text-properties fo:letter-spacing="-0.25pt"/>
    </style:style>
    <style:style style:family="text" style:name="T4287">
      <style:text-properties fo:letter-spacing="-0.25pt"/>
    </style:style>
    <style:style style:family="text" style:name="T4288">
      <style:text-properties fo:letter-spacing="-0.25pt"/>
    </style:style>
    <style:style style:family="text" style:name="T4289">
      <style:text-properties fo:letter-spacing="-0.25pt"/>
    </style:style>
    <style:style style:parent-style-name="716" style:family="paragraph" style:name="P62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22">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290">
      <style:text-properties fo:letter-spacing="-0.15pt"/>
    </style:style>
    <style:style style:family="text" style:name="T4291">
      <style:text-properties fo:letter-spacing="-0.15pt"/>
    </style:style>
    <style:style style:family="text" style:name="T4292">
      <style:text-properties fo:letter-spacing="-0.15pt"/>
    </style:style>
    <style:style style:family="text" style:name="T4293">
      <style:text-properties fo:letter-spacing="-0.15pt"/>
    </style:style>
    <style:style style:family="text" style:name="T4294">
      <style:text-properties fo:letter-spacing="-0.15pt"/>
    </style:style>
    <style:style style:family="text" style:name="T4295">
      <style:text-properties fo:letter-spacing="-0.15pt"/>
    </style:style>
    <style:style style:family="text" style:name="T4296">
      <style:text-properties fo:letter-spacing="-0.15pt"/>
    </style:style>
    <style:style style:family="text" style:name="T4297">
      <style:text-properties fo:letter-spacing="-0.15pt"/>
    </style:style>
    <style:style style:family="text" style:name="T4298">
      <style:text-properties fo:letter-spacing="-0.15pt"/>
    </style:style>
    <style:style style:family="text" style:name="T4299">
      <style:text-properties fo:letter-spacing="-0.15pt"/>
    </style:style>
    <style:style style:family="text" style:name="T4300">
      <style:text-properties fo:letter-spacing="-0.15pt"/>
    </style:style>
    <style:style style:family="text" style:name="T4301">
      <style:text-properties fo:letter-spacing="-0.15pt"/>
    </style:style>
    <style:style style:parent-style-name="716" style:master-page-name="MasterPage29" style:family="paragraph" style:name="P623">
      <style:paragraph-properties fo:margin-left="0cm" fo:margin-right="0.5204cm" fo:text-indent="0cm" fo:margin-top="3.3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02">
      <style:text-properties fo:letter-spacing="-0.15pt"/>
    </style:style>
    <style:style style:family="text" style:name="T4303">
      <style:text-properties fo:letter-spacing="-0.15pt"/>
    </style:style>
    <style:style style:family="text" style:name="T4304">
      <style:text-properties fo:letter-spacing="-0.15pt"/>
    </style:style>
    <style:style style:family="text" style:name="T4305">
      <style:text-properties fo:letter-spacing="-0.15pt"/>
    </style:style>
    <style:style style:family="text" style:name="T4306">
      <style:text-properties fo:letter-spacing="-0.15pt"/>
    </style:style>
    <style:style style:family="text" style:name="T4307">
      <style:text-properties fo:letter-spacing="-0.15pt"/>
    </style:style>
    <style:style style:family="text" style:name="T4308">
      <style:text-properties fo:letter-spacing="-0.15pt"/>
    </style:style>
    <style:style style:family="text" style:name="T4309">
      <style:text-properties fo:letter-spacing="-0.15pt"/>
    </style:style>
    <style:style style:family="text" style:name="T4310">
      <style:text-properties fo:letter-spacing="-0.15pt"/>
    </style:style>
    <style:style style:family="text" style:name="T4311">
      <style:text-properties fo:letter-spacing="-0.15pt"/>
    </style:style>
    <style:style style:family="text" style:name="T4312">
      <style:text-properties fo:letter-spacing="-0.15pt"/>
    </style:style>
    <style:style style:parent-style-name="716" style:family="paragraph" style:name="P624">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13">
      <style:text-properties fo:font-size="11.5pt"/>
    </style:style>
    <style:style style:family="text" style:name="T4314">
      <style:text-properties fo:font-size="11.5pt"/>
    </style:style>
    <style:style style:parent-style-name="716" style:family="paragraph" style:name="P625">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15">
      <style:text-properties fo:letter-spacing="-0.15pt"/>
    </style:style>
    <style:style style:family="text" style:name="T4316">
      <style:text-properties fo:letter-spacing="-0.15pt"/>
    </style:style>
    <style:style style:family="text" style:name="T4317">
      <style:text-properties fo:letter-spacing="-0.15pt"/>
    </style:style>
    <style:style style:family="text" style:name="T4318">
      <style:text-properties fo:letter-spacing="-0.15pt"/>
    </style:style>
    <style:style style:family="text" style:name="T4319">
      <style:text-properties fo:letter-spacing="-0.15pt"/>
    </style:style>
    <style:style style:family="text" style:name="T4320">
      <style:text-properties fo:letter-spacing="-0.15pt"/>
    </style:style>
    <style:style style:family="text" style:name="T4321">
      <style:text-properties fo:letter-spacing="-0.15pt"/>
    </style:style>
    <style:style style:family="text" style:name="T4322">
      <style:text-properties fo:letter-spacing="-0.15pt"/>
    </style:style>
    <style:style style:family="text" style:name="T4323">
      <style:text-properties fo:letter-spacing="-0.15pt"/>
    </style:style>
    <style:style style:family="text" style:name="T4324">
      <style:text-properties fo:letter-spacing="-0.15pt"/>
    </style:style>
    <style:style style:family="text" style:name="T4325">
      <style:text-properties fo:letter-spacing="-0.1pt"/>
    </style:style>
    <style:style style:parent-style-name="716" style:family="paragraph" style:name="P62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27">
      <style:paragraph-properties fo:text-align="justify" fo:margin-left="0cm" fo:margin-right="0.5116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26">
      <style:text-properties fo:letter-spacing="-0.25pt"/>
    </style:style>
    <style:style style:family="text" style:name="T4327">
      <style:text-properties fo:letter-spacing="-0.25pt"/>
    </style:style>
    <style:style style:family="text" style:name="T4328">
      <style:text-properties fo:letter-spacing="-0.25pt"/>
    </style:style>
    <style:style style:family="text" style:name="T4329">
      <style:text-properties fo:letter-spacing="-0.25pt"/>
    </style:style>
    <style:style style:family="text" style:name="T4330">
      <style:text-properties fo:letter-spacing="-0.25pt"/>
    </style:style>
    <style:style style:family="text" style:name="T4331">
      <style:text-properties fo:letter-spacing="-0.25pt"/>
    </style:style>
    <style:style style:family="text" style:name="T4332">
      <style:text-properties fo:letter-spacing="-0.25pt"/>
    </style:style>
    <style:style style:family="text" style:name="T4333">
      <style:text-properties fo:letter-spacing="-0.25pt"/>
    </style:style>
    <style:style style:family="text" style:name="T4334">
      <style:text-properties fo:letter-spacing="-0.25pt"/>
    </style:style>
    <style:style style:family="text" style:name="T4335">
      <style:text-properties fo:letter-spacing="-0.25pt"/>
    </style:style>
    <style:style style:family="text" style:name="T4336">
      <style:text-properties fo:letter-spacing="-0.25pt"/>
    </style:style>
    <style:style style:parent-style-name="716" style:family="paragraph" style:name="P628">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37">
      <style:text-properties fo:font-size="18pt"/>
    </style:style>
    <style:style style:family="text" style:name="T4338">
      <style:text-properties fo:font-size="18pt"/>
    </style:style>
    <style:style style:parent-style-name="712" style:family="paragraph" style:name="P629">
      <style:paragraph-properties fo:text-align="justify"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339">
      <style:text-properties fo:font-size="14pt" fo:font-weight="bold"/>
    </style:style>
    <style:style style:family="text" style:name="T4340">
      <style:text-properties fo:font-size="14pt" fo:letter-spacing="-0.25pt" fo:font-weight="bold"/>
    </style:style>
    <style:style style:family="text" style:name="T4341">
      <style:text-properties fo:font-size="14pt" fo:font-weight="bold"/>
    </style:style>
    <style:style style:family="text" style:name="T4342">
      <style:text-properties fo:font-size="14pt" fo:letter-spacing="-0.25pt" fo:font-weight="bold"/>
    </style:style>
    <style:style style:family="text" style:name="T4343">
      <style:text-properties fo:font-size="14pt" fo:letter-spacing="-0.1pt" fo:font-weight="bold"/>
    </style:style>
    <style:style style:parent-style-name="716" style:family="paragraph" style:name="P630">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44">
      <style:text-properties fo:font-size="15.5pt" fo:font-weight="bold"/>
    </style:style>
    <style:style style:family="text" style:name="T4345">
      <style:text-properties fo:font-size="15.5pt" fo:font-weight="bold"/>
    </style:style>
    <style:style style:parent-style-name="716" style:family="paragraph" style:name="P631">
      <style:paragraph-properties fo:line-height="115%" fo:margin-left="0cm" fo:margin-right="0.4569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46">
      <style:text-properties fo:letter-spacing="-0.1pt"/>
    </style:style>
    <style:style style:family="text" style:name="T4347">
      <style:text-properties fo:letter-spacing="-0.1pt"/>
    </style:style>
    <style:style style:family="text" style:name="T4348">
      <style:text-properties fo:letter-spacing="-0.1pt"/>
    </style:style>
    <style:style style:family="text" style:name="T4349">
      <style:text-properties fo:letter-spacing="-0.1pt"/>
    </style:style>
    <style:style style:family="text" style:name="T4350">
      <style:text-properties fo:letter-spacing="-0.1pt"/>
    </style:style>
    <style:style style:family="text" style:name="T4351">
      <style:text-properties fo:letter-spacing="-0.1pt"/>
    </style:style>
    <style:style style:family="text" style:name="T4352">
      <style:text-properties fo:letter-spacing="-0.1pt"/>
    </style:style>
    <style:style style:family="text" style:name="T4353">
      <style:text-properties fo:letter-spacing="-0.1pt"/>
    </style:style>
    <style:style style:family="text" style:name="T4354">
      <style:text-properties fo:letter-spacing="-0.1pt"/>
    </style:style>
    <style:style style:family="text" style:name="T4355">
      <style:text-properties fo:letter-spacing="-0.1pt"/>
    </style:style>
    <style:style style:family="text" style:name="T4356">
      <style:text-properties fo:letter-spacing="-0.1pt"/>
    </style:style>
    <style:style style:family="text" style:name="T4357">
      <style:text-properties fo:letter-spacing="-0.1pt"/>
    </style:style>
    <style:style style:family="text" style:name="T4358">
      <style:text-properties fo:letter-spacing="-0.1pt"/>
    </style:style>
    <style:style style:family="text" style:name="T4359">
      <style:text-properties fo:letter-spacing="-0.1pt"/>
    </style:style>
    <style:style style:parent-style-name="716" style:family="paragraph" style:name="P632">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60">
      <style:text-properties fo:letter-spacing="-0.15pt"/>
    </style:style>
    <style:style style:family="text" style:name="T4361">
      <style:text-properties fo:letter-spacing="-0.15pt"/>
    </style:style>
    <style:style style:family="text" style:name="T4362">
      <style:text-properties fo:letter-spacing="-0.15pt"/>
    </style:style>
    <style:style style:family="text" style:name="T4363">
      <style:text-properties fo:letter-spacing="-0.15pt"/>
    </style:style>
    <style:style style:family="text" style:name="T4364">
      <style:text-properties fo:letter-spacing="-0.15pt"/>
    </style:style>
    <style:style style:family="text" style:name="T4365">
      <style:text-properties fo:letter-spacing="-0.15pt"/>
    </style:style>
    <style:style style:family="text" style:name="T4366">
      <style:text-properties fo:letter-spacing="-0.15pt"/>
    </style:style>
    <style:style style:family="text" style:name="T4367">
      <style:text-properties fo:letter-spacing="-0.15pt"/>
    </style:style>
    <style:style style:family="text" style:name="T4368">
      <style:text-properties fo:letter-spacing="-0.15pt"/>
    </style:style>
    <style:style style:family="text" style:name="T4369">
      <style:text-properties fo:letter-spacing="-0.15pt"/>
    </style:style>
    <style:style style:family="text" style:name="T4370">
      <style:text-properties fo:letter-spacing="-0.15pt"/>
    </style:style>
    <style:style style:family="text" style:name="T4371">
      <style:text-properties fo:letter-spacing="-0.15pt"/>
    </style:style>
    <style:style style:family="text" style:name="T4372">
      <style:text-properties fo:letter-spacing="-0.1pt"/>
    </style:style>
    <style:style style:parent-style-name="716" style:family="paragraph" style:name="P633">
      <style:paragraph-properties fo:line-height="115%" fo:margin-left="0cm" fo:margin-right="0.4022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73">
      <style:text-properties fo:letter-spacing="-0.1pt"/>
    </style:style>
    <style:style style:family="text" style:name="T4374">
      <style:text-properties fo:letter-spacing="-0.1pt"/>
    </style:style>
    <style:style style:family="text" style:name="T4375">
      <style:text-properties fo:letter-spacing="-0.1pt"/>
    </style:style>
    <style:style style:family="text" style:name="T4376">
      <style:text-properties fo:letter-spacing="-0.1pt"/>
    </style:style>
    <style:style style:family="text" style:name="T4377">
      <style:text-properties fo:letter-spacing="-0.1pt"/>
    </style:style>
    <style:style style:family="text" style:name="T4378">
      <style:text-properties fo:letter-spacing="-0.1pt"/>
    </style:style>
    <style:style style:family="text" style:name="T4379">
      <style:text-properties fo:letter-spacing="-0.1pt"/>
    </style:style>
    <style:style style:family="text" style:name="T4380">
      <style:text-properties fo:letter-spacing="-0.1pt"/>
    </style:style>
    <style:style style:family="text" style:name="T4381">
      <style:text-properties fo:letter-spacing="-0.1pt"/>
    </style:style>
    <style:style style:family="text" style:name="T4382">
      <style:text-properties fo:letter-spacing="-0.1pt"/>
    </style:style>
    <style:style style:family="text" style:name="T4383">
      <style:text-properties fo:letter-spacing="-0.1pt"/>
    </style:style>
    <style:style style:family="text" style:name="T4384">
      <style:text-properties fo:letter-spacing="-0.1pt"/>
    </style:style>
    <style:style style:family="text" style:name="T4385">
      <style:text-properties fo:letter-spacing="-0.1pt"/>
    </style:style>
    <style:style style:family="text" style:name="T4386">
      <style:text-properties fo:letter-spacing="-0.1pt"/>
    </style:style>
    <style:style style:family="text" style:name="T4387">
      <style:text-properties fo:letter-spacing="-0.1pt"/>
    </style:style>
    <style:style style:parent-style-name="708" style:family="paragraph" style:name="P634">
      <style:paragraph-properties fo:text-align="justify" fo:margin-top="1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4388">
      <style:text-properties fo:letter-spacing="-0.5pt"/>
    </style:style>
    <style:style style:family="text" style:name="T4389">
      <style:text-properties fo:letter-spacing="-0.3pt"/>
    </style:style>
    <style:style style:family="text" style:name="T4390">
      <style:text-properties fo:letter-spacing="-0.35pt"/>
    </style:style>
    <style:style style:family="text" style:name="T4391">
      <style:text-properties fo:letter-spacing="-0.3pt"/>
    </style:style>
    <style:style style:family="text" style:name="T4392">
      <style:text-properties fo:letter-spacing="-0.1pt"/>
    </style:style>
    <style:style style:parent-style-name="716" style:family="paragraph" style:name="P635">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93">
      <style:text-properties fo:font-size="17pt" fo:font-weight="bold"/>
    </style:style>
    <style:style style:family="text" style:name="T4394">
      <style:text-properties fo:font-size="17pt" fo:font-weight="bold"/>
    </style:style>
    <style:style style:parent-style-name="716" style:family="paragraph" style:name="P63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395">
      <style:text-properties fo:letter-spacing="-0.15pt"/>
    </style:style>
    <style:style style:family="text" style:name="T4396">
      <style:text-properties fo:letter-spacing="-0.15pt"/>
    </style:style>
    <style:style style:family="text" style:name="T4397">
      <style:text-properties fo:letter-spacing="-0.15pt"/>
    </style:style>
    <style:style style:family="text" style:name="T4398">
      <style:text-properties fo:letter-spacing="-0.15pt"/>
    </style:style>
    <style:style style:family="text" style:name="T4399">
      <style:text-properties fo:letter-spacing="-0.15pt"/>
    </style:style>
    <style:style style:family="text" style:name="T4400">
      <style:text-properties fo:letter-spacing="-0.15pt"/>
    </style:style>
    <style:style style:family="text" style:name="T4401">
      <style:text-properties fo:letter-spacing="-0.15pt"/>
    </style:style>
    <style:style style:family="text" style:name="T4402">
      <style:text-properties fo:letter-spacing="-0.15pt"/>
    </style:style>
    <style:style style:family="text" style:name="T4403">
      <style:text-properties fo:letter-spacing="-0.15pt"/>
    </style:style>
    <style:style style:family="text" style:name="T4404">
      <style:text-properties fo:letter-spacing="-0.15pt"/>
    </style:style>
    <style:style style:family="text" style:name="T4405">
      <style:text-properties fo:letter-spacing="-0.15pt"/>
    </style:style>
    <style:style style:family="text" style:name="T4406">
      <style:text-properties fo:letter-spacing="-0.15pt"/>
    </style:style>
    <style:style style:family="text" style:name="T4407">
      <style:text-properties fo:letter-spacing="-0.1pt"/>
    </style:style>
    <style:style style:parent-style-name="716" style:family="paragraph" style:name="P63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38">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08">
      <style:text-properties fo:letter-spacing="-0.1pt"/>
    </style:style>
    <style:style style:family="text" style:name="T4409">
      <style:text-properties fo:letter-spacing="-0.1pt"/>
    </style:style>
    <style:style style:family="text" style:name="T4410">
      <style:text-properties fo:letter-spacing="-0.1pt"/>
    </style:style>
    <style:style style:family="text" style:name="T4411">
      <style:text-properties fo:letter-spacing="-0.1pt"/>
    </style:style>
    <style:style style:family="text" style:name="T4412">
      <style:text-properties fo:letter-spacing="-0.1pt"/>
    </style:style>
    <style:style style:family="text" style:name="T4413">
      <style:text-properties fo:letter-spacing="-0.1pt"/>
    </style:style>
    <style:style style:family="text" style:name="T4414">
      <style:text-properties fo:letter-spacing="-0.1pt"/>
    </style:style>
    <style:style style:family="text" style:name="T4415">
      <style:text-properties fo:letter-spacing="-0.1pt"/>
    </style:style>
    <style:style style:family="text" style:name="T4416">
      <style:text-properties fo:letter-spacing="-0.1pt"/>
    </style:style>
    <style:style style:family="text" style:name="T4417">
      <style:text-properties fo:letter-spacing="-0.1pt"/>
    </style:style>
    <style:style style:family="text" style:name="T4418">
      <style:text-properties fo:letter-spacing="-0.1pt"/>
    </style:style>
    <style:style style:family="text" style:name="T4419">
      <style:text-properties fo:letter-spacing="-0.1pt"/>
    </style:style>
    <style:style style:family="text" style:name="T4420">
      <style:text-properties fo:letter-spacing="-0.1pt"/>
    </style:style>
    <style:style style:parent-style-name="716" style:family="paragraph" style:name="P63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21">
      <style:text-properties fo:letter-spacing="-0.3pt"/>
    </style:style>
    <style:style style:family="text" style:name="T4422">
      <style:text-properties fo:letter-spacing="-0.3pt"/>
    </style:style>
    <style:style style:family="text" style:name="T4423">
      <style:text-properties fo:letter-spacing="-0.3pt"/>
    </style:style>
    <style:style style:family="text" style:name="T4424">
      <style:text-properties fo:letter-spacing="-0.3pt"/>
    </style:style>
    <style:style style:family="text" style:name="T4425">
      <style:text-properties fo:letter-spacing="-0.3pt"/>
    </style:style>
    <style:style style:family="text" style:name="T4426">
      <style:text-properties fo:letter-spacing="-0.3pt"/>
    </style:style>
    <style:style style:family="text" style:name="T4427">
      <style:text-properties fo:letter-spacing="-0.3pt"/>
    </style:style>
    <style:style style:parent-style-name="716" style:family="paragraph" style:name="P64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41">
      <style:paragraph-properties fo:text-align="justify" fo:margin-left="0cm" fo:margin-right="0.6033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28">
      <style:text-properties fo:letter-spacing="-0.15pt"/>
    </style:style>
    <style:style style:family="text" style:name="T4429">
      <style:text-properties fo:letter-spacing="-0.15pt"/>
    </style:style>
    <style:style style:family="text" style:name="T4430">
      <style:text-properties fo:letter-spacing="-0.15pt"/>
    </style:style>
    <style:style style:family="text" style:name="T4431">
      <style:text-properties fo:letter-spacing="-0.15pt"/>
    </style:style>
    <style:style style:family="text" style:name="T4432">
      <style:text-properties fo:letter-spacing="-0.15pt"/>
    </style:style>
    <style:style style:family="text" style:name="T4433">
      <style:text-properties fo:letter-spacing="-0.15pt"/>
    </style:style>
    <style:style style:family="text" style:name="T4434">
      <style:text-properties fo:letter-spacing="-0.15pt"/>
    </style:style>
    <style:style style:family="text" style:name="T4435">
      <style:text-properties fo:letter-spacing="-0.15pt"/>
    </style:style>
    <style:style style:family="text" style:name="T4436">
      <style:text-properties fo:letter-spacing="-0.15pt"/>
    </style:style>
    <style:style style:family="text" style:name="T4437">
      <style:text-properties fo:letter-spacing="-0.15pt"/>
    </style:style>
    <style:style style:family="text" style:name="T4438">
      <style:text-properties fo:letter-spacing="-0.15pt"/>
    </style:style>
    <style:style style:family="text" style:name="T4439">
      <style:text-properties fo:letter-spacing="-0.1pt"/>
    </style:style>
    <style:style style:family="text" style:name="T4440">
      <style:text-properties fo:letter-spacing="-0.1pt"/>
    </style:style>
    <style:style style:family="text" style:name="T4441">
      <style:text-properties fo:letter-spacing="-0.1pt"/>
    </style:style>
    <style:style style:family="text" style:name="T4442">
      <style:text-properties fo:letter-spacing="-0.1pt"/>
    </style:style>
    <style:style style:family="text" style:name="T4443">
      <style:text-properties fo:letter-spacing="-0.1pt"/>
    </style:style>
    <style:style style:family="text" style:name="T4444">
      <style:text-properties fo:letter-spacing="-0.1pt"/>
    </style:style>
    <style:style style:family="text" style:name="T4445">
      <style:text-properties fo:letter-spacing="-0.1pt"/>
    </style:style>
    <style:style style:family="text" style:name="T4446">
      <style:text-properties fo:letter-spacing="-0.1pt"/>
    </style:style>
    <style:style style:family="text" style:name="T4447">
      <style:text-properties fo:letter-spacing="-0.1pt"/>
    </style:style>
    <style:style style:family="text" style:name="T4448">
      <style:text-properties fo:letter-spacing="-0.1pt"/>
    </style:style>
    <style:style style:family="text" style:name="T4449">
      <style:text-properties fo:letter-spacing="-0.1pt"/>
    </style:style>
    <style:style style:parent-style-name="716" style:master-page-name="MasterPage30" style:family="paragraph" style:name="P642">
      <style:paragraph-properties fo:margin-left="0cm" fo:margin-right="0.4022cm" fo:text-indent="0cm" fo:margin-top="3.7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50">
      <style:text-properties fo:letter-spacing="-0.3pt"/>
    </style:style>
    <style:style style:family="text" style:name="T4451">
      <style:text-properties fo:letter-spacing="-0.3pt"/>
    </style:style>
    <style:style style:family="text" style:name="T4452">
      <style:text-properties fo:letter-spacing="-0.3pt"/>
    </style:style>
    <style:style style:family="text" style:name="T4453">
      <style:text-properties fo:letter-spacing="-0.3pt"/>
    </style:style>
    <style:style style:family="text" style:name="T4454">
      <style:text-properties fo:letter-spacing="-0.3pt"/>
    </style:style>
    <style:style style:family="text" style:name="T4455">
      <style:text-properties fo:letter-spacing="-0.3pt"/>
    </style:style>
    <style:style style:family="text" style:name="T4456">
      <style:text-properties fo:letter-spacing="-0.3pt"/>
    </style:style>
    <style:style style:family="text" style:name="T4457">
      <style:text-properties fo:letter-spacing="-0.3pt"/>
    </style:style>
    <style:style style:family="text" style:name="T4458">
      <style:text-properties fo:letter-spacing="-0.3pt"/>
    </style:style>
    <style:style style:family="text" style:name="T4459">
      <style:text-properties fo:letter-spacing="-0.3pt"/>
    </style:style>
    <style:style style:family="text" style:name="T4460">
      <style:text-properties fo:letter-spacing="-0.3pt"/>
    </style:style>
    <style:style style:parent-style-name="716" style:family="paragraph" style:name="P643">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61">
      <style:text-properties fo:font-size="11.5pt"/>
    </style:style>
    <style:style style:family="text" style:name="T4462">
      <style:text-properties fo:font-size="11.5pt"/>
    </style:style>
    <style:style style:parent-style-name="716" style:family="paragraph" style:name="P64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63">
      <style:text-properties fo:letter-spacing="-0.15pt"/>
    </style:style>
    <style:style style:family="text" style:name="T4464">
      <style:text-properties fo:letter-spacing="-0.15pt"/>
    </style:style>
    <style:style style:family="text" style:name="T4465">
      <style:text-properties fo:letter-spacing="-0.15pt"/>
    </style:style>
    <style:style style:family="text" style:name="T4466">
      <style:text-properties fo:letter-spacing="-0.15pt"/>
    </style:style>
    <style:style style:family="text" style:name="T4467">
      <style:text-properties fo:letter-spacing="-0.15pt"/>
    </style:style>
    <style:style style:family="text" style:name="T4468">
      <style:text-properties fo:letter-spacing="-0.15pt"/>
    </style:style>
    <style:style style:family="text" style:name="T4469">
      <style:text-properties fo:letter-spacing="-0.15pt"/>
    </style:style>
    <style:style style:family="text" style:name="T4470">
      <style:text-properties fo:letter-spacing="-0.15pt"/>
    </style:style>
    <style:style style:family="text" style:name="T4471">
      <style:text-properties fo:letter-spacing="-0.15pt"/>
    </style:style>
    <style:style style:family="text" style:name="T4472">
      <style:text-properties fo:letter-spacing="-0.15pt"/>
    </style:style>
    <style:style style:family="text" style:name="T4473">
      <style:text-properties fo:letter-spacing="-0.15pt"/>
    </style:style>
    <style:style style:family="text" style:name="T4474">
      <style:text-properties fo:letter-spacing="-0.15pt"/>
    </style:style>
    <style:style style:family="text" style:name="T4475">
      <style:text-properties fo:letter-spacing="-0.1pt"/>
    </style:style>
    <style:style style:parent-style-name="716" style:family="paragraph" style:name="P64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46">
      <style:paragraph-properties fo:margin-left="0cm" fo:margin-right="1.429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76">
      <style:text-properties fo:letter-spacing="-0.1pt"/>
    </style:style>
    <style:style style:family="text" style:name="T4477">
      <style:text-properties fo:letter-spacing="-0.1pt"/>
    </style:style>
    <style:style style:family="text" style:name="T4478">
      <style:text-properties fo:letter-spacing="-0.1pt"/>
    </style:style>
    <style:style style:family="text" style:name="T4479">
      <style:text-properties fo:letter-spacing="-0.1pt"/>
    </style:style>
    <style:style style:family="text" style:name="T4480">
      <style:text-properties fo:letter-spacing="-0.1pt"/>
    </style:style>
    <style:style style:family="text" style:name="T4481">
      <style:text-properties fo:letter-spacing="-0.1pt"/>
    </style:style>
    <style:style style:family="text" style:name="T4482">
      <style:text-properties fo:letter-spacing="-0.1pt"/>
    </style:style>
    <style:style style:family="text" style:name="T4483">
      <style:text-properties fo:letter-spacing="-0.1pt"/>
    </style:style>
    <style:style style:family="text" style:name="T4484">
      <style:text-properties fo:letter-spacing="-0.1pt"/>
    </style:style>
    <style:style style:family="text" style:name="T4485">
      <style:text-properties fo:letter-spacing="-0.1pt"/>
    </style:style>
    <style:style style:family="text" style:name="T4486">
      <style:text-properties fo:letter-spacing="-0.1pt"/>
    </style:style>
    <style:style style:family="text" style:name="T4487">
      <style:text-properties fo:letter-spacing="-0.1pt"/>
    </style:style>
    <style:style style:family="text" style:name="T4488">
      <style:text-properties fo:letter-spacing="-0.1pt"/>
    </style:style>
    <style:style style:family="text" style:name="T4489">
      <style:text-properties fo:letter-spacing="-0.1pt"/>
    </style:style>
    <style:style style:family="text" style:name="T4490">
      <style:text-properties fo:letter-spacing="-0.1pt"/>
    </style:style>
    <style:style style:parent-style-name="716" style:family="paragraph" style:name="P64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91">
      <style:text-properties fo:font-size="13pt"/>
    </style:style>
    <style:style style:family="text" style:name="T4492">
      <style:text-properties fo:font-size="13pt"/>
    </style:style>
    <style:style style:parent-style-name="716" style:family="paragraph" style:name="P648">
      <style:paragraph-properties fo:margin-left="0cm" fo:margin-right="0cm" fo:text-indent="0cm" fo:margin-top="0.4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493">
      <style:text-properties fo:font-size="18.5pt"/>
    </style:style>
    <style:style style:family="text" style:name="T4494">
      <style:text-properties fo:font-size="18.5pt"/>
    </style:style>
    <style:style style:parent-style-name="711" style:family="paragraph" style:name="P649">
      <style:paragraph-properties fo:margin-left="0.1993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4495">
      <style:text-properties fo:letter-spacing="-0.1pt"/>
    </style:style>
    <style:style style:family="text" style:name="T4496">
      <style:text-properties fo:letter-spacing="-0.05pt"/>
    </style:style>
    <style:style style:family="text" style:name="T4497">
      <style:text-properties fo:letter-spacing="-0.05pt"/>
    </style:style>
    <style:style style:family="text" style:name="T4498">
      <style:text-properties fo:letter-spacing="-0.05pt"/>
    </style:style>
    <style:style style:family="text" style:name="T4499">
      <style:text-properties fo:letter-spacing="-0.1pt"/>
    </style:style>
    <style:style style:parent-style-name="716" style:family="paragraph" style:name="P650">
      <style:paragraph-properties fo:line-height="115%" fo:margin-left="0cm" fo:margin-right="0.5504cm" fo:text-indent="0cm" fo:margin-top="9.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500">
      <style:text-properties fo:letter-spacing="-0.1pt"/>
    </style:style>
    <style:style style:family="text" style:name="T4501">
      <style:text-properties fo:letter-spacing="-0.1pt"/>
    </style:style>
    <style:style style:parent-style-name="716" style:family="paragraph" style:name="P651">
      <style:paragraph-properties fo:line-height="115%"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502">
      <style:text-properties fo:letter-spacing="-0.1pt"/>
    </style:style>
    <style:style style:family="text" style:name="T4503">
      <style:text-properties fo:letter-spacing="-0.1pt"/>
    </style:style>
    <style:style style:family="text" style:name="T4504">
      <style:text-properties fo:letter-spacing="-0.1pt"/>
    </style:style>
    <style:style style:family="text" style:name="T4505">
      <style:text-properties fo:letter-spacing="-0.1pt"/>
    </style:style>
    <style:style style:family="text" style:name="T4506">
      <style:text-properties fo:letter-spacing="-0.1pt"/>
    </style:style>
    <style:style style:family="text" style:name="T4507">
      <style:text-properties fo:letter-spacing="-0.1pt"/>
    </style:style>
    <style:style style:family="text" style:name="T4508">
      <style:text-properties fo:letter-spacing="-0.1pt"/>
    </style:style>
    <style:style style:family="text" style:name="T4509">
      <style:text-properties fo:letter-spacing="-0.1pt"/>
    </style:style>
    <style:style style:family="text" style:name="T4510">
      <style:text-properties fo:letter-spacing="-0.1pt"/>
    </style:style>
    <style:style style:family="text" style:name="T4511">
      <style:text-properties fo:letter-spacing="-0.1pt"/>
    </style:style>
    <style:style style:family="text" style:name="T4512">
      <style:text-properties fo:letter-spacing="-0.1pt"/>
    </style:style>
    <style:style style:family="text" style:name="T4513">
      <style:text-properties fo:letter-spacing="-0.1pt"/>
    </style:style>
    <style:style style:family="text" style:name="T4514">
      <style:text-properties fo:letter-spacing="-0.1pt"/>
    </style:style>
    <style:style style:family="text" style:name="T4515">
      <style:text-properties fo:letter-spacing="-0.1pt"/>
    </style:style>
    <style:style style:family="text" style:name="T4516">
      <style:text-properties fo:letter-spacing="-0.1pt"/>
    </style:style>
    <style:style style:family="text" style:name="T4517">
      <style:text-properties fo:letter-spacing="-0.1pt"/>
    </style:style>
    <style:style style:family="text" style:name="T4518">
      <style:text-properties fo:letter-spacing="-0.1pt"/>
    </style:style>
    <style:style style:family="text" style:name="T4519">
      <style:text-properties fo:letter-spacing="-0.1pt"/>
    </style:style>
    <style:style style:family="text" style:name="T4520">
      <style:text-properties fo:letter-spacing="-0.1pt"/>
    </style:style>
    <style:style style:family="text" style:name="T4521">
      <style:text-properties fo:letter-spacing="-0.1pt"/>
    </style:style>
    <style:style style:family="text" style:name="T4522">
      <style:text-properties fo:letter-spacing="-0.1pt"/>
    </style:style>
    <style:style style:family="text" style:name="T4523">
      <style:text-properties fo:letter-spacing="-0.1pt"/>
    </style:style>
    <style:style style:family="text" style:name="T4524">
      <style:text-properties fo:letter-spacing="-0.1pt"/>
    </style:style>
    <style:style style:family="text" style:name="T4525">
      <style:text-properties fo:letter-spacing="-0.1pt"/>
    </style:style>
    <style:style style:family="text" style:name="T4526">
      <style:text-properties fo:letter-spacing="-0.1pt"/>
    </style:style>
    <style:style style:family="text" style:name="T4527">
      <style:text-properties fo:letter-spacing="-0.1pt"/>
    </style:style>
    <style:style style:parent-style-name="716" style:family="paragraph" style:name="P652">
      <style:paragraph-properties fo:line-height="115%" fo:margin-left="0cm" fo:margin-right="0.5504cm" fo:text-indent="0cm" fo:margin-top="6.9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528">
      <style:text-properties fo:letter-spacing="-0.15pt"/>
    </style:style>
    <style:style style:family="text" style:name="T4529">
      <style:text-properties fo:letter-spacing="-0.15pt"/>
    </style:style>
    <style:style style:family="text" style:name="T4530">
      <style:text-properties fo:letter-spacing="-0.15pt"/>
    </style:style>
    <style:style style:family="text" style:name="T4531">
      <style:text-properties fo:letter-spacing="-0.15pt"/>
    </style:style>
    <style:style style:family="text" style:name="T4532">
      <style:text-properties fo:letter-spacing="-0.15pt"/>
    </style:style>
    <style:style style:family="text" style:name="T4533">
      <style:text-properties fo:letter-spacing="-0.15pt"/>
    </style:style>
    <style:style style:family="text" style:name="T4534">
      <style:text-properties fo:letter-spacing="-0.15pt"/>
    </style:style>
    <style:style style:family="text" style:name="T4535">
      <style:text-properties fo:letter-spacing="-0.15pt"/>
    </style:style>
    <style:style style:family="text" style:name="T4536">
      <style:text-properties fo:letter-spacing="-0.15pt"/>
    </style:style>
    <style:style style:family="text" style:name="T4537">
      <style:text-properties fo:letter-spacing="-0.15pt"/>
    </style:style>
    <style:style style:family="text" style:name="T4538">
      <style:text-properties fo:letter-spacing="-0.15pt"/>
    </style:style>
    <style:style style:family="text" style:name="T4539">
      <style:text-properties fo:letter-spacing="-0.15pt"/>
    </style:style>
    <style:style style:parent-style-name="716" style:family="paragraph" style:name="P653">
      <style:paragraph-properties fo:margin-top="7.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540">
      <style:text-properties fo:letter-spacing="-0.05pt"/>
    </style:style>
    <style:style style:family="text" style:name="T4541">
      <style:text-properties fo:letter-spacing="-0.05pt"/>
    </style:style>
    <style:style style:family="text" style:name="T4542">
      <style:text-properties fo:letter-spacing="-0.05pt"/>
    </style:style>
    <style:style style:family="text" style:name="T4543">
      <style:text-properties fo:letter-spacing="-0.05pt"/>
    </style:style>
    <style:style style:family="text" style:name="T4544">
      <style:text-properties fo:letter-spacing="-0.05pt"/>
    </style:style>
    <style:style style:family="text" style:name="T4545">
      <style:text-properties fo:letter-spacing="-0.05pt"/>
    </style:style>
    <style:style style:family="text" style:name="T4546">
      <style:text-properties fo:letter-spacing="-0.05pt"/>
    </style:style>
    <style:style style:family="text" style:name="T4547">
      <style:text-properties fo:letter-spacing="-0.05pt"/>
    </style:style>
    <style:style style:family="text" style:name="T4548">
      <style:text-properties fo:letter-spacing="-0.05pt"/>
    </style:style>
    <style:style style:family="text" style:name="T4549">
      <style:text-properties fo:letter-spacing="-0.1pt"/>
    </style:style>
    <style:style style:parent-style-name="717" style:list-style-name="WWNum17" style:family="paragraph" style:name="P654">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550">
      <style:text-properties fo:font-size="12pt"/>
    </style:style>
    <style:style style:family="text" style:name="T4551">
      <style:text-properties fo:font-size="12pt" fo:letter-spacing="-0.05pt"/>
    </style:style>
    <style:style style:family="text" style:name="T4552">
      <style:text-properties fo:font-size="12pt"/>
    </style:style>
    <style:style style:family="text" style:name="T4553">
      <style:text-properties fo:font-size="12pt" fo:letter-spacing="-0.05pt"/>
    </style:style>
    <style:style style:family="text" style:name="T4554">
      <style:text-properties fo:font-size="12pt"/>
    </style:style>
    <style:style style:family="text" style:name="T4555">
      <style:text-properties fo:font-size="12pt" fo:letter-spacing="-0.05pt"/>
    </style:style>
    <style:style style:family="text" style:name="T4556">
      <style:text-properties fo:font-size="12pt"/>
    </style:style>
    <style:style style:family="text" style:name="T4557">
      <style:text-properties fo:font-size="12pt" fo:letter-spacing="-0.05pt"/>
    </style:style>
    <style:style style:family="text" style:name="T4558">
      <style:text-properties fo:font-size="12pt"/>
    </style:style>
    <style:style style:family="text" style:name="T4559">
      <style:text-properties fo:font-size="12pt" fo:letter-spacing="-0.05pt"/>
    </style:style>
    <style:style style:family="text" style:name="T4560">
      <style:text-properties fo:font-size="12pt"/>
    </style:style>
    <style:style style:family="text" style:name="T4561">
      <style:text-properties fo:font-size="12pt" fo:letter-spacing="-0.1pt"/>
    </style:style>
    <style:style style:parent-style-name="717" style:list-style-name="WWNum17" style:family="paragraph" style:name="P655">
      <style:paragraph-properties fo:line-height="115%" fo:margin-left="1.443cm" fo:margin-right="0.411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562">
      <style:text-properties fo:font-size="12pt"/>
    </style:style>
    <style:style style:family="text" style:name="T4563">
      <style:text-properties fo:font-size="12pt" fo:letter-spacing="-0.1pt"/>
    </style:style>
    <style:style style:family="text" style:name="T4564">
      <style:text-properties fo:font-size="12pt"/>
    </style:style>
    <style:style style:family="text" style:name="T4565">
      <style:text-properties fo:font-size="12pt" fo:letter-spacing="-0.1pt"/>
    </style:style>
    <style:style style:family="text" style:name="T4566">
      <style:text-properties fo:font-size="12pt"/>
    </style:style>
    <style:style style:family="text" style:name="T4567">
      <style:text-properties fo:font-size="12pt" fo:letter-spacing="-0.1pt"/>
    </style:style>
    <style:style style:family="text" style:name="T4568">
      <style:text-properties fo:font-size="12pt"/>
    </style:style>
    <style:style style:family="text" style:name="T4569">
      <style:text-properties fo:font-size="12pt" fo:letter-spacing="-0.1pt"/>
    </style:style>
    <style:style style:family="text" style:name="T4570">
      <style:text-properties fo:font-size="12pt"/>
    </style:style>
    <style:style style:family="text" style:name="T4571">
      <style:text-properties fo:font-size="12pt" fo:letter-spacing="-0.1pt"/>
    </style:style>
    <style:style style:family="text" style:name="T4572">
      <style:text-properties fo:font-size="12pt"/>
    </style:style>
    <style:style style:family="text" style:name="T4573">
      <style:text-properties fo:font-size="12pt" fo:letter-spacing="-0.1pt"/>
    </style:style>
    <style:style style:family="text" style:name="T4574">
      <style:text-properties fo:font-size="12pt"/>
    </style:style>
    <style:style style:family="text" style:name="T4575">
      <style:text-properties fo:font-size="12pt" fo:letter-spacing="-0.1pt"/>
    </style:style>
    <style:style style:family="text" style:name="T4576">
      <style:text-properties fo:font-size="12pt"/>
    </style:style>
    <style:style style:family="text" style:name="T4577">
      <style:text-properties fo:font-size="12pt" fo:letter-spacing="-0.1pt"/>
    </style:style>
    <style:style style:family="text" style:name="T4578">
      <style:text-properties fo:font-size="12pt"/>
    </style:style>
    <style:style style:family="text" style:name="T4579">
      <style:text-properties fo:font-size="12pt" fo:letter-spacing="-0.1pt"/>
    </style:style>
    <style:style style:family="text" style:name="T4580">
      <style:text-properties fo:font-size="12pt"/>
    </style:style>
    <style:style style:family="text" style:name="T4581">
      <style:text-properties fo:font-size="12pt" fo:letter-spacing="-0.1pt"/>
    </style:style>
    <style:style style:family="text" style:name="T4582">
      <style:text-properties fo:font-size="12pt"/>
    </style:style>
    <style:style style:family="text" style:name="T4583">
      <style:text-properties fo:font-size="12pt" fo:letter-spacing="-0.1pt"/>
    </style:style>
    <style:style style:family="text" style:name="T4584">
      <style:text-properties fo:font-size="12pt"/>
    </style:style>
    <style:style style:family="text" style:name="T4585">
      <style:text-properties fo:font-size="12pt" fo:letter-spacing="-0.1pt"/>
    </style:style>
    <style:style style:family="text" style:name="T4586">
      <style:text-properties fo:font-size="12pt"/>
    </style:style>
    <style:style style:family="text" style:name="T4587">
      <style:text-properties fo:font-size="12pt" fo:letter-spacing="-0.1pt"/>
    </style:style>
    <style:style style:family="text" style:name="T4588">
      <style:text-properties fo:font-size="12pt"/>
    </style:style>
    <style:style style:family="text" style:name="T4589">
      <style:text-properties fo:font-size="12pt" fo:letter-spacing="-0.1pt"/>
    </style:style>
    <style:style style:family="text" style:name="T4590">
      <style:text-properties fo:font-size="12pt"/>
    </style:style>
    <style:style style:parent-style-name="717" style:list-style-name="WWNum17" style:family="paragraph" style:name="P656">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591">
      <style:text-properties fo:font-size="12pt"/>
    </style:style>
    <style:style style:family="text" style:name="T4592">
      <style:text-properties fo:font-size="12pt" fo:letter-spacing="-0.1pt"/>
    </style:style>
    <style:style style:parent-style-name="717" style:list-style-name="WWNum17" style:family="paragraph" style:name="P657">
      <style:paragraph-properties fo:line-height="115%" fo:margin-left="1.443cm" fo:margin-right="2.036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593">
      <style:text-properties fo:font-size="12pt"/>
    </style:style>
    <style:style style:family="text" style:name="T4594">
      <style:text-properties fo:font-size="12pt" fo:letter-spacing="-0.15pt"/>
    </style:style>
    <style:style style:family="text" style:name="T4595">
      <style:text-properties fo:font-size="12pt"/>
    </style:style>
    <style:style style:family="text" style:name="T4596">
      <style:text-properties fo:font-size="12pt" fo:letter-spacing="-0.15pt"/>
    </style:style>
    <style:style style:family="text" style:name="T4597">
      <style:text-properties fo:font-size="12pt"/>
    </style:style>
    <style:style style:family="text" style:name="T4598">
      <style:text-properties fo:font-size="12pt" fo:letter-spacing="-0.15pt"/>
    </style:style>
    <style:style style:family="text" style:name="T4599">
      <style:text-properties fo:font-size="12pt"/>
    </style:style>
    <style:style style:family="text" style:name="T4600">
      <style:text-properties fo:font-size="12pt" fo:letter-spacing="-0.15pt"/>
    </style:style>
    <style:style style:family="text" style:name="T4601">
      <style:text-properties fo:font-size="12pt"/>
    </style:style>
    <style:style style:family="text" style:name="T4602">
      <style:text-properties fo:font-size="12pt" fo:letter-spacing="-0.15pt"/>
    </style:style>
    <style:style style:family="text" style:name="T4603">
      <style:text-properties fo:font-size="12pt"/>
    </style:style>
    <style:style style:family="text" style:name="T4604">
      <style:text-properties fo:font-size="12pt" fo:letter-spacing="-0.15pt"/>
    </style:style>
    <style:style style:family="text" style:name="T4605">
      <style:text-properties fo:font-size="12pt"/>
    </style:style>
    <style:style style:family="text" style:name="T4606">
      <style:text-properties fo:font-size="12pt" fo:letter-spacing="-0.15pt"/>
    </style:style>
    <style:style style:family="text" style:name="T4607">
      <style:text-properties fo:font-size="12pt"/>
    </style:style>
    <style:style style:family="text" style:name="T4608">
      <style:text-properties fo:font-size="12pt" fo:letter-spacing="-0.15pt"/>
    </style:style>
    <style:style style:family="text" style:name="T4609">
      <style:text-properties fo:font-size="12pt"/>
    </style:style>
    <style:style style:family="text" style:name="T4610">
      <style:text-properties fo:font-size="12pt" fo:letter-spacing="-0.15pt"/>
    </style:style>
    <style:style style:family="text" style:name="T4611">
      <style:text-properties fo:font-size="12pt"/>
    </style:style>
    <style:style style:family="text" style:name="T4612">
      <style:text-properties fo:font-size="12pt" fo:letter-spacing="-0.15pt"/>
    </style:style>
    <style:style style:family="text" style:name="T4613">
      <style:text-properties fo:font-size="12pt"/>
    </style:style>
    <style:style style:parent-style-name="717" style:list-style-name="WWNum17" style:family="paragraph" style:name="P658">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614">
      <style:text-properties fo:font-size="12pt"/>
    </style:style>
    <style:style style:family="text" style:name="T4615">
      <style:text-properties fo:font-size="12pt" fo:letter-spacing="-0.05pt"/>
    </style:style>
    <style:style style:family="text" style:name="T4616">
      <style:text-properties fo:font-size="12pt"/>
    </style:style>
    <style:style style:family="text" style:name="T4617">
      <style:text-properties fo:font-size="12pt" fo:letter-spacing="-0.05pt"/>
    </style:style>
    <style:style style:family="text" style:name="T4618">
      <style:text-properties fo:font-size="12pt"/>
    </style:style>
    <style:style style:family="text" style:name="T4619">
      <style:text-properties fo:font-size="12pt" fo:letter-spacing="-0.05pt"/>
    </style:style>
    <style:style style:family="text" style:name="T4620">
      <style:text-properties fo:font-size="12pt"/>
    </style:style>
    <style:style style:family="text" style:name="T4621">
      <style:text-properties fo:font-size="12pt" fo:letter-spacing="-0.05pt"/>
    </style:style>
    <style:style style:family="text" style:name="T4622">
      <style:text-properties fo:font-size="12pt"/>
    </style:style>
    <style:style style:family="text" style:name="T4623">
      <style:text-properties fo:font-size="12pt" fo:letter-spacing="-0.05pt"/>
    </style:style>
    <style:style style:family="text" style:name="T4624">
      <style:text-properties fo:font-size="12pt"/>
    </style:style>
    <style:style style:family="text" style:name="T4625">
      <style:text-properties fo:font-size="12pt" fo:letter-spacing="-0.1pt"/>
    </style:style>
    <style:style style:parent-style-name="717" style:list-style-name="WWNum17" style:family="paragraph" style:name="P659">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626">
      <style:text-properties fo:font-size="12pt"/>
    </style:style>
    <style:style style:family="text" style:name="T4627">
      <style:text-properties fo:font-size="12pt" fo:letter-spacing="-0.15pt"/>
    </style:style>
    <style:style style:parent-style-name="717" style:list-style-name="WWNum17" style:family="paragraph" style:name="P660">
      <style:paragraph-properties fo:line-height="115%" fo:margin-left="1.443cm" fo:margin-right="1.198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628">
      <style:text-properties fo:font-size="12pt"/>
    </style:style>
    <style:style style:family="text" style:name="T4629">
      <style:text-properties fo:font-size="12pt" fo:letter-spacing="-0.25pt"/>
    </style:style>
    <style:style style:family="text" style:name="T4630">
      <style:text-properties fo:font-size="12pt"/>
    </style:style>
    <style:style style:family="text" style:name="T4631">
      <style:text-properties fo:font-size="12pt" fo:letter-spacing="-0.25pt"/>
    </style:style>
    <style:style style:family="text" style:name="T4632">
      <style:text-properties fo:font-size="12pt"/>
    </style:style>
    <style:style style:family="text" style:name="T4633">
      <style:text-properties fo:font-size="12pt" fo:letter-spacing="-0.25pt"/>
    </style:style>
    <style:style style:family="text" style:name="T4634">
      <style:text-properties fo:font-size="12pt"/>
    </style:style>
    <style:style style:family="text" style:name="T4635">
      <style:text-properties fo:font-size="12pt" fo:letter-spacing="-0.25pt"/>
    </style:style>
    <style:style style:family="text" style:name="T4636">
      <style:text-properties fo:font-size="12pt"/>
    </style:style>
    <style:style style:family="text" style:name="T4637">
      <style:text-properties fo:font-size="12pt" fo:letter-spacing="-0.25pt"/>
    </style:style>
    <style:style style:family="text" style:name="T4638">
      <style:text-properties fo:font-size="12pt"/>
    </style:style>
    <style:style style:family="text" style:name="T4639">
      <style:text-properties fo:font-size="12pt" fo:letter-spacing="-0.25pt"/>
    </style:style>
    <style:style style:family="text" style:name="T4640">
      <style:text-properties fo:font-size="12pt"/>
    </style:style>
    <style:style style:family="text" style:name="T4641">
      <style:text-properties fo:font-size="12pt" fo:letter-spacing="-0.25pt"/>
    </style:style>
    <style:style style:family="text" style:name="T4642">
      <style:text-properties fo:font-size="12pt"/>
    </style:style>
    <style:style style:family="text" style:name="T4643">
      <style:text-properties fo:font-size="12pt" fo:letter-spacing="-0.25pt"/>
    </style:style>
    <style:style style:family="text" style:name="T4644">
      <style:text-properties fo:font-size="12pt"/>
    </style:style>
    <style:style style:family="text" style:name="T4645">
      <style:text-properties fo:font-size="12pt" fo:letter-spacing="-0.25pt"/>
    </style:style>
    <style:style style:family="text" style:name="T4646">
      <style:text-properties fo:font-size="12pt"/>
    </style:style>
    <style:style style:family="text" style:name="T4647">
      <style:text-properties fo:font-size="12pt" fo:letter-spacing="-0.25pt"/>
    </style:style>
    <style:style style:family="text" style:name="T4648">
      <style:text-properties fo:font-size="12pt"/>
    </style:style>
    <style:style style:family="text" style:name="T4649">
      <style:text-properties fo:font-size="12pt" fo:letter-spacing="-0.25pt"/>
    </style:style>
    <style:style style:family="text" style:name="T4650">
      <style:text-properties fo:font-size="12pt"/>
    </style:style>
    <style:style style:family="text" style:name="T4651">
      <style:text-properties fo:font-size="12pt" fo:letter-spacing="-0.25pt"/>
    </style:style>
    <style:style style:family="text" style:name="T4652">
      <style:text-properties fo:font-size="12pt"/>
    </style:style>
    <style:style style:parent-style-name="717" style:list-style-name="WWNum17" style:family="paragraph" style:name="P661">
      <style:paragraph-properties fo:line-height="115%" fo:margin-left="1.443cm" fo:margin-right="0.8114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653">
      <style:text-properties fo:font-size="12pt"/>
    </style:style>
    <style:style style:family="text" style:name="T4654">
      <style:text-properties fo:font-size="12pt" fo:letter-spacing="-0.1pt"/>
    </style:style>
    <style:style style:family="text" style:name="T4655">
      <style:text-properties fo:font-size="12pt"/>
    </style:style>
    <style:style style:family="text" style:name="T4656">
      <style:text-properties fo:font-size="12pt" fo:letter-spacing="-0.1pt"/>
    </style:style>
    <style:style style:family="text" style:name="T4657">
      <style:text-properties fo:font-size="12pt"/>
    </style:style>
    <style:style style:family="text" style:name="T4658">
      <style:text-properties fo:font-size="12pt" fo:letter-spacing="-0.1pt"/>
    </style:style>
    <style:style style:family="text" style:name="T4659">
      <style:text-properties fo:font-size="12pt"/>
    </style:style>
    <style:style style:family="text" style:name="T4660">
      <style:text-properties fo:font-size="12pt" fo:letter-spacing="-0.1pt"/>
    </style:style>
    <style:style style:family="text" style:name="T4661">
      <style:text-properties fo:font-size="12pt"/>
    </style:style>
    <style:style style:family="text" style:name="T4662">
      <style:text-properties fo:font-size="12pt" fo:letter-spacing="-0.1pt"/>
    </style:style>
    <style:style style:family="text" style:name="T4663">
      <style:text-properties fo:font-size="12pt"/>
    </style:style>
    <style:style style:family="text" style:name="T4664">
      <style:text-properties fo:font-size="12pt" fo:letter-spacing="-0.1pt"/>
    </style:style>
    <style:style style:family="text" style:name="T4665">
      <style:text-properties fo:font-size="12pt"/>
    </style:style>
    <style:style style:family="text" style:name="T4666">
      <style:text-properties fo:font-size="12pt" fo:letter-spacing="-0.1pt"/>
    </style:style>
    <style:style style:family="text" style:name="T4667">
      <style:text-properties fo:font-size="12pt"/>
    </style:style>
    <style:style style:family="text" style:name="T4668">
      <style:text-properties fo:font-size="12pt" fo:letter-spacing="-0.1pt"/>
    </style:style>
    <style:style style:family="text" style:name="T4669">
      <style:text-properties fo:font-size="12pt"/>
    </style:style>
    <style:style style:family="text" style:name="T4670">
      <style:text-properties fo:font-size="12pt" fo:letter-spacing="-0.1pt"/>
    </style:style>
    <style:style style:family="text" style:name="T4671">
      <style:text-properties fo:font-size="12pt"/>
    </style:style>
    <style:style style:family="text" style:name="T4672">
      <style:text-properties fo:font-size="12pt" fo:letter-spacing="-0.1pt"/>
    </style:style>
    <style:style style:family="text" style:name="T4673">
      <style:text-properties fo:font-size="12pt"/>
    </style:style>
    <style:style style:family="text" style:name="T4674">
      <style:text-properties fo:font-size="12pt" fo:letter-spacing="-0.1pt"/>
    </style:style>
    <style:style style:family="text" style:name="T4675">
      <style:text-properties fo:font-size="12pt"/>
    </style:style>
    <style:style style:family="text" style:name="T4676">
      <style:text-properties fo:font-size="12pt" fo:letter-spacing="-0.1pt"/>
    </style:style>
    <style:style style:family="text" style:name="T4677">
      <style:text-properties fo:font-size="12pt"/>
    </style:style>
    <style:style style:family="text" style:name="T4678">
      <style:text-properties fo:font-size="12pt" fo:letter-spacing="-0.1pt"/>
    </style:style>
    <style:style style:family="text" style:name="T4679">
      <style:text-properties fo:font-size="12pt"/>
    </style:style>
    <style:style style:parent-style-name="716" style:family="paragraph" style:name="P662">
      <style:paragraph-properties fo:margin-top="6.9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680">
      <style:text-properties fo:letter-spacing="-0.1pt"/>
    </style:style>
    <style:style style:family="text" style:name="T4681">
      <style:text-properties fo:letter-spacing="-0.05pt"/>
    </style:style>
    <style:style style:family="text" style:name="T4682">
      <style:text-properties fo:letter-spacing="-0.1pt"/>
    </style:style>
    <style:style style:family="text" style:name="T4683">
      <style:text-properties fo:letter-spacing="-0.05pt"/>
    </style:style>
    <style:style style:family="text" style:name="T4684">
      <style:text-properties fo:letter-spacing="-0.05pt"/>
    </style:style>
    <style:style style:family="text" style:name="T4685">
      <style:text-properties fo:letter-spacing="-0.1pt"/>
    </style:style>
    <style:style style:family="text" style:name="T4686">
      <style:text-properties fo:letter-spacing="-0.05pt"/>
    </style:style>
    <style:style style:family="text" style:name="T4687">
      <style:text-properties fo:letter-spacing="-0.1pt"/>
    </style:style>
    <style:style style:family="text" style:name="T4688">
      <style:text-properties fo:letter-spacing="-0.05pt"/>
    </style:style>
    <style:style style:family="text" style:name="T4689">
      <style:text-properties fo:letter-spacing="-0.05pt"/>
    </style:style>
    <style:style style:family="text" style:name="T4690">
      <style:text-properties fo:letter-spacing="-0.1pt"/>
    </style:style>
    <style:style style:family="text" style:name="T4691">
      <style:text-properties fo:letter-spacing="-0.05pt"/>
    </style:style>
    <style:style style:family="text" style:name="T4692">
      <style:text-properties fo:letter-spacing="-0.05pt"/>
    </style:style>
    <style:style style:family="text" style:name="T4693">
      <style:text-properties fo:letter-spacing="-0.1pt"/>
    </style:style>
    <style:style style:parent-style-name="707" style:master-page-name="MasterPage31" style:family="paragraph" style:name="P663">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4694">
      <style:text-properties fo:letter-spacing="-0.25pt"/>
    </style:style>
    <style:style style:family="text" style:name="T4695">
      <style:text-properties fo:letter-spacing="-0.25pt"/>
    </style:style>
    <style:style style:family="text" style:name="T4696">
      <style:text-properties fo:letter-spacing="-0.15pt"/>
    </style:style>
    <style:style style:family="text" style:name="T4697">
      <style:text-properties fo:letter-spacing="-0.1pt"/>
    </style:style>
    <style:style style:parent-style-name="716" style:family="paragraph" style:name="P664">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698">
      <style:text-properties fo:font-size="17pt" fo:font-weight="bold"/>
    </style:style>
    <style:style style:family="text" style:name="T4699">
      <style:text-properties fo:font-size="17pt" fo:font-weight="bold"/>
    </style:style>
    <style:style style:parent-style-name="716" style:family="paragraph" style:name="P665">
      <style:paragraph-properties fo:margin-left="0cm" fo:margin-right="0.774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00">
      <style:text-properties fo:letter-spacing="-0.15pt"/>
    </style:style>
    <style:style style:family="text" style:name="T4701">
      <style:text-properties fo:letter-spacing="-0.15pt"/>
    </style:style>
    <style:style style:family="text" style:name="T4702">
      <style:text-properties fo:letter-spacing="-0.15pt"/>
    </style:style>
    <style:style style:family="text" style:name="T4703">
      <style:text-properties fo:letter-spacing="-0.15pt"/>
    </style:style>
    <style:style style:family="text" style:name="T4704">
      <style:text-properties fo:letter-spacing="-0.15pt"/>
    </style:style>
    <style:style style:family="text" style:name="T4705">
      <style:text-properties fo:letter-spacing="-0.15pt"/>
    </style:style>
    <style:style style:family="text" style:name="T4706">
      <style:text-properties fo:letter-spacing="-0.15pt"/>
    </style:style>
    <style:style style:family="text" style:name="T4707">
      <style:text-properties fo:letter-spacing="-0.15pt"/>
    </style:style>
    <style:style style:family="text" style:name="T4708">
      <style:text-properties fo:letter-spacing="-0.15pt"/>
    </style:style>
    <style:style style:family="text" style:name="T4709">
      <style:text-properties fo:letter-spacing="-0.15pt"/>
    </style:style>
    <style:style style:family="text" style:name="T4710">
      <style:text-properties fo:letter-spacing="-0.15pt"/>
    </style:style>
    <style:style style:family="text" style:name="T4711">
      <style:text-properties fo:letter-spacing="-0.15pt"/>
    </style:style>
    <style:style style:family="text" style:name="T4712">
      <style:text-properties fo:letter-spacing="-0.15pt"/>
    </style:style>
    <style:style style:family="text" style:name="T4713">
      <style:text-properties fo:letter-spacing="-0.15pt"/>
    </style:style>
    <style:style style:family="text" style:name="T4714">
      <style:text-properties fo:letter-spacing="-0.15pt"/>
    </style:style>
    <style:style style:parent-style-name="716" style:family="paragraph" style:name="P666">
      <style:paragraph-properties fo:margin-left="0cm" fo:margin-right="0.1446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15">
      <style:text-properties fo:letter-spacing="-0.15pt"/>
    </style:style>
    <style:style style:family="text" style:name="T4716">
      <style:text-properties fo:letter-spacing="-0.15pt"/>
    </style:style>
    <style:style style:family="text" style:name="T4717">
      <style:text-properties fo:letter-spacing="-0.15pt"/>
    </style:style>
    <style:style style:family="text" style:name="T4718">
      <style:text-properties fo:letter-spacing="-0.15pt"/>
    </style:style>
    <style:style style:family="text" style:name="T4719">
      <style:text-properties fo:letter-spacing="-0.15pt"/>
    </style:style>
    <style:style style:family="text" style:name="T4720">
      <style:text-properties fo:letter-spacing="-0.15pt"/>
    </style:style>
    <style:style style:family="text" style:name="T4721">
      <style:text-properties fo:letter-spacing="-0.15pt"/>
    </style:style>
    <style:style style:family="text" style:name="T4722">
      <style:text-properties fo:letter-spacing="-0.15pt"/>
    </style:style>
    <style:style style:family="text" style:name="T4723">
      <style:text-properties fo:letter-spacing="-0.15pt"/>
    </style:style>
    <style:style style:family="text" style:name="T4724">
      <style:text-properties fo:letter-spacing="-0.15pt"/>
    </style:style>
    <style:style style:family="text" style:name="T4725">
      <style:text-properties fo:letter-spacing="-0.15pt"/>
    </style:style>
    <style:style style:family="text" style:name="T4726">
      <style:text-properties fo:letter-spacing="-0.15pt"/>
    </style:style>
    <style:style style:parent-style-name="716" style:family="paragraph" style:name="P66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68">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27">
      <style:text-properties fo:letter-spacing="-0.15pt"/>
    </style:style>
    <style:style style:family="text" style:name="T4728">
      <style:text-properties fo:letter-spacing="-0.15pt"/>
    </style:style>
    <style:style style:family="text" style:name="T4729">
      <style:text-properties fo:letter-spacing="-0.15pt"/>
    </style:style>
    <style:style style:family="text" style:name="T4730">
      <style:text-properties fo:letter-spacing="-0.15pt"/>
    </style:style>
    <style:style style:family="text" style:name="T4731">
      <style:text-properties fo:letter-spacing="-0.15pt"/>
    </style:style>
    <style:style style:family="text" style:name="T4732">
      <style:text-properties fo:letter-spacing="-0.15pt"/>
    </style:style>
    <style:style style:family="text" style:name="T4733">
      <style:text-properties fo:letter-spacing="-0.15pt"/>
    </style:style>
    <style:style style:family="text" style:name="T4734">
      <style:text-properties fo:letter-spacing="-0.15pt"/>
    </style:style>
    <style:style style:family="text" style:name="T4735">
      <style:text-properties fo:letter-spacing="-0.15pt"/>
    </style:style>
    <style:style style:family="text" style:name="T4736">
      <style:text-properties fo:letter-spacing="-0.15pt"/>
    </style:style>
    <style:style style:family="text" style:name="T4737">
      <style:text-properties fo:letter-spacing="-0.15pt"/>
    </style:style>
    <style:style style:parent-style-name="716" style:family="paragraph" style:name="P66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70">
      <style:paragraph-properties fo:margin-left="0cm" fo:margin-right="0.4022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38">
      <style:text-properties fo:letter-spacing="-0.25pt"/>
    </style:style>
    <style:style style:family="text" style:name="T4739">
      <style:text-properties fo:letter-spacing="-0.25pt"/>
    </style:style>
    <style:style style:family="text" style:name="T4740">
      <style:text-properties fo:letter-spacing="-0.25pt"/>
    </style:style>
    <style:style style:family="text" style:name="T4741">
      <style:text-properties fo:letter-spacing="-0.25pt"/>
    </style:style>
    <style:style style:family="text" style:name="T4742">
      <style:text-properties fo:letter-spacing="-0.25pt"/>
    </style:style>
    <style:style style:family="text" style:name="T4743">
      <style:text-properties fo:letter-spacing="-0.25pt"/>
    </style:style>
    <style:style style:family="text" style:name="T4744">
      <style:text-properties fo:letter-spacing="-0.25pt"/>
    </style:style>
    <style:style style:family="text" style:name="T4745">
      <style:text-properties fo:letter-spacing="-0.25pt"/>
    </style:style>
    <style:style style:family="text" style:name="T4746">
      <style:text-properties fo:letter-spacing="-0.25pt"/>
    </style:style>
    <style:style style:family="text" style:name="T4747">
      <style:text-properties fo:letter-spacing="-0.25pt"/>
    </style:style>
    <style:style style:family="text" style:name="T4748">
      <style:text-properties fo:letter-spacing="-0.25pt"/>
    </style:style>
    <style:style style:family="text" style:name="T4749">
      <style:text-properties fo:letter-spacing="-0.25pt"/>
    </style:style>
    <style:style style:parent-style-name="716" style:family="paragraph" style:name="P67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72">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50">
      <style:text-properties fo:letter-spacing="-0.25pt"/>
    </style:style>
    <style:style style:family="text" style:name="T4751">
      <style:text-properties fo:letter-spacing="-0.25pt"/>
    </style:style>
    <style:style style:family="text" style:name="T4752">
      <style:text-properties fo:letter-spacing="-0.25pt"/>
    </style:style>
    <style:style style:family="text" style:name="T4753">
      <style:text-properties fo:letter-spacing="-0.25pt"/>
    </style:style>
    <style:style style:family="text" style:name="T4754">
      <style:text-properties fo:letter-spacing="-0.25pt"/>
    </style:style>
    <style:style style:family="text" style:name="T4755">
      <style:text-properties fo:letter-spacing="-0.25pt"/>
    </style:style>
    <style:style style:family="text" style:name="T4756">
      <style:text-properties fo:letter-spacing="-0.25pt"/>
    </style:style>
    <style:style style:family="text" style:name="T4757">
      <style:text-properties fo:letter-spacing="-0.25pt"/>
    </style:style>
    <style:style style:family="text" style:name="T4758">
      <style:text-properties fo:letter-spacing="-0.25pt"/>
    </style:style>
    <style:style style:family="text" style:name="T4759">
      <style:text-properties fo:letter-spacing="-0.25pt"/>
    </style:style>
    <style:style style:family="text" style:name="T4760">
      <style:text-properties fo:letter-spacing="-0.25pt"/>
    </style:style>
    <style:style style:family="text" style:name="T4761">
      <style:text-properties fo:letter-spacing="-0.1pt"/>
    </style:style>
    <style:style style:parent-style-name="716" style:family="paragraph" style:name="P67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62">
      <style:text-properties fo:font-size="13pt"/>
    </style:style>
    <style:style style:family="text" style:name="T4763">
      <style:text-properties fo:font-size="13pt"/>
    </style:style>
    <style:style style:parent-style-name="708" style:family="paragraph" style:name="P674">
      <style:paragraph-properties fo:margin-top="8.85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4764">
      <style:text-properties fo:letter-spacing="-0.5pt"/>
    </style:style>
    <style:style style:family="text" style:name="T4765">
      <style:text-properties fo:letter-spacing="-0.45pt"/>
    </style:style>
    <style:style style:family="text" style:name="T4766">
      <style:text-properties fo:letter-spacing="-0.1pt"/>
    </style:style>
    <style:style style:parent-style-name="716" style:family="paragraph" style:name="P675">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67">
      <style:text-properties fo:font-size="17pt" fo:font-weight="bold"/>
    </style:style>
    <style:style style:family="text" style:name="T4768">
      <style:text-properties fo:font-size="17pt" fo:font-weight="bold"/>
    </style:style>
    <style:style style:parent-style-name="716" style:family="paragraph" style:name="P676">
      <style:paragraph-properties fo:margin-left="0cm" fo:margin-right="1.432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69">
      <style:text-properties fo:letter-spacing="-0.25pt"/>
    </style:style>
    <style:style style:family="text" style:name="T4770">
      <style:text-properties fo:letter-spacing="-0.25pt"/>
    </style:style>
    <style:style style:family="text" style:name="T4771">
      <style:text-properties fo:letter-spacing="-0.25pt"/>
    </style:style>
    <style:style style:family="text" style:name="T4772">
      <style:text-properties fo:letter-spacing="-0.25pt"/>
    </style:style>
    <style:style style:family="text" style:name="T4773">
      <style:text-properties fo:letter-spacing="-0.25pt"/>
    </style:style>
    <style:style style:family="text" style:name="T4774">
      <style:text-properties fo:letter-spacing="-0.25pt"/>
    </style:style>
    <style:style style:family="text" style:name="T4775">
      <style:text-properties fo:letter-spacing="-0.25pt"/>
    </style:style>
    <style:style style:family="text" style:name="T4776">
      <style:text-properties fo:letter-spacing="-0.25pt"/>
    </style:style>
    <style:style style:family="text" style:name="T4777">
      <style:text-properties fo:letter-spacing="-0.25pt"/>
    </style:style>
    <style:style style:family="text" style:name="T4778">
      <style:text-properties fo:letter-spacing="-0.1pt"/>
    </style:style>
    <style:style style:parent-style-name="716" style:family="paragraph" style:name="P677">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79">
      <style:text-properties fo:font-size="11.5pt"/>
    </style:style>
    <style:style style:family="text" style:name="T4780">
      <style:text-properties fo:font-size="11.5pt"/>
    </style:style>
    <style:style style:parent-style-name="716" style:family="paragraph" style:name="P67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81">
      <style:text-properties fo:letter-spacing="-0.35pt"/>
    </style:style>
    <style:style style:family="text" style:name="T4782">
      <style:text-properties fo:letter-spacing="-0.35pt"/>
    </style:style>
    <style:style style:family="text" style:name="T4783">
      <style:text-properties fo:letter-spacing="-0.35pt"/>
    </style:style>
    <style:style style:family="text" style:name="T4784">
      <style:text-properties fo:letter-spacing="-0.35pt"/>
    </style:style>
    <style:style style:family="text" style:name="T4785">
      <style:text-properties fo:letter-spacing="-0.35pt"/>
    </style:style>
    <style:style style:family="text" style:name="T4786">
      <style:text-properties fo:letter-spacing="-0.35pt"/>
    </style:style>
    <style:style style:family="text" style:name="T4787">
      <style:text-properties fo:letter-spacing="-0.35pt"/>
    </style:style>
    <style:style style:family="text" style:name="T4788">
      <style:text-properties fo:letter-spacing="-0.35pt"/>
    </style:style>
    <style:style style:parent-style-name="716" style:family="paragraph" style:name="P679">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789">
      <style:text-properties fo:letter-spacing="-0.15pt"/>
    </style:style>
    <style:style style:family="text" style:name="T4790">
      <style:text-properties fo:letter-spacing="-0.15pt"/>
    </style:style>
    <style:style style:family="text" style:name="T4791">
      <style:text-properties fo:letter-spacing="-0.15pt"/>
    </style:style>
    <style:style style:family="text" style:name="T4792">
      <style:text-properties fo:letter-spacing="-0.15pt"/>
    </style:style>
    <style:style style:family="text" style:name="T4793">
      <style:text-properties fo:letter-spacing="-0.15pt"/>
    </style:style>
    <style:style style:family="text" style:name="T4794">
      <style:text-properties fo:letter-spacing="-0.15pt"/>
    </style:style>
    <style:style style:family="text" style:name="T4795">
      <style:text-properties fo:letter-spacing="-0.15pt"/>
    </style:style>
    <style:style style:family="text" style:name="T4796">
      <style:text-properties fo:letter-spacing="-0.15pt"/>
    </style:style>
    <style:style style:family="text" style:name="T4797">
      <style:text-properties fo:letter-spacing="-0.15pt"/>
    </style:style>
    <style:style style:family="text" style:name="T4798">
      <style:text-properties fo:letter-spacing="-0.15pt"/>
    </style:style>
    <style:style style:family="text" style:name="T4799">
      <style:text-properties fo:letter-spacing="-0.15pt"/>
    </style:style>
    <style:style style:family="text" style:name="T4800">
      <style:text-properties fo:letter-spacing="-0.1pt"/>
    </style:style>
    <style:style style:parent-style-name="716" style:family="paragraph" style:name="P680">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01">
      <style:text-properties fo:font-size="18pt"/>
    </style:style>
    <style:style style:family="text" style:name="T4802">
      <style:text-properties fo:font-size="18pt"/>
    </style:style>
    <style:style style:parent-style-name="712" style:family="paragraph" style:name="P681">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803">
      <style:text-properties fo:font-size="14pt" fo:font-weight="bold"/>
    </style:style>
    <style:style style:family="text" style:name="T4804">
      <style:text-properties fo:font-size="14pt" fo:letter-spacing="-0.35pt" fo:font-weight="bold"/>
    </style:style>
    <style:style style:family="text" style:name="T4805">
      <style:text-properties fo:font-size="14pt" fo:font-weight="bold"/>
    </style:style>
    <style:style style:family="text" style:name="T4806">
      <style:text-properties fo:font-size="14pt" fo:letter-spacing="-0.3pt" fo:font-weight="bold"/>
    </style:style>
    <style:style style:family="text" style:name="T4807">
      <style:text-properties fo:font-size="14pt" fo:font-weight="bold"/>
    </style:style>
    <style:style style:family="text" style:name="T4808">
      <style:text-properties fo:font-size="14pt" fo:letter-spacing="-0.25pt" fo:font-weight="bold"/>
    </style:style>
    <style:style style:family="text" style:name="T4809">
      <style:text-properties fo:font-size="14pt" fo:letter-spacing="-0.1pt" fo:font-weight="bold"/>
    </style:style>
    <style:style style:parent-style-name="716" style:family="paragraph" style:name="P68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10">
      <style:text-properties fo:font-size="17pt" fo:font-weight="bold"/>
    </style:style>
    <style:style style:family="text" style:name="T4811">
      <style:text-properties fo:font-size="17pt" fo:font-weight="bold"/>
    </style:style>
    <style:style style:parent-style-name="716" style:family="paragraph" style:name="P68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12">
      <style:text-properties fo:letter-spacing="-0.15pt"/>
    </style:style>
    <style:style style:family="text" style:name="T4813">
      <style:text-properties fo:letter-spacing="-0.15pt"/>
    </style:style>
    <style:style style:family="text" style:name="T4814">
      <style:text-properties fo:letter-spacing="-0.15pt"/>
    </style:style>
    <style:style style:family="text" style:name="T4815">
      <style:text-properties fo:letter-spacing="-0.15pt"/>
    </style:style>
    <style:style style:family="text" style:name="T4816">
      <style:text-properties fo:letter-spacing="-0.15pt"/>
    </style:style>
    <style:style style:family="text" style:name="T4817">
      <style:text-properties fo:letter-spacing="-0.15pt"/>
    </style:style>
    <style:style style:family="text" style:name="T4818">
      <style:text-properties fo:letter-spacing="-0.15pt"/>
    </style:style>
    <style:style style:family="text" style:name="T4819">
      <style:text-properties fo:letter-spacing="-0.15pt"/>
    </style:style>
    <style:style style:family="text" style:name="T4820">
      <style:text-properties fo:letter-spacing="-0.15pt"/>
    </style:style>
    <style:style style:family="text" style:name="T4821">
      <style:text-properties fo:letter-spacing="-0.15pt"/>
    </style:style>
    <style:style style:family="text" style:name="T4822">
      <style:text-properties fo:letter-spacing="-0.15pt"/>
    </style:style>
    <style:style style:family="text" style:name="T4823">
      <style:text-properties fo:letter-spacing="-0.15pt"/>
    </style:style>
    <style:style style:parent-style-name="716" style:family="paragraph" style:name="P68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24">
      <style:text-properties fo:letter-spacing="-0.1pt"/>
    </style:style>
    <style:style style:family="text" style:name="T4825">
      <style:text-properties fo:letter-spacing="-0.1pt"/>
    </style:style>
    <style:style style:family="text" style:name="T4826">
      <style:text-properties fo:letter-spacing="-0.1pt"/>
    </style:style>
    <style:style style:family="text" style:name="T4827">
      <style:text-properties fo:letter-spacing="-0.1pt"/>
    </style:style>
    <style:style style:family="text" style:name="T4828">
      <style:text-properties fo:letter-spacing="-0.1pt"/>
    </style:style>
    <style:style style:family="text" style:name="T4829">
      <style:text-properties fo:letter-spacing="-0.1pt"/>
    </style:style>
    <style:style style:family="text" style:name="T4830">
      <style:text-properties fo:letter-spacing="-0.1pt"/>
    </style:style>
    <style:style style:family="text" style:name="T4831">
      <style:text-properties fo:letter-spacing="-0.1pt"/>
    </style:style>
    <style:style style:family="text" style:name="T4832">
      <style:text-properties fo:letter-spacing="-0.1pt"/>
    </style:style>
    <style:style style:family="text" style:name="T4833">
      <style:text-properties fo:letter-spacing="-0.1pt"/>
    </style:style>
    <style:style style:family="text" style:name="T4834">
      <style:text-properties fo:letter-spacing="-0.1pt"/>
    </style:style>
    <style:style style:family="text" style:name="T4835">
      <style:text-properties fo:letter-spacing="-0.1pt"/>
    </style:style>
    <style:style style:family="text" style:name="T4836">
      <style:text-properties fo:letter-spacing="-0.1pt"/>
    </style:style>
    <style:style style:family="text" style:name="T4837">
      <style:text-properties fo:letter-spacing="-0.1pt"/>
    </style:style>
    <style:style style:parent-style-name="716" style:family="paragraph" style:name="P68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8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38">
      <style:text-properties fo:letter-spacing="-0.25pt"/>
    </style:style>
    <style:style style:family="text" style:name="T4839">
      <style:text-properties fo:letter-spacing="-0.25pt"/>
    </style:style>
    <style:style style:family="text" style:name="T4840">
      <style:text-properties fo:letter-spacing="-0.25pt"/>
    </style:style>
    <style:style style:family="text" style:name="T4841">
      <style:text-properties fo:letter-spacing="-0.25pt"/>
    </style:style>
    <style:style style:family="text" style:name="T4842">
      <style:text-properties fo:letter-spacing="-0.25pt"/>
    </style:style>
    <style:style style:family="text" style:name="T4843">
      <style:text-properties fo:letter-spacing="-0.25pt"/>
    </style:style>
    <style:style style:family="text" style:name="T4844">
      <style:text-properties fo:letter-spacing="-0.25pt"/>
    </style:style>
    <style:style style:family="text" style:name="T4845">
      <style:text-properties fo:letter-spacing="-0.25pt"/>
    </style:style>
    <style:style style:family="text" style:name="T4846">
      <style:text-properties fo:letter-spacing="-0.25pt"/>
    </style:style>
    <style:style style:family="text" style:name="T4847">
      <style:text-properties fo:letter-spacing="-0.25pt"/>
    </style:style>
    <style:style style:family="text" style:name="T4848">
      <style:text-properties fo:letter-spacing="-0.25pt"/>
    </style:style>
    <style:style style:family="text" style:name="T4849">
      <style:text-properties fo:letter-spacing="-0.25pt"/>
    </style:style>
    <style:style style:family="text" style:name="T4850">
      <style:text-properties fo:letter-spacing="-0.25pt"/>
    </style:style>
    <style:style style:parent-style-name="711" style:list-style-name="WWNum18" style:master-page-name="MasterPage32" style:family="paragraph" style:name="P687">
      <style:paragraph-properties fo:margin-left="0cm" fo:margin-right="0cm" fo:text-indent="-0.4728cm" fo:margin-top="3.7pt" fo:margin-bottom="0pt" fo:break-before="page">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4851">
      <style:text-properties fo:letter-spacing="-0.1pt"/>
    </style:style>
    <style:style style:parent-style-name="716" style:family="paragraph" style:name="P688">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52">
      <style:text-properties fo:font-size="11.5pt" fo:font-weight="bold"/>
    </style:style>
    <style:style style:family="text" style:name="T4853">
      <style:text-properties fo:font-size="11.5pt" fo:font-weight="bold"/>
    </style:style>
    <style:style style:parent-style-name="716" style:family="paragraph" style:name="P689">
      <style:paragraph-properties fo:margin-left="0cm" fo:margin-right="0.4022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54">
      <style:text-properties fo:letter-spacing="-0.25pt"/>
    </style:style>
    <style:style style:family="text" style:name="T4855">
      <style:text-properties fo:letter-spacing="-0.25pt"/>
    </style:style>
    <style:style style:family="text" style:name="T4856">
      <style:text-properties fo:letter-spacing="-0.25pt"/>
    </style:style>
    <style:style style:family="text" style:name="T4857">
      <style:text-properties fo:letter-spacing="-0.25pt"/>
    </style:style>
    <style:style style:family="text" style:name="T4858">
      <style:text-properties fo:letter-spacing="-0.25pt"/>
    </style:style>
    <style:style style:family="text" style:name="T4859">
      <style:text-properties fo:letter-spacing="-0.25pt"/>
    </style:style>
    <style:style style:family="text" style:name="T4860">
      <style:text-properties fo:letter-spacing="-0.25pt"/>
    </style:style>
    <style:style style:family="text" style:name="T4861">
      <style:text-properties fo:letter-spacing="-0.25pt"/>
    </style:style>
    <style:style style:family="text" style:name="T4862">
      <style:text-properties fo:letter-spacing="-0.25pt"/>
    </style:style>
    <style:style style:family="text" style:name="T4863">
      <style:text-properties fo:letter-spacing="-0.25pt"/>
    </style:style>
    <style:style style:family="text" style:name="T4864">
      <style:text-properties fo:letter-spacing="-0.25pt"/>
    </style:style>
    <style:style style:parent-style-name="716" style:family="paragraph" style:name="P69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65">
      <style:text-properties fo:font-size="13pt"/>
    </style:style>
    <style:style style:family="text" style:name="T4866">
      <style:text-properties fo:font-size="13pt"/>
    </style:style>
    <style:style style:parent-style-name="716" style:family="paragraph" style:name="P691">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67">
      <style:text-properties fo:font-size="11pt"/>
    </style:style>
    <style:style style:family="text" style:name="T4868">
      <style:text-properties fo:font-size="11pt"/>
    </style:style>
    <style:style style:parent-style-name="711" style:list-style-name="WWNum18" style:family="paragraph" style:name="P692">
      <style:paragraph-properties fo:margin-left="0cm" fo:margin-right="0cm" fo:text-indent="-0.4728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bold"/>
    </style:style>
    <style:style style:family="text" style:name="T4869">
      <style:text-properties fo:letter-spacing="-0.1pt"/>
    </style:style>
    <style:style style:parent-style-name="716" style:family="paragraph" style:name="P69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70">
      <style:text-properties fo:font-weight="bold"/>
    </style:style>
    <style:style style:family="text" style:name="T4871">
      <style:text-properties fo:font-weight="bold"/>
    </style:style>
    <style:style style:parent-style-name="716" style:family="paragraph" style:name="P694">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72">
      <style:text-properties fo:letter-spacing="-0.1pt"/>
    </style:style>
    <style:style style:family="text" style:name="T4873">
      <style:text-properties fo:letter-spacing="-0.1pt"/>
    </style:style>
    <style:style style:family="text" style:name="T4874">
      <style:text-properties fo:letter-spacing="-0.1pt"/>
    </style:style>
    <style:style style:family="text" style:name="T4875">
      <style:text-properties fo:letter-spacing="-0.1pt"/>
    </style:style>
    <style:style style:family="text" style:name="T4876">
      <style:text-properties fo:letter-spacing="-0.1pt"/>
    </style:style>
    <style:style style:family="text" style:name="T4877">
      <style:text-properties fo:letter-spacing="-0.1pt"/>
    </style:style>
    <style:style style:family="text" style:name="T4878">
      <style:text-properties fo:letter-spacing="-0.1pt"/>
    </style:style>
    <style:style style:family="text" style:name="T4879">
      <style:text-properties fo:letter-spacing="-0.1pt"/>
    </style:style>
    <style:style style:family="text" style:name="T4880">
      <style:text-properties fo:letter-spacing="-0.1pt"/>
    </style:style>
    <style:style style:family="text" style:name="T4881">
      <style:text-properties fo:letter-spacing="-0.1pt"/>
    </style:style>
    <style:style style:family="text" style:name="T4882">
      <style:text-properties fo:letter-spacing="-0.1pt"/>
    </style:style>
    <style:style style:family="text" style:name="T4883">
      <style:text-properties fo:letter-spacing="-0.1pt"/>
    </style:style>
    <style:style style:family="text" style:name="T4884">
      <style:text-properties fo:letter-spacing="-0.1pt"/>
    </style:style>
    <style:style style:family="text" style:name="T4885">
      <style:text-properties fo:letter-spacing="-0.1pt"/>
    </style:style>
    <style:style style:family="text" style:name="T4886">
      <style:text-properties fo:letter-spacing="-0.1pt"/>
    </style:style>
    <style:style style:family="text" style:name="T4887">
      <style:text-properties fo:letter-spacing="-0.1pt"/>
    </style:style>
    <style:style style:parent-style-name="716" style:family="paragraph" style:name="P69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96">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888">
      <style:text-properties fo:letter-spacing="-0.1pt"/>
    </style:style>
    <style:style style:family="text" style:name="T4889">
      <style:text-properties fo:letter-spacing="-0.1pt"/>
    </style:style>
    <style:style style:family="text" style:name="T4890">
      <style:text-properties fo:letter-spacing="-0.1pt"/>
    </style:style>
    <style:style style:family="text" style:name="T4891">
      <style:text-properties fo:letter-spacing="-0.1pt"/>
    </style:style>
    <style:style style:family="text" style:name="T4892">
      <style:text-properties fo:letter-spacing="-0.1pt"/>
    </style:style>
    <style:style style:family="text" style:name="T4893">
      <style:text-properties fo:letter-spacing="-0.1pt"/>
    </style:style>
    <style:style style:family="text" style:name="T4894">
      <style:text-properties fo:letter-spacing="-0.1pt"/>
    </style:style>
    <style:style style:family="text" style:name="T4895">
      <style:text-properties fo:letter-spacing="-0.1pt"/>
    </style:style>
    <style:style style:family="text" style:name="T4896">
      <style:text-properties fo:letter-spacing="-0.1pt"/>
    </style:style>
    <style:style style:family="text" style:name="T4897">
      <style:text-properties fo:letter-spacing="-0.1pt"/>
    </style:style>
    <style:style style:family="text" style:name="T4898">
      <style:text-properties fo:letter-spacing="-0.1pt"/>
    </style:style>
    <style:style style:family="text" style:name="T4899">
      <style:text-properties fo:letter-spacing="-0.1pt"/>
    </style:style>
    <style:style style:family="text" style:name="T4900">
      <style:text-properties fo:letter-spacing="-0.1pt"/>
    </style:style>
    <style:style style:family="text" style:name="T4901">
      <style:text-properties fo:letter-spacing="-0.1pt"/>
    </style:style>
    <style:style style:family="text" style:name="T4902">
      <style:text-properties fo:letter-spacing="-0.1pt"/>
    </style:style>
    <style:style style:family="text" style:name="T4903">
      <style:text-properties fo:letter-spacing="-0.1pt"/>
    </style:style>
    <style:style style:family="text" style:name="T4904">
      <style:text-properties fo:letter-spacing="-0.1pt"/>
    </style:style>
    <style:style style:family="text" style:name="T4905">
      <style:text-properties fo:letter-spacing="-0.1pt"/>
    </style:style>
    <style:style style:family="text" style:name="T4906">
      <style:text-properties fo:letter-spacing="-0.1pt"/>
    </style:style>
    <style:style style:family="text" style:name="T4907">
      <style:text-properties fo:letter-spacing="-0.1pt"/>
    </style:style>
    <style:style style:family="text" style:name="T4908">
      <style:text-properties fo:letter-spacing="-0.1pt"/>
    </style:style>
    <style:style style:family="text" style:name="T4909">
      <style:text-properties fo:letter-spacing="-0.1pt"/>
    </style:style>
    <style:style style:family="text" style:name="T4910">
      <style:text-properties fo:letter-spacing="-0.1pt"/>
    </style:style>
    <style:style style:family="text" style:name="T4911">
      <style:text-properties fo:letter-spacing="-0.1pt"/>
    </style:style>
    <style:style style:family="text" style:name="T4912">
      <style:text-properties fo:letter-spacing="-0.1pt"/>
    </style:style>
    <style:style style:family="text" style:name="T4913">
      <style:text-properties fo:letter-spacing="-0.1pt"/>
    </style:style>
    <style:style style:family="text" style:name="T4914">
      <style:text-properties fo:letter-spacing="-0.1pt"/>
    </style:style>
    <style:style style:family="text" style:name="T4915">
      <style:text-properties fo:letter-spacing="-0.1pt"/>
    </style:style>
    <style:style style:parent-style-name="716" style:family="paragraph" style:name="P697">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69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16">
      <style:text-properties fo:letter-spacing="-0.1pt"/>
    </style:style>
    <style:style style:family="text" style:name="T4917">
      <style:text-properties fo:letter-spacing="-0.1pt"/>
    </style:style>
    <style:style style:family="text" style:name="T4918">
      <style:text-properties fo:letter-spacing="-0.1pt"/>
    </style:style>
    <style:style style:family="text" style:name="T4919">
      <style:text-properties fo:letter-spacing="-0.1pt"/>
    </style:style>
    <style:style style:family="text" style:name="T4920">
      <style:text-properties fo:letter-spacing="-0.1pt"/>
    </style:style>
    <style:style style:family="text" style:name="T4921">
      <style:text-properties fo:letter-spacing="-0.1pt"/>
    </style:style>
    <style:style style:family="text" style:name="T4922">
      <style:text-properties fo:letter-spacing="-0.1pt"/>
    </style:style>
    <style:style style:family="text" style:name="T4923">
      <style:text-properties fo:letter-spacing="-0.1pt"/>
    </style:style>
    <style:style style:family="text" style:name="T4924">
      <style:text-properties fo:letter-spacing="-0.1pt"/>
    </style:style>
    <style:style style:family="text" style:name="T4925">
      <style:text-properties fo:letter-spacing="-0.1pt"/>
    </style:style>
    <style:style style:family="text" style:name="T4926">
      <style:text-properties fo:letter-spacing="-0.1pt"/>
    </style:style>
    <style:style style:family="text" style:name="T4927">
      <style:text-properties fo:letter-spacing="-0.1pt"/>
    </style:style>
    <style:style style:family="text" style:name="T4928">
      <style:text-properties fo:letter-spacing="-0.1pt"/>
    </style:style>
    <style:style style:parent-style-name="716" style:family="paragraph" style:name="P69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29">
      <style:text-properties fo:font-size="13pt"/>
    </style:style>
    <style:style style:family="text" style:name="T4930">
      <style:text-properties fo:font-size="13pt"/>
    </style:style>
    <style:style style:parent-style-name="716" style:family="paragraph" style:name="P700">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31">
      <style:text-properties fo:font-size="13pt"/>
    </style:style>
    <style:style style:family="text" style:name="T4932">
      <style:text-properties fo:font-size="13pt"/>
    </style:style>
    <style:style style:parent-style-name="712" style:family="paragraph" style:name="P701">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933">
      <style:text-properties fo:font-size="14pt" fo:font-weight="bold"/>
    </style:style>
    <style:style style:family="text" style:name="T4934">
      <style:text-properties fo:font-size="14pt" fo:letter-spacing="-0.25pt" fo:font-weight="bold"/>
    </style:style>
    <style:style style:family="text" style:name="T4935">
      <style:text-properties fo:font-size="14pt" fo:letter-spacing="-0.1pt" fo:font-weight="bold"/>
    </style:style>
    <style:style style:parent-style-name="716" style:family="paragraph" style:name="P702">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36">
      <style:text-properties fo:font-size="17pt" fo:font-weight="bold"/>
    </style:style>
    <style:style style:family="text" style:name="T4937">
      <style:text-properties fo:font-size="17pt" fo:font-weight="bold"/>
    </style:style>
    <style:style style:parent-style-name="716" style:family="paragraph" style:name="P703">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38">
      <style:text-properties fo:letter-spacing="-0.15pt"/>
    </style:style>
    <style:style style:family="text" style:name="T4939">
      <style:text-properties fo:letter-spacing="-0.15pt"/>
    </style:style>
    <style:style style:family="text" style:name="T4940">
      <style:text-properties fo:letter-spacing="-0.15pt"/>
    </style:style>
    <style:style style:family="text" style:name="T4941">
      <style:text-properties fo:letter-spacing="-0.15pt"/>
    </style:style>
    <style:style style:family="text" style:name="T4942">
      <style:text-properties fo:letter-spacing="-0.15pt"/>
    </style:style>
    <style:style style:family="text" style:name="T4943">
      <style:text-properties fo:letter-spacing="-0.15pt"/>
    </style:style>
    <style:style style:family="text" style:name="T4944">
      <style:text-properties fo:letter-spacing="-0.15pt"/>
    </style:style>
    <style:style style:family="text" style:name="T4945">
      <style:text-properties fo:letter-spacing="-0.15pt"/>
    </style:style>
    <style:style style:family="text" style:name="T4946">
      <style:text-properties fo:letter-spacing="-0.15pt"/>
    </style:style>
    <style:style style:family="text" style:name="T4947">
      <style:text-properties fo:letter-spacing="-0.15pt"/>
    </style:style>
    <style:style style:family="text" style:name="T4948">
      <style:text-properties fo:letter-spacing="-0.15pt"/>
    </style:style>
    <style:style style:family="text" style:name="T4949">
      <style:text-properties fo:letter-spacing="-0.1pt"/>
    </style:style>
    <style:style style:parent-style-name="716" style:family="paragraph" style:name="P704">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50">
      <style:text-properties fo:font-size="18pt"/>
    </style:style>
    <style:style style:family="text" style:name="T4951">
      <style:text-properties fo:font-size="18pt"/>
    </style:style>
    <style:style style:parent-style-name="712" style:family="paragraph" style:name="P705">
      <style:paragraph-properties fo:margin-left="0.1993cm" fo:margin-right="0cm" fo:text-indent="0cm"/>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952">
      <style:text-properties fo:font-size="14pt" fo:font-weight="bold"/>
    </style:style>
    <style:style style:family="text" style:name="T4953">
      <style:text-properties fo:font-size="14pt" fo:letter-spacing="-0.35pt" fo:font-weight="bold"/>
    </style:style>
    <style:style style:family="text" style:name="T4954">
      <style:text-properties fo:font-size="14pt" fo:letter-spacing="-0.1pt" fo:font-weight="bold"/>
    </style:style>
    <style:style style:parent-style-name="716" style:family="paragraph" style:name="P706">
      <style:paragraph-properties fo:margin-left="0cm" fo:margin-right="0cm" fo:text-indent="0cm" fo:margin-top="0.2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55">
      <style:text-properties fo:font-size="17pt" fo:font-weight="bold"/>
    </style:style>
    <style:style style:family="text" style:name="T4956">
      <style:text-properties fo:font-size="17pt" fo:font-weight="bold"/>
    </style:style>
    <style:style style:parent-style-name="716" style:family="paragraph" style:name="P707">
      <style:paragraph-properties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57">
      <style:text-properties fo:letter-spacing="-0.15pt"/>
    </style:style>
    <style:style style:family="text" style:name="T4958">
      <style:text-properties fo:letter-spacing="-0.15pt"/>
    </style:style>
    <style:style style:family="text" style:name="T4959">
      <style:text-properties fo:letter-spacing="-0.15pt"/>
    </style:style>
    <style:style style:family="text" style:name="T4960">
      <style:text-properties fo:letter-spacing="-0.15pt"/>
    </style:style>
    <style:style style:family="text" style:name="T4961">
      <style:text-properties fo:letter-spacing="-0.15pt"/>
    </style:style>
    <style:style style:family="text" style:name="T4962">
      <style:text-properties fo:letter-spacing="-0.15pt"/>
    </style:style>
    <style:style style:family="text" style:name="T4963">
      <style:text-properties fo:letter-spacing="-0.15pt"/>
    </style:style>
    <style:style style:family="text" style:name="T4964">
      <style:text-properties fo:letter-spacing="-0.15pt"/>
    </style:style>
    <style:style style:family="text" style:name="T4965">
      <style:text-properties fo:letter-spacing="-0.15pt"/>
    </style:style>
    <style:style style:family="text" style:name="T4966">
      <style:text-properties fo:letter-spacing="-0.15pt"/>
    </style:style>
    <style:style style:parent-style-name="716" style:family="paragraph" style:name="P708">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67">
      <style:text-properties fo:letter-spacing="-0.15pt"/>
    </style:style>
    <style:style style:family="text" style:name="T4968">
      <style:text-properties fo:letter-spacing="-0.15pt"/>
    </style:style>
    <style:style style:family="text" style:name="T4969">
      <style:text-properties fo:letter-spacing="-0.15pt"/>
    </style:style>
    <style:style style:family="text" style:name="T4970">
      <style:text-properties fo:letter-spacing="-0.15pt"/>
    </style:style>
    <style:style style:family="text" style:name="T4971">
      <style:text-properties fo:letter-spacing="-0.15pt"/>
    </style:style>
    <style:style style:family="text" style:name="T4972">
      <style:text-properties fo:letter-spacing="-0.15pt"/>
    </style:style>
    <style:style style:family="text" style:name="T4973">
      <style:text-properties fo:letter-spacing="-0.15pt"/>
    </style:style>
    <style:style style:family="text" style:name="T4974">
      <style:text-properties fo:letter-spacing="-0.15pt"/>
    </style:style>
    <style:style style:family="text" style:name="T4975">
      <style:text-properties fo:letter-spacing="-0.15pt"/>
    </style:style>
    <style:style style:family="text" style:name="T4976">
      <style:text-properties fo:letter-spacing="-0.15pt"/>
    </style:style>
    <style:style style:family="text" style:name="T4977">
      <style:text-properties fo:letter-spacing="-0.15pt"/>
    </style:style>
    <style:style style:family="text" style:name="T4978">
      <style:text-properties fo:letter-spacing="-0.15pt"/>
    </style:style>
    <style:style style:parent-style-name="712" style:master-page-name="MasterPage33" style:family="paragraph" style:name="P709">
      <style:paragraph-properties fo:margin-left="0.1993cm" fo:margin-right="0cm" fo:text-indent="0cm" fo:margin-top="3.3pt" fo:margin-bottom="0pt" fo:break-before="page"/>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4979">
      <style:text-properties fo:font-size="14pt" fo:font-weight="bold"/>
    </style:style>
    <style:style style:family="text" style:name="T4980">
      <style:text-properties fo:font-size="14pt" fo:letter-spacing="-0.45pt" fo:font-weight="bold"/>
    </style:style>
    <style:style style:family="text" style:name="T4981">
      <style:text-properties fo:font-size="14pt" fo:font-weight="bold"/>
    </style:style>
    <style:style style:family="text" style:name="T4982">
      <style:text-properties fo:font-size="14pt" fo:letter-spacing="-0.35pt" fo:font-weight="bold"/>
    </style:style>
    <style:style style:family="text" style:name="T4983">
      <style:text-properties fo:font-size="14pt" fo:letter-spacing="-0.1pt" fo:font-weight="bold"/>
    </style:style>
    <style:style style:parent-style-name="716" style:family="paragraph" style:name="P710">
      <style:paragraph-properties fo:margin-left="0cm" fo:margin-right="0cm" fo:text-indent="0cm" fo:margin-top="0.2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84">
      <style:text-properties fo:font-size="17pt" fo:font-weight="bold"/>
    </style:style>
    <style:style style:family="text" style:name="T4985">
      <style:text-properties fo:font-size="17pt" fo:font-weight="bold"/>
    </style:style>
    <style:style style:parent-style-name="716" style:family="paragraph" style:name="P711">
      <style:paragraph-properties fo:margin-left="0cm" fo:margin-right="0.5504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4986">
      <style:text-properties fo:letter-spacing="-0.1pt"/>
    </style:style>
    <style:style style:family="text" style:name="T4987">
      <style:text-properties fo:letter-spacing="-0.1pt"/>
    </style:style>
    <style:style style:family="text" style:name="T4988">
      <style:text-properties fo:letter-spacing="-0.1pt"/>
    </style:style>
    <style:style style:family="text" style:name="T4989">
      <style:text-properties fo:letter-spacing="-0.1pt"/>
    </style:style>
    <style:style style:family="text" style:name="T4990">
      <style:text-properties fo:letter-spacing="-0.1pt"/>
    </style:style>
    <style:style style:family="text" style:name="T4991">
      <style:text-properties fo:letter-spacing="-0.1pt"/>
    </style:style>
    <style:style style:family="text" style:name="T4992">
      <style:text-properties fo:letter-spacing="-0.1pt"/>
    </style:style>
    <style:style style:family="text" style:name="T4993">
      <style:text-properties fo:letter-spacing="-0.1pt"/>
    </style:style>
    <style:style style:family="text" style:name="T4994">
      <style:text-properties fo:letter-spacing="-0.1pt"/>
    </style:style>
    <style:style style:family="text" style:name="T4995">
      <style:text-properties fo:letter-spacing="-0.1pt"/>
    </style:style>
    <style:style style:family="text" style:name="T4996">
      <style:text-properties fo:letter-spacing="-0.1pt"/>
    </style:style>
    <style:style style:family="text" style:name="T4997">
      <style:text-properties fo:letter-spacing="-0.1pt"/>
    </style:style>
    <style:style style:family="text" style:name="T4998">
      <style:text-properties fo:letter-spacing="-0.1pt"/>
    </style:style>
    <style:style style:family="text" style:name="T4999">
      <style:text-properties fo:letter-spacing="-0.1pt"/>
    </style:style>
    <style:style style:family="text" style:name="T5000">
      <style:text-properties fo:letter-spacing="-0.1pt"/>
    </style:style>
    <style:style style:family="text" style:name="T5001">
      <style:text-properties fo:letter-spacing="-0.15pt"/>
    </style:style>
    <style:style style:family="text" style:name="T5002">
      <style:text-properties fo:letter-spacing="-0.15pt"/>
    </style:style>
    <style:style style:family="text" style:name="T5003">
      <style:text-properties fo:letter-spacing="-0.15pt"/>
    </style:style>
    <style:style style:family="text" style:name="T5004">
      <style:text-properties fo:letter-spacing="-0.15pt"/>
    </style:style>
    <style:style style:family="text" style:name="T5005">
      <style:text-properties fo:letter-spacing="-0.15pt"/>
    </style:style>
    <style:style style:family="text" style:name="T5006">
      <style:text-properties fo:letter-spacing="-0.15pt"/>
    </style:style>
    <style:style style:family="text" style:name="T5007">
      <style:text-properties fo:letter-spacing="-0.15pt"/>
    </style:style>
    <style:style style:family="text" style:name="T5008">
      <style:text-properties fo:letter-spacing="-0.15pt"/>
    </style:style>
    <style:style style:family="text" style:name="T5009">
      <style:text-properties fo:letter-spacing="-0.15pt"/>
    </style:style>
    <style:style style:family="text" style:name="T5010">
      <style:text-properties fo:letter-spacing="-0.15pt"/>
    </style:style>
    <style:style style:family="text" style:name="T5011">
      <style:text-properties fo:letter-spacing="-0.15pt"/>
    </style:style>
    <style:style style:family="text" style:name="T5012">
      <style:text-properties fo:letter-spacing="-0.15pt"/>
    </style:style>
    <style:style style:parent-style-name="716" style:family="paragraph" style:name="P712">
      <style:paragraph-properties fo:margin-left="0cm" fo:margin-right="0cm" fo:text-indent="0cm" fo:margin-top="0.5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13">
      <style:text-properties fo:font-size="11.5pt"/>
    </style:style>
    <style:style style:family="text" style:name="T5014">
      <style:text-properties fo:font-size="11.5pt"/>
    </style:style>
    <style:style style:parent-style-name="716" style:family="paragraph" style:name="P71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15">
      <style:text-properties fo:letter-spacing="-0.15pt"/>
    </style:style>
    <style:style style:family="text" style:name="T5016">
      <style:text-properties fo:letter-spacing="-0.15pt"/>
    </style:style>
    <style:style style:family="text" style:name="T5017">
      <style:text-properties fo:letter-spacing="-0.15pt"/>
    </style:style>
    <style:style style:family="text" style:name="T5018">
      <style:text-properties fo:letter-spacing="-0.15pt"/>
    </style:style>
    <style:style style:family="text" style:name="T5019">
      <style:text-properties fo:letter-spacing="-0.15pt"/>
    </style:style>
    <style:style style:family="text" style:name="T5020">
      <style:text-properties fo:letter-spacing="-0.15pt"/>
    </style:style>
    <style:style style:family="text" style:name="T5021">
      <style:text-properties fo:letter-spacing="-0.15pt"/>
    </style:style>
    <style:style style:family="text" style:name="T5022">
      <style:text-properties fo:letter-spacing="-0.15pt"/>
    </style:style>
    <style:style style:family="text" style:name="T5023">
      <style:text-properties fo:letter-spacing="-0.15pt"/>
    </style:style>
    <style:style style:family="text" style:name="T5024">
      <style:text-properties fo:letter-spacing="-0.15pt"/>
    </style:style>
    <style:style style:family="text" style:name="T5025">
      <style:text-properties fo:letter-spacing="-0.15pt"/>
    </style:style>
    <style:style style:parent-style-name="716" style:family="paragraph" style:name="P71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15">
      <style:paragraph-properties fo:text-align="justify" fo:margin-left="0cm" fo:margin-right="0.47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26">
      <style:text-properties fo:letter-spacing="-0.15pt"/>
    </style:style>
    <style:style style:family="text" style:name="T5027">
      <style:text-properties fo:letter-spacing="-0.15pt"/>
    </style:style>
    <style:style style:family="text" style:name="T5028">
      <style:text-properties fo:letter-spacing="-0.15pt"/>
    </style:style>
    <style:style style:family="text" style:name="T5029">
      <style:text-properties fo:letter-spacing="-0.15pt"/>
    </style:style>
    <style:style style:family="text" style:name="T5030">
      <style:text-properties fo:letter-spacing="-0.15pt"/>
    </style:style>
    <style:style style:family="text" style:name="T5031">
      <style:text-properties fo:letter-spacing="-0.15pt"/>
    </style:style>
    <style:style style:family="text" style:name="T5032">
      <style:text-properties fo:letter-spacing="-0.15pt"/>
    </style:style>
    <style:style style:family="text" style:name="T5033">
      <style:text-properties fo:letter-spacing="-0.15pt"/>
    </style:style>
    <style:style style:family="text" style:name="T5034">
      <style:text-properties fo:letter-spacing="-0.15pt"/>
    </style:style>
    <style:style style:family="text" style:name="T5035">
      <style:text-properties fo:letter-spacing="-0.15pt"/>
    </style:style>
    <style:style style:family="text" style:name="T5036">
      <style:text-properties fo:letter-spacing="-0.1pt"/>
    </style:style>
    <style:style style:family="text" style:name="T5037">
      <style:text-properties fo:letter-spacing="-0.1pt"/>
    </style:style>
    <style:style style:family="text" style:name="T5038">
      <style:text-properties fo:letter-spacing="-0.1pt"/>
    </style:style>
    <style:style style:family="text" style:name="T5039">
      <style:text-properties fo:letter-spacing="-0.1pt"/>
    </style:style>
    <style:style style:family="text" style:name="T5040">
      <style:text-properties fo:letter-spacing="-0.1pt"/>
    </style:style>
    <style:style style:family="text" style:name="T5041">
      <style:text-properties fo:letter-spacing="-0.1pt"/>
    </style:style>
    <style:style style:family="text" style:name="T5042">
      <style:text-properties fo:letter-spacing="-0.1pt"/>
    </style:style>
    <style:style style:family="text" style:name="T5043">
      <style:text-properties fo:letter-spacing="-0.1pt"/>
    </style:style>
    <style:style style:family="text" style:name="T5044">
      <style:text-properties fo:letter-spacing="-0.1pt"/>
    </style:style>
    <style:style style:parent-style-name="707" style:master-page-name="MasterPage34" style:family="paragraph" style:name="P716">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5045">
      <style:text-properties fo:letter-spacing="-0.1pt"/>
    </style:style>
    <style:style style:parent-style-name="716" style:family="paragraph" style:name="P717">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46">
      <style:text-properties fo:font-size="25pt" fo:font-weight="bold"/>
    </style:style>
    <style:style style:family="text" style:name="T5047">
      <style:text-properties fo:font-size="25pt" fo:font-weight="bold"/>
    </style:style>
    <style:style style:parent-style-name="716" style:family="paragraph" style:name="P718">
      <style:paragraph-properties fo:line-height="115%"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48">
      <style:text-properties fo:letter-spacing="-0.1pt"/>
    </style:style>
    <style:style style:family="text" style:name="T5049">
      <style:text-properties fo:letter-spacing="-0.1pt"/>
    </style:style>
    <style:style style:family="text" style:name="T5050">
      <style:text-properties fo:letter-spacing="-0.1pt"/>
    </style:style>
    <style:style style:family="text" style:name="T5051">
      <style:text-properties fo:letter-spacing="-0.1pt"/>
    </style:style>
    <style:style style:family="text" style:name="T5052">
      <style:text-properties fo:letter-spacing="-0.1pt"/>
    </style:style>
    <style:style style:family="text" style:name="T5053">
      <style:text-properties fo:letter-spacing="-0.1pt"/>
    </style:style>
    <style:style style:family="text" style:name="T5054">
      <style:text-properties fo:letter-spacing="-0.1pt"/>
    </style:style>
    <style:style style:family="text" style:name="T5055">
      <style:text-properties fo:letter-spacing="-0.1pt"/>
    </style:style>
    <style:style style:family="text" style:name="T5056">
      <style:text-properties fo:letter-spacing="-0.1pt"/>
    </style:style>
    <style:style style:family="text" style:name="T5057">
      <style:text-properties fo:letter-spacing="-0.1pt"/>
    </style:style>
    <style:style style:family="text" style:name="T5058">
      <style:text-properties fo:letter-spacing="-0.1pt"/>
    </style:style>
    <style:style style:family="text" style:name="T5059">
      <style:text-properties fo:letter-spacing="-0.1pt"/>
    </style:style>
    <style:style style:family="text" style:name="T5060">
      <style:text-properties fo:letter-spacing="-0.1pt"/>
    </style:style>
    <style:style style:family="text" style:name="T5061">
      <style:text-properties fo:letter-spacing="-0.1pt"/>
    </style:style>
    <style:style style:family="text" style:name="T5062">
      <style:text-properties fo:letter-spacing="-0.1pt"/>
    </style:style>
    <style:style style:family="text" style:name="T5063">
      <style:text-properties fo:letter-spacing="-0.1pt"/>
    </style:style>
    <style:style style:parent-style-name="716" style:family="paragraph" style:name="P719">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64">
      <style:text-properties fo:letter-spacing="-0.15pt"/>
    </style:style>
    <style:style style:family="text" style:name="T5065">
      <style:text-properties fo:letter-spacing="-0.15pt"/>
    </style:style>
    <style:style style:family="text" style:name="T5066">
      <style:text-properties fo:letter-spacing="-0.15pt"/>
    </style:style>
    <style:style style:family="text" style:name="T5067">
      <style:text-properties fo:letter-spacing="-0.15pt"/>
    </style:style>
    <style:style style:family="text" style:name="T5068">
      <style:text-properties fo:letter-spacing="-0.15pt"/>
    </style:style>
    <style:style style:family="text" style:name="T5069">
      <style:text-properties fo:letter-spacing="-0.15pt"/>
    </style:style>
    <style:style style:family="text" style:name="T5070">
      <style:text-properties fo:letter-spacing="-0.15pt"/>
    </style:style>
    <style:style style:family="text" style:name="T5071">
      <style:text-properties fo:letter-spacing="-0.15pt"/>
    </style:style>
    <style:style style:family="text" style:name="T5072">
      <style:text-properties fo:letter-spacing="-0.15pt"/>
    </style:style>
    <style:style style:family="text" style:name="T5073">
      <style:text-properties fo:letter-spacing="-0.15pt"/>
    </style:style>
    <style:style style:family="text" style:name="T5074">
      <style:text-properties fo:letter-spacing="-0.15pt"/>
    </style:style>
    <style:style style:family="text" style:name="T5075">
      <style:text-properties fo:letter-spacing="-0.15pt"/>
    </style:style>
    <style:style style:parent-style-name="716" style:family="paragraph" style:name="P720">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76">
      <style:text-properties fo:letter-spacing="-0.25pt"/>
    </style:style>
    <style:style style:family="text" style:name="T5077">
      <style:text-properties fo:letter-spacing="-0.25pt"/>
    </style:style>
    <style:style style:family="text" style:name="T5078">
      <style:text-properties fo:letter-spacing="-0.25pt"/>
    </style:style>
    <style:style style:family="text" style:name="T5079">
      <style:text-properties fo:letter-spacing="-0.25pt"/>
    </style:style>
    <style:style style:family="text" style:name="T5080">
      <style:text-properties fo:letter-spacing="-0.25pt"/>
    </style:style>
    <style:style style:family="text" style:name="T5081">
      <style:text-properties fo:letter-spacing="-0.25pt"/>
    </style:style>
    <style:style style:family="text" style:name="T5082">
      <style:text-properties fo:letter-spacing="-0.25pt"/>
    </style:style>
    <style:style style:family="text" style:name="T5083">
      <style:text-properties fo:letter-spacing="-0.25pt"/>
    </style:style>
    <style:style style:family="text" style:name="T5084">
      <style:text-properties fo:letter-spacing="-0.25pt"/>
    </style:style>
    <style:style style:family="text" style:name="T5085">
      <style:text-properties fo:letter-spacing="-0.25pt"/>
    </style:style>
    <style:style style:family="text" style:name="T5086">
      <style:text-properties fo:letter-spacing="-0.25pt"/>
    </style:style>
    <style:style style:family="text" style:name="T5087">
      <style:text-properties fo:letter-spacing="-0.25pt"/>
    </style:style>
    <style:style style:family="text" style:name="T5088">
      <style:text-properties fo:letter-spacing="-0.25pt"/>
    </style:style>
    <style:style style:family="text" style:name="T5089">
      <style:text-properties fo:letter-spacing="-0.25pt"/>
    </style:style>
    <style:style style:family="text" style:name="T5090">
      <style:text-properties fo:letter-spacing="-0.25pt"/>
    </style:style>
    <style:style style:family="text" style:name="T5091">
      <style:text-properties fo:letter-spacing="-0.1pt"/>
    </style:style>
    <style:style style:parent-style-name="716" style:family="paragraph" style:name="P721">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92">
      <style:text-properties fo:letter-spacing="-0.1pt"/>
    </style:style>
    <style:style style:parent-style-name="716" style:family="paragraph" style:name="P72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93">
      <style:text-properties fo:font-size="10.5pt"/>
    </style:style>
    <style:style style:family="text" style:name="T5094">
      <style:text-properties fo:font-size="10.5pt"/>
    </style:style>
    <style:style style:parent-style-name="708" style:family="paragraph" style:name="P723">
      <style:paragraph-properties fo:margin-top="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095">
      <style:text-properties fo:letter-spacing="-0.1pt"/>
    </style:style>
    <style:style style:family="text" style:name="T5096">
      <style:text-properties fo:letter-spacing="-0.1pt"/>
    </style:style>
    <style:style style:family="text" style:name="T5097">
      <style:text-properties fo:letter-spacing="-0.1pt"/>
    </style:style>
    <style:style style:parent-style-name="716" style:family="paragraph" style:name="P724">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098">
      <style:text-properties fo:letter-spacing="-0.15pt"/>
    </style:style>
    <style:style style:family="text" style:name="T5099">
      <style:text-properties fo:letter-spacing="-0.15pt"/>
    </style:style>
    <style:style style:family="text" style:name="T5100">
      <style:text-properties fo:letter-spacing="-0.15pt"/>
    </style:style>
    <style:style style:family="text" style:name="T5101">
      <style:text-properties fo:letter-spacing="-0.15pt"/>
    </style:style>
    <style:style style:family="text" style:name="T5102">
      <style:text-properties fo:letter-spacing="-0.15pt"/>
    </style:style>
    <style:style style:family="text" style:name="T5103">
      <style:text-properties fo:letter-spacing="-0.15pt"/>
    </style:style>
    <style:style style:family="text" style:name="T5104">
      <style:text-properties fo:letter-spacing="-0.15pt"/>
    </style:style>
    <style:style style:family="text" style:name="T5105">
      <style:text-properties fo:letter-spacing="-0.15pt"/>
    </style:style>
    <style:style style:family="text" style:name="T5106">
      <style:text-properties fo:letter-spacing="-0.15pt"/>
    </style:style>
    <style:style style:family="text" style:name="T5107">
      <style:text-properties fo:letter-spacing="-0.15pt"/>
    </style:style>
    <style:style style:family="text" style:name="T5108">
      <style:text-properties fo:letter-spacing="-0.15pt"/>
    </style:style>
    <style:style style:parent-style-name="716" style:family="paragraph" style:name="P725">
      <style:paragraph-properties fo:line-height="115%"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09">
      <style:text-properties fo:letter-spacing="-0.1pt"/>
    </style:style>
    <style:style style:family="text" style:name="T5110">
      <style:text-properties fo:letter-spacing="-0.1pt"/>
    </style:style>
    <style:style style:family="text" style:name="T5111">
      <style:text-properties fo:letter-spacing="-0.1pt"/>
    </style:style>
    <style:style style:family="text" style:name="T5112">
      <style:text-properties fo:letter-spacing="-0.1pt"/>
    </style:style>
    <style:style style:family="text" style:name="T5113">
      <style:text-properties fo:letter-spacing="-0.1pt"/>
    </style:style>
    <style:style style:family="text" style:name="T5114">
      <style:text-properties fo:letter-spacing="-0.1pt"/>
    </style:style>
    <style:style style:family="text" style:name="T5115">
      <style:text-properties fo:letter-spacing="-0.1pt"/>
    </style:style>
    <style:style style:family="text" style:name="T5116">
      <style:text-properties fo:letter-spacing="-0.1pt"/>
    </style:style>
    <style:style style:family="text" style:name="T5117">
      <style:text-properties fo:letter-spacing="-0.1pt"/>
    </style:style>
    <style:style style:family="text" style:name="T5118">
      <style:text-properties fo:letter-spacing="-0.1pt"/>
    </style:style>
    <style:style style:family="text" style:name="T5119">
      <style:text-properties fo:letter-spacing="-0.1pt"/>
    </style:style>
    <style:style style:family="text" style:name="T5120">
      <style:text-properties fo:letter-spacing="-0.1pt"/>
    </style:style>
    <style:style style:family="text" style:name="T5121">
      <style:text-properties fo:letter-spacing="-0.1pt"/>
    </style:style>
    <style:style style:parent-style-name="708" style:family="paragraph" style:name="P726">
      <style:paragraph-properties fo:margin-top="1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122">
      <style:text-properties fo:letter-spacing="-0.1pt"/>
    </style:style>
    <style:style style:family="text" style:name="T5123">
      <style:text-properties fo:letter-spacing="-0.1pt"/>
    </style:style>
    <style:style style:parent-style-name="716" style:family="paragraph" style:name="P727">
      <style:paragraph-properties fo:line-height="115%" fo:text-align="justify" fo:margin-left="0cm" fo:margin-right="0.8785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24">
      <style:text-properties fo:letter-spacing="-0.1pt"/>
    </style:style>
    <style:style style:family="text" style:name="T5125">
      <style:text-properties fo:letter-spacing="-0.1pt"/>
    </style:style>
    <style:style style:family="text" style:name="T5126">
      <style:text-properties fo:letter-spacing="-0.1pt"/>
    </style:style>
    <style:style style:family="text" style:name="T5127">
      <style:text-properties fo:letter-spacing="-0.1pt"/>
    </style:style>
    <style:style style:family="text" style:name="T5128">
      <style:text-properties fo:letter-spacing="-0.1pt"/>
    </style:style>
    <style:style style:family="text" style:name="T5129">
      <style:text-properties fo:letter-spacing="-0.1pt"/>
    </style:style>
    <style:style style:family="text" style:name="T5130">
      <style:text-properties fo:letter-spacing="-0.1pt"/>
    </style:style>
    <style:style style:family="text" style:name="T5131">
      <style:text-properties fo:letter-spacing="-0.1pt"/>
    </style:style>
    <style:style style:family="text" style:name="T5132">
      <style:text-properties fo:letter-spacing="-0.1pt"/>
    </style:style>
    <style:style style:family="text" style:name="T5133">
      <style:text-properties fo:letter-spacing="-0.1pt"/>
    </style:style>
    <style:style style:family="text" style:name="T5134">
      <style:text-properties fo:letter-spacing="-0.1pt"/>
    </style:style>
    <style:style style:family="text" style:name="T5135">
      <style:text-properties fo:letter-spacing="-0.1pt"/>
    </style:style>
    <style:style style:family="text" style:name="T5136">
      <style:text-properties fo:letter-spacing="-0.1pt"/>
    </style:style>
    <style:style style:family="text" style:name="T5137">
      <style:text-properties fo:letter-spacing="-0.1pt"/>
    </style:style>
    <style:style style:parent-style-name="716" style:family="paragraph" style:name="P728">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38">
      <style:text-properties fo:letter-spacing="-0.1pt"/>
    </style:style>
    <style:style style:family="text" style:name="T5139">
      <style:text-properties fo:letter-spacing="-0.1pt"/>
    </style:style>
    <style:style style:family="text" style:name="T5140">
      <style:text-properties fo:letter-spacing="-0.1pt"/>
    </style:style>
    <style:style style:family="text" style:name="T5141">
      <style:text-properties fo:letter-spacing="-0.1pt"/>
    </style:style>
    <style:style style:family="text" style:name="T5142">
      <style:text-properties fo:letter-spacing="-0.1pt"/>
    </style:style>
    <style:style style:family="text" style:name="T5143">
      <style:text-properties fo:letter-spacing="-0.1pt"/>
    </style:style>
    <style:style style:family="text" style:name="T5144">
      <style:text-properties fo:letter-spacing="-0.1pt"/>
    </style:style>
    <style:style style:family="text" style:name="T5145">
      <style:text-properties fo:letter-spacing="-0.1pt"/>
    </style:style>
    <style:style style:family="text" style:name="T5146">
      <style:text-properties fo:letter-spacing="-0.1pt"/>
    </style:style>
    <style:style style:family="text" style:name="T5147">
      <style:text-properties fo:letter-spacing="-0.1pt"/>
    </style:style>
    <style:style style:family="text" style:name="T5148">
      <style:text-properties fo:letter-spacing="-0.1pt"/>
    </style:style>
    <style:style style:family="text" style:name="T5149">
      <style:text-properties fo:letter-spacing="-0.1pt"/>
    </style:style>
    <style:style style:family="text" style:name="T5150">
      <style:text-properties fo:letter-spacing="-0.1pt"/>
    </style:style>
    <style:style style:family="text" style:name="T5151">
      <style:text-properties fo:letter-spacing="-0.1pt"/>
    </style:style>
    <style:style style:family="text" style:name="T5152">
      <style:text-properties fo:letter-spacing="-0.1pt"/>
    </style:style>
    <style:style style:parent-style-name="708" style:master-page-name="MasterPage35" style:family="paragraph" style:name="P729">
      <style:paragraph-properties fo:break-before="page"/>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153">
      <style:text-properties fo:letter-spacing="-0.35pt"/>
    </style:style>
    <style:style style:family="text" style:name="T5154">
      <style:text-properties fo:letter-spacing="-0.3pt"/>
    </style:style>
    <style:style style:family="text" style:name="T5155">
      <style:text-properties fo:letter-spacing="-0.25pt"/>
    </style:style>
    <style:style style:family="text" style:name="T5156">
      <style:text-properties fo:letter-spacing="-0.15pt"/>
    </style:style>
    <style:style style:parent-style-name="712" style:family="paragraph" style:name="P730">
      <style:paragraph-properties fo:margin-left="0.1993cm" fo:margin-right="0cm" fo:text-indent="0cm" fo:margin-top="6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parent-style-name="Graphics" style:family="graphic" style:name="gr7">
      <style:graphic-properties draw:image-opacity="100%" style:repeat="stretch" fo:margin-left="0cm" fo:margin-right="0cm" fo:margin-top="0cm" fo:margin-bottom="0cm" style:horizontal-pos="from-left" style:horizontal-rel="page" style:vertical-pos="from-top" style:vertical-rel="paragraph" fo:background-color="transparent"/>
    </style:style>
    <style:style style:family="text" style:name="T5157">
      <style:text-properties fo:color="#999999" fo:font-size="12pt" fo:font-style="italic"/>
    </style:style>
    <style:style style:family="text" style:name="T5158">
      <style:text-properties fo:color="#999999" fo:font-size="12pt" fo:letter-spacing="-0.25pt" fo:font-style="italic"/>
    </style:style>
    <style:style style:parent-style-name="716" style:master-page-name="MasterPage36" style:family="paragraph" style:name="P731">
      <style:paragraph-properties fo:margin-left="0cm" fo:margin-right="0.5504cm" fo:text-indent="0cm" fo:margin-top="3.5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59">
      <style:text-properties fo:letter-spacing="-0.15pt"/>
    </style:style>
    <style:style style:family="text" style:name="T5160">
      <style:text-properties fo:letter-spacing="-0.15pt"/>
    </style:style>
    <style:style style:family="text" style:name="T5161">
      <style:text-properties fo:letter-spacing="-0.15pt"/>
    </style:style>
    <style:style style:family="text" style:name="T5162">
      <style:text-properties fo:letter-spacing="-0.15pt"/>
    </style:style>
    <style:style style:family="text" style:name="T5163">
      <style:text-properties fo:letter-spacing="-0.15pt"/>
    </style:style>
    <style:style style:family="text" style:name="T5164">
      <style:text-properties fo:letter-spacing="-0.15pt"/>
    </style:style>
    <style:style style:family="text" style:name="T5165">
      <style:text-properties fo:letter-spacing="-0.15pt"/>
    </style:style>
    <style:style style:family="text" style:name="T5166">
      <style:text-properties fo:letter-spacing="-0.15pt"/>
    </style:style>
    <style:style style:family="text" style:name="T5167">
      <style:text-properties fo:letter-spacing="-0.15pt"/>
    </style:style>
    <style:style style:family="text" style:name="T5168">
      <style:text-properties fo:letter-spacing="-0.15pt"/>
    </style:style>
    <style:style style:family="text" style:name="T5169">
      <style:text-properties fo:letter-spacing="-0.15pt"/>
    </style:style>
    <style:style style:family="text" style:name="T5170">
      <style:text-properties fo:letter-spacing="-0.15pt"/>
    </style:style>
    <style:style style:family="text" style:name="T5171">
      <style:text-properties fo:letter-spacing="-0.15pt"/>
    </style:style>
    <style:style style:parent-style-name="716" style:family="paragraph" style:name="P73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33">
      <style:paragraph-properties fo:line-height="115%" fo:margin-left="0cm" fo:margin-right="0.4498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72">
      <style:text-properties fo:letter-spacing="-0.1pt"/>
    </style:style>
    <style:style style:family="text" style:name="T5173">
      <style:text-properties fo:letter-spacing="-0.1pt"/>
    </style:style>
    <style:style style:family="text" style:name="T5174">
      <style:text-properties fo:letter-spacing="-0.1pt"/>
    </style:style>
    <style:style style:family="text" style:name="T5175">
      <style:text-properties fo:letter-spacing="-0.1pt"/>
    </style:style>
    <style:style style:family="text" style:name="T5176">
      <style:text-properties fo:letter-spacing="-0.1pt"/>
    </style:style>
    <style:style style:family="text" style:name="T5177">
      <style:text-properties fo:letter-spacing="-0.1pt"/>
    </style:style>
    <style:style style:family="text" style:name="T5178">
      <style:text-properties fo:letter-spacing="-0.1pt"/>
    </style:style>
    <style:style style:family="text" style:name="T5179">
      <style:text-properties fo:letter-spacing="-0.1pt"/>
    </style:style>
    <style:style style:family="text" style:name="T5180">
      <style:text-properties fo:letter-spacing="-0.1pt"/>
    </style:style>
    <style:style style:family="text" style:name="T5181">
      <style:text-properties fo:letter-spacing="-0.1pt"/>
    </style:style>
    <style:style style:family="text" style:name="T5182">
      <style:text-properties fo:letter-spacing="-0.1pt"/>
    </style:style>
    <style:style style:family="text" style:name="T5183">
      <style:text-properties fo:letter-spacing="-0.1pt"/>
    </style:style>
    <style:style style:family="text" style:name="T5184">
      <style:text-properties fo:letter-spacing="-0.1pt"/>
    </style:style>
    <style:style style:family="text" style:name="T5185">
      <style:text-properties fo:letter-spacing="-0.1pt"/>
    </style:style>
    <style:style style:family="text" style:name="T5186">
      <style:text-properties fo:letter-spacing="-0.1pt"/>
    </style:style>
    <style:style style:family="text" style:name="T5187">
      <style:text-properties fo:letter-spacing="-0.1pt"/>
    </style:style>
    <style:style style:family="text" style:name="T5188">
      <style:text-properties fo:letter-spacing="-0.1pt"/>
    </style:style>
    <style:style style:family="text" style:name="T5189">
      <style:text-properties fo:letter-spacing="-0.1pt"/>
    </style:style>
    <style:style style:parent-style-name="716" style:family="paragraph" style:name="P734">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190">
      <style:text-properties fo:letter-spacing="-0.1pt"/>
    </style:style>
    <style:style style:family="text" style:name="T5191">
      <style:text-properties fo:letter-spacing="-0.1pt"/>
    </style:style>
    <style:style style:family="text" style:name="T5192">
      <style:text-properties fo:letter-spacing="-0.1pt"/>
    </style:style>
    <style:style style:family="text" style:name="T5193">
      <style:text-properties fo:letter-spacing="-0.1pt"/>
    </style:style>
    <style:style style:family="text" style:name="T5194">
      <style:text-properties fo:letter-spacing="-0.1pt"/>
    </style:style>
    <style:style style:family="text" style:name="T5195">
      <style:text-properties fo:letter-spacing="-0.1pt"/>
    </style:style>
    <style:style style:family="text" style:name="T5196">
      <style:text-properties fo:letter-spacing="-0.1pt"/>
    </style:style>
    <style:style style:family="text" style:name="T5197">
      <style:text-properties fo:letter-spacing="-0.1pt"/>
    </style:style>
    <style:style style:family="text" style:name="T5198">
      <style:text-properties fo:letter-spacing="-0.1pt"/>
    </style:style>
    <style:style style:family="text" style:name="T5199">
      <style:text-properties fo:letter-spacing="-0.1pt"/>
    </style:style>
    <style:style style:family="text" style:name="T5200">
      <style:text-properties fo:letter-spacing="-0.1pt"/>
    </style:style>
    <style:style style:family="text" style:name="T5201">
      <style:text-properties fo:letter-spacing="-0.1pt"/>
    </style:style>
    <style:style style:family="text" style:name="T5202">
      <style:text-properties fo:letter-spacing="-0.1pt"/>
    </style:style>
    <style:style style:family="text" style:name="T5203">
      <style:text-properties fo:letter-spacing="-0.1pt"/>
    </style:style>
    <style:style style:family="text" style:name="T5204">
      <style:text-properties fo:letter-spacing="-0.1pt"/>
    </style:style>
    <style:style style:parent-style-name="716" style:family="paragraph" style:name="P735">
      <style:paragraph-properties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205">
      <style:text-properties fo:letter-spacing="-0.1pt"/>
    </style:style>
    <style:style style:parent-style-name="717" style:list-style-name="WWNum19" style:family="paragraph" style:name="P736">
      <style:paragraph-properties fo:line-height="115%" fo:margin-left="1.443cm" fo:margin-right="1.002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06">
      <style:text-properties fo:font-size="12pt"/>
    </style:style>
    <style:style style:family="text" style:name="T5207">
      <style:text-properties fo:font-size="12pt" fo:letter-spacing="-0.1pt"/>
    </style:style>
    <style:style style:family="text" style:name="T5208">
      <style:text-properties fo:font-size="12pt"/>
    </style:style>
    <style:style style:family="text" style:name="T5209">
      <style:text-properties fo:font-size="12pt" fo:letter-spacing="-0.1pt"/>
    </style:style>
    <style:style style:family="text" style:name="T5210">
      <style:text-properties fo:font-size="12pt"/>
    </style:style>
    <style:style style:family="text" style:name="T5211">
      <style:text-properties fo:font-size="12pt" fo:letter-spacing="-0.1pt"/>
    </style:style>
    <style:style style:family="text" style:name="T5212">
      <style:text-properties fo:font-size="12pt"/>
    </style:style>
    <style:style style:family="text" style:name="T5213">
      <style:text-properties fo:font-size="12pt" fo:letter-spacing="-0.1pt"/>
    </style:style>
    <style:style style:family="text" style:name="T5214">
      <style:text-properties fo:font-size="12pt"/>
    </style:style>
    <style:style style:family="text" style:name="T5215">
      <style:text-properties fo:font-size="12pt" fo:letter-spacing="-0.1pt"/>
    </style:style>
    <style:style style:family="text" style:name="T5216">
      <style:text-properties fo:font-size="12pt"/>
    </style:style>
    <style:style style:family="text" style:name="T5217">
      <style:text-properties fo:font-size="12pt" fo:letter-spacing="-0.1pt"/>
    </style:style>
    <style:style style:family="text" style:name="T5218">
      <style:text-properties fo:font-size="12pt"/>
    </style:style>
    <style:style style:family="text" style:name="T5219">
      <style:text-properties fo:font-size="12pt" fo:letter-spacing="-0.1pt"/>
    </style:style>
    <style:style style:family="text" style:name="T5220">
      <style:text-properties fo:font-size="12pt"/>
    </style:style>
    <style:style style:family="text" style:name="T5221">
      <style:text-properties fo:font-size="12pt" fo:letter-spacing="-0.1pt"/>
    </style:style>
    <style:style style:family="text" style:name="T5222">
      <style:text-properties fo:font-size="12pt"/>
    </style:style>
    <style:style style:family="text" style:name="T5223">
      <style:text-properties fo:font-size="12pt" fo:letter-spacing="-0.1pt"/>
    </style:style>
    <style:style style:family="text" style:name="T5224">
      <style:text-properties fo:font-size="12pt"/>
    </style:style>
    <style:style style:family="text" style:name="T5225">
      <style:text-properties fo:font-size="12pt" fo:letter-spacing="-0.1pt"/>
    </style:style>
    <style:style style:family="text" style:name="T5226">
      <style:text-properties fo:font-size="12pt"/>
    </style:style>
    <style:style style:family="text" style:name="T5227">
      <style:text-properties fo:font-size="12pt" fo:letter-spacing="-0.1pt"/>
    </style:style>
    <style:style style:family="text" style:name="T5228">
      <style:text-properties fo:font-size="12pt"/>
    </style:style>
    <style:style style:family="text" style:name="T5229">
      <style:text-properties fo:font-size="12pt" fo:letter-spacing="-0.1pt"/>
    </style:style>
    <style:style style:family="text" style:name="T5230">
      <style:text-properties fo:font-size="12pt"/>
    </style:style>
    <style:style style:family="text" style:name="T5231">
      <style:text-properties fo:font-size="12pt" fo:letter-spacing="-0.1pt"/>
    </style:style>
    <style:style style:family="text" style:name="T5232">
      <style:text-properties fo:font-size="12pt"/>
    </style:style>
    <style:style style:family="text" style:name="T5233">
      <style:text-properties fo:font-size="12pt" fo:letter-spacing="-0.1pt"/>
    </style:style>
    <style:style style:family="text" style:name="T5234">
      <style:text-properties fo:font-size="12pt"/>
    </style:style>
    <style:style style:family="text" style:name="T5235">
      <style:text-properties fo:font-size="12pt" fo:letter-spacing="-0.1pt"/>
    </style:style>
    <style:style style:family="text" style:name="T5236">
      <style:text-properties fo:font-size="12pt"/>
    </style:style>
    <style:style style:family="text" style:name="T5237">
      <style:text-properties fo:font-size="12pt" fo:letter-spacing="-0.1pt"/>
    </style:style>
    <style:style style:family="text" style:name="T5238">
      <style:text-properties fo:font-size="12pt"/>
    </style:style>
    <style:style style:parent-style-name="717" style:list-style-name="WWNum19" style:family="paragraph" style:name="P737">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39">
      <style:text-properties fo:font-size="12pt"/>
    </style:style>
    <style:style style:family="text" style:name="T5240">
      <style:text-properties fo:font-size="12pt" fo:letter-spacing="-0.1pt"/>
    </style:style>
    <style:style style:parent-style-name="717" style:list-style-name="WWNum19" style:family="paragraph" style:name="P738">
      <style:paragraph-properties fo:line-height="115%" fo:margin-left="1.443cm" fo:margin-right="1.896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41">
      <style:text-properties fo:font-size="12pt"/>
    </style:style>
    <style:style style:family="text" style:name="T5242">
      <style:text-properties fo:font-size="12pt" fo:letter-spacing="-0.15pt"/>
    </style:style>
    <style:style style:family="text" style:name="T5243">
      <style:text-properties fo:font-size="12pt"/>
    </style:style>
    <style:style style:family="text" style:name="T5244">
      <style:text-properties fo:font-size="12pt" fo:letter-spacing="-0.15pt"/>
    </style:style>
    <style:style style:family="text" style:name="T5245">
      <style:text-properties fo:font-size="12pt"/>
    </style:style>
    <style:style style:family="text" style:name="T5246">
      <style:text-properties fo:font-size="12pt" fo:letter-spacing="-0.15pt"/>
    </style:style>
    <style:style style:family="text" style:name="T5247">
      <style:text-properties fo:font-size="12pt"/>
    </style:style>
    <style:style style:family="text" style:name="T5248">
      <style:text-properties fo:font-size="12pt" fo:letter-spacing="-0.15pt"/>
    </style:style>
    <style:style style:family="text" style:name="T5249">
      <style:text-properties fo:font-size="12pt"/>
    </style:style>
    <style:style style:family="text" style:name="T5250">
      <style:text-properties fo:font-size="12pt" fo:letter-spacing="-0.15pt"/>
    </style:style>
    <style:style style:family="text" style:name="T5251">
      <style:text-properties fo:font-size="12pt"/>
    </style:style>
    <style:style style:family="text" style:name="T5252">
      <style:text-properties fo:font-size="12pt" fo:letter-spacing="-0.15pt"/>
    </style:style>
    <style:style style:family="text" style:name="T5253">
      <style:text-properties fo:font-size="12pt"/>
    </style:style>
    <style:style style:family="text" style:name="T5254">
      <style:text-properties fo:font-size="12pt" fo:letter-spacing="-0.15pt"/>
    </style:style>
    <style:style style:family="text" style:name="T5255">
      <style:text-properties fo:font-size="12pt"/>
    </style:style>
    <style:style style:family="text" style:name="T5256">
      <style:text-properties fo:font-size="12pt" fo:letter-spacing="-0.15pt"/>
    </style:style>
    <style:style style:family="text" style:name="T5257">
      <style:text-properties fo:font-size="12pt"/>
    </style:style>
    <style:style style:family="text" style:name="T5258">
      <style:text-properties fo:font-size="12pt" fo:letter-spacing="-0.15pt"/>
    </style:style>
    <style:style style:family="text" style:name="T5259">
      <style:text-properties fo:font-size="12pt"/>
    </style:style>
    <style:style style:family="text" style:name="T5260">
      <style:text-properties fo:font-size="12pt" fo:letter-spacing="-0.15pt"/>
    </style:style>
    <style:style style:family="text" style:name="T5261">
      <style:text-properties fo:font-size="12pt"/>
    </style:style>
    <style:style style:family="text" style:name="T5262">
      <style:text-properties fo:font-size="12pt" fo:letter-spacing="-0.15pt"/>
    </style:style>
    <style:style style:family="text" style:name="T5263">
      <style:text-properties fo:font-size="12pt"/>
    </style:style>
    <style:style style:family="text" style:name="T5264">
      <style:text-properties fo:font-size="12pt" fo:letter-spacing="-0.1pt"/>
    </style:style>
    <style:style style:parent-style-name="717" style:list-style-name="WWNum19" style:family="paragraph" style:name="P739">
      <style:paragraph-properties fo:line-height="115%" fo:margin-left="1.443cm" fo:margin-right="0.6721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65">
      <style:text-properties fo:font-size="12pt"/>
    </style:style>
    <style:style style:family="text" style:name="T5266">
      <style:text-properties fo:font-size="12pt" fo:letter-spacing="-0.25pt"/>
    </style:style>
    <style:style style:family="text" style:name="T5267">
      <style:text-properties fo:font-size="12pt"/>
    </style:style>
    <style:style style:family="text" style:name="T5268">
      <style:text-properties fo:font-size="12pt" fo:letter-spacing="-0.25pt"/>
    </style:style>
    <style:style style:family="text" style:name="T5269">
      <style:text-properties fo:font-size="12pt"/>
    </style:style>
    <style:style style:family="text" style:name="T5270">
      <style:text-properties fo:font-size="12pt" fo:letter-spacing="-0.25pt"/>
    </style:style>
    <style:style style:family="text" style:name="T5271">
      <style:text-properties fo:font-size="12pt"/>
    </style:style>
    <style:style style:family="text" style:name="T5272">
      <style:text-properties fo:font-size="12pt" fo:letter-spacing="-0.25pt"/>
    </style:style>
    <style:style style:family="text" style:name="T5273">
      <style:text-properties fo:font-size="12pt"/>
    </style:style>
    <style:style style:family="text" style:name="T5274">
      <style:text-properties fo:font-size="12pt" fo:letter-spacing="-0.25pt"/>
    </style:style>
    <style:style style:family="text" style:name="T5275">
      <style:text-properties fo:font-size="12pt"/>
    </style:style>
    <style:style style:family="text" style:name="T5276">
      <style:text-properties fo:font-size="12pt" fo:letter-spacing="-0.25pt"/>
    </style:style>
    <style:style style:family="text" style:name="T5277">
      <style:text-properties fo:font-size="12pt"/>
    </style:style>
    <style:style style:family="text" style:name="T5278">
      <style:text-properties fo:font-size="12pt" fo:letter-spacing="-0.25pt"/>
    </style:style>
    <style:style style:family="text" style:name="T5279">
      <style:text-properties fo:font-size="12pt"/>
    </style:style>
    <style:style style:family="text" style:name="T5280">
      <style:text-properties fo:font-size="12pt" fo:letter-spacing="-0.25pt"/>
    </style:style>
    <style:style style:family="text" style:name="T5281">
      <style:text-properties fo:font-size="12pt"/>
    </style:style>
    <style:style style:family="text" style:name="T5282">
      <style:text-properties fo:font-size="12pt" fo:letter-spacing="-0.25pt"/>
    </style:style>
    <style:style style:family="text" style:name="T5283">
      <style:text-properties fo:font-size="12pt"/>
    </style:style>
    <style:style style:family="text" style:name="T5284">
      <style:text-properties fo:font-size="12pt" fo:letter-spacing="-0.25pt"/>
    </style:style>
    <style:style style:family="text" style:name="T5285">
      <style:text-properties fo:font-size="12pt"/>
    </style:style>
    <style:style style:family="text" style:name="T5286">
      <style:text-properties fo:font-size="12pt" fo:letter-spacing="-0.25pt"/>
    </style:style>
    <style:style style:family="text" style:name="T5287">
      <style:text-properties fo:font-size="12pt"/>
    </style:style>
    <style:style style:family="text" style:name="T5288">
      <style:text-properties fo:font-size="12pt" fo:letter-spacing="-0.25pt"/>
    </style:style>
    <style:style style:family="text" style:name="T5289">
      <style:text-properties fo:font-size="12pt"/>
    </style:style>
    <style:style style:family="text" style:name="T5290">
      <style:text-properties fo:font-size="12pt" fo:letter-spacing="-0.25pt"/>
    </style:style>
    <style:style style:family="text" style:name="T5291">
      <style:text-properties fo:font-size="12pt"/>
    </style:style>
    <style:style style:family="text" style:name="T5292">
      <style:text-properties fo:font-size="12pt" fo:letter-spacing="-0.25pt"/>
    </style:style>
    <style:style style:family="text" style:name="T5293">
      <style:text-properties fo:font-size="12pt"/>
    </style:style>
    <style:style style:parent-style-name="717" style:list-style-name="WWNum19" style:family="paragraph" style:name="P740">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94">
      <style:text-properties fo:font-size="12pt"/>
    </style:style>
    <style:style style:family="text" style:name="T5295">
      <style:text-properties fo:font-size="12pt" fo:letter-spacing="-0.1pt"/>
    </style:style>
    <style:style style:parent-style-name="717" style:list-style-name="WWNum19" style:family="paragraph" style:name="P741">
      <style:paragraph-properties fo:line-height="115%" fo:margin-left="1.443cm" fo:margin-right="0.7585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296">
      <style:text-properties fo:font-size="12pt"/>
    </style:style>
    <style:style style:family="text" style:name="T5297">
      <style:text-properties fo:font-size="12pt" fo:letter-spacing="-0.15pt"/>
    </style:style>
    <style:style style:family="text" style:name="T5298">
      <style:text-properties fo:font-size="12pt"/>
    </style:style>
    <style:style style:family="text" style:name="T5299">
      <style:text-properties fo:font-size="12pt" fo:letter-spacing="-0.15pt"/>
    </style:style>
    <style:style style:family="text" style:name="T5300">
      <style:text-properties fo:font-size="12pt"/>
    </style:style>
    <style:style style:family="text" style:name="T5301">
      <style:text-properties fo:font-size="12pt" fo:letter-spacing="-0.15pt"/>
    </style:style>
    <style:style style:family="text" style:name="T5302">
      <style:text-properties fo:font-size="12pt"/>
    </style:style>
    <style:style style:family="text" style:name="T5303">
      <style:text-properties fo:font-size="12pt" fo:letter-spacing="-0.15pt"/>
    </style:style>
    <style:style style:family="text" style:name="T5304">
      <style:text-properties fo:font-size="12pt"/>
    </style:style>
    <style:style style:family="text" style:name="T5305">
      <style:text-properties fo:font-size="12pt" fo:letter-spacing="-0.15pt"/>
    </style:style>
    <style:style style:family="text" style:name="T5306">
      <style:text-properties fo:font-size="12pt"/>
    </style:style>
    <style:style style:family="text" style:name="T5307">
      <style:text-properties fo:font-size="12pt" fo:letter-spacing="-0.15pt"/>
    </style:style>
    <style:style style:family="text" style:name="T5308">
      <style:text-properties fo:font-size="12pt"/>
    </style:style>
    <style:style style:family="text" style:name="T5309">
      <style:text-properties fo:font-size="12pt" fo:letter-spacing="-0.15pt"/>
    </style:style>
    <style:style style:family="text" style:name="T5310">
      <style:text-properties fo:font-size="12pt"/>
    </style:style>
    <style:style style:family="text" style:name="T5311">
      <style:text-properties fo:font-size="12pt" fo:letter-spacing="-0.15pt"/>
    </style:style>
    <style:style style:family="text" style:name="T5312">
      <style:text-properties fo:font-size="12pt"/>
    </style:style>
    <style:style style:family="text" style:name="T5313">
      <style:text-properties fo:font-size="12pt" fo:letter-spacing="-0.15pt"/>
    </style:style>
    <style:style style:family="text" style:name="T5314">
      <style:text-properties fo:font-size="12pt"/>
    </style:style>
    <style:style style:family="text" style:name="T5315">
      <style:text-properties fo:font-size="12pt" fo:letter-spacing="-0.15pt"/>
    </style:style>
    <style:style style:family="text" style:name="T5316">
      <style:text-properties fo:font-size="12pt"/>
    </style:style>
    <style:style style:family="text" style:name="T5317">
      <style:text-properties fo:font-size="12pt" fo:letter-spacing="-0.15pt"/>
    </style:style>
    <style:style style:family="text" style:name="T5318">
      <style:text-properties fo:font-size="12pt"/>
    </style:style>
    <style:style style:family="text" style:name="T5319">
      <style:text-properties fo:font-size="12pt" fo:letter-spacing="-0.15pt"/>
    </style:style>
    <style:style style:family="text" style:name="T5320">
      <style:text-properties fo:font-size="12pt"/>
    </style:style>
    <style:style style:family="text" style:name="T5321">
      <style:text-properties fo:font-size="12pt" fo:letter-spacing="-0.15pt"/>
    </style:style>
    <style:style style:family="text" style:name="T5322">
      <style:text-properties fo:font-size="12pt"/>
    </style:style>
    <style:style style:parent-style-name="717" style:list-style-name="WWNum19" style:family="paragraph" style:name="P742">
      <style:paragraph-properties fo:margin-left="0cm" fo:margin-right="0cm" fo:text-indent="-0.504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323">
      <style:text-properties fo:font-size="12pt"/>
    </style:style>
    <style:style style:family="text" style:name="T5324">
      <style:text-properties fo:font-size="12pt" fo:letter-spacing="-0.1pt"/>
    </style:style>
    <style:style style:parent-style-name="717" style:list-style-name="WWNum19" style:family="paragraph" style:name="P743">
      <style:paragraph-properties fo:margin-left="0cm" fo:margin-right="0cm" fo:text-indent="-0.5045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325">
      <style:text-properties fo:font-size="12pt"/>
    </style:style>
    <style:style style:family="text" style:name="T5326">
      <style:text-properties fo:font-size="12pt" fo:letter-spacing="-0.15pt"/>
    </style:style>
    <style:style style:parent-style-name="716" style:family="paragraph" style:name="P744">
      <style:paragraph-properties fo:line-height="115%" fo:margin-left="0cm" fo:margin-right="0.5504cm" fo:text-indent="0cm" fo:margin-top="9.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327">
      <style:text-properties fo:letter-spacing="-0.1pt"/>
    </style:style>
    <style:style style:family="text" style:name="T5328">
      <style:text-properties fo:letter-spacing="-0.1pt"/>
    </style:style>
    <style:style style:family="text" style:name="T5329">
      <style:text-properties fo:letter-spacing="-0.1pt"/>
    </style:style>
    <style:style style:family="text" style:name="T5330">
      <style:text-properties fo:letter-spacing="-0.1pt"/>
    </style:style>
    <style:style style:family="text" style:name="T5331">
      <style:text-properties fo:letter-spacing="-0.1pt"/>
    </style:style>
    <style:style style:family="text" style:name="T5332">
      <style:text-properties fo:letter-spacing="-0.1pt"/>
    </style:style>
    <style:style style:family="text" style:name="T5333">
      <style:text-properties fo:letter-spacing="-0.1pt"/>
    </style:style>
    <style:style style:family="text" style:name="T5334">
      <style:text-properties fo:letter-spacing="-0.1pt"/>
    </style:style>
    <style:style style:family="text" style:name="T5335">
      <style:text-properties fo:letter-spacing="-0.1pt"/>
    </style:style>
    <style:style style:family="text" style:name="T5336">
      <style:text-properties fo:letter-spacing="-0.1pt"/>
    </style:style>
    <style:style style:family="text" style:name="T5337">
      <style:text-properties fo:letter-spacing="-0.1pt"/>
    </style:style>
    <style:style style:family="text" style:name="T5338">
      <style:text-properties fo:letter-spacing="-0.1pt"/>
    </style:style>
    <style:style style:family="text" style:name="T5339">
      <style:text-properties fo:letter-spacing="-0.1pt"/>
    </style:style>
    <style:style style:family="text" style:name="T5340">
      <style:text-properties fo:letter-spacing="-0.1pt"/>
    </style:style>
    <style:style style:family="text" style:name="T5341">
      <style:text-properties fo:letter-spacing="-0.1pt"/>
    </style:style>
    <style:style style:parent-style-name="708" style:family="paragraph" style:name="P745">
      <style:paragraph-properties fo:margin-top="1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342">
      <style:text-properties fo:letter-spacing="-0.3pt"/>
    </style:style>
    <style:style style:family="text" style:name="T5343">
      <style:text-properties fo:letter-spacing="-0.25pt"/>
    </style:style>
    <style:style style:family="text" style:name="T5344">
      <style:text-properties fo:letter-spacing="-0.25pt"/>
    </style:style>
    <style:style style:family="text" style:name="T5345">
      <style:text-properties fo:letter-spacing="-0.25pt"/>
    </style:style>
    <style:style style:family="text" style:name="T5346">
      <style:text-properties fo:letter-spacing="-0.15pt"/>
    </style:style>
    <style:style style:family="text" style:name="T5347">
      <style:text-properties fo:letter-spacing="-0.1pt"/>
    </style:style>
    <style:style style:parent-style-name="716" style:family="paragraph" style:name="P746">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348">
      <style:text-properties fo:letter-spacing="-0.1pt"/>
    </style:style>
    <style:style style:family="text" style:name="T5349">
      <style:text-properties fo:letter-spacing="-0.1pt"/>
    </style:style>
    <style:style style:family="text" style:name="T5350">
      <style:text-properties fo:letter-spacing="-0.1pt"/>
    </style:style>
    <style:style style:family="text" style:name="T5351">
      <style:text-properties fo:letter-spacing="-0.1pt"/>
    </style:style>
    <style:style style:family="text" style:name="T5352">
      <style:text-properties fo:letter-spacing="-0.1pt"/>
    </style:style>
    <style:style style:family="text" style:name="T5353">
      <style:text-properties fo:letter-spacing="-0.1pt"/>
    </style:style>
    <style:style style:family="text" style:name="T5354">
      <style:text-properties fo:letter-spacing="-0.1pt"/>
    </style:style>
    <style:style style:family="text" style:name="T5355">
      <style:text-properties fo:letter-spacing="-0.1pt"/>
    </style:style>
    <style:style style:family="text" style:name="T5356">
      <style:text-properties fo:letter-spacing="-0.1pt"/>
    </style:style>
    <style:style style:family="text" style:name="T5357">
      <style:text-properties fo:letter-spacing="-0.1pt"/>
    </style:style>
    <style:style style:family="text" style:name="T5358">
      <style:text-properties fo:letter-spacing="-0.1pt"/>
    </style:style>
    <style:style style:family="text" style:name="T5359">
      <style:text-properties fo:letter-spacing="-0.1pt"/>
    </style:style>
    <style:style style:family="text" style:name="T5360">
      <style:text-properties fo:letter-spacing="-0.1pt"/>
    </style:style>
    <style:style style:family="text" style:name="T5361">
      <style:text-properties fo:letter-spacing="-0.1pt"/>
    </style:style>
    <style:style style:parent-style-name="716" style:family="paragraph" style:name="P747">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362">
      <style:text-properties fo:letter-spacing="-0.1pt"/>
    </style:style>
    <style:style style:family="text" style:name="T5363">
      <style:text-properties fo:letter-spacing="-0.1pt"/>
    </style:style>
    <style:style style:family="text" style:name="T5364">
      <style:text-properties fo:letter-spacing="-0.1pt"/>
    </style:style>
    <style:style style:family="text" style:name="T5365">
      <style:text-properties fo:letter-spacing="-0.1pt"/>
    </style:style>
    <style:style style:family="text" style:name="T5366">
      <style:text-properties fo:letter-spacing="-0.1pt"/>
    </style:style>
    <style:style style:family="text" style:name="T5367">
      <style:text-properties fo:letter-spacing="-0.1pt"/>
    </style:style>
    <style:style style:family="text" style:name="T5368">
      <style:text-properties fo:letter-spacing="-0.1pt"/>
    </style:style>
    <style:style style:family="text" style:name="T5369">
      <style:text-properties fo:letter-spacing="-0.1pt"/>
    </style:style>
    <style:style style:family="text" style:name="T5370">
      <style:text-properties fo:letter-spacing="-0.1pt"/>
    </style:style>
    <style:style style:family="text" style:name="T5371">
      <style:text-properties fo:letter-spacing="-0.1pt"/>
    </style:style>
    <style:style style:family="text" style:name="T5372">
      <style:text-properties fo:letter-spacing="-0.1pt"/>
    </style:style>
    <style:style style:family="text" style:name="T5373">
      <style:text-properties fo:letter-spacing="-0.1pt"/>
    </style:style>
    <style:style style:family="text" style:name="T5374">
      <style:text-properties fo:letter-spacing="-0.1pt"/>
    </style:style>
    <style:style style:family="text" style:name="T5375">
      <style:text-properties fo:letter-spacing="-0.1pt"/>
    </style:style>
    <style:style style:family="text" style:name="T5376">
      <style:text-properties fo:letter-spacing="-0.1pt"/>
    </style:style>
    <style:style style:family="text" style:name="T5377">
      <style:text-properties fo:letter-spacing="-0.1pt"/>
    </style:style>
    <style:style style:family="text" style:name="T5378">
      <style:text-properties fo:letter-spacing="-0.15pt"/>
    </style:style>
    <style:style style:family="text" style:name="T5379">
      <style:text-properties fo:letter-spacing="-0.15pt"/>
    </style:style>
    <style:style style:family="text" style:name="T5380">
      <style:text-properties fo:letter-spacing="-0.15pt"/>
    </style:style>
    <style:style style:family="text" style:name="T5381">
      <style:text-properties fo:letter-spacing="-0.15pt"/>
    </style:style>
    <style:style style:family="text" style:name="T5382">
      <style:text-properties fo:letter-spacing="-0.15pt"/>
    </style:style>
    <style:style style:family="text" style:name="T5383">
      <style:text-properties fo:letter-spacing="-0.15pt"/>
    </style:style>
    <style:style style:family="text" style:name="T5384">
      <style:text-properties fo:letter-spacing="-0.15pt"/>
    </style:style>
    <style:style style:family="text" style:name="T5385">
      <style:text-properties fo:letter-spacing="-0.15pt"/>
    </style:style>
    <style:style style:family="text" style:name="T5386">
      <style:text-properties fo:letter-spacing="-0.15pt"/>
    </style:style>
    <style:style style:family="text" style:name="T5387">
      <style:text-properties fo:letter-spacing="-0.15pt"/>
    </style:style>
    <style:style style:family="text" style:name="T5388">
      <style:text-properties fo:letter-spacing="-0.15pt"/>
    </style:style>
    <style:style style:family="text" style:name="T5389">
      <style:text-properties fo:letter-spacing="-0.15pt"/>
    </style:style>
    <style:style style:parent-style-name="707" style:master-page-name="MasterPage37" style:family="paragraph" style:name="P748">
      <style:paragraph-properties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5390">
      <style:text-properties fo:letter-spacing="-0.1pt"/>
    </style:style>
    <style:style style:parent-style-name="716" style:family="paragraph" style:name="P749">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391">
      <style:text-properties fo:letter-spacing="-0.25pt"/>
    </style:style>
    <style:style style:family="text" style:name="T5392">
      <style:text-properties fo:letter-spacing="-0.25pt"/>
    </style:style>
    <style:style style:family="text" style:name="T5393">
      <style:text-properties fo:letter-spacing="-0.25pt"/>
    </style:style>
    <style:style style:family="text" style:name="T5394">
      <style:text-properties fo:letter-spacing="-0.25pt"/>
    </style:style>
    <style:style style:family="text" style:name="T5395">
      <style:text-properties fo:letter-spacing="-0.25pt"/>
    </style:style>
    <style:style style:family="text" style:name="T5396">
      <style:text-properties fo:letter-spacing="-0.25pt"/>
    </style:style>
    <style:style style:family="text" style:name="T5397">
      <style:text-properties fo:letter-spacing="-0.25pt"/>
    </style:style>
    <style:style style:family="text" style:name="T5398">
      <style:text-properties fo:letter-spacing="-0.25pt"/>
    </style:style>
    <style:style style:family="text" style:name="T5399">
      <style:text-properties fo:letter-spacing="-0.25pt"/>
    </style:style>
    <style:style style:family="text" style:name="T5400">
      <style:text-properties fo:letter-spacing="-0.25pt"/>
    </style:style>
    <style:style style:family="text" style:name="T5401">
      <style:text-properties fo:letter-spacing="-0.25pt"/>
    </style:style>
    <style:style style:family="text" style:name="T5402">
      <style:text-properties fo:letter-spacing="-0.25pt"/>
    </style:style>
    <style:style style:family="text" style:name="T5403">
      <style:text-properties fo:letter-spacing="-0.25pt"/>
    </style:style>
    <style:style style:family="text" style:name="T5404">
      <style:text-properties fo:letter-spacing="-0.25pt"/>
    </style:style>
    <style:style style:family="text" style:name="T5405">
      <style:text-properties fo:letter-spacing="-0.25pt"/>
    </style:style>
    <style:style style:family="text" style:name="T5406">
      <style:text-properties fo:letter-spacing="-0.15pt"/>
    </style:style>
    <style:style style:parent-style-name="716" style:family="paragraph" style:name="P750">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407">
      <style:text-properties fo:letter-spacing="-0.15pt"/>
    </style:style>
    <style:style style:family="text" style:name="T5408">
      <style:text-properties fo:letter-spacing="-0.15pt"/>
    </style:style>
    <style:style style:family="text" style:name="T5409">
      <style:text-properties fo:letter-spacing="-0.15pt"/>
    </style:style>
    <style:style style:family="text" style:name="T5410">
      <style:text-properties fo:letter-spacing="-0.15pt"/>
    </style:style>
    <style:style style:family="text" style:name="T5411">
      <style:text-properties fo:letter-spacing="-0.15pt"/>
    </style:style>
    <style:style style:family="text" style:name="T5412">
      <style:text-properties fo:letter-spacing="-0.15pt"/>
    </style:style>
    <style:style style:family="text" style:name="T5413">
      <style:text-properties fo:letter-spacing="-0.15pt"/>
    </style:style>
    <style:style style:family="text" style:name="T5414">
      <style:text-properties fo:letter-spacing="-0.15pt"/>
    </style:style>
    <style:style style:family="text" style:name="T5415">
      <style:text-properties fo:letter-spacing="-0.15pt"/>
    </style:style>
    <style:style style:family="text" style:name="T5416">
      <style:text-properties fo:letter-spacing="-0.15pt"/>
    </style:style>
    <style:style style:family="text" style:name="T5417">
      <style:text-properties fo:letter-spacing="-0.15pt"/>
    </style:style>
    <style:style style:family="text" style:name="T5418">
      <style:text-properties fo:letter-spacing="-0.15pt"/>
    </style:style>
    <style:style style:family="text" style:name="T5419">
      <style:text-properties fo:letter-spacing="-0.15pt"/>
    </style:style>
    <style:style style:family="text" style:name="T5420">
      <style:text-properties fo:letter-spacing="-0.15pt"/>
    </style:style>
    <style:style style:parent-style-name="708" style:family="paragraph" style:name="P751">
      <style:paragraph-properties fo:margin-top="1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421">
      <style:text-properties fo:letter-spacing="-0.3pt"/>
    </style:style>
    <style:style style:family="text" style:name="T5422">
      <style:text-properties fo:letter-spacing="-0.15pt"/>
    </style:style>
    <style:style style:family="text" style:name="T5423">
      <style:text-properties fo:letter-spacing="-0.1pt"/>
    </style:style>
    <style:style style:family="text" style:name="T5424">
      <style:text-properties fo:letter-spacing="-0.15pt"/>
    </style:style>
    <style:style style:family="text" style:name="T5425">
      <style:text-properties fo:letter-spacing="-0.15pt"/>
    </style:style>
    <style:style style:family="text" style:name="T5426">
      <style:text-properties fo:letter-spacing="-0.1pt"/>
    </style:style>
    <style:style style:family="text" style:name="T5427">
      <style:text-properties fo:letter-spacing="-0.15pt"/>
    </style:style>
    <style:style style:family="text" style:name="T5428">
      <style:text-properties fo:letter-spacing="-0.1pt"/>
    </style:style>
    <style:style style:family="text" style:name="T5429">
      <style:text-properties fo:letter-spacing="-0.1pt"/>
    </style:style>
    <style:style style:parent-style-name="716" style:family="paragraph" style:name="P752">
      <style:paragraph-properties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430">
      <style:text-properties fo:letter-spacing="-0.1pt"/>
    </style:style>
    <style:style style:parent-style-name="717" style:list-style-name="WWNum20" style:family="paragraph" style:name="P753">
      <style:paragraph-properties fo:line-height="115%" fo:margin-left="1.443cm" fo:margin-right="1.244cm" fo:text-indent="0cm" fo:margin-top="9.05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431">
      <style:text-properties fo:font-size="12pt"/>
    </style:style>
    <style:style style:family="text" style:name="T5432">
      <style:text-properties fo:font-size="12pt" fo:letter-spacing="-0.3pt"/>
    </style:style>
    <style:style style:family="text" style:name="T5433">
      <style:text-properties fo:font-size="12pt"/>
    </style:style>
    <style:style style:family="text" style:name="T5434">
      <style:text-properties fo:font-size="12pt" fo:letter-spacing="-0.3pt"/>
    </style:style>
    <style:style style:family="text" style:name="T5435">
      <style:text-properties fo:font-size="12pt"/>
    </style:style>
    <style:style style:family="text" style:name="T5436">
      <style:text-properties fo:font-size="12pt" fo:letter-spacing="-0.3pt"/>
    </style:style>
    <style:style style:family="text" style:name="T5437">
      <style:text-properties fo:font-size="12pt"/>
    </style:style>
    <style:style style:family="text" style:name="T5438">
      <style:text-properties fo:font-size="12pt" fo:letter-spacing="-0.3pt"/>
    </style:style>
    <style:style style:family="text" style:name="T5439">
      <style:text-properties fo:font-size="12pt"/>
    </style:style>
    <style:style style:family="text" style:name="T5440">
      <style:text-properties fo:font-size="12pt" fo:letter-spacing="-0.3pt"/>
    </style:style>
    <style:style style:family="text" style:name="T5441">
      <style:text-properties fo:font-size="12pt"/>
    </style:style>
    <style:style style:family="text" style:name="T5442">
      <style:text-properties fo:font-size="12pt" fo:letter-spacing="-0.3pt"/>
    </style:style>
    <style:style style:family="text" style:name="T5443">
      <style:text-properties fo:font-size="12pt"/>
    </style:style>
    <style:style style:family="text" style:name="T5444">
      <style:text-properties fo:font-size="12pt" fo:letter-spacing="-0.3pt"/>
    </style:style>
    <style:style style:family="text" style:name="T5445">
      <style:text-properties fo:font-size="12pt"/>
    </style:style>
    <style:style style:family="text" style:name="T5446">
      <style:text-properties fo:font-size="12pt" fo:letter-spacing="-0.3pt"/>
    </style:style>
    <style:style style:family="text" style:name="T5447">
      <style:text-properties fo:font-size="12pt"/>
    </style:style>
    <style:style style:family="text" style:name="T5448">
      <style:text-properties fo:font-size="12pt" fo:letter-spacing="-0.3pt"/>
    </style:style>
    <style:style style:family="text" style:name="T5449">
      <style:text-properties fo:font-size="12pt"/>
    </style:style>
    <style:style style:parent-style-name="717" style:list-style-name="WWNum20" style:family="paragraph" style:name="P754">
      <style:paragraph-properties fo:line-height="115%" fo:margin-left="1.443cm" fo:margin-right="0.7497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450">
      <style:text-properties fo:font-size="12pt"/>
    </style:style>
    <style:style style:family="text" style:name="T5451">
      <style:text-properties fo:font-size="12pt" fo:letter-spacing="-0.15pt"/>
    </style:style>
    <style:style style:family="text" style:name="T5452">
      <style:text-properties fo:font-size="12pt"/>
    </style:style>
    <style:style style:family="text" style:name="T5453">
      <style:text-properties fo:font-size="12pt" fo:letter-spacing="-0.15pt"/>
    </style:style>
    <style:style style:family="text" style:name="T5454">
      <style:text-properties fo:font-size="12pt"/>
    </style:style>
    <style:style style:family="text" style:name="T5455">
      <style:text-properties fo:font-size="12pt" fo:letter-spacing="-0.15pt"/>
    </style:style>
    <style:style style:family="text" style:name="T5456">
      <style:text-properties fo:font-size="12pt"/>
    </style:style>
    <style:style style:family="text" style:name="T5457">
      <style:text-properties fo:font-size="12pt" fo:letter-spacing="-0.15pt"/>
    </style:style>
    <style:style style:family="text" style:name="T5458">
      <style:text-properties fo:font-size="12pt"/>
    </style:style>
    <style:style style:family="text" style:name="T5459">
      <style:text-properties fo:font-size="12pt" fo:letter-spacing="-0.15pt"/>
    </style:style>
    <style:style style:family="text" style:name="T5460">
      <style:text-properties fo:font-size="12pt"/>
    </style:style>
    <style:style style:family="text" style:name="T5461">
      <style:text-properties fo:font-size="12pt" fo:letter-spacing="-0.15pt"/>
    </style:style>
    <style:style style:family="text" style:name="T5462">
      <style:text-properties fo:font-size="12pt"/>
    </style:style>
    <style:style style:family="text" style:name="T5463">
      <style:text-properties fo:font-size="12pt" fo:letter-spacing="-0.15pt"/>
    </style:style>
    <style:style style:family="text" style:name="T5464">
      <style:text-properties fo:font-size="12pt"/>
    </style:style>
    <style:style style:family="text" style:name="T5465">
      <style:text-properties fo:font-size="12pt" fo:letter-spacing="-0.15pt"/>
    </style:style>
    <style:style style:family="text" style:name="T5466">
      <style:text-properties fo:font-size="12pt"/>
    </style:style>
    <style:style style:family="text" style:name="T5467">
      <style:text-properties fo:font-size="12pt" fo:letter-spacing="-0.15pt"/>
    </style:style>
    <style:style style:family="text" style:name="T5468">
      <style:text-properties fo:font-size="12pt"/>
    </style:style>
    <style:style style:family="text" style:name="T5469">
      <style:text-properties fo:font-size="12pt" fo:letter-spacing="-0.15pt"/>
    </style:style>
    <style:style style:family="text" style:name="T5470">
      <style:text-properties fo:font-size="12pt"/>
    </style:style>
    <style:style style:family="text" style:name="T5471">
      <style:text-properties fo:font-size="12pt" fo:letter-spacing="-0.15pt"/>
    </style:style>
    <style:style style:family="text" style:name="T5472">
      <style:text-properties fo:font-size="12pt"/>
    </style:style>
    <style:style style:family="text" style:name="T5473">
      <style:text-properties fo:font-size="12pt" fo:letter-spacing="-0.15pt"/>
    </style:style>
    <style:style style:family="text" style:name="T5474">
      <style:text-properties fo:font-size="12pt"/>
    </style:style>
    <style:style style:family="text" style:name="T5475">
      <style:text-properties fo:font-size="12pt" fo:letter-spacing="-0.15pt"/>
    </style:style>
    <style:style style:family="text" style:name="T5476">
      <style:text-properties fo:font-size="12pt"/>
    </style:style>
    <style:style style:family="text" style:name="T5477">
      <style:text-properties fo:font-size="12pt" fo:letter-spacing="-0.15pt"/>
    </style:style>
    <style:style style:family="text" style:name="T5478">
      <style:text-properties fo:font-size="12pt"/>
    </style:style>
    <style:style style:parent-style-name="717" style:list-style-name="WWNum20" style:family="paragraph" style:name="P755">
      <style:paragraph-properties fo:line-height="115%" fo:margin-left="1.443cm" fo:margin-right="0.4833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479">
      <style:text-properties fo:font-size="12pt"/>
    </style:style>
    <style:style style:family="text" style:name="T5480">
      <style:text-properties fo:font-size="12pt" fo:letter-spacing="-0.25pt"/>
    </style:style>
    <style:style style:family="text" style:name="T5481">
      <style:text-properties fo:font-size="12pt"/>
    </style:style>
    <style:style style:family="text" style:name="T5482">
      <style:text-properties fo:font-size="12pt" fo:letter-spacing="-0.25pt"/>
    </style:style>
    <style:style style:family="text" style:name="T5483">
      <style:text-properties fo:font-size="12pt"/>
    </style:style>
    <style:style style:family="text" style:name="T5484">
      <style:text-properties fo:font-size="12pt" fo:letter-spacing="-0.25pt"/>
    </style:style>
    <style:style style:family="text" style:name="T5485">
      <style:text-properties fo:font-size="12pt"/>
    </style:style>
    <style:style style:family="text" style:name="T5486">
      <style:text-properties fo:font-size="12pt" fo:letter-spacing="-0.25pt"/>
    </style:style>
    <style:style style:family="text" style:name="T5487">
      <style:text-properties fo:font-size="12pt"/>
    </style:style>
    <style:style style:family="text" style:name="T5488">
      <style:text-properties fo:font-size="12pt" fo:letter-spacing="-0.25pt"/>
    </style:style>
    <style:style style:family="text" style:name="T5489">
      <style:text-properties fo:font-size="12pt"/>
    </style:style>
    <style:style style:family="text" style:name="T5490">
      <style:text-properties fo:font-size="12pt" fo:letter-spacing="-0.25pt"/>
    </style:style>
    <style:style style:family="text" style:name="T5491">
      <style:text-properties fo:font-size="12pt"/>
    </style:style>
    <style:style style:family="text" style:name="T5492">
      <style:text-properties fo:font-size="12pt" fo:letter-spacing="-0.25pt"/>
    </style:style>
    <style:style style:family="text" style:name="T5493">
      <style:text-properties fo:font-size="12pt"/>
    </style:style>
    <style:style style:family="text" style:name="T5494">
      <style:text-properties fo:font-size="12pt" fo:letter-spacing="-0.25pt"/>
    </style:style>
    <style:style style:family="text" style:name="T5495">
      <style:text-properties fo:font-size="12pt"/>
    </style:style>
    <style:style style:family="text" style:name="T5496">
      <style:text-properties fo:font-size="12pt" fo:letter-spacing="-0.25pt"/>
    </style:style>
    <style:style style:family="text" style:name="T5497">
      <style:text-properties fo:font-size="12pt"/>
    </style:style>
    <style:style style:parent-style-name="716" style:family="paragraph" style:name="P75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498">
      <style:text-properties fo:font-size="13pt"/>
    </style:style>
    <style:style style:family="text" style:name="T5499">
      <style:text-properties fo:font-size="13pt"/>
    </style:style>
    <style:style style:parent-style-name="712" style:family="paragraph" style:name="P757">
      <style:paragraph-properties fo:margin-left="0.1993cm" fo:margin-right="0cm" fo:text-indent="0cm" fo:margin-top="7.9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500">
      <style:text-properties fo:font-size="14pt" fo:font-weight="bold"/>
    </style:style>
    <style:style style:family="text" style:name="T5501">
      <style:text-properties fo:font-size="14pt" fo:letter-spacing="-0.15pt" fo:font-weight="bold"/>
    </style:style>
    <style:style style:family="text" style:name="T5502">
      <style:text-properties fo:font-size="14pt" fo:font-weight="bold"/>
    </style:style>
    <style:style style:family="text" style:name="T5503">
      <style:text-properties fo:font-size="14pt" fo:letter-spacing="-0.15pt" fo:font-weight="bold"/>
    </style:style>
    <style:style style:family="text" style:name="T5504">
      <style:text-properties fo:font-size="14pt" fo:font-weight="bold"/>
    </style:style>
    <style:style style:family="text" style:name="T5505">
      <style:text-properties fo:font-size="14pt" fo:letter-spacing="-0.15pt" fo:font-weight="bold"/>
    </style:style>
    <style:style style:family="text" style:name="T5506">
      <style:text-properties fo:font-size="14pt" fo:letter-spacing="-0.1pt" fo:font-weight="bold"/>
    </style:style>
    <style:style style:parent-style-name="716" style:family="paragraph" style:name="P758">
      <style:paragraph-properties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07">
      <style:text-properties fo:letter-spacing="-0.1pt"/>
    </style:style>
    <style:style style:parent-style-name="717" style:list-style-name="WWNum21" style:family="paragraph" style:name="P759">
      <style:paragraph-properties fo:line-height="115%" fo:margin-left="1.443cm" fo:margin-right="0.4128cm" fo:text-indent="0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508">
      <style:text-properties fo:font-size="12pt"/>
    </style:style>
    <style:style style:family="text" style:name="T5509">
      <style:text-properties fo:font-size="12pt" fo:letter-spacing="-0.15pt"/>
    </style:style>
    <style:style style:family="text" style:name="T5510">
      <style:text-properties fo:font-size="12pt"/>
    </style:style>
    <style:style style:family="text" style:name="T5511">
      <style:text-properties fo:font-size="12pt" fo:letter-spacing="-0.15pt"/>
    </style:style>
    <style:style style:family="text" style:name="T5512">
      <style:text-properties fo:font-size="12pt"/>
    </style:style>
    <style:style style:family="text" style:name="T5513">
      <style:text-properties fo:font-size="12pt" fo:letter-spacing="-0.15pt"/>
    </style:style>
    <style:style style:family="text" style:name="T5514">
      <style:text-properties fo:font-size="12pt"/>
    </style:style>
    <style:style style:family="text" style:name="T5515">
      <style:text-properties fo:font-size="12pt" fo:letter-spacing="-0.15pt"/>
    </style:style>
    <style:style style:family="text" style:name="T5516">
      <style:text-properties fo:font-size="12pt"/>
    </style:style>
    <style:style style:family="text" style:name="T5517">
      <style:text-properties fo:font-size="12pt" fo:letter-spacing="-0.15pt"/>
    </style:style>
    <style:style style:family="text" style:name="T5518">
      <style:text-properties fo:font-size="12pt"/>
    </style:style>
    <style:style style:family="text" style:name="T5519">
      <style:text-properties fo:font-size="12pt" fo:letter-spacing="-0.15pt"/>
    </style:style>
    <style:style style:family="text" style:name="T5520">
      <style:text-properties fo:font-size="12pt"/>
    </style:style>
    <style:style style:family="text" style:name="T5521">
      <style:text-properties fo:font-size="12pt" fo:letter-spacing="-0.15pt"/>
    </style:style>
    <style:style style:family="text" style:name="T5522">
      <style:text-properties fo:font-size="12pt"/>
    </style:style>
    <style:style style:family="text" style:name="T5523">
      <style:text-properties fo:font-size="12pt" fo:letter-spacing="-0.15pt"/>
    </style:style>
    <style:style style:family="text" style:name="T5524">
      <style:text-properties fo:font-size="12pt"/>
    </style:style>
    <style:style style:family="text" style:name="T5525">
      <style:text-properties fo:font-size="12pt" fo:letter-spacing="-0.15pt"/>
    </style:style>
    <style:style style:family="text" style:name="T5526">
      <style:text-properties fo:font-size="12pt"/>
    </style:style>
    <style:style style:family="text" style:name="T5527">
      <style:text-properties fo:font-size="12pt" fo:letter-spacing="-0.15pt"/>
    </style:style>
    <style:style style:family="text" style:name="T5528">
      <style:text-properties fo:font-size="12pt"/>
    </style:style>
    <style:style style:parent-style-name="716" style:family="paragraph" style:name="P760">
      <style:paragraph-properties fo:margin-left="0cm" fo:margin-right="0cm" fo:text-indent="0cm" fo:margin-top="0.3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29">
      <style:text-properties fo:font-size="13.5pt"/>
    </style:style>
    <style:style style:family="text" style:name="T5530">
      <style:text-properties fo:font-size="13.5pt"/>
    </style:style>
    <style:style style:parent-style-name="717" style:list-style-name="WWNum21" style:family="paragraph" style:name="P761">
      <style:paragraph-properties fo:line-height="115%" fo:margin-left="1.443cm" fo:margin-right="0.8679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531">
      <style:text-properties fo:font-size="12pt"/>
    </style:style>
    <style:style style:family="text" style:name="T5532">
      <style:text-properties fo:font-size="12pt" fo:letter-spacing="-0.15pt"/>
    </style:style>
    <style:style style:family="text" style:name="T5533">
      <style:text-properties fo:font-size="12pt"/>
    </style:style>
    <style:style style:family="text" style:name="T5534">
      <style:text-properties fo:font-size="12pt" fo:letter-spacing="-0.15pt"/>
    </style:style>
    <style:style style:family="text" style:name="T5535">
      <style:text-properties fo:font-size="12pt"/>
    </style:style>
    <style:style style:family="text" style:name="T5536">
      <style:text-properties fo:font-size="12pt" fo:letter-spacing="-0.15pt"/>
    </style:style>
    <style:style style:family="text" style:name="T5537">
      <style:text-properties fo:font-size="12pt"/>
    </style:style>
    <style:style style:family="text" style:name="T5538">
      <style:text-properties fo:font-size="12pt" fo:letter-spacing="-0.15pt"/>
    </style:style>
    <style:style style:family="text" style:name="T5539">
      <style:text-properties fo:font-size="12pt"/>
    </style:style>
    <style:style style:family="text" style:name="T5540">
      <style:text-properties fo:font-size="12pt" fo:letter-spacing="-0.15pt"/>
    </style:style>
    <style:style style:family="text" style:name="T5541">
      <style:text-properties fo:font-size="12pt"/>
    </style:style>
    <style:style style:family="text" style:name="T5542">
      <style:text-properties fo:font-size="12pt" fo:letter-spacing="-0.15pt"/>
    </style:style>
    <style:style style:family="text" style:name="T5543">
      <style:text-properties fo:font-size="12pt"/>
    </style:style>
    <style:style style:family="text" style:name="T5544">
      <style:text-properties fo:font-size="12pt" fo:letter-spacing="-0.15pt"/>
    </style:style>
    <style:style style:family="text" style:name="T5545">
      <style:text-properties fo:font-size="12pt"/>
    </style:style>
    <style:style style:family="text" style:name="T5546">
      <style:text-properties fo:font-size="12pt" fo:letter-spacing="-0.15pt"/>
    </style:style>
    <style:style style:family="text" style:name="T5547">
      <style:text-properties fo:font-size="12pt"/>
    </style:style>
    <style:style style:family="text" style:name="T5548">
      <style:text-properties fo:font-size="12pt" fo:letter-spacing="-0.15pt"/>
    </style:style>
    <style:style style:family="text" style:name="T5549">
      <style:text-properties fo:font-size="12pt"/>
    </style:style>
    <style:style style:family="text" style:name="T5550">
      <style:text-properties fo:font-size="12pt" fo:letter-spacing="-0.15pt"/>
    </style:style>
    <style:style style:family="text" style:name="T5551">
      <style:text-properties fo:font-size="12pt"/>
    </style:style>
    <style:style style:family="text" style:name="T5552">
      <style:text-properties fo:font-size="12pt" fo:letter-spacing="-0.15pt"/>
    </style:style>
    <style:style style:family="text" style:name="T5553">
      <style:text-properties fo:font-size="12pt"/>
    </style:style>
    <style:style style:family="text" style:name="T5554">
      <style:text-properties fo:font-size="12pt" fo:letter-spacing="-0.15pt"/>
    </style:style>
    <style:style style:family="text" style:name="T5555">
      <style:text-properties fo:font-size="12pt"/>
    </style:style>
    <style:style style:family="text" style:name="T5556">
      <style:text-properties fo:font-size="12pt" fo:letter-spacing="-0.1pt"/>
    </style:style>
    <style:style style:parent-style-name="716" style:family="paragraph" style:name="P762">
      <style:paragraph-properties fo:margin-left="0cm" fo:margin-right="0cm" fo:text-indent="0cm" fo:margin-top="0.3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57">
      <style:text-properties fo:font-size="13.5pt"/>
    </style:style>
    <style:style style:family="text" style:name="T5558">
      <style:text-properties fo:font-size="13.5pt"/>
    </style:style>
    <style:style style:parent-style-name="717" style:list-style-name="WWNum21" style:family="paragraph" style:name="P763">
      <style:paragraph-properties fo:line-height="115%" fo:margin-left="1.443cm" fo:margin-right="1.237cm" fo:text-indent="0cm">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559">
      <style:text-properties fo:font-size="12pt"/>
    </style:style>
    <style:style style:family="text" style:name="T5560">
      <style:text-properties fo:font-size="12pt" fo:letter-spacing="-0.15pt"/>
    </style:style>
    <style:style style:family="text" style:name="T5561">
      <style:text-properties fo:font-size="12pt"/>
    </style:style>
    <style:style style:family="text" style:name="T5562">
      <style:text-properties fo:font-size="12pt" fo:letter-spacing="-0.15pt"/>
    </style:style>
    <style:style style:family="text" style:name="T5563">
      <style:text-properties fo:font-size="12pt"/>
    </style:style>
    <style:style style:family="text" style:name="T5564">
      <style:text-properties fo:font-size="12pt" fo:letter-spacing="-0.15pt"/>
    </style:style>
    <style:style style:family="text" style:name="T5565">
      <style:text-properties fo:font-size="12pt"/>
    </style:style>
    <style:style style:family="text" style:name="T5566">
      <style:text-properties fo:font-size="12pt" fo:letter-spacing="-0.15pt"/>
    </style:style>
    <style:style style:family="text" style:name="T5567">
      <style:text-properties fo:font-size="12pt"/>
    </style:style>
    <style:style style:family="text" style:name="T5568">
      <style:text-properties fo:font-size="12pt" fo:letter-spacing="-0.15pt"/>
    </style:style>
    <style:style style:family="text" style:name="T5569">
      <style:text-properties fo:font-size="12pt"/>
    </style:style>
    <style:style style:family="text" style:name="T5570">
      <style:text-properties fo:font-size="12pt" fo:letter-spacing="-0.15pt"/>
    </style:style>
    <style:style style:family="text" style:name="T5571">
      <style:text-properties fo:font-size="12pt"/>
    </style:style>
    <style:style style:family="text" style:name="T5572">
      <style:text-properties fo:font-size="12pt" fo:letter-spacing="-0.15pt"/>
    </style:style>
    <style:style style:family="text" style:name="T5573">
      <style:text-properties fo:font-size="12pt"/>
    </style:style>
    <style:style style:family="text" style:name="T5574">
      <style:text-properties fo:font-size="12pt" fo:letter-spacing="-0.15pt"/>
    </style:style>
    <style:style style:family="text" style:name="T5575">
      <style:text-properties fo:font-size="12pt"/>
    </style:style>
    <style:style style:family="text" style:name="T5576">
      <style:text-properties fo:font-size="12pt" fo:letter-spacing="-0.15pt"/>
    </style:style>
    <style:style style:family="text" style:name="T5577">
      <style:text-properties fo:font-size="12pt"/>
    </style:style>
    <style:style style:family="text" style:name="T5578">
      <style:text-properties fo:font-size="12pt" fo:letter-spacing="-0.15pt"/>
    </style:style>
    <style:style style:family="text" style:name="T5579">
      <style:text-properties fo:font-size="12pt"/>
    </style:style>
    <style:style style:parent-style-name="716" style:family="paragraph" style:name="P764">
      <style:paragraph-properties fo:line-height="115%" fo:margin-left="0cm" fo:margin-right="0.5504cm" fo:text-indent="0cm" fo:margin-top="3.7pt" fo:margin-bottom="0pt" fo:break-before="page"/>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580">
      <style:text-properties fo:letter-spacing="-0.55pt"/>
    </style:style>
    <style:style style:family="text" style:name="T5581">
      <style:text-properties fo:letter-spacing="-0.55pt"/>
    </style:style>
    <style:style style:family="text" style:name="T5582">
      <style:text-properties fo:letter-spacing="-0.55pt"/>
    </style:style>
    <style:style style:family="text" style:name="T5583">
      <style:text-properties fo:letter-spacing="-0.55pt"/>
    </style:style>
    <style:style style:family="text" style:name="T5584">
      <style:text-properties fo:letter-spacing="-0.55pt"/>
    </style:style>
    <style:style style:family="text" style:name="T5585">
      <style:text-properties fo:letter-spacing="-0.55pt"/>
    </style:style>
    <style:style style:family="text" style:name="T5586">
      <style:text-properties fo:letter-spacing="-0.55pt"/>
    </style:style>
    <style:style style:family="text" style:name="T5587">
      <style:text-properties fo:letter-spacing="-0.55pt"/>
    </style:style>
    <style:style style:family="text" style:name="T5588">
      <style:text-properties fo:letter-spacing="-0.55pt"/>
    </style:style>
    <style:style style:family="text" style:name="T5589">
      <style:text-properties fo:letter-spacing="-0.55pt"/>
    </style:style>
    <style:style style:family="text" style:name="T5590">
      <style:text-properties fo:letter-spacing="-0.15pt"/>
    </style:style>
    <style:style style:family="text" style:name="T5591">
      <style:text-properties fo:letter-spacing="-0.15pt"/>
    </style:style>
    <style:style style:family="text" style:name="T5592">
      <style:text-properties fo:letter-spacing="-0.15pt"/>
    </style:style>
    <style:style style:family="text" style:name="T5593">
      <style:text-properties fo:letter-spacing="-0.15pt"/>
    </style:style>
    <style:style style:family="text" style:name="T5594">
      <style:text-properties fo:letter-spacing="-0.15pt"/>
    </style:style>
    <style:style style:family="text" style:name="T5595">
      <style:text-properties fo:letter-spacing="-0.15pt"/>
    </style:style>
    <style:style style:family="text" style:name="T5596">
      <style:text-properties fo:letter-spacing="-0.15pt"/>
    </style:style>
    <style:style style:family="text" style:name="T5597">
      <style:text-properties fo:letter-spacing="-0.15pt"/>
    </style:style>
    <style:style style:family="text" style:name="T5598">
      <style:text-properties fo:letter-spacing="-0.15pt"/>
    </style:style>
    <style:style style:family="text" style:name="T5599">
      <style:text-properties fo:letter-spacing="-0.15pt"/>
    </style:style>
    <style:style style:family="text" style:name="T5600">
      <style:text-properties fo:letter-spacing="-0.15pt"/>
    </style:style>
    <style:style style:parent-style-name="716" style:family="paragraph" style:name="P765">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01">
      <style:text-properties fo:font-size="13pt"/>
    </style:style>
    <style:style style:family="text" style:name="T5602">
      <style:text-properties fo:font-size="13pt"/>
    </style:style>
    <style:style style:parent-style-name="716" style:family="paragraph" style:name="P766">
      <style:paragraph-properties fo:margin-left="0cm" fo:margin-right="0cm" fo:text-indent="0cm" fo:margin-top="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03">
      <style:text-properties fo:font-size="12.5pt"/>
    </style:style>
    <style:style style:family="text" style:name="T5604">
      <style:text-properties fo:font-size="12.5pt"/>
    </style:style>
    <style:style style:parent-style-name="712" style:family="paragraph" style:name="P767">
      <style:paragraph-properties fo:margin-left="0.1993cm" fo:margin-right="0cm" fo:text-indent="0cm" fo:margin-top="0.05pt" fo:margin-bottom="0pt"/>
      <style:text-properties fo:font-variant="normal" fo:text-transform="none" fo:color="#000000" style:text-line-through-type="none" fo:font-family="Arial" style:font-family-asian="Arial" style:font-family-complex="Arial" fo:font-size="10pt" fo:letter-spacing="0pt" fo:language="en" fo:country="US" fo:font-style="normal" style:text-underline-type="none" style:text-underline-width="auto" fo:font-weight="normal"/>
    </style:style>
    <style:style style:family="text" style:name="T5605">
      <style:text-properties fo:font-size="14pt" fo:font-weight="bold"/>
    </style:style>
    <style:style style:family="text" style:name="T5606">
      <style:text-properties fo:font-size="14pt" fo:letter-spacing="-0.15pt" fo:font-weight="bold"/>
    </style:style>
    <style:style style:family="text" style:name="T5607">
      <style:text-properties fo:font-size="14pt" fo:font-weight="bold"/>
    </style:style>
    <style:style style:family="text" style:name="T5608">
      <style:text-properties fo:font-size="14pt" fo:letter-spacing="-0.15pt" fo:font-weight="bold"/>
    </style:style>
    <style:style style:family="text" style:name="T5609">
      <style:text-properties fo:font-size="14pt" fo:font-weight="bold"/>
    </style:style>
    <style:style style:family="text" style:name="T5610">
      <style:text-properties fo:font-size="14pt" fo:letter-spacing="-0.15pt" fo:font-weight="bold"/>
    </style:style>
    <style:style style:family="text" style:name="T5611">
      <style:text-properties fo:font-size="14pt" fo:font-weight="bold"/>
    </style:style>
    <style:style style:family="text" style:name="T5612">
      <style:text-properties fo:font-size="14pt" fo:letter-spacing="-0.15pt" fo:font-weight="bold"/>
    </style:style>
    <style:style style:family="text" style:name="T5613">
      <style:text-properties fo:font-size="14pt" fo:letter-spacing="-0.1pt" fo:font-weight="bold"/>
    </style:style>
    <style:style style:parent-style-name="716" style:family="paragraph" style:name="P768">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14">
      <style:text-properties fo:font-size="15pt" fo:font-weight="bold"/>
    </style:style>
    <style:style style:family="text" style:name="T5615">
      <style:text-properties fo:font-size="15pt" fo:font-weight="bold"/>
    </style:style>
    <style:style style:parent-style-name="716" style:family="paragraph" style:name="P769">
      <style:paragraph-properties fo:margin-top="11.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16">
      <style:text-properties fo:letter-spacing="-0.3pt"/>
    </style:style>
    <style:style style:family="text" style:name="T5617">
      <style:text-properties fo:letter-spacing="-0.3pt"/>
    </style:style>
    <style:style style:family="text" style:name="T5618">
      <style:text-properties fo:letter-spacing="-0.3pt"/>
    </style:style>
    <style:style style:family="text" style:name="T5619">
      <style:text-properties fo:letter-spacing="-0.3pt"/>
    </style:style>
    <style:style style:family="text" style:name="T5620">
      <style:text-properties fo:letter-spacing="-0.3pt"/>
    </style:style>
    <style:style style:family="text" style:name="T5621">
      <style:text-properties fo:letter-spacing="-0.3pt"/>
    </style:style>
    <style:style style:family="text" style:name="T5622">
      <style:text-properties fo:letter-spacing="-0.3pt"/>
    </style:style>
    <style:style style:family="text" style:name="T5623">
      <style:text-properties fo:letter-spacing="-0.3pt"/>
    </style:style>
    <style:style style:family="text" style:name="T5624">
      <style:text-properties fo:letter-spacing="-0.3pt"/>
    </style:style>
    <style:style style:family="text" style:name="T5625">
      <style:text-properties fo:letter-spacing="-0.3pt"/>
    </style:style>
    <style:style style:family="text" style:name="T5626">
      <style:text-properties fo:letter-spacing="-0.3pt"/>
    </style:style>
    <style:style style:family="text" style:name="T5627">
      <style:text-properties fo:letter-spacing="-0.1pt"/>
    </style:style>
    <style:style style:parent-style-name="716" style:family="paragraph" style:name="P770">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71">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28">
      <style:text-properties fo:letter-spacing="-0.15pt"/>
    </style:style>
    <style:style style:family="text" style:name="T5629">
      <style:text-properties fo:letter-spacing="-0.15pt"/>
    </style:style>
    <style:style style:family="text" style:name="T5630">
      <style:text-properties fo:letter-spacing="-0.15pt"/>
    </style:style>
    <style:style style:family="text" style:name="T5631">
      <style:text-properties fo:letter-spacing="-0.15pt"/>
    </style:style>
    <style:style style:family="text" style:name="T5632">
      <style:text-properties fo:letter-spacing="-0.15pt"/>
    </style:style>
    <style:style style:family="text" style:name="T5633">
      <style:text-properties fo:letter-spacing="-0.15pt"/>
    </style:style>
    <style:style style:family="text" style:name="T5634">
      <style:text-properties fo:letter-spacing="-0.15pt"/>
    </style:style>
    <style:style style:family="text" style:name="T5635">
      <style:text-properties fo:letter-spacing="-0.15pt"/>
    </style:style>
    <style:style style:family="text" style:name="T5636">
      <style:text-properties fo:letter-spacing="-0.15pt"/>
    </style:style>
    <style:style style:family="text" style:name="T5637">
      <style:text-properties fo:letter-spacing="-0.15pt"/>
    </style:style>
    <style:style style:family="text" style:name="T5638">
      <style:text-properties fo:letter-spacing="-0.15pt"/>
    </style:style>
    <style:style style:family="text" style:name="T5639">
      <style:text-properties fo:letter-spacing="-0.15pt"/>
    </style:style>
    <style:style style:parent-style-name="716" style:family="paragraph" style:name="P772">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73">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40">
      <style:text-properties fo:letter-spacing="-0.15pt"/>
    </style:style>
    <style:style style:family="text" style:name="T5641">
      <style:text-properties fo:letter-spacing="-0.15pt"/>
    </style:style>
    <style:style style:family="text" style:name="T5642">
      <style:text-properties fo:letter-spacing="-0.15pt"/>
    </style:style>
    <style:style style:family="text" style:name="T5643">
      <style:text-properties fo:letter-spacing="-0.15pt"/>
    </style:style>
    <style:style style:family="text" style:name="T5644">
      <style:text-properties fo:letter-spacing="-0.15pt"/>
    </style:style>
    <style:style style:family="text" style:name="T5645">
      <style:text-properties fo:letter-spacing="-0.15pt"/>
    </style:style>
    <style:style style:family="text" style:name="T5646">
      <style:text-properties fo:letter-spacing="-0.15pt"/>
    </style:style>
    <style:style style:family="text" style:name="T5647">
      <style:text-properties fo:letter-spacing="-0.15pt"/>
    </style:style>
    <style:style style:family="text" style:name="T5648">
      <style:text-properties fo:letter-spacing="-0.15pt"/>
    </style:style>
    <style:style style:family="text" style:name="T5649">
      <style:text-properties fo:letter-spacing="-0.15pt"/>
    </style:style>
    <style:style style:family="text" style:name="T5650">
      <style:text-properties fo:letter-spacing="-0.15pt"/>
    </style:style>
    <style:style style:family="text" style:name="T5651">
      <style:text-properties fo:letter-spacing="-0.15pt"/>
    </style:style>
    <style:style style:parent-style-name="716" style:family="paragraph" style:name="P774">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75">
      <style:paragraph-properties fo:margin-left="0cm" fo:margin-right="0.5027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52">
      <style:text-properties fo:letter-spacing="-0.1pt"/>
    </style:style>
    <style:style style:family="text" style:name="T5653">
      <style:text-properties fo:letter-spacing="-0.1pt"/>
    </style:style>
    <style:style style:family="text" style:name="T5654">
      <style:text-properties fo:letter-spacing="-0.1pt"/>
    </style:style>
    <style:style style:family="text" style:name="T5655">
      <style:text-properties fo:letter-spacing="-0.1pt"/>
    </style:style>
    <style:style style:family="text" style:name="T5656">
      <style:text-properties fo:letter-spacing="-0.1pt"/>
    </style:style>
    <style:style style:family="text" style:name="T5657">
      <style:text-properties fo:letter-spacing="-0.1pt"/>
    </style:style>
    <style:style style:family="text" style:name="T5658">
      <style:text-properties fo:letter-spacing="-0.1pt"/>
    </style:style>
    <style:style style:family="text" style:name="T5659">
      <style:text-properties fo:letter-spacing="-0.1pt"/>
    </style:style>
    <style:style style:family="text" style:name="T5660">
      <style:text-properties fo:letter-spacing="-0.1pt"/>
    </style:style>
    <style:style style:family="text" style:name="T5661">
      <style:text-properties fo:letter-spacing="-0.1pt"/>
    </style:style>
    <style:style style:family="text" style:name="T5662">
      <style:text-properties fo:letter-spacing="-0.1pt"/>
    </style:style>
    <style:style style:family="text" style:name="T5663">
      <style:text-properties fo:letter-spacing="-0.1pt"/>
    </style:style>
    <style:style style:family="text" style:name="T5664">
      <style:text-properties fo:letter-spacing="-0.1pt"/>
    </style:style>
    <style:style style:family="text" style:name="T5665">
      <style:text-properties fo:letter-spacing="-0.1pt"/>
    </style:style>
    <style:style style:parent-style-name="716" style:family="paragraph" style:name="P776">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77">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66">
      <style:text-properties fo:letter-spacing="-0.15pt"/>
    </style:style>
    <style:style style:family="text" style:name="T5667">
      <style:text-properties fo:letter-spacing="-0.15pt"/>
    </style:style>
    <style:style style:family="text" style:name="T5668">
      <style:text-properties fo:letter-spacing="-0.15pt"/>
    </style:style>
    <style:style style:family="text" style:name="T5669">
      <style:text-properties fo:letter-spacing="-0.15pt"/>
    </style:style>
    <style:style style:family="text" style:name="T5670">
      <style:text-properties fo:letter-spacing="-0.15pt"/>
    </style:style>
    <style:style style:family="text" style:name="T5671">
      <style:text-properties fo:letter-spacing="-0.15pt"/>
    </style:style>
    <style:style style:family="text" style:name="T5672">
      <style:text-properties fo:letter-spacing="-0.15pt"/>
    </style:style>
    <style:style style:family="text" style:name="T5673">
      <style:text-properties fo:letter-spacing="-0.15pt"/>
    </style:style>
    <style:style style:family="text" style:name="T5674">
      <style:text-properties fo:letter-spacing="-0.15pt"/>
    </style:style>
    <style:style style:family="text" style:name="T5675">
      <style:text-properties fo:letter-spacing="-0.15pt"/>
    </style:style>
    <style:style style:family="text" style:name="T5676">
      <style:text-properties fo:letter-spacing="-0.15pt"/>
    </style:style>
    <style:style style:parent-style-name="716" style:family="paragraph" style:name="P778">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77">
      <style:text-properties fo:letter-spacing="-0.1pt"/>
    </style:style>
    <style:style style:parent-style-name="716" style:family="paragraph" style:name="P779">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parent-style-name="716" style:family="paragraph" style:name="P780">
      <style:paragraph-properties fo:margin-left="0cm" fo:margin-right="0.5504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78">
      <style:text-properties fo:letter-spacing="-0.15pt"/>
    </style:style>
    <style:style style:family="text" style:name="T5679">
      <style:text-properties fo:letter-spacing="-0.15pt"/>
    </style:style>
    <style:style style:family="text" style:name="T5680">
      <style:text-properties fo:letter-spacing="-0.15pt"/>
    </style:style>
    <style:style style:family="text" style:name="T5681">
      <style:text-properties fo:letter-spacing="-0.15pt"/>
    </style:style>
    <style:style style:family="text" style:name="T5682">
      <style:text-properties fo:letter-spacing="-0.15pt"/>
    </style:style>
    <style:style style:family="text" style:name="T5683">
      <style:text-properties fo:letter-spacing="-0.15pt"/>
    </style:style>
    <style:style style:family="text" style:name="T5684">
      <style:text-properties fo:letter-spacing="-0.15pt"/>
    </style:style>
    <style:style style:family="text" style:name="T5685">
      <style:text-properties fo:letter-spacing="-0.15pt"/>
    </style:style>
    <style:style style:family="text" style:name="T5686">
      <style:text-properties fo:letter-spacing="-0.15pt"/>
    </style:style>
    <style:style style:family="text" style:name="T5687">
      <style:text-properties fo:letter-spacing="-0.15pt"/>
    </style:style>
    <style:style style:family="text" style:name="T5688">
      <style:text-properties fo:letter-spacing="-0.15pt"/>
    </style:style>
    <style:style style:parent-style-name="707" style:master-page-name="MasterPage38" style:family="paragraph" style:name="P781">
      <style:paragraph-properties fo:margin-left="0cm" fo:margin-right="0.5504cm" fo:text-indent="0cm" fo:break-before="page"/>
      <style:text-properties fo:font-variant="normal" fo:text-transform="none" fo:color="#000000" style:text-line-through-type="none" fo:font-family="Arial" style:font-family-asian="Arial" style:font-family-complex="Arial" fo:font-size="18pt" fo:letter-spacing="0pt" fo:language="en" fo:country="US" fo:font-style="normal" style:text-underline-type="none" style:text-underline-width="auto" fo:font-weight="bold"/>
    </style:style>
    <style:style style:family="text" style:name="T5689">
      <style:text-properties fo:letter-spacing="-0.65pt"/>
    </style:style>
    <style:style style:family="text" style:name="T5690">
      <style:text-properties fo:letter-spacing="-0.65pt"/>
    </style:style>
    <style:style style:family="text" style:name="T5691">
      <style:text-properties fo:letter-spacing="-0.65pt"/>
    </style:style>
    <style:style style:family="text" style:name="T5692">
      <style:text-properties fo:letter-spacing="-0.65pt"/>
    </style:style>
    <style:style style:family="text" style:name="T5693">
      <style:text-properties fo:letter-spacing="-0.65pt"/>
    </style:style>
    <style:style style:parent-style-name="716" style:family="paragraph" style:name="P782">
      <style:paragraph-properties fo:margin-left="0cm" fo:margin-right="0cm" fo:text-indent="0cm" fo:margin-top="0.1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94">
      <style:text-properties fo:font-size="25pt" fo:font-weight="bold"/>
    </style:style>
    <style:style style:family="text" style:name="T5695">
      <style:text-properties fo:font-size="25pt" fo:font-weight="bold"/>
    </style:style>
    <style:style style:parent-style-name="716" style:family="paragraph" style:name="P783">
      <style:paragraph-properties fo:line-height="115%"/>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696">
      <style:text-properties fo:letter-spacing="-0.25pt"/>
    </style:style>
    <style:style style:family="text" style:name="T5697">
      <style:text-properties fo:letter-spacing="-0.25pt"/>
    </style:style>
    <style:style style:family="text" style:name="T5698">
      <style:text-properties fo:letter-spacing="-0.25pt"/>
    </style:style>
    <style:style style:family="text" style:name="T5699">
      <style:text-properties fo:letter-spacing="-0.25pt"/>
    </style:style>
    <style:style style:family="text" style:name="T5700">
      <style:text-properties fo:letter-spacing="-0.25pt"/>
    </style:style>
    <style:style style:family="text" style:name="T5701">
      <style:text-properties fo:letter-spacing="-0.25pt"/>
    </style:style>
    <style:style style:family="text" style:name="T5702">
      <style:text-properties fo:letter-spacing="-0.25pt"/>
    </style:style>
    <style:style style:family="text" style:name="T5703">
      <style:text-properties fo:letter-spacing="-0.25pt"/>
    </style:style>
    <style:style style:family="text" style:name="T5704">
      <style:text-properties fo:letter-spacing="-0.25pt"/>
    </style:style>
    <style:style style:family="text" style:name="T5705">
      <style:text-properties fo:letter-spacing="-0.1pt"/>
    </style:style>
    <style:style style:family="text" style:name="T5706">
      <style:text-properties fo:letter-spacing="-0.1pt"/>
    </style:style>
    <style:style style:family="text" style:name="T5707">
      <style:text-properties fo:letter-spacing="-0.1pt"/>
    </style:style>
    <style:style style:family="text" style:name="T5708">
      <style:text-properties fo:letter-spacing="-0.1pt"/>
    </style:style>
    <style:style style:family="text" style:name="T5709">
      <style:text-properties fo:letter-spacing="-0.1pt"/>
    </style:style>
    <style:style style:family="text" style:name="T5710">
      <style:text-properties fo:letter-spacing="-0.1pt"/>
    </style:style>
    <style:style style:family="text" style:name="T5711">
      <style:text-properties fo:letter-spacing="-0.1pt"/>
    </style:style>
    <style:style style:family="text" style:name="T5712">
      <style:text-properties fo:letter-spacing="-0.1pt"/>
    </style:style>
    <style:style style:family="text" style:name="T5713">
      <style:text-properties fo:letter-spacing="-0.1pt"/>
    </style:style>
    <style:style style:family="text" style:name="T5714">
      <style:text-properties fo:letter-spacing="-0.1pt"/>
    </style:style>
    <style:style style:family="text" style:name="T5715">
      <style:text-properties fo:letter-spacing="-0.1pt"/>
    </style:style>
    <style:style style:family="text" style:name="T5716">
      <style:text-properties fo:letter-spacing="-0.1pt"/>
    </style:style>
    <style:style style:family="text" style:name="T5717">
      <style:text-properties fo:letter-spacing="-0.1pt"/>
    </style:style>
    <style:style style:parent-style-name="716" style:family="paragraph" style:name="P784">
      <style:paragraph-properties fo:line-height="115%" fo:margin-left="0cm" fo:margin-right="0.52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18">
      <style:text-properties fo:letter-spacing="-0.25pt"/>
    </style:style>
    <style:style style:family="text" style:name="T5719">
      <style:text-properties fo:letter-spacing="-0.25pt"/>
    </style:style>
    <style:style style:family="text" style:name="T5720">
      <style:text-properties fo:letter-spacing="-0.25pt"/>
    </style:style>
    <style:style style:family="text" style:name="T5721">
      <style:text-properties fo:letter-spacing="-0.25pt"/>
    </style:style>
    <style:style style:family="text" style:name="T5722">
      <style:text-properties fo:letter-spacing="-0.25pt"/>
    </style:style>
    <style:style style:family="text" style:name="T5723">
      <style:text-properties fo:letter-spacing="-0.25pt"/>
    </style:style>
    <style:style style:family="text" style:name="T5724">
      <style:text-properties fo:letter-spacing="-0.25pt"/>
    </style:style>
    <style:style style:family="text" style:name="T5725">
      <style:text-properties fo:letter-spacing="-0.25pt"/>
    </style:style>
    <style:style style:family="text" style:name="T5726">
      <style:text-properties fo:letter-spacing="-0.25pt"/>
    </style:style>
    <style:style style:parent-style-name="708" style:family="paragraph" style:name="P785">
      <style:paragraph-properties fo:margin-top="1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727">
      <style:text-properties fo:letter-spacing="-0.3pt"/>
    </style:style>
    <style:style style:family="text" style:name="T5728">
      <style:text-properties fo:letter-spacing="-0.25pt"/>
    </style:style>
    <style:style style:family="text" style:name="T5729">
      <style:text-properties fo:letter-spacing="-0.25pt"/>
    </style:style>
    <style:style style:family="text" style:name="T5730">
      <style:text-properties fo:letter-spacing="-0.15pt"/>
    </style:style>
    <style:style style:family="text" style:name="T5731">
      <style:text-properties fo:letter-spacing="-0.25pt"/>
    </style:style>
    <style:style style:parent-style-name="716" style:family="paragraph" style:name="P786">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32">
      <style:text-properties fo:letter-spacing="-0.1pt"/>
    </style:style>
    <style:style style:family="text" style:name="T5733">
      <style:text-properties fo:letter-spacing="-0.1pt"/>
    </style:style>
    <style:style style:family="text" style:name="T5734">
      <style:text-properties fo:letter-spacing="-0.1pt"/>
    </style:style>
    <style:style style:family="text" style:name="T5735">
      <style:text-properties fo:letter-spacing="-0.1pt"/>
    </style:style>
    <style:style style:family="text" style:name="T5736">
      <style:text-properties fo:letter-spacing="-0.1pt"/>
    </style:style>
    <style:style style:family="text" style:name="T5737">
      <style:text-properties fo:letter-spacing="-0.1pt"/>
    </style:style>
    <style:style style:family="text" style:name="T5738">
      <style:text-properties fo:letter-spacing="-0.1pt"/>
    </style:style>
    <style:style style:family="text" style:name="T5739">
      <style:text-properties fo:letter-spacing="-0.1pt"/>
    </style:style>
    <style:style style:family="text" style:name="T5740">
      <style:text-properties fo:letter-spacing="-0.1pt"/>
    </style:style>
    <style:style style:family="text" style:name="T5741">
      <style:text-properties fo:letter-spacing="-0.1pt"/>
    </style:style>
    <style:style style:family="text" style:name="T5742">
      <style:text-properties fo:letter-spacing="-0.1pt"/>
    </style:style>
    <style:style style:family="text" style:name="T5743">
      <style:text-properties fo:letter-spacing="-0.1pt"/>
    </style:style>
    <style:style style:family="text" style:name="T5744">
      <style:text-properties fo:letter-spacing="-0.1pt"/>
    </style:style>
    <style:style style:family="text" style:name="T5745">
      <style:text-properties fo:letter-spacing="-0.1pt"/>
    </style:style>
    <style:style style:parent-style-name="716" style:family="paragraph" style:name="P787">
      <style:paragraph-properties fo:line-height="115%" fo:margin-left="0cm" fo:margin-right="0.5504cm" fo:text-indent="0cm" fo:margin-top="7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46">
      <style:text-properties fo:letter-spacing="-0.3pt"/>
    </style:style>
    <style:style style:family="text" style:name="T5747">
      <style:text-properties fo:letter-spacing="-0.3pt"/>
    </style:style>
    <style:style style:family="text" style:name="T5748">
      <style:text-properties fo:letter-spacing="-0.3pt"/>
    </style:style>
    <style:style style:family="text" style:name="T5749">
      <style:text-properties fo:letter-spacing="-0.3pt"/>
    </style:style>
    <style:style style:family="text" style:name="T5750">
      <style:text-properties fo:letter-spacing="-0.3pt"/>
    </style:style>
    <style:style style:family="text" style:name="T5751">
      <style:text-properties fo:letter-spacing="-0.3pt"/>
    </style:style>
    <style:style style:family="text" style:name="T5752">
      <style:text-properties fo:letter-spacing="-0.3pt"/>
    </style:style>
    <style:style style:family="text" style:name="T5753">
      <style:text-properties fo:letter-spacing="-0.3pt"/>
    </style:style>
    <style:style style:family="text" style:name="T5754">
      <style:text-properties fo:letter-spacing="-0.3pt"/>
    </style:style>
    <style:style style:family="text" style:name="T5755">
      <style:text-properties fo:letter-spacing="-0.3pt"/>
    </style:style>
    <style:style style:family="text" style:name="T5756">
      <style:text-properties fo:letter-spacing="-0.3pt"/>
    </style:style>
    <style:style style:family="text" style:name="T5757">
      <style:text-properties fo:letter-spacing="-0.3pt"/>
    </style:style>
    <style:style style:family="text" style:name="T5758">
      <style:text-properties fo:letter-spacing="-0.3pt"/>
    </style:style>
    <style:style style:family="text" style:name="T5759">
      <style:text-properties fo:letter-spacing="-0.3pt"/>
    </style:style>
    <style:style style:parent-style-name="716" style:family="paragraph" style:name="P788">
      <style:paragraph-properties fo:line-height="115%" fo:margin-left="1.469cm" fo:margin-right="0.8573cm" fo:text-indent="-0.63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60">
      <style:text-properties fo:letter-spacing="-0.5pt"/>
    </style:style>
    <style:style style:family="text" style:name="T5761">
      <style:text-properties fo:letter-spacing="-0.15pt"/>
    </style:style>
    <style:style style:family="text" style:name="T5762">
      <style:text-properties fo:letter-spacing="-0.15pt"/>
    </style:style>
    <style:style style:family="text" style:name="T5763">
      <style:text-properties fo:letter-spacing="-0.15pt"/>
    </style:style>
    <style:style style:family="text" style:name="T5764">
      <style:text-properties fo:letter-spacing="-0.15pt"/>
    </style:style>
    <style:style style:family="text" style:name="T5765">
      <style:text-properties fo:letter-spacing="-0.15pt"/>
    </style:style>
    <style:style style:family="text" style:name="T5766">
      <style:text-properties fo:letter-spacing="-0.15pt"/>
    </style:style>
    <style:style style:family="text" style:name="T5767">
      <style:text-properties fo:letter-spacing="-0.15pt"/>
    </style:style>
    <style:style style:family="text" style:name="T5768">
      <style:text-properties fo:letter-spacing="-0.15pt"/>
    </style:style>
    <style:style style:family="text" style:name="T5769">
      <style:text-properties fo:letter-spacing="-0.15pt"/>
    </style:style>
    <style:style style:family="text" style:name="T5770">
      <style:text-properties fo:letter-spacing="-0.15pt"/>
    </style:style>
    <style:style style:parent-style-name="716" style:family="paragraph" style:name="P789">
      <style:paragraph-properties fo:margin-left="0.8344cm" fo:margin-right="0cm" fo:text-indent="0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71">
      <style:text-properties fo:letter-spacing="-0.5pt"/>
    </style:style>
    <style:style style:family="text" style:name="T5772">
      <style:text-properties fo:letter-spacing="-0.1pt"/>
    </style:style>
    <style:style style:parent-style-name="716" style:family="paragraph" style:name="P790">
      <style:paragraph-properties fo:line-height="115%" fo:margin-left="1.469cm" fo:margin-right="1.822cm" fo:text-indent="-0.635cm" fo:margin-top="9.1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73">
      <style:text-properties fo:letter-spacing="-0.5pt"/>
    </style:style>
    <style:style style:family="text" style:name="T5774">
      <style:text-properties fo:letter-spacing="-0.1pt"/>
    </style:style>
    <style:style style:family="text" style:name="T5775">
      <style:text-properties fo:letter-spacing="-0.1pt"/>
    </style:style>
    <style:style style:family="text" style:name="T5776">
      <style:text-properties fo:letter-spacing="-0.1pt"/>
    </style:style>
    <style:style style:family="text" style:name="T5777">
      <style:text-properties fo:letter-spacing="-0.1pt"/>
    </style:style>
    <style:style style:family="text" style:name="T5778">
      <style:text-properties fo:letter-spacing="-0.1pt"/>
    </style:style>
    <style:style style:family="text" style:name="T5779">
      <style:text-properties fo:letter-spacing="-0.1pt"/>
    </style:style>
    <style:style style:family="text" style:name="T5780">
      <style:text-properties fo:letter-spacing="-0.1pt"/>
    </style:style>
    <style:style style:family="text" style:name="T5781">
      <style:text-properties fo:letter-spacing="-0.1pt"/>
    </style:style>
    <style:style style:family="text" style:name="T5782">
      <style:text-properties fo:letter-spacing="-0.1pt"/>
    </style:style>
    <style:style style:family="text" style:name="T5783">
      <style:text-properties fo:letter-spacing="-0.1pt"/>
    </style:style>
    <style:style style:family="text" style:name="T5784">
      <style:text-properties fo:letter-spacing="-0.1pt"/>
    </style:style>
    <style:style style:family="text" style:name="T5785">
      <style:text-properties fo:letter-spacing="-0.1pt"/>
    </style:style>
    <style:style style:family="text" style:name="T5786">
      <style:text-properties fo:letter-spacing="-0.1pt"/>
    </style:style>
    <style:style style:parent-style-name="716" style:family="paragraph" style:name="P791">
      <style:paragraph-properties fo:line-height="115%" fo:margin-left="1.469cm" fo:margin-right="0.5504cm" fo:text-indent="-0.63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787">
      <style:text-properties fo:letter-spacing="-0.5pt"/>
    </style:style>
    <style:style style:family="text" style:name="T5788">
      <style:text-properties fo:letter-spacing="-0.15pt"/>
    </style:style>
    <style:style style:family="text" style:name="T5789">
      <style:text-properties fo:letter-spacing="-0.15pt"/>
    </style:style>
    <style:style style:family="text" style:name="T5790">
      <style:text-properties fo:letter-spacing="-0.15pt"/>
    </style:style>
    <style:style style:family="text" style:name="T5791">
      <style:text-properties fo:letter-spacing="-0.15pt"/>
    </style:style>
    <style:style style:family="text" style:name="T5792">
      <style:text-properties fo:letter-spacing="-0.15pt"/>
    </style:style>
    <style:style style:family="text" style:name="T5793">
      <style:text-properties fo:letter-spacing="-0.15pt"/>
    </style:style>
    <style:style style:family="text" style:name="T5794">
      <style:text-properties fo:letter-spacing="-0.15pt"/>
    </style:style>
    <style:style style:family="text" style:name="T5795">
      <style:text-properties fo:letter-spacing="-0.15pt"/>
    </style:style>
    <style:style style:family="text" style:name="T5796">
      <style:text-properties fo:letter-spacing="-0.15pt"/>
    </style:style>
    <style:style style:family="text" style:name="T5797">
      <style:text-properties fo:letter-spacing="-0.15pt"/>
    </style:style>
    <style:style style:family="text" style:name="T5798">
      <style:text-properties fo:letter-spacing="-0.15pt"/>
    </style:style>
    <style:style style:family="text" style:name="T5799">
      <style:text-properties fo:letter-spacing="-0.15pt"/>
    </style:style>
    <style:style style:parent-style-name="716" style:family="paragraph" style:name="P792">
      <style:paragraph-properties fo:line-height="115%" fo:margin-left="1.469cm" fo:margin-right="0.7744cm" fo:text-indent="-0.635cm" fo:margin-top="7pt" fo:margin-bottom="0pt">
        <style:tab-stops>
          <style:tab-stop style:position="0.9984cm" style:type="left"/>
        </style:tab-stops>
      </style:paragraph-properties>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800">
      <style:text-properties fo:letter-spacing="-0.5pt"/>
    </style:style>
    <style:style style:family="text" style:name="T5801">
      <style:text-properties fo:letter-spacing="-0.15pt"/>
    </style:style>
    <style:style style:family="text" style:name="T5802">
      <style:text-properties fo:letter-spacing="-0.15pt"/>
    </style:style>
    <style:style style:family="text" style:name="T5803">
      <style:text-properties fo:letter-spacing="-0.15pt"/>
    </style:style>
    <style:style style:family="text" style:name="T5804">
      <style:text-properties fo:letter-spacing="-0.15pt"/>
    </style:style>
    <style:style style:family="text" style:name="T5805">
      <style:text-properties fo:letter-spacing="-0.15pt"/>
    </style:style>
    <style:style style:family="text" style:name="T5806">
      <style:text-properties fo:letter-spacing="-0.15pt"/>
    </style:style>
    <style:style style:family="text" style:name="T5807">
      <style:text-properties fo:letter-spacing="-0.15pt"/>
    </style:style>
    <style:style style:family="text" style:name="T5808">
      <style:text-properties fo:letter-spacing="-0.15pt"/>
    </style:style>
    <style:style style:family="text" style:name="T5809">
      <style:text-properties fo:letter-spacing="-0.15pt"/>
    </style:style>
    <style:style style:family="text" style:name="T5810">
      <style:text-properties fo:letter-spacing="-0.15pt"/>
    </style:style>
    <style:style style:family="text" style:name="T5811">
      <style:text-properties fo:letter-spacing="-0.15pt"/>
    </style:style>
    <style:style style:family="text" style:name="T5812">
      <style:text-properties fo:letter-spacing="-0.15pt"/>
    </style:style>
    <style:style style:parent-style-name="716" style:family="paragraph" style:name="P793">
      <style:paragraph-properties fo:margin-left="0cm" fo:margin-right="0cm" fo:text-indent="0cm"/>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813">
      <style:text-properties fo:font-size="13pt"/>
    </style:style>
    <style:style style:family="text" style:name="T5814">
      <style:text-properties fo:font-size="13pt"/>
    </style:style>
    <style:style style:parent-style-name="716" style:family="paragraph" style:name="P794">
      <style:paragraph-properties fo:margin-left="0cm" fo:margin-right="0cm" fo:text-indent="0cm" fo:margin-top="0.05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815">
      <style:text-properties fo:font-size="15.5pt"/>
    </style:style>
    <style:style style:family="text" style:name="T5816">
      <style:text-properties fo:font-size="15.5pt"/>
    </style:style>
    <style:style style:parent-style-name="708" style:family="paragraph" style:name="P795">
      <style:paragraph-properties fo:margin-top="0pt" fo:margin-bottom="0pt"/>
      <style:text-properties fo:font-variant="normal" fo:text-transform="none" fo:color="#000000" style:text-line-through-type="none" fo:font-family="Arial" style:font-family-asian="Arial" style:font-family-complex="Arial" fo:font-size="16pt" fo:letter-spacing="0pt" fo:language="en" fo:country="US" fo:font-style="normal" style:text-underline-type="none" style:text-underline-width="auto" fo:font-weight="bold"/>
    </style:style>
    <style:style style:family="text" style:name="T5817">
      <style:text-properties fo:letter-spacing="-0.5pt"/>
    </style:style>
    <style:style style:family="text" style:name="T5818">
      <style:text-properties fo:letter-spacing="-0.35pt"/>
    </style:style>
    <style:style style:family="text" style:name="T5819">
      <style:text-properties fo:letter-spacing="-0.35pt"/>
    </style:style>
    <style:style style:family="text" style:name="T5820">
      <style:text-properties fo:letter-spacing="-0.35pt"/>
    </style:style>
    <style:style style:family="text" style:name="T5821">
      <style:text-properties fo:letter-spacing="-0.35pt"/>
    </style:style>
    <style:style style:family="text" style:name="T5822">
      <style:text-properties fo:letter-spacing="-0.1pt"/>
    </style:style>
    <style:style style:parent-style-name="716" style:family="paragraph" style:name="P796">
      <style:paragraph-properties fo:line-height="115%" fo:margin-left="0cm" fo:margin-right="0.5504cm" fo:text-indent="0cm" fo:margin-top="6pt" fo:margin-bottom="0pt"/>
      <style:text-properties fo:font-variant="normal" fo:text-transform="none" fo:color="#000000" style:text-line-through-type="none" fo:font-family="Arial" style:font-family-asian="Arial" style:font-family-complex="Arial" fo:font-size="12pt" fo:letter-spacing="0pt" fo:language="en" fo:country="US" fo:font-style="normal" style:text-underline-type="none" style:text-underline-width="auto" fo:font-weight="normal"/>
    </style:style>
    <style:style style:family="text" style:name="T5823">
      <style:text-properties fo:letter-spacing="-0.1pt"/>
    </style:style>
    <style:style style:family="text" style:name="T5824">
      <style:text-properties fo:letter-spacing="-0.1pt"/>
    </style:style>
    <style:style style:family="text" style:name="T5825">
      <style:text-properties fo:letter-spacing="-0.1pt"/>
    </style:style>
    <style:style style:family="text" style:name="T5826">
      <style:text-properties fo:letter-spacing="-0.1pt"/>
    </style:style>
    <style:style style:family="text" style:name="T5827">
      <style:text-properties fo:letter-spacing="-0.1pt"/>
    </style:style>
    <style:style style:family="text" style:name="T5828">
      <style:text-properties fo:letter-spacing="-0.1pt"/>
    </style:style>
    <style:style style:family="text" style:name="T5829">
      <style:text-properties fo:letter-spacing="-0.1pt"/>
    </style:style>
    <style:style style:family="text" style:name="T5830">
      <style:text-properties fo:letter-spacing="-0.1pt"/>
    </style:style>
    <style:style style:family="text" style:name="T5831">
      <style:text-properties fo:letter-spacing="-0.1pt"/>
    </style:style>
    <style:style style:family="text" style:name="T5832">
      <style:text-properties fo:letter-spacing="-0.1pt"/>
    </style:style>
    <style:style style:family="text" style:name="T5833">
      <style:text-properties fo:letter-spacing="-0.1pt"/>
    </style:style>
    <style:style style:family="text" style:name="T5834">
      <style:text-properties fo:letter-spacing="-0.1pt"/>
    </style:style>
    <style:style style:family="text" style:name="T5835">
      <style:text-properties fo:letter-spacing="-0.1pt"/>
    </style:style>
    <style:style style:family="text" style:name="T5836">
      <style:text-properties fo:letter-spacing="-0.1pt"/>
    </style:style>
  </office:automatic-styles>
  <office:body>
    <office:text text:use-soft-page-breaks="true">
      <text:p text:style-name="P39"><text:span text:style-name="T473"/><text:span text:style-name="T474"/></text:p>
      <text:p text:style-name="P40"><text:span text:style-name="T475">Demos</text:span><text:span text:style-name="T476"><text:s/></text:span><text:span text:style-name="T477">Network</text:span><text:span text:style-name="T478"><text:s/></text:span><text:span>©</text:span><text:span text:style-name="T479"><text:s/></text:span><text:span>202</text:span><text:span text:style-name="T480">5</text:span><text:span text:style-name="T481"><text:s/></text:span><text:span>by</text:span><text:span text:style-name="T482"><text:s/></text:span><text:span text:style-name="T483">Azhar</text:span><text:span text:style-name="T484"><text:s/></text:span><text:bookmark-start text:name="​​License_"/><text:span/><text:bookmark-end text:name="​​License_"/><text:span text:style-name="T485">Nurhussen,</text:span><text:span text:style-name="T486"><text:s/></text:span><text:span text:style-name="T487">Cristiano</text:span><text:span text:style-name="T488"><text:s/></text:span><text:span text:style-name="T489">Frassineti,</text:span><text:span text:style-name="T490"><text:s/></text:span><text:span text:style-name="T491">Jacob</text:span><text:span text:style-name="T492"><text:s/></text:span><text:span text:style-name="T493">Ortiz</text:span><text:span text:style-name="T494"><text:s/></text:span><text:span text:style-name="T495">Hansen</text:span><text:span text:style-name="T496"><text:s/></text:span><text:span>is licensed under </text:span><text:span text:style-name="T497">Attribution-NonCommercial-NoDerivatives 4.0 International</text:span><text:span/></text:p>
      <text:p text:style-name="P41"><text:span text:style-name="T498"/><text:span text:style-name="T499"/></text:p>
      <text:p text:style-name="P42"><text:span>CC</text:span><text:span text:style-name="T500"><text:s/></text:span><text:span>BY-NC-ND</text:span><text:span text:style-name="T501"><text:s/></text:span><text:span text:style-name="T502">4.0</text:span><text:span/></text:p>
      <text:p text:style-name="P43"><text:span text:style-name="T503"/><text:span text:style-name="T504"/></text:p>
      <text:list>
        <text:list-item>
          <text:h text:outline-level="6" text:restart-numbering="0" text:is-list-header="0" text:style-name="P44"><text:span/><text:span/><text:span>Attribution-NonCommercial-NoDerivatives 4.0 </text:span><text:span text:style-name="T505">International</text:span><text:span/><text:span/><text:span/></text:h>
        </text:list-item>
      </text:list>
      <text:p text:style-name="P45"><text:span text:style-name="T506"/><text:span text:style-name="T507"/></text:p>
      <text:p text:style-name="P46"><text:span>This license requires that reusers give credit to the creator. It allows reusers to copy and distribute</text:span><text:span text:style-name="T508"><text:s/></text:span><text:span>the</text:span><text:span text:style-name="T509"><text:s/></text:span><text:span>material</text:span><text:span text:style-name="T510"><text:s/></text:span><text:span>in</text:span><text:span text:style-name="T511"><text:s/></text:span><text:span>any</text:span><text:span text:style-name="T512"><text:s/></text:span><text:span>medium</text:span><text:span text:style-name="T513"><text:s/></text:span><text:span>or</text:span><text:span text:style-name="T514"><text:s/></text:span><text:span>format</text:span><text:span text:style-name="T515"><text:s/></text:span><text:span>in</text:span><text:span text:style-name="T516"><text:s/></text:span><text:span>unadapted</text:span><text:span text:style-name="T517"><text:s/></text:span><text:span>form</text:span><text:span text:style-name="T518"><text:s/></text:span><text:span>and</text:span><text:span text:style-name="T519"><text:s/></text:span><text:span>for</text:span><text:span text:style-name="T520"><text:s/></text:span><text:span>noncommercial purposes only.</text:span><text:span/></text:p>
      <text:p text:style-name="P47"><text:span text:style-name="T521"/><text:span text:style-name="T522"/></text:p>
      <text:p text:style-name="P48"><text:span text:style-name="T523"/><text:span text:style-name="T524"/></text:p>
      <text:p text:style-name="P49"><text:span text:style-name="T525">BY:</text:span><text:span text:style-name="T526"><text:s/></text:span><text:span>Credit</text:span><text:span text:style-name="T527"><text:s/></text:span><text:span>must</text:span><text:span text:style-name="T528"><text:s/></text:span><text:span>be</text:span><text:span text:style-name="T529"><text:s/></text:span><text:span>given</text:span><text:span text:style-name="T530"><text:s/></text:span><text:span>to</text:span><text:span text:style-name="T531"><text:s/></text:span><text:span>the</text:span><text:span text:style-name="T532"> creator(s).</text:span><text:span/></text:p>
      <text:p text:style-name="P50"><text:span text:style-name="T533">NC:</text:span><text:span text:style-name="T534"><text:s/></text:span><text:span>Only</text:span><text:span text:style-name="T535"><text:s/></text:span><text:span>noncommercial</text:span><text:span text:style-name="T536"><text:s/></text:span><text:span>use</text:span><text:span text:style-name="T537"><text:s/></text:span><text:span>of</text:span><text:span text:style-name="T538"><text:s/></text:span><text:span>this</text:span><text:span text:style-name="T539"><text:s/></text:span><text:span>work</text:span><text:span text:style-name="T540"><text:s/></text:span><text:span>is</text:span><text:span text:style-name="T541"><text:s/></text:span><text:span>permitted.</text:span><text:span text:style-name="T542"><text:s/></text:span><text:span>Noncommercial</text:span><text:span text:style-name="T543"><text:s/></text:span><text:span>means</text:span><text:span text:style-name="T544"><text:s/></text:span><text:span>not primarily intended for or directed towards commercial advantage or monetary </text:span><text:span text:style-name="T545">compensation.</text:span><text:span/></text:p>
      <text:p text:style-name="P51"><text:span text:style-name="T546"/><text:span text:style-name="T547"/></text:p>
      <text:p text:style-name="P52"><text:span text:style-name="T548">ND: </text:span><text:span>No derivatives or adaptations of this work are </text:span><text:span text:style-name="T549">permitted.</text:span><text:span/></text:p>
      <text:p text:style-name="P53"><text:span text:style-name="T550"/><text:span text:style-name="T551"/></text:p>
      <text:p text:style-name="P54"><text:span text:style-name="T552"/><text:span text:style-name="T553"/></text:p>
      <text:p text:style-name="P55"><text:span text:style-name="T554"/><text:span text:style-name="T555"/></text:p>
      <text:p text:style-name="P56"><text:span>To</text:span><text:span text:style-name="T556"><text:s/></text:span><text:span>view</text:span><text:span text:style-name="T557"><text:s/></text:span><text:span>a</text:span><text:span text:style-name="T558"><text:s/></text:span><text:span>copy</text:span><text:span text:style-name="T559"><text:s/></text:span><text:span>of</text:span><text:span text:style-name="T560"><text:s/></text:span><text:span>this</text:span><text:span text:style-name="T561"><text:s/></text:span><text:span>license,</text:span><text:span text:style-name="T562"><text:s/></text:span><text:span>visit</text:span><text:span text:style-name="T563"><text:s/></text:span><text:a xlink:href="#ttp://creativecommons.org/licenses/by-nc-nd/4.0/" xlink:type="simple"><text:span text:style-name="T564"/><text:span text:style-name="T565"/><text:span text:style-name="T566">http://creativecommons.org/licenses/by-nc-</text:span><text:span text:style-name="T567"/><text:span text:style-name="T568">nd/4.0/</text:span></text:a><text:span/><text:span/></text:p>
      <text:p text:style-name="P57"><text:span text:style-name="T569"/><text:span text:style-name="T570"/></text:p>
      <text:p text:style-name="P58"><text:span text:style-name="T571"/><text:span text:style-name="T572"/></text:p>
      <text:p text:style-name="P59"><text:span>By</text:span><text:span text:style-name="T573"><text:s/></text:span><text:span>reading,</text:span><text:span text:style-name="T574"><text:s/></text:span><text:span>downloading,</text:span><text:span text:style-name="T575"><text:s/></text:span><text:span>distributing,</text:span><text:span text:style-name="T576"><text:s/></text:span><text:span>using</text:span><text:span text:style-name="T577"><text:s/></text:span><text:span>and</text:span><text:span text:style-name="T578"><text:s/></text:span><text:span>enjoying</text:span><text:span text:style-name="T579"><text:s/></text:span><text:span>this</text:span><text:span text:style-name="T580"><text:s/></text:span><text:span>work</text:span><text:span text:style-name="T581"><text:s/></text:span><text:span>in</text:span><text:span text:style-name="T582"><text:s/></text:span><text:span>any</text:span><text:span text:style-name="T583"><text:s/></text:span><text:span>form,</text:span><text:span text:style-name="T584"><text:s/></text:span><text:span>in</text:span><text:span text:style-name="T585"><text:s/></text:span><text:span>whole</text:span><text:span text:style-name="T586"><text:s/></text:span><text:span>or in part, you accept the above terms and conditions.</text:span><text:span/></text:p>
      <text:p text:style-name="P60"><text:span>Demos: A BORDERLESS INTERCONNECTIVITY LAYER, ENABLING SEAMLESS INTEROPERABILITY AND ADVANCED</text:span><text:span text:style-name="T587"><text:s/></text:span><text:span>FUNCTIONS</text:span><text:span text:style-name="T588"><text:s/></text:span><text:span>ACROSS</text:span><text:span text:style-name="T589"><text:s/></text:span><text:span>ALL</text:span><text:span text:style-name="T590"><text:s/></text:span><text:span>CHAINS</text:span><text:span text:style-name="T591"><text:s/></text:span><text:span>AND</text:span><text:span text:style-name="T592"><text:s/></text:span><text:span>WEBS</text:span><text:span/></text:p>
      <text:p text:style-name="P61"><text:span text:style-name="T593"/><text:span text:style-name="T594"/></text:p>
      <text:p text:style-name="P62"><text:span>Azhar</text:span><text:span text:style-name="T595"><text:s/></text:span><text:span>Nurhussen</text:span><text:span text:style-name="T596"><text:s/></text:span><text:span>|</text:span><text:span text:style-name="T597"><text:s/></text:span><text:span>Cristiano</text:span><text:span text:style-name="T598"><text:s/></text:span><text:span>Frassineti</text:span><text:span text:style-name="T599"><text:s/></text:span><text:span>|</text:span><text:span text:style-name="T600"><text:s/></text:span><text:span>Jacob</text:span><text:span text:style-name="T601"><text:s/></text:span><text:span>Ortiz</text:span><text:span text:style-name="T602"><text:s/></text:span><text:span>Hansen </text:span><text:a xlink:href="#ailto:team@kynesys.xyz" xlink:type="simple"><text:span text:style-name="T603"/><text:span text:style-name="T604"/><text:span text:style-name="T605">team@kynesys.xyz</text:span></text:a><text:span/><text:span/></text:p>
      <text:p text:style-name="P63"><text:span text:style-name="T606"/><text:span text:style-name="T607"/></text:p>
      <text:p text:style-name="P64"><text:span text:style-name="T608"/><text:span text:style-name="T609"/></text:p>
      <text:p text:style-name="P65"><text:span text:style-name="T610">Abstract</text:span><text:span/></text:p>
      <text:p text:style-name="P66"><text:span text:style-name="T611"/><text:span text:style-name="T612"/></text:p>
      <text:p text:style-name="P67"><text:span>This</text:span><text:span text:style-name="T613"><text:s/></text:span><text:span>paper</text:span><text:span text:style-name="T614"><text:s/></text:span><text:span>presents</text:span><text:span text:style-name="T615"><text:s/></text:span><text:span>a</text:span><text:span text:style-name="T616"><text:s/></text:span><text:span>comprehensive</text:span><text:span text:style-name="T617"><text:s/></text:span><text:span>analysis</text:span><text:span text:style-name="T618"><text:s/></text:span><text:span>of</text:span><text:span text:style-name="T619"><text:s/></text:span><text:span>Demos,</text:span><text:span text:style-name="T620"><text:s/></text:span><text:span>a</text:span><text:span text:style-name="T621"><text:s/></text:span><text:span>novel</text:span><text:span text:style-name="T622"><text:s/></text:span><text:span>blockchain</text:span><text:span text:style-name="T623"><text:s/></text:span><text:span>system</text:span><text:span text:style-name="T624"><text:s/></text:span><text:span>that integrates various advanced concepts and tec</text:span><text:span>hnologies to create a secure, robust, efficient, scalable, and adaptable network. The design incorporates features such as Dynamic Validation Shard Size</text:span><text:span text:style-name="T625"><text:s/></text:span><text:span>and Shard Generation with a Common Validator Selection Algorithm (CVSA).</text:span><text:span/></text:p>
      <text:p text:style-name="P68"><text:span/><text:span/></text:p>
      <text:p text:style-name="P69"><text:span>Dynamic</text:span><text:span text:style-name="T626"><text:s/></text:span><text:span>Validation</text:span><text:span text:style-name="T627"><text:s/></text:span><text:span>Shard</text:span><text:span text:style-name="T628"><text:s/></text:span><text:span>Size</text:span><text:span text:style-name="T629"><text:s/></text:span><text:span>enables</text:span><text:span text:style-name="T630"><text:s/></text:span><text:span>the</text:span><text:span text:style-name="T631"><text:s/></text:span><text:span>network</text:span><text:span text:style-name="T632"><text:s/></text:span><text:span>to</text:span><text:span text:style-name="T633"><text:s/></text:span><text:span>dynamically</text:span><text:span text:style-name="T634"><text:s/></text:span><text:span>adjust</text:span><text:span text:style-name="T635"><text:s/></text:span><text:span>the</text:span><text:span text:style-name="T636"><text:s/></text:span><text:span>number</text:span><text:span text:style-name="T637"><text:s/></text:span><text:span>of subdivisions (shards) based on transaction l</text:span><text:span>oad and node distribution. This ensures optimal performance and resource utilization across varying network conditions. Load balancing techniques distribute the workload and nodes across shards, improving transaction processing speeds and reducing latency.</text:span><text:span/></text:p>
      <text:p text:style-name="P70"><text:span/><text:span/></text:p>
      <text:p text:style-name="P71"><text:span>Shard Generation with CVSA ensures consistent and secure Shard configuration by creating</text:span><text:span text:style-name="T638"><text:s/></text:span><text:span>a</text:span><text:span text:style-name="T639"><text:s/></text:span><text:span>shared,</text:span><text:span text:style-name="T640"><text:s/></text:span><text:span>deterministic</text:span><text:span text:style-name="T641"><text:s/></text:span><text:span>source</text:span><text:span text:style-name="T642"><text:s/></text:span><text:span>of</text:span><text:span text:style-name="T643"><text:s/></text:span><text:span>randomness.</text:span><text:span text:style-name="T644"><text:s/></text:span><text:span>The</text:span><text:span text:style-name="T645"><text:s/></text:span><text:span>process</text:span><text:span text:style-name="T646"><text:s/></text:span><text:span>involves</text:span><text:span text:style-name="T647"><text:s/></text:span><text:span>initiating</text:span><text:span text:style-name="T648"><text:s/></text:span><text:span>an epoch,</text:span><text:span text:style-name="T649"><text:s/></text:span><text:span>applying</text:span><text:span text:style-name="T650"><text:s/></text:span><text:span>the</text:span><text:span text:style-name="T651"><text:s/></text:span><text:span>CVSA,</text:span><text:span text:style-name="T652"><text:s/></text:span><text:span>verifying</text:span><text:span text:style-name="T653"><text:s/></text:span><text:span>and</text:span><text:span text:style-name="T654"><text:s/></text:span><text:span>distributing</text:span><text:span text:style-name="T655"><text:s/></text:span><text:span>the</text:span><text:span text:style-name="T656"><text:s/></text:span><text:span>output,</text:span><text:span text:style-name="T657"><text:s/></text:span><text:span>generating</text:span><text:span text:style-name="T658"><text:s/></text:span><text:span>shards</text:span><text:span text:style-name="T659"><text:s/></text:span><text:span>based on the output, and assigning nodes to these shards. This approach enhances security, scalability, and fairness in the network.</text:span><text:span/></text:p>
      <text:p text:style-name="P72"><text:span/><text:span/></text:p>
      <text:p text:style-name="P73"><text:span>The</text:span><text:span text:style-name="T660"><text:s/></text:span><text:span>paper</text:span><text:span text:style-name="T661"><text:s/></text:span><text:span>also</text:span><text:span text:style-name="T662"><text:s/></text:span><text:span>addresses</text:span><text:span text:style-name="T663"><text:s/></text:span><text:span>other</text:span><text:span text:style-name="T664"><text:s/></text:span><text:span>important</text:span><text:span text:style-name="T665"><text:s/></text:span><text:span>aspects,</text:span><text:span text:style-name="T666"><text:s/></text:span><text:span>including</text:span><text:span text:style-name="T667"><text:s/></text:span><text:span>on-chain</text:span><text:span text:style-name="T668"><text:s/></text:span><text:span>Web2</text:span><text:span text:style-name="T669"><text:s/></text:span><text:span>integration and cross-chain logic execution.</text:span><text:span/></text:p>
      <text:p text:style-name="P74"><text:span/><text:span/></text:p>
      <text:p text:style-name="P75"><text:span>On-chain</text:span><text:span text:style-name="T670"><text:s/></text:span><text:span>Web2</text:span><text:span text:style-name="T671"><text:s/></text:span><text:span>integration</text:span><text:span text:style-name="T672"><text:s/></text:span><text:span>allows</text:span><text:span text:style-name="T673"><text:s/></text:span><text:span>native</text:span><text:span text:style-name="T674"><text:s/></text:span><text:span>access</text:span><text:span text:style-name="T675"><text:s/></text:span><text:span>to</text:span><text:span text:style-name="T676"><text:s/></text:span><text:span>Web2</text:span><text:span text:style-name="T677"><text:s/></text:span><text:span>resources</text:span><text:span text:style-name="T678"><text:s/></text:span><text:span>within</text:span><text:span text:style-name="T679"><text:s/></text:span><text:span>the</text:span><text:span text:style-name="T680"><text:s/></text:span><text:span>blockchain network, leveraging cryptographic algorithms for authenticity and integrity verification.</text:span><text:span/></text:p>
      <text:p text:style-name="P76"><text:span>Cross-chain</text:span><text:span text:style-name="T681"><text:s/></text:span><text:span>logic</text:span><text:span text:style-name="T682"><text:s/></text:span><text:span>execution</text:span><text:span text:style-name="T683"><text:s/></text:span><text:span>enables</text:span><text:span text:style-name="T684"><text:s/></text:span><text:span>scripting,</text:span><text:span text:style-name="T685"><text:s/></text:span><text:span>execution,</text:span><text:span text:style-name="T686"><text:s/></text:span><text:span>and</text:span><text:span text:style-name="T687"><text:s/></text:span><text:span>consolidation</text:span><text:span text:style-name="T688"><text:s/></text:span><text:span>of</text:span><text:span text:style-name="T689"><text:s/></text:span><text:span>smart contracts and transactions across multiple networks, combining their strengths and mitigating limitations.</text:span><text:span/></text:p>
      <text:p text:style-name="P77"><text:span/><text:span/></text:p>
      <text:p text:style-name="P78"><text:span>Through</text:span><text:span text:style-name="T690"><text:s/></text:span><text:span>the</text:span><text:span text:style-name="T691"><text:s/></text:span><text:span>integration</text:span><text:span text:style-name="T692"><text:s/></text:span><text:span>of</text:span><text:span text:style-name="T693"><text:s/></text:span><text:span>these</text:span><text:span text:style-name="T694"><text:s/></text:span><text:span>advanced</text:span><text:span text:style-name="T695"><text:s/></text:span><text:span>concepts</text:span><text:span text:style-name="T696"><text:s/></text:span><text:span>and</text:span><text:span text:style-name="T697"><text:s/></text:span><text:span>technologies,</text:span><text:span text:style-name="T698"><text:s/></text:span><text:span>the</text:span><text:span text:style-name="T699"><text:s/></text:span><text:span>proposed blockchain system design demonstrates the potential for creating a highly secure, scalable, and efficient network suitable for a wide range of applications.</text:span><text:span/></text:p>
      <text:p text:style-name="P79"><text:span/><text:span/></text:p>
      <text:p text:style-name="P80"><text:span>It offers innovative solutions to incentivize node participation, adapt to varying network conditions,</text:span><text:span text:style-name="T700"><text:s/></text:span><text:span>ensure</text:span><text:span text:style-name="T701"><text:s/></text:span><text:span>secure</text:span><text:span text:style-name="T702"><text:s/></text:span><text:span>communication,</text:span><text:span text:style-name="T703"><text:s/></text:span><text:span>and</text:span><text:span text:style-name="T704"><text:s/></text:span><text:span>provide</text:span><text:span text:style-name="T705"><text:s/></text:span><text:span>efficient</text:span><text:span text:style-name="T706"><text:s/></text:span><text:span>storage</text:span><text:span text:style-name="T707"><text:s/></text:span><text:span>capabilities</text:span><text:span text:style-name="T708"><text:s/></text:span><text:span>in</text:span><text:span text:style-name="T709"><text:s/></text:span><text:span>a (highly) decentralized manner.</text:span><text:span/></text:p>
      <text:p text:style-name="P81"><text:span text:style-name="T710">Table</text:span><text:span text:style-name="T711"><text:s/></text:span><text:span text:style-name="T712">of</text:span><text:span text:style-name="T713"><text:s/></text:span><text:span text:style-name="T714">Contents</text:span><text:span/></text:p>
      <text:p text:style-name="P82"><text:span/><text:span/><text:span/></text:p>
      <text:table-of-content text:name="">
        <text:table-of-content-source text:outline-level="3"/>
        <text:index-body>
          <text:p text:style-name="P82"><text:a xlink:href="#_Toc1" xlink:type="simple"><text:span text:style-name="T715"/><text:span text:style-name="T716">License</text:span><text:span text:style-name="T717"/><text:span><text:tab/></text:span><text:span>5</text:span></text:a><text:span/></text:p>
          <text:p text:style-name="P83"><text:a xlink:href="#_Toc2" xlink:type="simple"><text:span text:style-name="T718"/><text:span text:style-name="T719">Introduction</text:span><text:span text:style-name="T720"/><text:span><text:tab/></text:span><text:span>6</text:span></text:a><text:span/></text:p>
          <text:p text:style-name="P84"><text:a xlink:href="#_Toc3" xlink:type="simple"><text:span text:style-name="T721"/><text:span text:style-name="T722">Demos</text:span><text:span text:style-name="T723"><text:s/></text:span><text:span text:style-name="T724">Core</text:span><text:span text:style-name="T725"><text:s/></text:span><text:span text:style-name="T726">Structure</text:span><text:span text:style-name="T727"><text:s/></text:span><text:span text:style-name="T728">and</text:span><text:span text:style-name="T729"><text:s/></text:span><text:span text:style-name="T730">Principles</text:span><text:span text:style-name="T731"/><text:span><text:tab/></text:span><text:span>6</text:span></text:a><text:span/></text:p>
          <text:p text:style-name="P85"><text:a xlink:href="#_Toc4" xlink:type="simple"><text:span text:style-name="T732"/><text:span text:style-name="T733">The</text:span><text:span text:style-name="T734"><text:s/></text:span><text:span text:style-name="T735">Role</text:span><text:span text:style-name="T736"><text:s/></text:span><text:span text:style-name="T737">of</text:span><text:span text:style-name="T738"><text:s/></text:span><text:span text:style-name="T739">Demos</text:span><text:span text:style-name="T740"/><text:span><text:tab/></text:span><text:span>9</text:span></text:a><text:span/></text:p>
          <text:p text:style-name="P86"><text:a xlink:href="#_Toc5" xlink:type="simple"><text:span text:style-name="T741"/><text:span text:style-name="T742">Transaction Lifecycle: Scaling through Shard Duty</text:span><text:span text:style-name="T743"/><text:span><text:tab/></text:span><text:span>11</text:span></text:a><text:span text:style-name="T744"/></text:p>
          <text:p text:style-name="P87"><text:a xlink:href="#_Toc6" xlink:type="simple"><text:span text:style-name="T745"/><text:span text:style-name="T746">Native Bridges: Ensuring Secure Cross-Chain Value Transfers in Demos</text:span><text:span text:style-name="T747"/><text:span><text:tab/></text:span><text:span>12</text:span></text:a><text:span text:style-name="T748"/></text:p>
          <text:p text:style-name="P88"><text:a xlink:href="#_Toc7" xlink:type="simple"><text:span text:style-name="T749"/><text:span text:style-name="T750">Liquidity</text:span><text:span text:style-name="T751"><text:s/></text:span><text:span text:style-name="T752">Tanks:</text:span><text:span text:style-name="T753"><text:s/></text:span><text:span text:style-name="T754">Demos</text:span><text:span text:style-name="T755"><text:s/></text:span><text:span text:style-name="T756">Metafees</text:span><text:span text:style-name="T757"><text:s/></text:span><text:span text:style-name="T758">State</text:span><text:span text:style-name="T759"><text:s text:c="2"/></text:span><text:span text:style-name="T760"/><text:span><text:tab/></text:span><text:span>13</text:span></text:a><text:span/></text:p>
          <text:p text:style-name="P89"><text:a xlink:href="#_Toc8" xlink:type="simple"><text:span text:style-name="T761"/><text:span text:style-name="T762">Demos Architecture &amp; Consensus </text:span><text:span text:style-name="T763">Mechanism</text:span><text:span text:style-name="T764"/><text:span><text:tab/></text:span><text:span>14</text:span></text:a><text:span/></text:p>
          <text:p text:style-name="P90"><text:a xlink:href="#_Toc9" xlink:type="simple"><text:span text:style-name="T765"/><text:span text:style-name="T766">Decentralized</text:span><text:span text:style-name="T767"><text:s/></text:span><text:span text:style-name="T768">Adaptive</text:span><text:span text:style-name="T769"><text:s/></text:span><text:span text:style-name="T770">Architecture</text:span><text:span text:style-name="T771"><text:s/></text:span><text:span text:style-name="T772">(DAA)</text:span><text:span text:style-name="T773"/><text:span><text:tab/></text:span><text:span>14</text:span></text:a><text:span/></text:p>
          <text:p text:style-name="P91"><text:a xlink:href="#_Toc10" xlink:type="simple"><text:span text:style-name="T774"/><text:span text:style-name="T775">The</text:span><text:span text:style-name="T776"><text:s/></text:span><text:span text:style-name="T777">Global</text:span><text:span text:style-name="T778"><text:s/></text:span><text:span text:style-name="T779">Change</text:span><text:span text:style-name="T780"><text:s/></text:span><text:span text:style-name="T781">Registry</text:span><text:span text:style-name="T782"><text:s/></text:span><text:span text:style-name="T783">(GCR)</text:span><text:span text:style-name="T784"/><text:span><text:tab/></text:span><text:span>16</text:span></text:a><text:span text:style-name="T785"/></text:p>
          <text:p text:style-name="P92"><text:a xlink:href="#_Toc11" xlink:type="simple"><text:span text:style-name="T786"/><text:span text:style-name="T787">Proof-of-Representation</text:span><text:span text:style-name="T788"><text:s/></text:span><text:span text:style-name="T789">with</text:span><text:span text:style-name="T790"><text:s/></text:span><text:span text:style-name="T791">Byzantine</text:span><text:span text:style-name="T792"><text:s/></text:span><text:span text:style-name="T793">Fault</text:span><text:span text:style-name="T794"><text:s/></text:span><text:span text:style-name="T795">Tolerance </text:span><text:span text:style-name="T796">(PoR-BFT)</text:span><text:span text:style-name="T797"/><text:span><text:tab/></text:span><text:span>18</text:span></text:a><text:span/></text:p>
          <text:p text:style-name="P93"><text:a xlink:href="#_Toc12" xlink:type="simple"><text:span text:style-name="T798"/><text:span text:style-name="T799">Shard</text:span><text:span text:style-name="T800"><text:s/></text:span><text:span text:style-name="T801">Generation</text:span><text:span text:style-name="T802"><text:s/></text:span><text:span text:style-name="T803">and</text:span><text:span text:style-name="T804"><text:s/></text:span><text:span text:style-name="T805">Validators</text:span><text:span text:style-name="T806"><text:s/></text:span><text:span text:style-name="T807">Choice</text:span><text:span text:style-name="T808"><text:s/></text:span><text:span text:style-name="T809">with</text:span><text:span text:style-name="T810"><text:s/></text:span><text:span text:style-name="T811">a</text:span><text:span text:style-name="T812"><text:s/></text:span><text:span text:style-name="T813">Common Validator Selection Algorithm (CVSA)</text:span><text:span text:style-name="T814"/><text:span><text:tab/></text:span><text:span>21</text:span></text:a><text:span/></text:p>
          <text:p text:style-name="P94"><text:a xlink:href="#_Toc13" xlink:type="simple"><text:span text:style-name="T815"/><text:span text:style-name="T816">Dynamic</text:span><text:span text:style-name="T817"><text:s/></text:span><text:span text:style-name="T818">Validation</text:span><text:span text:style-name="T819"><text:s/></text:span><text:span text:style-name="T820">Shard</text:span><text:span text:style-name="T821"><text:s/></text:span><text:span text:style-name="T822">Size</text:span><text:span text:style-name="T823"/><text:span><text:tab/></text:span><text:span>22</text:span></text:a><text:span/></text:p>
          <text:p text:style-name="P95"><text:a xlink:href="#_Toc14" xlink:type="simple"><text:span text:style-name="T824"/><text:span text:style-name="T825">Recap</text:span><text:span text:style-name="T826"/><text:span><text:tab/></text:span><text:span>23</text:span></text:a><text:span/></text:p>
          <text:p text:style-name="P96"><text:a xlink:href="#_Toc15" xlink:type="simple"><text:span text:style-name="T827"/><text:span text:style-name="T828">The</text:span><text:span text:style-name="T829"><text:s/></text:span><text:span text:style-name="T830">Importance</text:span><text:span text:style-name="T831"><text:s/></text:span><text:span text:style-name="T832">of</text:span><text:span text:style-name="T833"><text:s/></text:span><text:span text:style-name="T834">Being</text:span><text:span text:style-name="T835"><text:s/></text:span><text:span text:style-name="T836">Futureproof:</text:span><text:span text:style-name="T837"><text:s/></text:span><text:span text:style-name="T838">Post</text:span><text:span text:style-name="T839"><text:s/></text:span><text:span text:style-name="T840">Quantum </text:span><text:span text:style-name="T841">Cryptography</text:span><text:span text:style-name="T842"/><text:span><text:tab/></text:span><text:span>24</text:span></text:a><text:span/></text:p>
          <text:p text:style-name="P97"><text:a xlink:href="#_Toc16" xlink:type="simple"><text:span text:style-name="T843"/><text:span text:style-name="T844">The</text:span><text:span text:style-name="T845"><text:s/></text:span><text:span text:style-name="T846">Demos</text:span><text:span text:style-name="T847"><text:s/></text:span><text:span text:style-name="T848">PQC</text:span><text:span text:style-name="T849"><text:s/></text:span><text:span text:style-name="T850">Stack</text:span><text:span text:style-name="T851"/><text:span><text:tab/></text:span><text:span>25</text:span></text:a><text:span/></text:p>
          <text:p text:style-name="P98"><text:a xlink:href="#_Toc17" xlink:type="simple"><text:span text:style-name="T852"/><text:span text:style-name="T853">ML-DSA</text:span><text:span text:style-name="T854"/><text:span><text:tab/></text:span><text:span>25</text:span></text:a><text:span text:style-name="T855"/></text:p>
          <text:p text:style-name="P99"><text:a xlink:href="#_Toc27" xlink:type="simple"><text:span text:style-name="T856"/><text:span text:style-name="T857">Falcon</text:span><text:span text:style-name="T858"/><text:span><text:tab/></text:span><text:span>25</text:span></text:a><text:span text:style-name="T859"/></text:p>
          <text:p text:style-name="P100"><text:a xlink:href="#_Toc28" xlink:type="simple"><text:span text:style-name="T860"/><text:span text:style-name="T861">ML-KEM with AES</text:span><text:span text:style-name="T862"/><text:span><text:tab/></text:span><text:span>26</text:span></text:a><text:span text:style-name="T863"/><text:span/><text:span/><text:span text:style-name="T864"/></text:p>
          <text:p text:style-name="P101"><text:a xlink:href="#_Toc43" xlink:type="simple"><text:span text:style-name="T865"/><text:span text:style-name="T866">Demos </text:span><text:span text:style-name="T867">Modularity</text:span><text:span text:style-name="T868"/><text:span><text:tab/></text:span><text:span>27</text:span></text:a><text:span/></text:p>
          <text:p text:style-name="P102"><text:a xlink:href="#_Toc44" xlink:type="simple"><text:span text:style-name="T869"/><text:span text:style-name="T870">On-chain </text:span><text:span text:style-name="T871">Web2</text:span><text:span text:style-name="T872"/><text:span><text:tab/></text:span><text:span>28</text:span></text:a><text:span/></text:p>
          <text:p text:style-name="P103"><text:a xlink:href="#_Toc45" xlink:type="simple"><text:span text:style-name="T873"/><text:span text:style-name="T874">Design</text:span><text:span text:style-name="T875"><text:s/></text:span><text:span text:style-name="T876">and</text:span><text:span text:style-name="T877"><text:s/></text:span><text:span text:style-name="T878">Mechanism</text:span><text:span text:style-name="T879"/><text:span><text:tab/></text:span><text:span>28</text:span></text:a><text:span/></text:p>
          <text:p text:style-name="P104"><text:a xlink:href="#_Toc46" xlink:type="simple"><text:span text:style-name="T880"/><text:span text:style-name="T881">Ensuring</text:span><text:span text:style-name="T882"><text:s/></text:span><text:span text:style-name="T883">Integrity</text:span><text:span text:style-name="T884"><text:s/></text:span><text:span text:style-name="T885">and</text:span><text:span text:style-name="T886"><text:s/></text:span><text:span text:style-name="T887">Stability</text:span><text:span text:style-name="T888"/><text:span><text:tab/></text:span><text:span>31</text:span></text:a><text:span/></text:p>
          <text:p text:style-name="P105"><text:a xlink:href="#_Toc47" xlink:type="simple"><text:span text:style-name="T889"/><text:span text:style-name="T890">Towards</text:span><text:span text:style-name="T891"><text:s/></text:span><text:span text:style-name="T892">the</text:span><text:span text:style-name="T893"><text:s/></text:span><text:span text:style-name="T894">Fediverse:</text:span><text:span text:style-name="T895"><text:s/></text:span><text:span text:style-name="T896">ActivityPub</text:span><text:span text:style-name="T897"><text:s/></text:span><text:span text:style-name="T898">integration</text:span><text:span text:style-name="T899"/><text:span><text:tab/></text:span><text:span>32</text:span></text:a><text:span/></text:p>
          <text:p text:style-name="P106"><text:a xlink:href="#_Toc48" xlink:type="simple"><text:span text:style-name="T900"/><text:span text:style-name="T901">TOR</text:span><text:span text:style-name="T902"><text:s/></text:span><text:span text:style-name="T903">Network:</text:span><text:span text:style-name="T904"><text:s/></text:span><text:span text:style-name="T905">A</text:span><text:span text:style-name="T906"><text:s/></text:span><text:span text:style-name="T907">Special</text:span><text:span text:style-name="T908"><text:s/></text:span><text:span text:style-name="T909">Context</text:span><text:span text:style-name="T910"><text:s/></text:span><text:span text:style-name="T911">Made</text:span><text:span text:style-name="T912"><text:s/></text:span><text:span text:style-name="T913">for</text:span><text:span text:style-name="T914"><text:s/></text:span><text:span text:style-name="T915">Privacy</text:span><text:span text:style-name="T916"/><text:span><text:tab/></text:span><text:span>35</text:span></text:a><text:span/></text:p>
          <text:p text:style-name="P107"><text:a xlink:href="#_Toc49" xlink:type="simple"><text:span text:style-name="T917"/><text:span text:style-name="T918">Demos</text:span><text:span text:style-name="T919"><text:s/></text:span><text:span text:style-name="T920">Network</text:span><text:span text:style-name="T921"><text:s/></text:span><text:span text:style-name="T922">and</text:span><text:span text:style-name="T923"><text:s/></text:span><text:span text:style-name="T924">TOR:</text:span><text:span text:style-name="T925"><text:s/></text:span><text:span text:style-name="T926">A</text:span><text:span text:style-name="T927"><text:s/></text:span><text:span text:style-name="T928">Natural</text:span><text:span text:style-name="T929"><text:s/></text:span><text:span text:style-name="T930">Synergy</text:span><text:span text:style-name="T931"/><text:span><text:tab/></text:span><text:span>35</text:span></text:a><text:span/></text:p>
          <text:p text:style-name="P108"><text:a xlink:href="#_Toc50" xlink:type="simple"><text:span text:style-name="T932"/><text:span text:style-name="T933">Cross-chain Logic </text:span><text:span text:style-name="T934">Execution</text:span><text:span text:style-name="T935"/><text:span><text:tab/></text:span><text:span>36</text:span></text:a><text:span/></text:p>
          <text:p text:style-name="P109"><text:a xlink:href="#_Toc51" xlink:type="simple"><text:span text:style-name="T936"/><text:span text:style-name="T937">Design</text:span><text:span text:style-name="T938"><text:s/></text:span><text:span text:style-name="T939">and</text:span><text:span text:style-name="T940"><text:s/></text:span><text:span text:style-name="T941">Principles</text:span><text:span text:style-name="T942"/><text:span><text:tab/></text:span><text:span>36</text:span></text:a><text:span/></text:p>
          <text:p text:style-name="P110"><text:a xlink:href="#_Toc52" xlink:type="simple"><text:span text:style-name="T943"/><text:span text:style-name="T944">Read,</text:span><text:span text:style-name="T945"><text:s/></text:span><text:span text:style-name="T946">Write,</text:span><text:span text:style-name="T947"><text:s/></text:span><text:span text:style-name="T948">and</text:span><text:span text:style-name="T949"><text:s/></text:span><text:span text:style-name="T950">Cross-chain</text:span><text:span text:style-name="T951"><text:s/></text:span><text:span text:style-name="T952">Presence</text:span><text:span text:style-name="T953"/><text:span><text:tab/></text:span><text:span>37</text:span></text:a><text:span/></text:p>
          <text:p text:style-name="P111"><text:a xlink:href="#_Toc53" xlink:type="simple"><text:span text:style-name="T954"/><text:span text:style-name="T955">Web2</text:span><text:span text:style-name="T956"><text:s/></text:span><text:span text:style-name="T957">and</text:span><text:span text:style-name="T958"><text:s/></text:span><text:span text:style-name="T959">Cross-Web</text:span><text:span text:style-name="T960"><text:s/></text:span><text:span text:style-name="T961">Logic</text:span><text:span text:style-name="T962"/><text:span><text:tab/></text:span><text:span>39</text:span></text:a><text:span/></text:p>
          <text:p text:style-name="P112"><text:a xlink:href="#_Toc54" xlink:type="simple"><text:span text:style-name="T963"/><text:span text:style-name="T964">Example:</text:span><text:span text:style-name="T965"><text:s/></text:span><text:span text:style-name="T966">Cross-chain</text:span><text:span text:style-name="T967"><text:s/></text:span><text:span text:style-name="T968">Swapping</text:span><text:span text:style-name="T969"/><text:span><text:tab/></text:span><text:span>39</text:span></text:a><text:span/></text:p>
          <text:p text:style-name="P113"><text:a xlink:href="#_Toc55" xlink:type="simple"><text:span text:style-name="T970"/><text:span text:style-name="T971">L2 Parallel Subnetwork </text:span><text:span text:style-name="T972">(L2PS)</text:span><text:span text:style-name="T973"/><text:span><text:tab/></text:span><text:span>42</text:span></text:a><text:span/></text:p>
          <text:p text:style-name="P114"><text:a xlink:href="#_Toc56" xlink:type="simple"><text:span text:style-name="T974"/><text:span text:style-name="T975">What</text:span><text:span text:style-name="T976"><text:s/></text:span><text:span text:style-name="T977">is</text:span><text:span text:style-name="T978"><text:s/></text:span><text:span text:style-name="T979">a</text:span><text:span text:style-name="T980"> Subnetwork?</text:span><text:span text:style-name="T981"/><text:span><text:tab/></text:span><text:span>42</text:span></text:a><text:span/></text:p>
          <text:p text:style-name="P115"><text:a xlink:href="#_Toc57" xlink:type="simple"><text:span text:style-name="T982"/><text:span text:style-name="T983">Why</text:span><text:span text:style-name="T984"><text:s/></text:span><text:span text:style-name="T985">Parallel?</text:span><text:span text:style-name="T986"/><text:span><text:tab/></text:span><text:span>42</text:span></text:a><text:span/></text:p>
          <text:p text:style-name="P116"><text:a xlink:href="#_Toc58" xlink:type="simple"><text:span text:style-name="T987"/><text:span text:style-name="T988">IMP:</text:span><text:span text:style-name="T989"><text:s/></text:span><text:span text:style-name="T990">Demos</text:span><text:span text:style-name="T991"><text:s/></text:span><text:span text:style-name="T992">built-in</text:span><text:span text:style-name="T993"><text:s/></text:span><text:span text:style-name="T994">L2PS</text:span><text:span text:style-name="T995"/><text:span><text:tab/></text:span><text:span>43</text:span></text:a><text:span/></text:p>
          <text:p text:style-name="P117"><text:a xlink:href="#_Toc59" xlink:type="simple"><text:span text:style-name="T996"/><text:span text:style-name="T997">Privacy</text:span><text:span text:style-name="T998"><text:s/></text:span><text:span text:style-name="T999">and</text:span><text:span text:style-name="T1000"><text:s/></text:span><text:span text:style-name="T1001">L2PS:</text:span><text:span text:style-name="T1002"><text:s/></text:span><text:span text:style-name="T1003">A</text:span><text:span text:style-name="T1004"><text:s/></text:span><text:span text:style-name="T1005">built-in</text:span><text:span text:style-name="T1006"><text:s/></text:span><text:span text:style-name="T1007">concept</text:span><text:span text:style-name="T1008"/><text:span><text:tab/></text:span><text:span>44</text:span></text:a><text:span/></text:p>
          <text:p text:style-name="P118"><text:a xlink:href="#_Toc60" xlink:type="simple"><text:span text:style-name="T1009"/><text:span text:style-name="T1010">The ZK (Zero Knowledge) </text:span><text:span text:style-name="T1011">Module</text:span><text:span text:style-name="T1012"/><text:span><text:tab/></text:span><text:span>45</text:span></text:a><text:span/></text:p>
          <text:p text:style-name="P119"><text:a xlink:href="#_Toc61" xlink:type="simple"><text:span text:style-name="T1013"/><text:span text:style-name="T1014">The</text:span><text:span text:style-name="T1015"><text:s/></text:span><text:span text:style-name="T1016">Importance</text:span><text:span text:style-name="T1017"><text:s/></text:span><text:span text:style-name="T1018">of</text:span><text:span text:style-name="T1019"><text:s/></text:span><text:span text:style-name="T1020">a</text:span><text:span text:style-name="T1021"><text:s/></text:span><text:span text:style-name="T1022">ZK</text:span><text:span text:style-name="T1023"><text:s/></text:span><text:span text:style-name="T1024">Module</text:span><text:span text:style-name="T1025"><text:s/></text:span><text:span text:style-name="T1026">in</text:span><text:span text:style-name="T1027"><text:s/></text:span><text:span text:style-name="T1028">the</text:span><text:span text:style-name="T1029"><text:s/></text:span><text:span text:style-name="T1030">Omniweb</text:span><text:span text:style-name="T1031"/><text:span><text:tab/></text:span><text:span>45</text:span></text:a><text:span/></text:p>
          <text:p text:style-name="P120"><text:a xlink:href="#_Toc62" xlink:type="simple"><text:span text:style-name="T1032"/><text:span text:style-name="T1033">Homomorphic</text:span><text:span text:style-name="T1034"><text:s/></text:span><text:span text:style-name="T1035">Encryption:</text:span><text:span text:style-name="T1036"><text:s/></text:span><text:span text:style-name="T1037">Tailoring</text:span><text:span text:style-name="T1038"><text:s/></text:span><text:span text:style-name="T1039">Privacy</text:span><text:span text:style-name="T1040"><text:s/></text:span><text:span text:style-name="T1041">for</text:span><text:span text:style-name="T1042"><text:s/></text:span><text:span text:style-name="T1043">Real Use Cases</text:span><text:span text:style-name="T1044"/><text:span><text:tab/></text:span><text:span>47</text:span></text:a><text:span/></text:p>
          <text:p text:style-name="P121"><text:a xlink:href="#_Toc63" xlink:type="simple"><text:span text:style-name="T1045"/><text:span text:style-name="T1046">A</text:span><text:span text:style-name="T1047"><text:s/></text:span><text:span text:style-name="T1048">Practical</text:span><text:span text:style-name="T1049"><text:s/></text:span><text:span text:style-name="T1050">Example</text:span><text:span text:style-name="T1051"><text:s/></text:span><text:span text:style-name="T1052">of</text:span><text:span text:style-name="T1053"><text:s/></text:span><text:span text:style-name="T1054">FHE</text:span><text:span text:style-name="T1055"/><text:span><text:tab/></text:span><text:span>47</text:span></text:a><text:span/></text:p>
          <text:p text:style-name="P122"><text:a xlink:href="#_Toc64" xlink:type="simple"><text:span text:style-name="T1056"/><text:span text:style-name="T1057">A</text:span><text:span text:style-name="T1058"><text:s/></text:span><text:span text:style-name="T1059">Trustless</text:span><text:span text:style-name="T1060"><text:s/></text:span><text:span text:style-name="T1061">Approach</text:span><text:span text:style-name="T1062"><text:s/></text:span><text:span text:style-name="T1063">to</text:span><text:span text:style-name="T1064"><text:s/></text:span><text:span text:style-name="T1065">Data</text:span><text:span text:style-name="T1066"><text:s/></text:span><text:span text:style-name="T1067">Transformation</text:span><text:span text:style-name="T1068"/><text:span><text:tab/></text:span><text:span>47</text:span></text:a><text:span/></text:p>
          <text:p text:style-name="P123"><text:span/><text:span/><text:span/><text:span/><text:span/></text:p>
        </text:index-body>
      </text:table-of-content>
      <text:p text:style-name="P124"><text:span/><text:span/></text:p>
      <text:list>
        <text:list-item>
          <text:h text:outline-level="4" text:restart-numbering="0" text:is-list-header="0" text:style-name="P125"><text:span/><text:bookmark-start text:name="_Toc1"/><text:span/><text:span text:style-name="T1069">License</text:span><text:span/><text:bookmark-end text:name="_Toc1"/><text:span/><text:span/></text:h>
        </text:list-item>
      </text:list>
      <text:p text:style-name="P126"><text:span/><text:a xlink:href="#ttps://kynesys.xyz/demos" xlink:type="simple"><text:span text:style-name="T1070"/><text:span text:style-name="T1071"/><text:span text:style-name="T1072">Demos: A BORDERLESS INTERCONNECTIVITY LAYER, ENABLING SEAMLESS</text:span></text:a><text:span text:style-name="T1073"><text:s/></text:span><text:a xlink:href="#ttps://kynesys.xyz/demos" xlink:type="simple"><text:span text:style-name="T1074"/><text:span text:style-name="T1075"/><text:span text:style-name="T1076">INTEROPERABILITY</text:span><text:span text:style-name="T1077"/><text:span text:style-name="T1078"><text:s/></text:span><text:span text:style-name="T1079"/><text:span text:style-name="T1080">AND</text:span><text:span text:style-name="T1081"/><text:span text:style-name="T1082"><text:s/></text:span><text:span text:style-name="T1083"/><text:span text:style-name="T1084">ADVANCED</text:span><text:span text:style-name="T1085"/><text:span text:style-name="T1086"><text:s/></text:span><text:span text:style-name="T1087"/><text:span text:style-name="T1088">FUNCTIONS</text:span><text:span text:style-name="T1089"/><text:span text:style-name="T1090"><text:s/></text:span><text:span text:style-name="T1091"/><text:span text:style-name="T1092">ACROSS</text:span><text:span text:style-name="T1093"/><text:span text:style-name="T1094"><text:s/></text:span><text:span text:style-name="T1095"/><text:span text:style-name="T1096">ALL</text:span><text:span text:style-name="T1097"/><text:span text:style-name="T1098"><text:s/></text:span><text:span text:style-name="T1099"/><text:span text:style-name="T1100">CHAINS</text:span><text:span text:style-name="T1101"/><text:span text:style-name="T1102"><text:s/></text:span><text:span text:style-name="T1103"/><text:span text:style-name="T1104">AND</text:span><text:span text:style-name="T1105"/><text:span text:style-name="T1106"><text:s/></text:span><text:span text:style-name="T1107"/><text:span text:style-name="T1108">WEBS</text:span></text:a><text:span/><text:span/></text:p>
      <text:p text:style-name="P127"><text:span>©</text:span><text:span text:style-name="T1109"><text:s/></text:span><text:span>2023</text:span><text:span text:style-name="T1110"><text:s/></text:span><text:span>by</text:span><text:span text:style-name="T1111"><text:s/></text:span><text:a xlink:href="#ttps://kynesys.xyz/" xlink:type="simple"><text:span text:style-name="T1112"/><text:span text:style-name="T1113"/><text:span text:style-name="T1114">Azhar</text:span><text:span text:style-name="T1115"/><text:span text:style-name="T1116"><text:s/></text:span><text:span text:style-name="T1117"/><text:span text:style-name="T1118">Nurhussen,</text:span><text:span text:style-name="T1119"/><text:span text:style-name="T1120"><text:s/></text:span><text:span text:style-name="T1121"/><text:span text:style-name="T1122">Cristiano</text:span><text:span text:style-name="T1123"/><text:span text:style-name="T1124"><text:s/></text:span><text:span text:style-name="T1125"/><text:span text:style-name="T1126">Frassineti,</text:span><text:span text:style-name="T1127"/><text:span text:style-name="T1128"><text:s/></text:span><text:span text:style-name="T1129"/><text:span text:style-name="T1130">Jacob</text:span><text:span text:style-name="T1131"/><text:span text:style-name="T1132"><text:s/></text:span><text:span text:style-name="T1133"/><text:span text:style-name="T1134">Ortiz</text:span><text:span text:style-name="T1135"/><text:span text:style-name="T1136"><text:s/></text:span><text:span text:style-name="T1137"/><text:span text:style-name="T1138">Hansen</text:span></text:a><text:span text:style-name="T1139"><text:s/></text:span><text:span>is</text:span><text:span text:style-name="T1140"><text:s/></text:span><text:span>licensed</text:span><text:span text:style-name="T1141"><text:s/></text:span><text:span>under </text:span><text:a xlink:href="#ttp://creativecommons.org/licenses/by-nc-nd/4.0/?ref=chooser-v1" xlink:type="simple"><text:span text:style-name="T1142"/><text:span text:style-name="T1143"/><text:span text:style-name="T1144">CC BY-NC-ND 4.0</text:span></text:a><text:span/><text:span/></text:p>
      <text:p text:style-name="P128"><text:span text:style-name="T1145"/><text:span text:style-name="T1146"/></text:p>
      <text:p text:style-name="P129"><text:span text:style-name="T1147"/><text:span text:style-name="T1148"/></text:p>
      <text:list>
        <text:list-item>
          <text:h text:outline-level="5" text:restart-numbering="0" text:is-list-header="0" text:style-name="P130"><text:span/><text:span/><text:span text:style-name="T1149"><text:s/></text:span><text:span text:style-name="T1150"><text:s/></text:span><text:span>CC</text:span><text:span text:style-name="T1151"><text:s/></text:span><text:span>BY-NC-ND</text:span><text:span text:style-name="T1152"><text:s/></text:span><text:span text:style-name="T1153">4.0</text:span><text:span/><text:span/><text:span/></text:h>
        </text:list-item>
        <text:list-item>
          <text:h text:outline-level="5" text:restart-numbering="0" text:is-list-header="0" text:style-name="P131"><text:span/><text:span/><text:span text:style-name="T1154">Attribution-NonCommercial-NoDerivatives</text:span><text:span text:style-name="T1155"><text:s/></text:span><text:span text:style-name="T1156">4.0</text:span><text:span text:style-name="T1157"><text:s/></text:span><text:span text:style-name="T1158">International</text:span><text:span/><text:span/><text:span/></text:h>
        </text:list-item>
      </text:list>
      <text:p text:style-name="P132"><text:span text:style-name="T1159"/><text:span text:style-name="T1160"/></text:p>
      <text:p text:style-name="P133"><text:span>This license requires that reusers give credit to the creator. It allows reusers to copy and distribute</text:span><text:span text:style-name="T1161"><text:s/></text:span><text:span>the</text:span><text:span text:style-name="T1162"><text:s/></text:span><text:span>material</text:span><text:span text:style-name="T1163"><text:s/></text:span><text:span>in</text:span><text:span text:style-name="T1164"><text:s/></text:span><text:span>any</text:span><text:span text:style-name="T1165"><text:s/></text:span><text:span>medium</text:span><text:span text:style-name="T1166"><text:s/></text:span><text:span>or</text:span><text:span text:style-name="T1167"><text:s/></text:span><text:span>format</text:span><text:span text:style-name="T1168"><text:s/></text:span><text:span>in</text:span><text:span text:style-name="T1169"><text:s/></text:span><text:span>unadapted</text:span><text:span text:style-name="T1170"><text:s/></text:span><text:span>form</text:span><text:span text:style-name="T1171"><text:s/></text:span><text:span>and</text:span><text:span text:style-name="T1172"><text:s/></text:span><text:span>for</text:span><text:span text:style-name="T1173"><text:s/></text:span><text:span>noncommercial purposes only.</text:span><text:span/></text:p>
      <text:list text:style-name="WWNum2" text:continue-numbering="true">
        <text:list-item>
          <text:p text:style-name="P134"><text:span text:style-name="T1174">BY:</text:span><text:span text:style-name="T1175"><text:s/></text:span><text:span text:style-name="T1176">Credit</text:span><text:span text:style-name="T1177"><text:s/></text:span><text:span text:style-name="T1178">must</text:span><text:span text:style-name="T1179"><text:s/></text:span><text:span text:style-name="T1180">be</text:span><text:span text:style-name="T1181"><text:s/></text:span><text:span text:style-name="T1182">given</text:span><text:span text:style-name="T1183"><text:s/></text:span><text:span text:style-name="T1184">to</text:span><text:span text:style-name="T1185"><text:s/></text:span><text:span text:style-name="T1186">the</text:span><text:span text:style-name="T1187"> creator.</text:span><text:span/></text:p>
        </text:list-item>
        <text:list-item>
          <text:p text:style-name="P135"><text:span><text:tab/></text:span><text:span text:style-name="T1188">NC:</text:span><text:span text:style-name="T1189"><text:s/></text:span><text:span text:style-name="T1190">Only</text:span><text:span text:style-name="T1191"><text:s/></text:span><text:span text:style-name="T1192">noncommercial</text:span><text:span text:style-name="T1193"><text:s/></text:span><text:span text:style-name="T1194">use</text:span><text:span text:style-name="T1195"><text:s/></text:span><text:span text:style-name="T1196">of</text:span><text:span text:style-name="T1197"><text:s/></text:span><text:span text:style-name="T1198">this</text:span><text:span text:style-name="T1199"><text:s/></text:span><text:span text:style-name="T1200">work</text:span><text:span text:style-name="T1201"><text:s/></text:span><text:span text:style-name="T1202">is</text:span><text:span text:style-name="T1203"><text:s/></text:span><text:span text:style-name="T1204">permitted.</text:span><text:span text:style-name="T1205"><text:s/></text:span><text:span text:style-name="T1206">Noncommercial</text:span><text:span text:style-name="T1207"><text:s/></text:span><text:span text:style-name="T1208">means</text:span><text:span text:style-name="T1209"><text:s/></text:span><text:span text:style-name="T1210">not primarily intended for or directed towards commercial advantage or monetary </text:span><text:span text:style-name="T1211">compensation.</text:span><text:span/></text:p>
        </text:list-item>
        <text:list-item>
          <text:p text:style-name="P136"><text:span text:style-name="T1212">ND: </text:span><text:span text:style-name="T1213">No derivatives or adaptations of this work are </text:span><text:span text:style-name="T1214">permitted.</text:span><text:span/></text:p>
        </text:list-item>
      </text:list>
      <text:p text:style-name="P137"><text:span text:style-name="T1215"/><text:span text:style-name="T1216"/></text:p>
      <text:p text:style-name="P138"><text:span text:style-name="T1217"/><text:span text:style-name="T1218"/></text:p>
      <text:p text:style-name="P139"><text:span>To</text:span><text:span text:style-name="T1219"><text:s/></text:span><text:span>view</text:span><text:span text:style-name="T1220"><text:s/></text:span><text:span>a</text:span><text:span text:style-name="T1221"><text:s/></text:span><text:span>full</text:span><text:span text:style-name="T1222"><text:s/></text:span><text:span>copy</text:span><text:span text:style-name="T1223"><text:s/></text:span><text:span>of</text:span><text:span text:style-name="T1224"><text:s/></text:span><text:span>this</text:span><text:span text:style-name="T1225"><text:s/></text:span><text:span>license,</text:span><text:span text:style-name="T1226"><text:s/></text:span><text:span>visit</text:span><text:span text:style-name="T1227"><text:s/></text:span><text:a xlink:href="#ttp://creativecommons.org/licenses/by-nc-nd/4.0/" xlink:type="simple"><text:span text:style-name="T1228"/><text:span text:style-name="T1229"/><text:span text:style-name="T1230">http://creativecommons.org/licenses/by-nc-</text:span><text:span text:style-name="T1231"/><text:span text:style-name="T1232">nd/4.0/</text:span></text:a><text:span/><text:span/></text:p>
      <text:list>
        <text:list-item>
          <text:h text:outline-level="2" text:restart-numbering="0" text:is-list-header="0" text:style-name="P140"><text:span/><text:bookmark-start text:name="_Toc2"/><text:span/><text:span text:style-name="T1233">Introduction</text:span><text:span/><text:bookmark-end text:name="_Toc2"/><text:span/><text:span/></text:h>
        </text:list-item>
      </text:list>
      <text:p text:style-name="P141"><text:span text:style-name="T1234"/><text:span text:style-name="T1235"/></text:p>
      <text:p text:style-name="P142"><text:span>The following document presents Demos, an innovative decentralized network that interconnects and expands existing blockchain technology to address the limitations and challenges</text:span><text:span text:style-name="T1236"><text:s/></text:span><text:span>faced</text:span><text:span text:style-name="T1237"><text:s/></text:span><text:span>by</text:span><text:span text:style-name="T1238"><text:s/></text:span><text:span>traditional</text:span><text:span text:style-name="T1239"><text:s/></text:span><text:span>blockchain</text:span><text:span text:style-name="T1240"><text:s/></text:span><text:span>systems.</text:span><text:span text:style-name="T1241"><text:s/></text:span><text:span>Demos</text:span><text:span text:style-name="T1242"><text:s/></text:span><text:span>introduces</text:span><text:span text:style-name="T1243"><text:s/></text:span><text:span>novel</text:span><text:span text:style-name="T1244"><text:s/></text:span><text:span>concepts</text:span><text:span text:style-name="T1245"><text:s/></text:span><text:span>and mechanisms that aim to revolutionize the way decentralized networks operate and deliver trust, transparency, and scalability.</text:span><text:span/></text:p>
      <text:p text:style-name="P143"><text:span/><text:span/></text:p>
      <text:p text:style-name="P144"><text:span>This</text:span><text:span text:style-name="T1246"><text:s/></text:span><text:span>yellow</text:span><text:span text:style-name="T1247"><text:s/></text:span><text:span>paper</text:span><text:span text:style-name="T1248"><text:s/></text:span><text:span>elucidates</text:span><text:span text:style-name="T1249"><text:s/></text:span><text:span>the</text:span><text:span text:style-name="T1250"><text:s/></text:span><text:span>key</text:span><text:span text:style-name="T1251"><text:s/></text:span><text:span>principles,</text:span><text:span text:style-name="T1252"><text:s/></text:span><text:span>design,</text:span><text:span text:style-name="T1253"><text:s/></text:span><text:span>and</text:span><text:span text:style-name="T1254"><text:s/></text:span><text:span>functionality</text:span><text:span text:style-name="T1255"><text:s/></text:span><text:span>of</text:span><text:span text:style-name="T1256"><text:s/></text:span><text:span>Demos,</text:span><text:span text:style-name="T1257"><text:s/></text:span><text:span>aiming to provide a comprehensive understanding of its inner workings. By exploring the decentralized nature of Demos and its nodal composition, we delve into the intricate mechanics that underpin this groundbreaking network.</text:span><text:span/></text:p>
      <text:p text:style-name="P145"><text:span text:style-name="T1258"/><text:span text:style-name="T1259"/></text:p>
      <text:list>
        <text:list-item>
          <text:h text:outline-level="3" text:restart-numbering="0" text:is-list-header="0" text:style-name="P146"><text:span/><text:bookmark-start text:name="_Toc3"/><text:span/><text:span>Demos</text:span><text:span text:style-name="T1260"><text:s/></text:span><text:span>Core</text:span><text:span text:style-name="T1261"><text:s/></text:span><text:span>Structure</text:span><text:span text:style-name="T1262"><text:s/></text:span><text:span>and</text:span><text:span text:style-name="T1263"><text:s/></text:span><text:span text:style-name="T1264">Principles</text:span><text:span/><text:bookmark-end text:name="_Toc3"/><text:span/><text:span/></text:h>
        </text:list-item>
      </text:list>
      <text:p text:style-name="P147"><text:span text:style-name="T1265"/><text:span text:style-name="T1266"/></text:p>
      <text:p text:style-name="P148"><text:span>Demos</text:span><text:span text:style-name="T1267"><text:s/></text:span><text:span>represents</text:span><text:span text:style-name="T1268"><text:s/></text:span><text:span>a</text:span><text:span text:style-name="T1269"><text:s/></text:span><text:span>decentralized</text:span><text:span text:style-name="T1270"><text:s/></text:span><text:span>blockchain</text:span><text:span text:style-name="T1271"><text:s/></text:span><text:span>system,</text:span><text:span text:style-name="T1272"><text:s/></text:span><text:span>encompassing</text:span><text:span text:style-name="T1273"><text:s/></text:span><text:span>a</text:span><text:span text:style-name="T1274"><text:s/></text:span><text:span>distributed framework consisting of interconnected nodes.</text:span><text:span/></text:p>
      <text:p text:style-name="P149"><text:span/><text:span/></text:p>
      <text:p text:style-name="P150"><text:span>Demos is based on the Demos Network specifications, SDK and </text:span><text:span text:style-name="T1275">framework.</text:span><text:span/></text:p>
      <text:p text:style-name="P151"><text:span/><text:span/></text:p>
      <text:p text:style-name="P152"><text:span>As</text:span><text:span text:style-name="T1276"><text:s/></text:span><text:span>a</text:span><text:span text:style-name="T1277"><text:s/></text:span><text:span>fully</text:span><text:span text:style-name="T1278"><text:s/></text:span><text:span>self-contained</text:span><text:span text:style-name="T1279"><text:s/></text:span><text:span>blockchain,</text:span><text:span text:style-name="T1280"><text:s/></text:span><text:span>built</text:span><text:span text:style-name="T1281"><text:s/></text:span><text:span>from</text:span><text:span text:style-name="T1282"><text:s/></text:span><text:span>the</text:span><text:span text:style-name="T1283"><text:s/></text:span><text:span>ground</text:span><text:span text:style-name="T1284"><text:s/></text:span><text:span>up</text:span><text:span text:style-name="T1285"><text:s/></text:span><text:span>and</text:span><text:span text:style-name="T1286"><text:s/></text:span><text:span>designed</text:span><text:span text:style-name="T1287"><text:s/></text:span><text:span>to</text:span><text:span text:style-name="T1288"><text:s/></text:span><text:span>facilitate</text:span><text:span text:style-name="T1289"><text:s/></text:span><text:span>the creation of an Omniweb, Demos includes several features and modules.</text:span><text:span/></text:p>
      <text:p text:style-name="P153"><text:span/><text:span/></text:p>
      <text:p text:style-name="P154"><text:span>This</text:span><text:span text:style-name="T1290"><text:s/></text:span><text:span>paper</text:span><text:span text:style-name="T1291"><text:s/></text:span><text:span>reflects</text:span><text:span text:style-name="T1292"><text:s/></text:span><text:span>the</text:span><text:span text:style-name="T1293"><text:s/></text:span><text:span>current</text:span><text:span text:style-name="T1294"><text:s/></text:span><text:span>state</text:span><text:span text:style-name="T1295"><text:s/></text:span><text:span>of</text:span><text:span text:style-name="T1296"><text:s/></text:span><text:span>the</text:span><text:span text:style-name="T1297"><text:s/></text:span><text:span>Demos</text:span><text:span text:style-name="T1298"><text:s/></text:span><text:span>Network</text:span><text:span text:style-name="T1299"><text:s/></text:span><text:span>specifications</text:span><text:span text:style-name="T1300"><text:s/></text:span><text:span>as</text:span><text:span text:style-name="T1301"><text:s/></text:span><text:span>of</text:span><text:span text:style-name="T1302"><text:s/></text:span><text:span text:style-name="T1303">24</text:span><text:span text:style-name="T1304"><text:s/></text:span><text:span text:style-name="T1305">May</text:span><text:span text:style-name="T1306"><text:s/></text:span><text:span text:style-name="T1307">202</text:span><text:span text:style-name="T1308">5</text:span><text:span text:style-name="T1309">.</text:span><text:span/></text:p>
      <text:p text:style-name="P155"><text:span/><text:span/></text:p>
      <text:p text:style-name="P156"><text:span>In the following text, those features will be discussed in </text:span><text:span text:style-name="T1310">detail.</text:span><text:span/></text:p>
      <text:p text:style-name="P157"><text:span text:style-name="T1311"/><text:span text:style-name="T1312">Figure 1: Demos Network </text:span><text:span text:style-name="T1313">Architecture</text:span><text:span/><text:span/><text:span/></text:p>
      <text:p text:style-name="P158"><text:span/><draw:frame draw:name="image1.jpeg" draw:style-name="gr3" draw:z-index="8" text:anchor-type="paragraph" svg:width="14.42cm" svg:height="24.28cm" svg:x="3.251cm" svg:y="0.54cm"><draw:image xlink:href="Pictures/image1.jpg" xlink:type="simple" xlink:show="embed" xlink:actuate="onLoad"/></draw:frame><text:span/></text:p>
      <text:p text:style-name="P159"><text:span/><text:bookmark-start text:name="Overall_Architecture_"/><text:span/><text:bookmark-end text:name="Overall_Architecture_"/><text:span text:style-name="T1314">Overall</text:span><text:span text:style-name="T1315"><text:s/></text:span><text:span text:style-name="T1316">Architecture</text:span><text:span/></text:p>
      <text:p text:style-name="P160"><text:span text:style-name="T1317"/><text:span text:style-name="T1318"/></text:p>
      <text:p text:style-name="P161"><text:span>As</text:span><text:span text:style-name="T1319"><text:s/></text:span><text:span>described</text:span><text:span text:style-name="T1320"><text:s/></text:span><text:span>in</text:span><text:span text:style-name="T1321"><text:s/></text:span><text:span>Figure</text:span><text:span text:style-name="T1322"><text:s/></text:span><text:span>1</text:span><text:span text:style-name="T1323"><text:s/></text:span><text:span>above,</text:span><text:span text:style-name="T1324"><text:s/></text:span><text:span>Demos</text:span><text:span text:style-name="T1325"><text:s/></text:span><text:span>is</text:span><text:span text:style-name="T1326"><text:s/></text:span><text:span>able</text:span><text:span text:style-name="T1327"><text:s/></text:span><text:span>to</text:span><text:span text:style-name="T1328"><text:s/></text:span><text:span>accept</text:span><text:span text:style-name="T1329"><text:s/></text:span><text:span>and</text:span><text:span text:style-name="T1330"><text:s/></text:span><text:span>process</text:span><text:span text:style-name="T1331"><text:s/></text:span><text:span>different</text:span><text:span text:style-name="T1332"><text:s/></text:span><text:span>types</text:span><text:span text:style-name="T1333"><text:s/></text:span><text:span>of transactions coming from and going to different contexts through its network of nodes.</text:span><text:span/></text:p>
      <text:p text:style-name="P162"><text:span>A</text:span><text:span text:style-name="T1334"><text:s/></text:span><text:span>context</text:span><text:span text:style-name="T1335"><text:s/></text:span><text:span>is</text:span><text:span text:style-name="T1336"><text:s/></text:span><text:span>defined</text:span><text:span text:style-name="T1337"><text:s/></text:span><text:span>as</text:span><text:span text:style-name="T1338"><text:s/></text:span><text:span>the</text:span><text:span text:style-name="T1339"><text:s/></text:span><text:span>domain</text:span><text:span text:style-name="T1340"><text:s/></text:span><text:span>in</text:span><text:span text:style-name="T1341"><text:s/></text:span><text:span>which</text:span><text:span text:style-name="T1342"><text:s/></text:span><text:span>a</text:span><text:span text:style-name="T1343"><text:s/></text:span><text:span>data</text:span><text:span text:style-name="T1344"><text:s/></text:span><text:span>source</text:span><text:span text:style-name="T1345"><text:s/></text:span><text:span>can</text:span><text:span text:style-name="T1346"><text:s/></text:span><text:span>be</text:span><text:span text:style-name="T1347"><text:s/></text:span><text:span>found.</text:span><text:span text:style-name="T1348"><text:s/></text:span><text:span>For</text:span><text:span text:style-name="T1349"><text:s/></text:span><text:span>example,</text:span><text:span text:style-name="T1350"><text:s/></text:span><text:span>to retrieve a resource hosted on a website, the context is Web2.</text:span><text:span/></text:p>
      <text:p text:style-name="P163"><text:span>The two main contexts in which Demos operates are Web2 and XM (Cross-chain Media). For</text:span><text:span text:style-name="T1351"><text:s/></text:span><text:span>each</text:span><text:span text:style-name="T1352"><text:s/></text:span><text:span>of</text:span><text:span text:style-name="T1353"><text:s/></text:span><text:span>them,</text:span><text:span text:style-name="T1354"><text:s/></text:span><text:span>Demos</text:span><text:span text:style-name="T1355"><text:s/></text:span><text:span>defines</text:span><text:span text:style-name="T1356"><text:s/></text:span><text:span>a</text:span><text:span text:style-name="T1357"><text:s/></text:span><text:span>strict</text:span><text:span text:style-name="T1358"><text:s/></text:span><text:span>set</text:span><text:span text:style-name="T1359"><text:s/></text:span><text:span>of</text:span><text:span text:style-name="T1360"><text:s/></text:span><text:span>rules</text:span><text:span text:style-name="T1361"><text:s/></text:span><text:span>and</text:span><text:span text:style-name="T1362"><text:s/></text:span><text:span>workflows</text:span><text:span text:style-name="T1363"><text:s/></text:span><text:span>to</text:span><text:span text:style-name="T1364"><text:s/></text:span><text:span>ensure</text:span><text:span text:style-name="T1365"><text:s/></text:span><text:span>integrity</text:span><text:span text:style-name="T1366"><text:s/></text:span><text:span>and </text:span><text:span text:style-name="T1367">security.</text:span><text:span/></text:p>
      <text:p text:style-name="P164"><text:span>Those rules will be discussed in the following </text:span><text:span text:style-name="T1368">paragraphs.</text:span><text:span/></text:p>
      <text:p text:style-name="P165"><text:span text:style-name="T1369"/><text:span text:style-name="T1370"/></text:p>
      <text:p text:style-name="P166"><text:span text:style-name="T1371"/><text:span text:style-name="T1372"/></text:p>
      <text:p text:style-name="P167"><text:span text:style-name="T1373">Nodes</text:span><text:span text:style-name="T1374"><text:s/></text:span><text:span text:style-name="T1375">and</text:span><text:span text:style-name="T1376"><text:s/></text:span><text:span text:style-name="T1377">Clients</text:span><text:span/></text:p>
      <text:p text:style-name="P168"><text:span>The</text:span><text:span text:style-name="T1378"><text:s/></text:span><text:span>term</text:span><text:span text:style-name="T1379"><text:s/></text:span><text:span>"node"</text:span><text:span text:style-name="T1380"><text:s/></text:span><text:span>refers</text:span><text:span text:style-name="T1381"><text:s/></text:span><text:span>to</text:span><text:span text:style-name="T1382"><text:s/></text:span><text:span>an</text:span><text:span text:style-name="T1383"><text:s/></text:span><text:span>entity</text:span><text:span text:style-name="T1384"><text:s/></text:span><text:span>that</text:span><text:span text:style-name="T1385"><text:s/></text:span><text:span>follows</text:span><text:span text:style-name="T1386"><text:s/></text:span><text:span>the</text:span><text:span text:style-name="T1387"><text:s/></text:span><text:span>Demos</text:span><text:span text:style-name="T1388"><text:s/></text:span><text:span>specifications</text:span><text:span text:style-name="T1389"><text:s/></text:span><text:span>by</text:span><text:span text:style-name="T1390"><text:s/></text:span><text:span>providing</text:span><text:span text:style-name="T1391"><text:s/></text:span><text:span>a client/server architecture that is compatible with other nodes of the same network.</text:span><text:span/></text:p>
      <text:p text:style-name="P169"><text:span/><text:span/></text:p>
      <text:p text:style-name="P170"><text:span>Given the public nature of Demos specifications, it is both feasible and strongly recommended to develop Demos clients capable of actively engaging in the Demos network.</text:span><text:span text:style-name="T1392"><text:s/></text:span><text:span>This</text:span><text:span text:style-name="T1393"><text:s/></text:span><text:span>approach</text:span><text:span text:style-name="T1394"><text:s/></text:span><text:span>fosters</text:span><text:span text:style-name="T1395"><text:s/></text:span><text:span>client</text:span><text:span text:style-name="T1396"><text:s/></text:span><text:span>diversity</text:span><text:span text:style-name="T1397"><text:s/></text:span><text:span>and</text:span><text:span text:style-name="T1398"><text:s/></text:span><text:span>enhances</text:span><text:span text:style-name="T1399"><text:s/></text:span><text:span>the</text:span><text:span text:style-name="T1400"><text:s/></text:span><text:span>overall</text:span><text:span text:style-name="T1401"><text:s/></text:span><text:span>functionality</text:span><text:span text:style-name="T1402"><text:s/></text:span><text:span>of</text:span><text:span text:style-name="T1403"><text:s/></text:span><text:span>the </text:span><text:span text:style-name="T1404">network.</text:span><text:span/></text:p>
      <text:p text:style-name="P171"><text:span/><text:span/></text:p>
      <text:p text:style-name="P172"><text:span text:style-name="T1405">Nodes</text:span><text:span text:style-name="T1406"><text:s/></text:span><text:span text:style-name="T1407">and</text:span><text:span text:style-name="T1408"><text:s/></text:span><text:span text:style-name="T1409">Validators</text:span><text:span/></text:p>
      <text:p text:style-name="P173"><text:span text:style-name="T1410"/><text:span text:style-name="T1411"/></text:p>
      <text:p text:style-name="P174"><text:span>The Demos architecture is designed to enforce a possible validator role for every node within the Demos network. As a result, the Demos network achieves a decentralized blockchain</text:span><text:span text:style-name="T1412"><text:s/></text:span><text:span>structure,</text:span><text:span text:style-name="T1413"><text:s/></text:span><text:span>leveraging</text:span><text:span text:style-name="T1414"><text:s/></text:span><text:span>a</text:span><text:span text:style-name="T1415"><text:s/></text:span><text:span>particular</text:span><text:span text:style-name="T1416"><text:s/></text:span><text:span>consensus</text:span><text:span text:style-name="T1417"><text:s/></text:span><text:span>mechanism</text:span><text:span text:style-name="T1418"><text:s/></text:span><text:span>that</text:span><text:span text:style-name="T1419"><text:s/></text:span><text:span>heavily</text:span><text:span text:style-name="T1420"><text:s/></text:span><text:span>relies</text:span><text:span text:style-name="T1421"><text:s/></text:span><text:span>on the resilience and security principles inherent in the blockchain paradigm.</text:span><text:span/></text:p>
      <text:p text:style-name="P175"><text:span/><text:span/></text:p>
      <text:p text:style-name="P176"><text:span>In order to ensure the commitment of validators and mitigate the risk of majority attacks, the operation of a node is contingent upon meeting specific prerequisites akin to staking. This</text:span><text:span text:style-name="T1422"><text:s/></text:span><text:span>approach</text:span><text:span text:style-name="T1423"><text:s/></text:span><text:span>aims</text:span><text:span text:style-name="T1424"><text:s/></text:span><text:span>to</text:span><text:span text:style-name="T1425"><text:s/></text:span><text:span>incentivize</text:span><text:span text:style-name="T1426"><text:s/></text:span><text:span>and</text:span><text:span text:style-name="T1427"><text:s/></text:span><text:span>reward</text:span><text:span text:style-name="T1428"><text:s/></text:span><text:span>honest</text:span><text:span text:style-name="T1429"><text:s/></text:span><text:span>and</text:span><text:span text:style-name="T1430"><text:s/></text:span><text:span>productive</text:span><text:span text:style-name="T1431"><text:s/></text:span><text:span>participants</text:span><text:span text:style-name="T1432"><text:s/></text:span><text:span>within</text:span><text:span text:style-name="T1433"><text:s/></text:span><text:span>the network while penalizing those who engage in malicious activities or exhibit inadequate </text:span><text:span text:style-name="T1434">performance.</text:span><text:span/></text:p>
      <text:list>
        <text:list-item>
          <text:h text:outline-level="3" text:restart-numbering="0" text:is-list-header="0" text:style-name="P177"><text:span/><text:bookmark-start text:name="_Toc4"/><text:span/><text:span>The</text:span><text:span text:style-name="T1435"><text:s/></text:span><text:span>Role</text:span><text:span text:style-name="T1436"><text:s/></text:span><text:span>of</text:span><text:span text:style-name="T1437"><text:s/></text:span><text:span text:style-name="T1438">Demos</text:span><text:span/><text:bookmark-end text:name="_Toc4"/><text:span/><text:span/></text:h>
        </text:list-item>
      </text:list>
      <text:p text:style-name="P178"><text:span text:style-name="T1439"/><text:span text:style-name="T1440"/></text:p>
      <text:p text:style-name="P179"><text:span>In order to grasp the essence of Demos' purpose and its potential capabilities, it is imperative</text:span><text:span text:style-name="T1441"><text:s/></text:span><text:span>to</text:span><text:span text:style-name="T1442"><text:s/></text:span><text:span>gain</text:span><text:span text:style-name="T1443"><text:s/></text:span><text:span>a</text:span><text:span text:style-name="T1444"><text:s/></text:span><text:span>comprehensive</text:span><text:span text:style-name="T1445"><text:s/></text:span><text:span>understanding</text:span><text:span text:style-name="T1446"><text:s/></text:span><text:span>of</text:span><text:span text:style-name="T1447"><text:s/></text:span><text:span>the</text:span><text:span text:style-name="T1448"><text:s/></text:span><text:span>network's</text:span><text:span text:style-name="T1449"><text:s/></text:span><text:span>fundamental</text:span><text:span text:style-name="T1450"><text:s/></text:span><text:span>role, delving into the intricacies of its multifaceted offerings.</text:span><text:span/></text:p>
      <text:p text:style-name="P180"><text:span/><text:span/></text:p>
      <text:p text:style-name="P181"><text:span>Demos,</text:span><text:span text:style-name="T1451"><text:s/></text:span><text:span>functioning</text:span><text:span text:style-name="T1452"><text:s/></text:span><text:span>as</text:span><text:span text:style-name="T1453"><text:s/></text:span><text:span>a</text:span><text:span text:style-name="T1454"><text:s/></text:span><text:span>network-agnostic</text:span><text:span text:style-name="T1455"><text:s/></text:span><text:span>Omniweb</text:span><text:span text:style-name="T1456"><text:s/></text:span><text:span>infrastructure,</text:span><text:span text:style-name="T1457"><text:s/></text:span><text:span>has</text:span><text:span text:style-name="T1458"><text:s/></text:span><text:span>been</text:span><text:span text:style-name="T1459"><text:s/></text:span><text:span>meticulously architected to facilitate seamless communication, interaction, and mediation among the realms of Web2, Web3, and the myriad of existing blockchains.</text:span><text:span/></text:p>
      <text:p text:style-name="P182"><text:span/><text:span/></text:p>
      <text:p text:style-name="P183"><text:span>While Demos acknowledges and recognizes the inherent value and benefits offered by</text:span><text:span text:style-name="T1460"><text:s/></text:span><text:span>the</text:span><text:span text:style-name="T1461"><text:s/></text:span><text:span>diverse</text:span><text:span text:style-name="T1462"><text:s/></text:span><text:span>L1,</text:span><text:span text:style-name="T1463"><text:s/></text:span><text:span>L2,</text:span><text:span text:style-name="T1464"><text:s/></text:span><text:span>and</text:span><text:span text:style-name="T1465"><text:s/></text:span><text:span>L3</text:span><text:span text:style-name="T1466"><text:s/></text:span><text:span>blockchains</text:span><text:span text:style-name="T1467"><text:s/></text:span><text:span>currently</text:span><text:span text:style-name="T1468"><text:s/></text:span><text:span>in</text:span><text:span text:style-name="T1469"><text:s/></text:span><text:span>existence,</text:span><text:span text:style-name="T1470"><text:s/></text:span><text:span>its</text:span><text:span text:style-name="T1471"><text:s/></text:span><text:span>primary</text:span><text:span text:style-name="T1472"><text:s/></text:span><text:span>objective</text:span><text:span text:style-name="T1473"><text:s/></text:span><text:span>is</text:span><text:span text:style-name="T1474"><text:s/></text:span><text:span>not</text:span><text:span text:style-name="T1475"><text:s/></text:span><text:span>to undermine their utility. Rather, Demos assumes the role of decentralizing the blockchains themselves, empowering users and developers to harness the optimal attributes embedded within each distinct chain.</text:span><text:span/></text:p>
      <text:p text:style-name="P184"><text:span/><text:span/></text:p>
      <text:p text:style-name="P185"><text:span>As</text:span><text:span text:style-name="T1476"><text:s/></text:span><text:span>explained</text:span><text:span text:style-name="T1477"><text:s/></text:span><text:span>in</text:span><text:span text:style-name="T1478"><text:s/></text:span><text:span>this</text:span><text:span text:style-name="T1479"><text:s/></text:span><text:span>paper,</text:span><text:span text:style-name="T1480"><text:s/></text:span><text:span>all</text:span><text:span text:style-name="T1481"><text:s/></text:span><text:span>the</text:span><text:span text:style-name="T1482"><text:s/></text:span><text:span>features</text:span><text:span text:style-name="T1483"><text:s/></text:span><text:span>that</text:span><text:span text:style-name="T1484"><text:s/></text:span><text:span>Demos</text:span><text:span text:style-name="T1485"><text:s/></text:span><text:span>provides</text:span><text:span text:style-name="T1486"><text:s/></text:span><text:span>are</text:span><text:span text:style-name="T1487"><text:s/></text:span><text:span>made</text:span><text:span text:style-name="T1488"><text:s/></text:span><text:span>with</text:span><text:span text:style-name="T1489"><text:s/></text:span><text:span>the</text:span><text:span text:style-name="T1490"><text:s/></text:span><text:span>specific goal of enhancing decentralization without reinventing the wheel. Each technology and blockchain possesses a unique set of strengths and weaknesses, that if combined would enhance the entirety of Web3.</text:span><text:span/></text:p>
      <text:p text:style-name="P186"><text:span/><text:span/></text:p>
      <text:p text:style-name="P187"><text:span>It is within this context that Demos emerges as a solution, a data layer that enables seamless interoperability among different technologies. Moreover, Demos enriches the entire</text:span><text:span text:style-name="T1491"><text:s/></text:span><text:span>ecosystem</text:span><text:span text:style-name="T1492"><text:s/></text:span><text:span>by</text:span><text:span text:style-name="T1493"><text:s/></text:span><text:span>incorporating</text:span><text:span text:style-name="T1494"><text:s/></text:span><text:span>its</text:span><text:span text:style-name="T1495"><text:s/></text:span><text:span>own</text:span><text:span text:style-name="T1496"><text:s/></text:span><text:span>distinctive</text:span><text:span text:style-name="T1497"><text:s/></text:span><text:span>features,</text:span><text:span text:style-name="T1498"><text:s/></text:span><text:span>thereby</text:span><text:span text:style-name="T1499"><text:s/></text:span><text:span>fostering</text:span><text:span text:style-name="T1500"><text:s/></text:span><text:span>a</text:span><text:span text:style-name="T1501"><text:s/></text:span><text:span>cohesive and unified environment.</text:span><text:span/></text:p>
      <text:p text:style-name="P188"><text:span text:style-name="T1502"/><text:span text:style-name="T1503"/></text:p>
      <text:p text:style-name="P189"><text:span/><text:bookmark-start text:name="A_Trustless_Data_Layer:_towards_the_Omni"/><text:span/><text:bookmark-end text:name="A_Trustless_Data_Layer:_towards_the_Omni"/><text:span text:style-name="T1504">A</text:span><text:span text:style-name="T1505"><text:s/></text:span><text:span text:style-name="T1506">Trustless</text:span><text:span text:style-name="T1507"><text:s/></text:span><text:span text:style-name="T1508">Data</text:span><text:span text:style-name="T1509"><text:s/></text:span><text:span text:style-name="T1510">Layer:</text:span><text:span text:style-name="T1511"><text:s/></text:span><text:span text:style-name="T1512">towards</text:span><text:span text:style-name="T1513"><text:s/></text:span><text:span text:style-name="T1514">the</text:span><text:span text:style-name="T1515"><text:s/></text:span><text:span text:style-name="T1516">Omniweb</text:span><text:span/></text:p>
      <text:p text:style-name="P190"><text:span text:style-name="T1517"/><text:span text:style-name="T1518"/></text:p>
      <text:p text:style-name="P191"><text:span>While being suitable for a vast array of operations, the main Demos goal is to establish itself</text:span><text:span text:style-name="T1519"><text:s/></text:span><text:span/><text:span>as</text:span><text:span text:style-name="T1520"><text:s/></text:span><text:span>a</text:span><text:span text:style-name="T1521"><text:s/></text:span><text:span>Data</text:span><text:span text:style-name="T1522"><text:s/></text:span><text:span>Layer,</text:span><text:span text:style-name="T1523"><text:s/></text:span><text:span>or</text:span><text:span text:style-name="T1524"><text:s/></text:span><text:span>Data</text:span><text:span text:style-name="T1525"><text:s/></text:span><text:span>Facilitator.</text:span><text:span text:style-name="T1526"/><text:span text:style-name="T1527"><text:s/></text:span><text:span>The</text:span><text:span text:style-name="T1528"><text:s/></text:span><text:span>core</text:span><text:span text:style-name="T1529"><text:s/></text:span><text:span>philosophy</text:span><text:span text:style-name="T1530"><text:s/></text:span><text:span>of</text:span><text:span text:style-name="T1531"><text:s/></text:span><text:span>Demos</text:span><text:span text:style-name="T1532"><text:s/></text:span><text:span>is</text:span><text:span text:style-name="T1533"><text:s/></text:span><text:span>that</text:span><text:span text:style-name="T1534"><text:s/></text:span><text:span>there</text:span><text:span text:style-name="T1535"><text:s/></text:span><text:span>are great</text:span><text:span text:style-name="T1536"><text:s/></text:span><text:span>projects</text:span><text:span text:style-name="T1537"><text:s/></text:span><text:span>and</text:span><text:span text:style-name="T1538"><text:s/></text:span><text:span>working</text:span><text:span text:style-name="T1539"><text:s/></text:span><text:span>infrastructures</text:span><text:span text:style-name="T1540"><text:s/></text:span><text:span>that</text:span><text:span text:style-name="T1541"><text:s/></text:span><text:span>suffer</text:span><text:span text:style-name="T1542"><text:s/></text:span><text:span>from</text:span><text:span text:style-name="T1543"><text:s/></text:span><text:span>being</text:span><text:span text:style-name="T1544"><text:s/></text:span><text:span>isolated</text:span><text:span text:style-name="T1545"><text:s/></text:span><text:span>from</text:span><text:span text:style-name="T1546"><text:s/></text:span><text:span>each</text:span><text:span text:style-name="T1547"><text:s/></text:span><text:span>other, with the best case being a sturdy, non standard compatibility.</text:span><text:span/></text:p>
      <text:p text:style-name="P192"><text:span>We call a</text:span><text:span>ll of these isolated systems “contexts”. If we see each one of these contexts (such as blockchains, Web2 protocols and so on) as railways, we see a huge number of working railways whose trains (data) can’t travel on the others. Demos is a meta-railway: the</text:span><text:span text:style-name="T1548"><text:s/></text:span><text:span>railway</text:span><text:span text:style-name="T1549"><text:s/></text:span><text:span>that</text:span><text:span text:style-name="T1550"><text:s/></text:span><text:span>connects</text:span><text:span text:style-name="T1551"><text:s/></text:span><text:span>and</text:span><text:span text:style-name="T1552"><text:s/></text:span><text:span>makes</text:span><text:span text:style-name="T1553"><text:s/></text:span><text:span>compatible</text:span><text:span text:style-name="T1554"><text:s/></text:span><text:span>other</text:span><text:span text:style-name="T1555"><text:s/></text:span><text:span>contexts</text:span><text:span text:style-name="T1556"><text:s/></text:span><text:span>using</text:span><text:span text:style-name="T1557"><text:s/></text:span><text:span>a</text:span><text:span text:style-name="T1558"><text:s/></text:span><text:span>common</text:span><text:span text:style-name="T1559"><text:s/></text:span><text:span>interface.</text:span><text:span/></text:p>
      <text:p text:style-name="P193"><text:span/><text:bookmark-start text:name="An_intent-based_environment_"/><text:span/><text:bookmark-end text:name="An_intent-based_environment_"/><text:span text:style-name="T1560">An</text:span><text:span text:style-name="T1561"><text:s/></text:span><text:span text:style-name="T1562">intent-based</text:span><text:span text:style-name="T1563"><text:s/></text:span><text:span text:style-name="T1564">environment</text:span><text:span/></text:p>
      <text:p text:style-name="P194"><text:span text:style-name="T1565"/><text:span text:style-name="T1566"/></text:p>
      <text:p text:style-name="P195"><text:span>The</text:span><text:span text:style-name="T1567"><text:s/></text:span><text:span>Demos</text:span><text:span text:style-name="T1568"><text:s/></text:span><text:span>network</text:span><text:span text:style-name="T1569"><text:s/></text:span><text:span>is</text:span><text:span text:style-name="T1570"><text:s/></text:span><text:span>designed</text:span><text:span text:style-name="T1571"><text:s/></text:span><text:span>to</text:span><text:span text:style-name="T1572"><text:s/></text:span><text:span>be</text:span><text:span text:style-name="T1573"><text:s/></text:span><text:span text:style-name="T1574">intent-centric</text:span><text:span>.</text:span><text:span text:style-name="T1575"><text:s/></text:span><text:span>While</text:span><text:span text:style-name="T1576"><text:s/></text:span><text:span>the</text:span><text:span text:style-name="T1577"><text:s/></text:span><text:span>term</text:span><text:span text:style-name="T1578"><text:s/></text:span><text:span>can</text:span><text:span text:style-name="T1579"><text:s/></text:span><text:span>be</text:span><text:span text:style-name="T1580"><text:s/></text:span><text:span>confusing</text:span><text:span text:style-name="T1581"><text:s/></text:span><text:span>as it applies to many possible mechanisms, it is very easy to explain how the Demos blockchain manages intents.</text:span><text:span/></text:p>
      <text:p text:style-name="P196"><text:span>Each</text:span><text:span text:style-name="T1582"><text:s/></text:span><text:span>transaction,</text:span><text:span text:style-name="T1583"><text:s/></text:span><text:span>as</text:span><text:span text:style-name="T1584"><text:s/></text:span><text:span>shown</text:span><text:span text:style-name="T1585"><text:s/></text:span><text:span>in</text:span><text:span text:style-name="T1586"><text:s/></text:span><text:span>the</text:span><text:span text:style-name="T1587"><text:s/></text:span><text:span>schematic</text:span><text:span text:style-name="T1588"><text:s/></text:span><text:span>below,</text:span><text:span text:style-name="T1589"><text:s/></text:span><text:span>contains</text:span><text:span text:style-name="T1590"><text:s/></text:span><text:span>information</text:span><text:span text:style-name="T1591"><text:s/></text:span><text:span>that</text:span><text:span text:style-name="T1592"><text:s/></text:span><text:span text:style-name="T1593">assigns</text:span><text:span text:style-name="T1594"><text:s/></text:span><text:span text:style-name="T1595">an intent</text:span><text:span text:style-name="T1596"><text:s/></text:span><text:span>to</text:span><text:span text:style-name="T1597"><text:s/></text:span><text:span>a</text:span><text:span text:style-name="T1598"><text:s/></text:span><text:span>client</text:span><text:span text:style-name="T1599"><text:s/></text:span><text:span>with</text:span><text:span text:style-name="T1600"><text:s/></text:span><text:span text:style-name="T1601">no</text:span><text:span text:style-name="T1602"><text:s/></text:span><text:span text:style-name="T1603">degree</text:span><text:span text:style-name="T1604"><text:s/></text:span><text:span text:style-name="T1605">of</text:span><text:span text:style-name="T1606"><text:s/></text:span><text:span text:style-name="T1607">uncertainty</text:span><text:span>.</text:span><text:span text:style-name="T1608"><text:s/></text:span><text:span>This</text:span><text:span text:style-name="T1609"><text:s/></text:span><text:span>means</text:span><text:span text:style-name="T1610"><text:s/></text:span><text:span>that</text:span><text:span text:style-name="T1611"><text:s/></text:span><text:span>the</text:span><text:span text:style-name="T1612"><text:s/></text:span><text:span>client</text:span><text:span text:style-name="T1613"><text:s/></text:span><text:span>expresses</text:span><text:span text:style-name="T1614"><text:s/></text:span><text:span>its will to perform the operations contained in the transaction at a given timestamp, with a given target block and in a reproducible manner</text:span><text:span>.</text:span><text:span/><text:span/></text:p>
      <text:p text:style-name="P197"><text:span text:style-name="T1615">Thanks</text:span><text:span text:style-name="T1616"><text:s/></text:span><text:span text:style-name="T1617">to</text:span><text:span text:style-name="T1618"><text:s/></text:span><text:span text:style-name="T1619">this,</text:span><text:span text:style-name="T1620"><text:s/></text:span><text:span text:style-name="T1621">Demos</text:span><text:span text:style-name="T1622"><text:s/></text:span><text:span text:style-name="T1623">Network</text:span><text:span text:style-name="T1624"><text:s/></text:span><text:span text:style-name="T1625">is</text:span><text:span text:style-name="T1626"><text:s/></text:span><text:span text:style-name="T1627">able</text:span><text:span text:style-name="T1628"><text:s/></text:span><text:span text:style-name="T1629">to</text:span><text:span text:style-name="T1630"><text:s/></text:span><text:span text:style-name="T1631">assign</text:span><text:span text:style-name="T1632"><text:s/></text:span><text:span text:style-name="T1633">a</text:span><text:span text:style-name="T1634"><text:s/></text:span><text:span text:style-name="T1635">precise</text:span><text:span text:style-name="T1636"><text:s/></text:span><text:span text:style-name="T1637">chronological</text:span><text:span text:style-name="T1638"><text:s/></text:span><text:span text:style-name="T1639">order</text:span><text:span text:style-name="T1640"><text:s/></text:span><text:span text:style-name="T1641">to</text:span><text:span text:style-name="T1642"><text:s/></text:span><text:span text:style-name="T1643">its shared mempool: </text:span><text:span text:style-name="T1644">frontrunners and priority fees are not supported </text:span><text:span text:style-name="T1645">in this scenario. Once the transaction has been correctly executed by the blockchain, finality can be guaranteed </text:span><text:span text:style-name="T1646">even before the next block is mined</text:span><text:span text:style-name="T1647">.</text:span><text:span/></text:p>
      <text:p text:style-name="P198"><text:span>In</text:span><text:span text:style-name="T1648"><text:s/></text:span><text:span>this</text:span><text:span text:style-name="T1649"><text:s/></text:span><text:span>mechanism,</text:span><text:span text:style-name="T1650"><text:s/></text:span><text:span>the</text:span><text:span text:style-name="T1651"><text:s/></text:span><text:span>inclusion</text:span><text:span text:style-name="T1652"><text:s/></text:span><text:span>of</text:span><text:span text:style-name="T1653"><text:s/></text:span><text:span>a</text:span><text:span text:style-name="T1654"><text:s/></text:span><text:span>transaction</text:span><text:span text:style-name="T1655"><text:s/></text:span><text:span>in</text:span><text:span text:style-name="T1656"><text:s/></text:span><text:span>a</text:span><text:span text:style-name="T1657"><text:s/></text:span><text:span>block</text:span><text:span text:style-name="T1658"><text:s/></text:span><text:span>is</text:span><text:span text:style-name="T1659"><text:s/></text:span><text:span>an</text:span><text:span text:style-name="T1660"><text:s/></text:span><text:span text:style-name="T1661">acknowledgement</text:span><text:span text:style-name="T1662"><text:s/></text:span><text:span text:style-name="T1663">of</text:span><text:span text:style-name="T1664"><text:s/></text:span><text:span text:style-name="T1665">the integrity </text:span><text:span>of the data and the retrieval process that led to the execution of the included </text:span><text:span text:style-name="T1666">payloads.</text:span><text:span/></text:p>
      <text:p text:style-name="P199"><text:span>Each transaction is essentially an </text:span><text:span text:style-name="T1667">intent </text:span><text:span>that, once resolved by the network through the mechanisms</text:span><text:span text:style-name="T1668"><text:s/></text:span><text:span>explained</text:span><text:span text:style-name="T1669"><text:s/></text:span><text:span>in</text:span><text:span text:style-name="T1670"><text:s/></text:span><text:span>this</text:span><text:span text:style-name="T1671"><text:s/></text:span><text:span>paper,</text:span><text:span text:style-name="T1672"><text:s/></text:span><text:span>is</text:span><text:span text:style-name="T1673"><text:s/></text:span><text:span>binding</text:span><text:span text:style-name="T1674"><text:s/></text:span><text:span>and</text:span><text:span text:style-name="T1675"><text:s/></text:span><text:span>already</text:span><text:span text:style-name="T1676"><text:s/></text:span><text:span>executed.</text:span><text:span text:style-name="T1677"><text:s/></text:span><text:span>It</text:span><text:span text:style-name="T1678"><text:s/></text:span><text:span>should</text:span><text:span text:style-name="T1679"><text:s/></text:span><text:span>be</text:span><text:span text:style-name="T1680"><text:s/></text:span><text:span>noted that Demos Network acts as a </text:span><text:span text:style-name="T1681">supervisor </text:span><text:span>of the execution of intents: for this specific reason, it guarantees impartiality and certainty even within the same block.</text:span><text:span/><text:span/><text:span/><text:span/></text:p>
      <text:list>
        <text:list-item>
          <text:h text:outline-level="3" text:restart-numbering="0" text:is-list-header="0" text:style-name="P200"><text:span/><text:bookmark-start text:name="_Toc5"/><text:span>Transaction Lifecycle: Scaling through Shard Duty</text:span><text:span/><text:bookmark-end text:name="_Toc5"/><text:span/><text:span text:style-name="T1682"/></text:h>
        </text:list-item>
        <text:list-item>
          <text:h text:outline-level="3" text:restart-numbering="0" text:is-list-header="0" text:style-name="P201"><text:span text:style-name="T1683"/><text:span text:style-name="T1684"/><text:span text:style-name="T1685"/></text:h>
        </text:list-item>
      </text:list>
      <text:p text:style-name="P202"><text:span text:style-name="T1686">The Demos network is engineered to process a high volume of transactions per second. </text:span><text:span text:style-name="T1687"/></text:p>
      <text:p text:style-name="P203"><text:span text:style-name="T1688"/><text:span text:style-name="T1689"/></text:p>
      <text:p text:style-name="P204"><text:span text:style-name="T1690">Consequently, each node (also referred to as an RPC endpoint) must efficiently handle substantial loads. To achieve this, the Demos architecture implements a mechanism kno</text:span><text:span text:style-name="T1691">wn as 'Shard Duty'.</text:span><text:span text:style-name="T1692"/><text:span/></text:p>
      <text:p text:style-name="P205"><text:span text:style-name="T1693"/><text:span text:style-name="T1694"/></text:p>
      <text:p text:style-name="P206"><text:span text:style-name="T1695">Every transaction adheres to a precise lifecycle designed to ensure execution, security, and integrity from inception to finality. This lifecycle leverages the Proof of </text:span><text:span text:style-name="T1696">Representation</text:span><text:span text:style-name="T1697"><text:s/></text:span><text:span text:style-name="T1698">(PoR) component of the consensus mechanism and its associated </text:span><text:span text:style-name="T1699">CVSA feature. The process unfolds as follows:</text:span><text:span text:style-name="T1700"/></text:p>
      <text:p text:style-name="P207"><text:span text:style-name="T1701"/><text:span text:style-name="T1702"/></text:p>
      <text:list text:style-name="WWNum28" text:continue-numbering="true">
        <text:list-item>
          <text:p text:style-name="P208"><text:span text:style-name="T1703">A transaction is received by an RPC endpoint, which verifies the transaction's signature and hash, alongside performing basic integrity checks.</text:span><text:span text:style-name="T1704"/></text:p>
        </text:list-item>
        <text:list-item>
          <text:p text:style-name="P209"><text:span text:style-name="T1705">Upon successful completion of these initial checks, the transaction is relayed to a randomly selected Shard member designated for the upcoming consensus round.</text:span><text:span text:style-name="T1706"/></text:p>
        </text:list-item>
        <text:list-item>
          <text:p text:style-name="P210"><text:span text:style-name="T1707">Leveraging the CVSA feature, each RPC endpoint is aware of the nodes constituting the Shard once the preceding block has been forged.</text:span><text:span text:style-name="T1708"/></text:p>
        </text:list-item>
        <text:list-item>
          <text:p text:style-name="P211"><text:span text:style-name="T1709">The designated Shard member stores the transaction in its local mempool and concurrently disseminates a copy to another Shard member to enhance availability and redundancy.</text:span><text:span text:style-name="T1710"/></text:p>
        </text:list-item>
        <text:list-item>
          <text:p text:style-name="P212"><text:span text:style-name="T1711">The transaction is subsequently organized within the PoR Shard's shared mempool upon commencement of the consensus cycle.</text:span><text:span text:style-name="T1712"/></text:p>
        </text:list-item>
        <text:list-item>
          <text:p text:style-name="P213"><text:span text:style-name="T1713">Once the entire Shard reaches agreement on the shared mempool's state, the transaction is executed, and the Global </text:span><text:span text:style-name="T1714">Change</text:span><text:span text:style-name="T1715"><text:s/></text:span><text:span text:style-name="T1716">Registry (GCR) is updated (see the chapter/section on the 'Global </text:span><text:span text:style-name="T1717">Change</text:span><text:span text:style-name="T1718"><text:s/></text:span><text:span text:style-name="T1719">Registry (GCR)' for details).</text:span><text:span text:style-name="T1720"/></text:p>
        </text:list-item>
      </text:list>
      <text:p text:style-name="P214"><text:span text:style-name="T1721"/><text:span text:style-name="T1722"/></text:p>
      <text:p text:style-name="P215"><text:span text:style-name="T1723">This architecture enables RPC endpoints to efficiently manage a high volume of transactions, as Shard members can readily store them pending the consensus phase. </text:span><text:span text:style-name="T1724"/></text:p>
      <text:p text:style-name="P216"><text:span text:style-name="T1725"/><text:span text:style-name="T1726"/></text:p>
      <text:p text:style-name="P217"><text:span text:style-name="T1727">Such a decentralized approach to transaction processing ensures network-wide integrity, order,</text:span><text:span text:style-name="T1728"> and finality, while minimizing overhead associated with execution, verification, and potential rollbacks of invalid GCR updates.</text:span><text:span text:style-name="T1729"/><text:span/></text:p>
      <text:h text:outline-level="3" text:restart-numbering="0" text:is-list-header="0" text:style-name="P218"><text:span text:style-name="T1730"/><text:span text:style-name="T1731"/></text:h>
      <text:h text:outline-level="3" text:restart-numbering="0" text:is-list-header="0" text:style-name="P219"><text:span text:style-name="T1732"/><text:span text:style-name="T1733"/><text:span text:style-name="T1734"/></text:h>
      <text:h text:outline-level="3" text:restart-numbering="0" text:is-list-header="0" text:style-name="P220"><text:span text:style-name="T1735"><text:soft-page-break/></text:span><text:span text:style-name="T1736"/></text:h>
      <text:list>
        <text:list-item>
          <text:h text:outline-level="3" text:restart-numbering="0" text:is-list-header="0" text:style-name="P221"><text:span/><text:bookmark-start text:name="_Toc6"/><text:span>Native Bridges: Ensuring Secure Cross-Chain Value Transfers in Demos</text:span><text:span/><text:bookmark-end text:name="_Toc6"/><text:span/><text:span/></text:h>
        </text:list-item>
        <text:list-item>
          <text:h text:outline-level="3" text:restart-numbering="0" text:is-list-header="0" text:style-name="P222"><text:span text:style-name="T1737"/><text:span text:style-name="T1738"/></text:h>
        </text:list-item>
      </text:list>
      <text:p text:style-name="P223"><text:span text:style-name="T1739">To operate efficiently across diverse networks, Demos incorporates built-in bridging functionality. This dynamic feature enables Demos to assess, transfer, and manage liquidity across different chains by leveraging the decentralized architecture of the ent</text:span><text:span text:style-name="T1740">ire network.</text:span><text:span text:style-name="T1741"/></text:p>
      <text:p text:style-name="P224"><text:span text:style-name="T1742"/><text:span text:style-name="T1743"/></text:p>
      <text:p text:style-name="P225"><text:span text:style-name="T1744">Each Demos RPC endpoint accepts a specific operation type, identified by the nativeBridge field. Such an operation signifies the client's intent to execute a liquidity transfer between two different blockchain contexts (e.g., Solana and Ethereum).</text:span><text:span text:style-name="T1745"/></text:p>
      <text:p text:style-name="P226"><text:span text:style-name="T1746"/><text:span text:style-name="T1747"/></text:p>
      <text:p text:style-name="P227"><text:span text:style-name="T1748">Upon receipt, the nativeBridge operation is processed by the RPC endpoint, which infers the relevant Liquidity Tank (see 'Liquidity Tanks' below) for the source network and the settlement currency (typically a stablecoin like USDC).</text:span><text:span text:style-name="T1749"/></text:p>
      <text:p text:style-name="P228"><text:span text:style-name="T1750"/><text:span text:style-name="T1751"/></text:p>
      <text:p text:style-name="P229"><text:span text:style-name="T1752">The processed operation details are then returned to the client. The client, in turn, generates a transaction incorporating this validated operation. This transaction is handled like any other within the Demos network and is subsequently submitted to a Sha</text:span><text:span text:style-name="T1753">rd member for execution during the consensus phase (see 'Transaction Lifecycle').</text:span><text:span text:style-name="T1754"/></text:p>
      <text:p text:style-name="P230"><text:span text:style-name="T1755"/><text:span text:style-name="T1756"/></text:p>
      <text:p text:style-name="P231"><text:span text:style-name="T1757">During the consensus process, a nativeBridge transaction undergoes checks for validity, compliance, and fulfillment of execution conditions. If the client's initiating transfer (deposit) on the source chain is confirmed and all checks pass, the funds are t</text:span><text:span text:style-name="T1758">ransferred from the Demos Liquidity Tanks to the recipient's address on the destination chain.</text:span><text:span text:style-name="T1759"/></text:p>
      <text:p text:style-name="P232"><text:span text:style-name="T1760"/><text:span text:style-name="T1761"/></text:p>
      <text:p text:style-name="P233"><text:span text:style-name="T1762">To maintain security, the state or authorization of each Liquidity Tank is refreshed every block. Furthermore, releasing funds from a Tank requires signatures from a majority of the respective Shard members.</text:span><text:span text:style-name="T1763"/></text:p>
      <text:h text:outline-level="3" text:restart-numbering="0" text:is-list-header="0" text:style-name="P234"><text:span text:style-name="T1764"/><text:span text:style-name="T1765"/></text:h>
      <text:h text:outline-level="3" text:restart-numbering="0" text:is-list-header="0" text:style-name="P235"><text:span text:style-name="T1766"/><text:span text:style-name="T1767"/></text:h>
      <text:h text:outline-level="3" text:restart-numbering="0" text:is-list-header="0" text:style-name="P236"><text:span text:style-name="T1768"/><text:span text:style-name="T1769"><text:soft-page-break/></text:span><text:span/><text:span/><text:span/></text:h>
      <text:list>
        <text:list-item>
          <text:h text:outline-level="3" text:restart-numbering="0" text:is-list-header="0" text:style-name="P237"><text:span/><text:bookmark-start text:name="_Toc7"/><text:span/><text:span text:style-name="T1770">Liquidity</text:span><text:span text:style-name="T1771"><text:s/></text:span><text:span>Tanks:</text:span><text:span text:style-name="T1772"><text:s/></text:span><text:span>Demos</text:span><text:span text:style-name="T1773"><text:s/></text:span><text:span>Metafees</text:span><text:span text:style-name="T1774"><text:s/></text:span><text:span text:style-name="T1775">State</text:span><text:span><text:line-break/><text:line-break/></text:span><text:span/><text:bookmark-end text:name="_Toc7"/><text:span/><text:span text:style-name="T1776"/></text:h>
        </text:list-item>
      </text:list>
      <text:p text:style-name="P238"><text:span>Being</text:span><text:span text:style-name="T1777"><text:s/></text:span><text:span>isolated</text:span><text:span text:style-name="T1778"><text:s/></text:span><text:span>and</text:span><text:span text:style-name="T1779"><text:s/></text:span><text:span>self-sufficient,</text:span><text:span text:style-name="T1780"><text:s/></text:span><text:span>each</text:span><text:span text:style-name="T1781"><text:s/></text:span><text:span>blockchain</text:span><text:span text:style-name="T1782"><text:s/></text:span><text:span>requires</text:span><text:span text:style-name="T1783"><text:s/></text:span><text:span>fees</text:span><text:span text:style-name="T1784"><text:s/></text:span><text:span>in</text:span><text:span text:style-name="T1785"><text:s/></text:span><text:span>its</text:span><text:span text:style-name="T1786"><text:s/></text:span><text:span>own</text:span><text:span text:style-name="T1787"><text:s/></text:span><text:span>currency</text:span><text:span text:style-name="T1788"><text:s/></text:span><text:span>(with some</text:span><text:span text:style-name="T1789"><text:s/></text:span><text:span>exceptions).</text:span><text:span text:style-name="T1790"><text:s/></text:span><text:span>What's</text:span><text:span text:style-name="T1791"><text:s/></text:span><text:span>more,</text:span><text:span text:style-name="T1792"><text:s/></text:span><text:span>it's</text:span><text:span text:style-name="T1793"><text:s/></text:span><text:span>very</text:span><text:span text:style-name="T1794"><text:s/></text:span><text:span>likely</text:span><text:span text:style-name="T1795"><text:s/></text:span><text:span>that</text:span><text:span text:style-name="T1796"><text:s/></text:span><text:span>clients</text:span><text:span text:style-name="T1797"><text:s/></text:span><text:span>won't</text:span><text:span text:style-name="T1798"><text:s/></text:span><text:span>have</text:span><text:span text:style-name="T1799"><text:s/></text:span><text:span>every</text:span><text:span text:style-name="T1800"><text:s/></text:span><text:span>single</text:span><text:span text:style-name="T1801"><text:s/></text:span><text:span>native coin for the chains they want to operate on.</text:span><text:span/></text:p>
      <text:p text:style-name="P239"><text:span>If</text:span><text:span text:style-name="T1802"><text:s/></text:span><text:span>a</text:span><text:span text:style-name="T1803"><text:s/></text:span><text:span>client</text:span><text:span text:style-name="T1804"><text:s/></text:span><text:span>wants</text:span><text:span text:style-name="T1805"><text:s/></text:span><text:span>to</text:span><text:span text:style-name="T1806"><text:s/></text:span><text:span>complete</text:span><text:span text:style-name="T1807"><text:s/></text:span><text:span>an</text:span><text:span text:style-name="T1808"><text:s/></text:span><text:span>XM</text:span><text:span text:style-name="T1809"><text:s/></text:span><text:span>transaction</text:span><text:span text:style-name="T1810"><text:s/></text:span><text:span>with</text:span><text:span text:style-name="T1811"><text:s/></text:span><text:span>writes</text:span><text:span text:style-name="T1812"><text:s/></text:span><text:span>on,</text:span><text:span text:style-name="T1813"><text:s/></text:span><text:span>for</text:span><text:span text:style-name="T1814"><text:s/></text:span><text:span>example,</text:span><text:span text:style-name="T1815"><text:s/></text:span><text:span>chain</text:span><text:span text:style-name="T1816"><text:s/></text:span><text:span>A,</text:span><text:span text:style-name="T1817"><text:s/></text:span><text:span>B</text:span><text:span text:style-name="T1818"><text:s/></text:span><text:span>and C, they would normally have to provide A tokens, B tokens and C tokens for gas, plus the Demos network fees.</text:span><text:span/></text:p>
      <text:p text:style-name="P240"><text:span>This option is inconvenient and unacceptable. In order to harmonize gas requirements, Demos</text:span><text:span text:style-name="T1819"><text:s/></text:span><text:span>creates</text:span><text:span text:style-name="T1820"><text:s/></text:span><text:span>entities</text:span><text:span text:style-name="T1821"><text:s/></text:span><text:span>called</text:span><text:span text:style-name="T1822"><text:s/></text:span><text:span>Liquidity Tanks</text:span><text:span text:style-name="T1823"><text:s/></text:span><text:span>on</text:span><text:span text:style-name="T1824"><text:s/></text:span><text:span>different</text:span><text:span text:style-name="T1825"><text:s/></text:span><text:span>networks</text:span><text:span text:style-name="T1826">, powered by the above described Native Bridges</text:span><text:span>.</text:span><text:span text:style-name="T1827"><text:s/></text:span><text:span>Depending</text:span><text:span text:style-name="T1828"><text:s/></text:span><text:span>on</text:span><text:span text:style-name="T1829"><text:s/></text:span><text:span>the</text:span><text:span text:style-name="T1830"><text:s/></text:span><text:span>network architecture, a Gas Tank can be a smart contract, a wallet, a chainware or any other compatible form.</text:span><text:span/></text:p>
      <text:p text:style-name="P241"><text:span>The</text:span><text:span text:style-name="T1831"><text:s/></text:span><text:span>role</text:span><text:span text:style-name="T1832"><text:s/></text:span><text:span>of</text:span><text:span text:style-name="T1833"><text:s/></text:span><text:span>the</text:span><text:span text:style-name="T1834"><text:s/></text:span><text:span>Gas</text:span><text:span text:style-name="T1835"><text:s/></text:span><text:span>Tank</text:span><text:span text:style-name="T1836"><text:s/></text:span><text:span>is</text:span><text:span text:style-name="T1837"><text:s/></text:span><text:span>to</text:span><text:span text:style-name="T1838"><text:s/></text:span><text:span>always</text:span><text:span text:style-name="T1839"><text:s/></text:span><text:span>be</text:span><text:span text:style-name="T1840"><text:s/></text:span><text:span>in</text:span><text:span text:style-name="T1841"><text:s/></text:span><text:span>real-time</text:span><text:span text:style-name="T1842"><text:s/></text:span><text:span>contact</text:span><text:span text:style-name="T1843"><text:s/></text:span><text:span>with</text:span><text:span text:style-name="T1844"><text:s/></text:span><text:span>the</text:span><text:span text:style-name="T1845"><text:s/></text:span><text:span>Demos</text:span><text:span text:style-name="T1846"><text:s/></text:span><text:span>Network</text:span><text:span text:style-name="T1847"><text:s/></text:span><text:span>and t</text:span><text:span>o collect fees in the chain's native currency or (if supported) in the chain's specific token. The Demos Network allows developers to specify how they wish to pay for gas, so that a developer can quickly execute their transaction with the tokens they hold.</text:span><text:span/></text:p>
      <text:p text:style-name="P242"><text:span>In</text:span><text:span text:style-name="T1848"><text:s/></text:span><text:span>the</text:span><text:span text:style-name="T1849"><text:s/></text:span><text:span>background,</text:span><text:span text:style-name="T1850"><text:s/></text:span><text:span>each</text:span><text:span text:style-name="T1851"><text:s/></text:span><text:span>gas</text:span><text:span text:style-name="T1852"><text:s/></text:span><text:span>tank</text:span><text:span text:style-name="T1853"><text:s/></text:span><text:span>is</text:span><text:span text:style-name="T1854"><text:s/></text:span><text:span>known</text:span><text:span text:style-name="T1855"><text:s/></text:span><text:span>to</text:span><text:span text:style-name="T1856"><text:s/></text:span><text:span>the</text:span><text:span text:style-name="T1857"><text:s/></text:span><text:span>network</text:span><text:span text:style-name="T1858"><text:s/></text:span><text:span>and</text:span><text:span text:style-name="T1859"><text:s/></text:span><text:span>provides</text:span><text:span text:style-name="T1860"><text:s/></text:span><text:span>its</text:span><text:span text:style-name="T1861"><text:s/></text:span><text:span>capacity</text:span><text:span text:style-name="T1862"><text:s/></text:span><text:span>so</text:span><text:span text:style-name="T1863"><text:s/></text:span><text:span>that the Demos Network always knows the total gas balance and how it is distributed.</text:span><text:span/></text:p>
      <text:p text:style-name="P243"><text:span>An example might be as </text:span><text:span text:style-name="T1864">follows:</text:span><text:span/></text:p>
      <text:list text:style-name="WWNum3" text:continue-numbering="true">
        <text:list-item>
          <text:p text:style-name="P244"><text:span text:style-name="T1865">Alice</text:span><text:span text:style-name="T1866"><text:s/></text:span><text:span text:style-name="T1867">sends</text:span><text:span text:style-name="T1868"><text:s/></text:span><text:span text:style-name="T1869">an</text:span><text:span text:style-name="T1870"><text:s/></text:span><text:span text:style-name="T1871">XM</text:span><text:span text:style-name="T1872"><text:s/></text:span><text:span text:style-name="T1873">Transaction</text:span><text:span text:style-name="T1874"><text:s/></text:span><text:span text:style-name="T1875">involving</text:span><text:span text:style-name="T1876"><text:s/></text:span><text:span text:style-name="T1877">a</text:span><text:span text:style-name="T1878"><text:s/></text:span><text:span text:style-name="T1879">write</text:span><text:span text:style-name="T1880"><text:s/></text:span><text:span text:style-name="T1881">operation</text:span><text:span text:style-name="T1882"><text:s/></text:span><text:span text:style-name="T1883">on</text:span><text:span text:style-name="T1884"><text:s/></text:span><text:span text:style-name="T1885">a</text:span><text:span text:style-name="T1886"><text:s/></text:span><text:span text:style-name="T1887">EVM</text:span><text:span text:style-name="T1888"><text:s/></text:span><text:span text:style-name="T1889">network</text:span><text:span text:style-name="T1890"><text:s/></text:span><text:span text:style-name="T1891">and two L1s</text:span><text:span/></text:p>
        </text:list-item>
        <text:list-item>
          <text:p text:style-name="P245"><text:span text:style-name="T1892">Demos</text:span><text:span text:style-name="T1893"><text:s/></text:span><text:span text:style-name="T1894">Network</text:span><text:span text:style-name="T1895"><text:s/></text:span><text:span text:style-name="T1896">calculates</text:span><text:span text:style-name="T1897"><text:s/></text:span><text:span text:style-name="T1898">the</text:span><text:span text:style-name="T1899"><text:s/></text:span><text:span text:style-name="T1900">max</text:span><text:span text:style-name="T1901"><text:s/></text:span><text:span text:style-name="T1902">fees</text:span><text:span text:style-name="T1903"><text:s/></text:span><text:span text:style-name="T1904">requested</text:span><text:span text:style-name="T1905"><text:s/></text:span><text:span text:style-name="T1906">in</text:span><text:span text:style-name="T1907"><text:s/></text:span><text:span text:style-name="T1908">the</text:span><text:span text:style-name="T1909"><text:s/></text:span><text:span text:style-name="T1910">various</text:span><text:span text:style-name="T1911"><text:s/></text:span><text:span text:style-name="T1912">steps</text:span><text:span text:style-name="T1913"><text:s/></text:span><text:span text:style-name="T1914">and presents Alice with coherent options to pay gas</text:span><text:span/></text:p>
        </text:list-item>
        <text:list-item>
          <text:p text:style-name="P246"><text:span text:style-name="T1915">Alice, holding just the EVM network native token, pays with that network </text:span><text:span text:style-name="T1916">token</text:span><text:span/></text:p>
        </text:list-item>
        <text:list-item>
          <text:p text:style-name="P247"><text:span text:style-name="T1917">The</text:span><text:span text:style-name="T1918"><text:s/></text:span><text:span text:style-name="T1919">EVM</text:span><text:span text:style-name="T1920"><text:s/></text:span><text:span text:style-name="T1921">Network</text:span><text:span text:style-name="T1922"><text:s/></text:span><text:span text:style-name="T1923">gas</text:span><text:span text:style-name="T1924"><text:s/></text:span><text:span text:style-name="T1925">tank</text:span><text:span text:style-name="T1926"><text:s/></text:span><text:span text:style-name="T1927">is</text:span><text:span text:style-name="T1928"><text:s/></text:span><text:span text:style-name="T1929">filled</text:span><text:span text:style-name="T1930"><text:s/></text:span><text:span text:style-name="T1931">and</text:span><text:span text:style-name="T1932"><text:s/></text:span><text:span text:style-name="T1933">synced,</text:span><text:span text:style-name="T1934"><text:s/></text:span><text:span text:style-name="T1935">while</text:span><text:span text:style-name="T1936"><text:s/></text:span><text:span text:style-name="T1937">the</text:span><text:span text:style-name="T1938"><text:s/></text:span><text:span text:style-name="T1939">RPC</text:span><text:span text:style-name="T1940"><text:s/></text:span><text:span text:style-name="T1941">converts</text:span><text:span text:style-name="T1942"><text:s/></text:span><text:span text:style-name="T1943">(if</text:span><text:span text:style-name="T1944"><text:s/></text:span><text:span text:style-name="T1945">needed, usually done in advance) the needed tokens</text:span><text:span/></text:p>
        </text:list-item>
      </text:list>
      <text:p text:style-name="P248"><text:span>This</text:span><text:span text:style-name="T1946"><text:s/></text:span><text:span>way,</text:span><text:span text:style-name="T1947"><text:s/></text:span><text:span>Alice</text:span><text:span text:style-name="T1948"><text:s/></text:span><text:span>just</text:span><text:span text:style-name="T1949"><text:s/></text:span><text:span>has</text:span><text:span text:style-name="T1950"><text:s/></text:span><text:span>to</text:span><text:span text:style-name="T1951"><text:s/></text:span><text:span>hold</text:span><text:span text:style-name="T1952"><text:s/></text:span><text:span>a</text:span><text:span text:style-name="T1953"><text:s/></text:span><text:span>single</text:span><text:span text:style-name="T1954"><text:s/></text:span><text:span>token</text:span><text:span text:style-name="T1955"><text:s/></text:span><text:span>instead</text:span><text:span text:style-name="T1956"><text:s/></text:span><text:span>of</text:span><text:span text:style-name="T1957"><text:s/></text:span><text:span text:style-name="T1958">3.</text:span><text:span/></text:p>
      <text:list>
        <text:list-item>
          <text:h text:outline-level="2" text:restart-numbering="0" text:is-list-header="0" text:style-name="P249"><text:span/><text:bookmark-start text:name="_Toc8"/><text:span/><text:span/><text:bookmark-start text:name="Demos_Architecture_&amp;_Consensus_Mechanism"/><text:span/><text:bookmark-end text:name="Demos_Architecture_&amp;_Consensus_Mechanism"/><text:span>Demos Architecture &amp; Consensus </text:span><text:span text:style-name="T1959">Mechanism</text:span><text:span/><text:bookmark-end text:name="_Toc8"/><text:span/><text:span/></text:h>
        </text:list-item>
      </text:list>
      <text:p text:style-name="P250"><text:span text:style-name="T1960"/><text:span text:style-name="T1961"/></text:p>
      <text:list>
        <text:list-item>
          <text:h text:outline-level="3" text:restart-numbering="0" text:is-list-header="0" text:style-name="P251"><text:span/><text:bookmark-start text:name="_Toc9"/><text:span/><text:span>Decentralized</text:span><text:span text:style-name="T1962"><text:s/></text:span><text:span>Adaptive</text:span><text:span text:style-name="T1963"><text:s/></text:span><text:span>Architecture</text:span><text:span text:style-name="T1964"><text:s/></text:span><text:span text:style-name="T1965">(DAA)</text:span><text:span/><text:bookmark-end text:name="_Toc9"/><text:span/><text:span/></text:h>
        </text:list-item>
      </text:list>
      <text:p text:style-name="P252"><text:span text:style-name="T1966"/><text:span text:style-name="T1967"/></text:p>
      <text:p text:style-name="P253"><text:span/><text:bookmark-start text:name="Overview_"/><text:span/><text:bookmark-end text:name="Overview_"/><text:span text:style-name="T1968">Overview</text:span><text:span/></text:p>
      <text:p text:style-name="P254"><text:span text:style-name="T1969"/><text:span text:style-name="T1970"/></text:p>
      <text:p text:style-name="P255"><text:span>Decentralized</text:span><text:span text:style-name="T1971"><text:s/></text:span><text:span>Adaptive</text:span><text:span text:style-name="T1972"><text:s/></text:span><text:span>Architecture</text:span><text:span text:style-name="T1973"><text:s/></text:span><text:span>(DAA)</text:span><text:span text:style-name="T1974"><text:s/></text:span><text:span>is</text:span><text:span text:style-name="T1975"><text:s/></text:span><text:span>an</text:span><text:span text:style-name="T1976"><text:s/></text:span><text:span>innovative</text:span><text:span text:style-name="T1977"><text:s/></text:span><text:span>architecture</text:span><text:span text:style-name="T1978"><text:s/></text:span><text:span>model</text:span><text:span text:style-name="T1979"><text:s/></text:span><text:span>designed</text:span><text:span text:style-name="T1980"><text:s/></text:span><text:span>to achieve</text:span><text:span text:style-name="T1981"><text:s/></text:span><text:span>exceptional</text:span><text:span text:style-name="T1982"><text:s/></text:span><text:span>efficiency,</text:span><text:span text:style-name="T1983"><text:s/></text:span><text:span>scalability,</text:span><text:span text:style-name="T1984"><text:s/></text:span><text:span>and</text:span><text:span text:style-name="T1985"><text:s/></text:span><text:span>performance</text:span><text:span text:style-name="T1986"><text:s/></text:span><text:span>in</text:span><text:span text:style-name="T1987"><text:s/></text:span><text:span>decentralized</text:span><text:span text:style-name="T1988"><text:s/></text:span><text:span>systems</text:span><text:span text:style-name="T1989"><text:s/></text:span><text:span>while operating as a meta-chain infrastructure. DAA leverages dynamic system adaptation</text:span><text:span text:style-name="T1990"><text:s/></text:span><text:span>and representative sharding technology to ensure robust security.</text:span><text:span/></text:p>
      <text:p text:style-name="P256"><text:span text:style-name="T1991"/><text:span text:style-name="T1992"/></text:p>
      <text:p text:style-name="P257"><text:span text:style-name="T1993">Mechanism</text:span><text:span/></text:p>
      <text:p text:style-name="P258"><text:span text:style-name="T1994"/><text:span text:style-name="T1995"/></text:p>
      <text:list text:style-name="WWNum4" text:continue-numbering="true">
        <text:list-item>
          <text:h text:outline-level="5" text:restart-numbering="0" text:is-list-header="0" text:style-name="P259"><text:span/><text:span/><text:span/><text:bookmark-start text:name="1._Global_Change_Registry_(GCR)_"/><text:span/><text:bookmark-end text:name="1._Global_Change_Registry_(GCR)_"/><text:span>Global</text:span><text:span text:style-name="T1996"><text:s/></text:span><text:span>Change</text:span><text:span text:style-name="T1997"><text:s/></text:span><text:span>Registry</text:span><text:span text:style-name="T1998"><text:s/></text:span><text:span text:style-name="T1999">(GCR)</text:span><text:span/><text:span/><text:span/></text:h>
        </text:list-item>
      </text:list>
      <text:p text:style-name="P260"><text:span text:style-name="T2000"/><text:span text:style-name="T2001"/></text:p>
      <text:p text:style-name="P261"><text:span>To</text:span><text:span text:style-name="T2002"><text:s/></text:span><text:span>enhance</text:span><text:span text:style-name="T2003"><text:s/></text:span><text:span>scalability</text:span><text:span text:style-name="T2004"><text:s/></text:span><text:span>and</text:span><text:span text:style-name="T2005"><text:s/></text:span><text:span>efficiency,</text:span><text:span text:style-name="T2006"><text:s/></text:span><text:span>DAA</text:span><text:span text:style-name="T2007"><text:s/></text:span><text:span>implements</text:span><text:span text:style-name="T2008"><text:s/></text:span><text:span>the</text:span><text:span text:style-name="T2009"><text:s/></text:span><text:span>Global</text:span><text:span text:style-name="T2010"><text:s/></text:span><text:span>Change</text:span><text:span text:style-name="T2011"><text:s/></text:span><text:span>Registry</text:span><text:span text:style-name="T2012"><text:s/></text:span><text:span>(GCR) paradigm.</text:span><text:span text:style-name="T2013"><text:s/></text:span><text:span>This</text:span><text:span text:style-name="T2014"><text:s/></text:span><text:span>mechanism</text:span><text:span text:style-name="T2015"><text:s/></text:span><text:span>involves</text:span><text:span text:style-name="T2016"><text:s/></text:span><text:span>processing</text:span><text:span text:style-name="T2017"><text:s/></text:span><text:span>transactions</text:span><text:span text:style-name="T2018"><text:s/></text:span><text:span>in</text:span><text:span text:style-name="T2019"><text:s/></text:span><text:span>the</text:span><text:span text:style-name="T2020"><text:s/></text:span><text:span>most</text:span><text:span text:style-name="T2021"><text:s/></text:span><text:span>decentralized</text:span><text:span text:style-name="T2022"><text:s/></text:span><text:span>and collaborative way so that it is easy, fast, and efficient to find and scrap invalid or malicious payloads.</text:span><text:span text:style-name="T2023"><text:s/></text:span><text:span>Moreover,</text:span><text:span text:style-name="T2024"><text:s/></text:span><text:span>the</text:span><text:span text:style-name="T2025"><text:s/></text:span><text:span>Global</text:span><text:span text:style-name="T2026"><text:s/></text:span><text:span>Change</text:span><text:span text:style-name="T2027"><text:s/></text:span><text:span>Registry</text:span><text:span text:style-name="T2028"><text:s/></text:span><text:span>ensures</text:span><text:span text:style-name="T2029"><text:s/></text:span><text:span>consistency</text:span><text:span text:style-name="T2030"><text:s/></text:span><text:span>across</text:span><text:span text:style-name="T2031"><text:s/></text:span><text:span>shards</text:span><text:span text:style-name="T2032"><text:s/></text:span><text:span>while allowing them to operate independently.</text:span><text:span/></text:p>
      <text:p text:style-name="P262"><text:span text:style-name="T2033"/><text:span text:style-name="T2034"/></text:p>
      <text:p text:style-name="P263"><text:span text:style-name="T2035"/><text:span text:style-name="T2036"/></text:p>
      <text:list text:style-name="WWNum4" text:continue-numbering="true">
        <text:list-item>
          <text:h text:outline-level="5" text:restart-numbering="0" text:is-list-header="0" text:style-name="P264"><text:span/><text:span/><text:span/><text:bookmark-start text:name="2._Proof-of-Representation_with_Byzantin"/><text:span/><text:bookmark-end text:name="2._Proof-of-Representation_with_Byzantin"/><text:span>Proof-of-Representation</text:span><text:span text:style-name="T2037"><text:s/></text:span><text:span>with</text:span><text:span text:style-name="T2038"><text:s/></text:span><text:span>Byzantine</text:span><text:span text:style-name="T2039"><text:s/></text:span><text:span>Fault</text:span><text:span text:style-name="T2040"><text:s/></text:span><text:span>Tolerance</text:span><text:span text:style-name="T2041"><text:s/></text:span><text:span>(PoR-</text:span><text:span text:style-name="T2042">BFT)</text:span><text:span/><text:span/><text:span/></text:h>
        </text:list-item>
      </text:list>
      <text:p text:style-name="P265"><text:span text:style-name="T2043"/><text:span text:style-name="T2044"/></text:p>
      <text:p text:style-name="P266"><text:span>DAA employs a two-layer byzantine consensus mechanism, </text:span><text:span text:style-name="T2045">combining</text:span><text:span/></text:p>
      <text:p text:style-name="P267"><text:span>Proof-of-Representation</text:span><text:span text:style-name="T2046"><text:s/></text:span><text:span>(PoR)</text:span><text:span text:style-name="T2047"><text:s/></text:span><text:span>with</text:span><text:span text:style-name="T2048"><text:s/></text:span><text:span>Byzantine</text:span><text:span text:style-name="T2049"><text:s/></text:span><text:span>Fault</text:span><text:span text:style-name="T2050"><text:s/></text:span><text:span>Tolerance</text:span><text:span text:style-name="T2051"><text:s/></text:span><text:span>(BFT)</text:span><text:span text:style-name="T2052"><text:s/></text:span><text:span>for</text:span><text:span text:style-name="T2053"><text:s/></text:span><text:span>updating</text:span><text:span text:style-name="T2054"><text:s/></text:span><text:span>the Global Change Registry. Nodes are selected to form a Representative Shard for the validation process based on the PoR algorithm that ensures a deterministic</text:span><text:span/></text:p>
      <text:p text:style-name="P268"><text:span>non-tamperable selection method. This incentivizes stability and efficiency. Within the Representative</text:span><text:span text:style-name="T2055"><text:s/></text:span><text:span>Shard,</text:span><text:span text:style-name="T2056"><text:s/></text:span><text:span>a</text:span><text:span text:style-name="T2057"><text:s/></text:span><text:span>Byzantine</text:span><text:span text:style-name="T2058"><text:s/></text:span><text:span>Fault</text:span><text:span text:style-name="T2059"><text:s/></text:span><text:span>Tolerant</text:span><text:span text:style-name="T2060"><text:s/></text:span><text:span>consensus</text:span><text:span text:style-name="T2061"><text:s/></text:span><text:span>protocol</text:span><text:span text:style-name="T2062"><text:s/></text:span><text:span>is</text:span><text:span text:style-name="T2063"><text:s/></text:span><text:span>implemented, guaranteeing robustness, security, and scalability without burdening the entire chain.</text:span><text:span/></text:p>
      <text:p text:style-name="P269"><text:span text:style-name="T2064"/><text:span text:style-name="T2065"/></text:p>
      <text:list text:style-name="WWNum4" text:continue-numbering="true">
        <text:list-item>
          <text:h text:outline-level="5" text:restart-numbering="0" text:is-list-header="0" text:style-name="P270"><text:span/><text:span/><text:span/><text:bookmark-start text:name="4._Dynamic_Validation_Shard_Size_"/><text:span/><text:bookmark-end text:name="4._Dynamic_Validation_Shard_Size_"/><text:span>Dynamic</text:span><text:span text:style-name="T2066"><text:s/></text:span><text:span>Validation</text:span><text:span text:style-name="T2067"><text:s/></text:span><text:span>Shard</text:span><text:span text:style-name="T2068"><text:s/></text:span><text:span text:style-name="T2069">Size</text:span><text:span/><text:span/><text:span/></text:h>
        </text:list-item>
      </text:list>
      <text:p text:style-name="P271"><text:span text:style-name="T2070"/><text:span text:style-name="T2071"/></text:p>
      <text:p text:style-name="P272"><text:span>DAA continuously adapts to varying transaction volumes by dynamically adjusting the number of participants to the block proposing consensus phase. This adaptability is achieved through a randomness layer powered by a Common Validator Selection Algorithm,</text:span><text:span text:style-name="T2072"><text:s/></text:span><text:span>ensuring</text:span><text:span text:style-name="T2073"><text:s/></text:span><text:span>the</text:span><text:span text:style-name="T2074"><text:s/></text:span><text:span>generation</text:span><text:span text:style-name="T2075"><text:s/></text:span><text:span>of</text:span><text:span text:style-name="T2076"><text:s/></text:span><text:span>a</text:span><text:span text:style-name="T2077"><text:s/></text:span><text:span>dynamic</text:span><text:span text:style-name="T2078"><text:s/></text:span><text:span>and</text:span><text:span text:style-name="T2079"><text:s/></text:span><text:span>consistent</text:span><text:span text:style-name="T2080"><text:s/></text:span><text:span>Representative</text:span><text:span text:style-name="T2081"><text:s/></text:span><text:span>Shard.</text:span><text:span/></text:p>
      <text:p text:style-name="P273"><text:span text:style-name="T2082"/><text:span text:style-name="T2083"/></text:p>
      <text:p text:style-name="P274"><text:span text:style-name="T2084">Advantages</text:span><text:span/></text:p>
      <text:p text:style-name="P275"><text:span text:style-name="T2085"/><text:span text:style-name="T2086"/></text:p>
      <text:list text:style-name="WWNum5" text:continue-numbering="true">
        <text:list-item>
          <text:p text:style-name="P276"><text:span text:style-name="T2087">Enhanced</text:span><text:span text:style-name="T2088"><text:s/></text:span><text:span text:style-name="T2089">Scalability</text:span><text:span text:style-name="T2090">:</text:span><text:span text:style-name="T2091"><text:s/></text:span><text:span text:style-name="T2092">Through</text:span><text:span text:style-name="T2093"><text:s/></text:span><text:span text:style-name="T2094">the</text:span><text:span text:style-name="T2095"><text:s/></text:span><text:span text:style-name="T2096">implementation</text:span><text:span text:style-name="T2097"><text:s/></text:span><text:span text:style-name="T2098">of</text:span><text:span text:style-name="T2099"><text:s/></text:span><text:span text:style-name="T2100">the</text:span><text:span text:style-name="T2101"><text:s/></text:span><text:span text:style-name="T2102">Common</text:span><text:span text:style-name="T2103"><text:s/></text:span><text:span text:style-name="T2104">Validator</text:span><text:span text:style-name="T2105"><text:s/></text:span><text:span text:style-name="T2106">Selection Algorithm, the Decentralized Adaptive Archite</text:span><text:span text:style-name="T2107">cture (DAA) system achieves superior processing capabilities by concurrently handling a multitude of transactions within a deterministic representation of all the nodes. This substantially augments the network's overall capacity, enabling seamless scaling.</text:span><text:span/></text:p>
        </text:list-item>
      </text:list>
      <text:p text:style-name="P277"><text:span/><text:span/></text:p>
      <text:list text:style-name="WWNum5" text:continue-numbering="true">
        <text:list-item>
          <text:p text:style-name="P278"><text:span text:style-name="T2108">Robust</text:span><text:span text:style-name="T2109"><text:s/></text:span><text:span text:style-name="T2110">Security</text:span><text:span text:style-name="T2111">:</text:span><text:span text:style-name="T2112"><text:s/></text:span><text:span text:style-name="T2113">The</text:span><text:span text:style-name="T2114"><text:s/></text:span><text:span text:style-name="T2115">DAA</text:span><text:span text:style-name="T2116"><text:s/></text:span><text:span text:style-name="T2117">system</text:span><text:span text:style-name="T2118"><text:s/></text:span><text:span text:style-name="T2119">incorporates</text:span><text:span text:style-name="T2120"><text:s/></text:span><text:span text:style-name="T2121">the</text:span><text:span text:style-name="T2122"><text:s/></text:span><text:span text:style-name="T2123">classic</text:span><text:span text:style-name="T2124"><text:s/></text:span><text:span text:style-name="T2125">Byzantine</text:span><text:span text:style-name="T2126"><text:s/></text:span><text:span text:style-name="T2127">Fault</text:span><text:span text:style-name="T2128"><text:s/></text:span><text:span text:style-name="T2129">Tolerant (BFT) consensus technique in conjunction with the Pro</text:span><text:span text:style-name="T2130">of-of-Representation model to establish a formidable security framework that effectively mitigates a wide range of potential attack vectors. This amalgamation of methodologies ensures the integrity and resilience of the system against malicious activities.</text:span><text:span/></text:p>
        </text:list-item>
      </text:list>
      <text:p text:style-name="P279"><text:span/><text:span/></text:p>
      <text:list text:style-name="WWNum5" text:continue-numbering="true">
        <text:list-item>
          <text:p text:style-name="P280"><text:span text:style-name="T2131">Heightened Efficiency</text:span><text:span text:style-name="T2132">: DAA demonstrates remarkable efficiency by dynamically adjusting the proposers' count in response to the network's load. Leveraging the power of BFT, independent cross-node validation is facilitated, leading to optimized processing speeds</text:span><text:span text:style-name="T2133"><text:s/></text:span><text:span text:style-name="T2134">and</text:span><text:span text:style-name="T2135"><text:s/></text:span><text:span text:style-name="T2136">resource</text:span><text:span text:style-name="T2137"><text:s/></text:span><text:span text:style-name="T2138">utilization.</text:span><text:span text:style-name="T2139"><text:s/></text:span><text:span text:style-name="T2140">The</text:span><text:span text:style-name="T2141"><text:s/></text:span><text:span text:style-name="T2142">system</text:span><text:span text:style-name="T2143"><text:s/></text:span><text:span text:style-name="T2144">operates</text:span><text:span text:style-name="T2145"><text:s/></text:span><text:span text:style-name="T2146">at</text:span><text:span text:style-name="T2147"><text:s/></text:span><text:span text:style-name="T2148">peak</text:span><text:span text:style-name="T2149"><text:s/></text:span><text:span text:style-name="T2150">efficiency,</text:span><text:span text:style-name="T2151"><text:s/></text:span><text:span text:style-name="T2152">bolstering</text:span><text:span text:style-name="T2153"><text:s/></text:span><text:span text:style-name="T2154">overall </text:span><text:span text:style-name="T2155">performance.</text:span><text:span/></text:p>
        </text:list-item>
      </text:list>
      <text:p text:style-name="P281"><text:span/><text:span/></text:p>
      <text:list text:style-name="WWNum5" text:continue-numbering="true">
        <text:list-item>
          <text:p text:style-name="P282"><text:span text:style-name="T2156">Sustained</text:span><text:span text:style-name="T2157"><text:s/></text:span><text:span text:style-name="T2158">Decentralization</text:span><text:span text:style-name="T2159">:</text:span><text:span text:style-name="T2160"><text:s/></text:span><text:span text:style-name="T2161">By employing a democratic, secure, and tamper-proof process for validation Shard generation, integrated with the Proof of </text:span><text:span text:style-name="T2162">Representation</text:span><text:span text:style-name="T2163"><text:s/></text:span><text:span text:style-name="T2164">(PoR) consensus component, DAA effectively addresses performance problems arising from communication overhead and local tra</text:span><text:span text:style-name="T2165">nsaction processing. Shard members are determined at the commencement of each block cycle, with their composition mathematically proven to be consistent across all legitimate nodes.</text:span><text:span text:style-name="T2166"/><text:span/></text:p>
        </text:list-item>
        <text:soft-page-break/>
      </text:list>
      <text:list>
        <text:list-item>
          <text:h text:outline-level="3" text:restart-numbering="0" text:is-list-header="0" text:style-name="P283"><text:span/><text:bookmark-start text:name="_Toc10"/><text:span/><text:span/><text:bookmark-start text:name="The_Global_Change_Registry_(GCR)_"/><text:span/><text:bookmark-end text:name="The_Global_Change_Registry_(GCR)_"/><text:span>The</text:span><text:span text:style-name="T2167"><text:s/></text:span><text:span>Global</text:span><text:span text:style-name="T2168"><text:s/></text:span><text:span>Change</text:span><text:span text:style-name="T2169"><text:s/></text:span><text:span>Registry</text:span><text:span text:style-name="T2170"><text:s/></text:span><text:span text:style-name="T2171">(GCR)</text:span><text:span/><text:bookmark-end text:name="_Toc10"/><text:span/><text:span/></text:h>
        </text:list-item>
      </text:list>
      <text:p text:style-name="P284"><text:span text:style-name="T2172"/><text:span text:style-name="T2173"/></text:p>
      <text:p text:style-name="P285"><text:span>GCR</text:span><text:span text:style-name="T2174"><text:s/></text:span><text:span>is</text:span><text:span text:style-name="T2175"><text:s/></text:span><text:span>a</text:span><text:span text:style-name="T2176"><text:s/></text:span><text:span>mechanism</text:span><text:span text:style-name="T2177"><text:s/></text:span><text:span>that</text:span><text:span text:style-name="T2178"><text:s/></text:span><text:span>allows</text:span><text:span text:style-name="T2179"><text:s/></text:span><text:span>transactions</text:span><text:span text:style-name="T2180"><text:s/></text:span><text:span>to</text:span><text:span text:style-name="T2181"><text:s/></text:span><text:span>be</text:span><text:span text:style-name="T2182"><text:s/></text:span><text:span>executed</text:span><text:span text:style-name="T2183"><text:s/></text:span><text:span>with</text:span><text:span text:style-name="T2184"><text:s/></text:span><text:span>the</text:span><text:span text:style-name="T2185"><text:s/></text:span><text:span>possibility</text:span><text:span text:style-name="T2186"><text:s/></text:span><text:span>of</text:span><text:span text:style-name="T2187"><text:s/></text:span><text:span>rolling back, examining, and verifying their content even before a block is emitted.</text:span><text:span/></text:p>
      <text:p text:style-name="P286"><text:span text:style-name="T2188"/><text:span text:style-name="T2189"/></text:p>
      <text:p text:style-name="P287"><text:span/><text:bookmark-start text:name="Mechanism_"/><text:span/><text:bookmark-end text:name="Mechanism_"/><text:span text:style-name="T2190">Mechanism</text:span><text:span/></text:p>
      <text:p text:style-name="P288"><text:span text:style-name="T2191"/><text:span text:style-name="T2192"/></text:p>
      <text:list text:style-name="WWNum6" text:continue-numbering="true">
        <text:list-item>
          <text:p text:style-name="P289"><text:span text:style-name="T2193"/><text:span text:style-name="T2194">A</text:span><text:span text:style-name="T2195"><text:s/></text:span><text:span text:style-name="T2196">transaction</text:span><text:span text:style-name="T2197"><text:s/></text:span><text:span text:style-name="T2198">reaches</text:span><text:span text:style-name="T2199"><text:s/></text:span><text:span text:style-name="T2200">an</text:span><text:span text:style-name="T2201"><text:s/></text:span><text:span text:style-name="T2202">RPC</text:span><text:span text:style-name="T2203"><text:s/></text:span><text:span text:style-name="T2204">and</text:span><text:span text:style-name="T2205"><text:s/></text:span><text:span text:style-name="T2206">is</text:span><text:span text:style-name="T2207"><text:s/></text:span><text:span text:style-name="T2208">validated</text:span><text:span text:style-name="T2209"><text:s/></text:span><text:span text:style-name="T2210">for</text:span><text:span text:style-name="T2211"><text:s/></text:span><text:span text:style-name="T2212">identity</text:span><text:span text:style-name="T2213"><text:s/></text:span><text:span text:style-name="T2214">and</text:span><text:span text:style-name="T2215"><text:s/></text:span><text:span text:style-name="T2216">integrity.</text:span><text:span text:style-name="T2217"><text:s/></text:span><text:span text:style-name="T2218">The</text:span><text:span text:style-name="T2219"><text:s/></text:span><text:span text:style-name="T2220">signature and the hashes are examined and confirmed, then the transaction is sent to </text:span><text:span text:style-name="T2221">a Shard member.</text:span><text:span/><text:span text:style-name="T2222"/><text:span/></text:p>
        </text:list-item>
      </text:list>
      <text:p text:style-name="P290"><text:span text:style-name="T2223"/><text:span text:style-name="T2224"/></text:p>
      <text:list text:style-name="WWNum6" text:continue-numbering="true">
        <text:list-item>
          <text:p text:style-name="P291"><text:span text:style-name="T2225"/><text:span text:style-name="T2226">During the consensus stage, Shard members merge their respective local mempools to construct a unified, ordered mempool. This consolidation yields a mempool encompassing all unique transactions processed by RPC endpoints during the current block period. Fo</text:span><text:span text:style-name="T2227">llowing verification, these transactions are then dispatched to the GCR Preprocessor.</text:span><text:span text:style-name="T2228"/><text:span text:style-name="T2229"/></text:p>
        </text:list-item>
      </text:list>
      <text:p text:style-name="P292"><text:span/><text:span/></text:p>
      <text:list text:style-name="WWNum6" text:continue-numbering="true">
        <text:list-item>
          <text:p text:style-name="P293"><text:span text:style-name="T2230">Global</text:span><text:span text:style-name="T2231"><text:s/></text:span><text:span text:style-name="T2232">Change</text:span><text:span text:style-name="T2233"><text:s/></text:span><text:span text:style-name="T2234">Registry</text:span><text:span text:style-name="T2235"><text:s/></text:span><text:span text:style-name="T2236">(GCR)</text:span><text:span text:style-name="T2237"><text:s/></text:span><text:span text:style-name="T2238">Preprocessor:</text:span><text:span text:style-name="T2239"><text:s/></text:span><text:span text:style-name="T2240">The</text:span><text:span text:style-name="T2241"><text:s/></text:span><text:span text:style-name="T2242">GCR</text:span><text:span text:style-name="T2243"><text:s/></text:span><text:span text:style-name="T2244">functions</text:span><text:span text:style-name="T2245"><text:s/></text:span><text:span text:style-name="T2246">as</text:span><text:span text:style-name="T2247"><text:s/></text:span><text:span text:style-name="T2248">a</text:span><text:span text:style-name="T2249"><text:s/></text:span><text:span text:style-name="T2250">comprehensive ledger that maintains the state of the entire blockchain network. The Preprocessor examines the transaction and builds a delta (a sorted registry of changes) to the Global Change Registry without modifying it directly.</text:span><text:span/></text:p>
        </text:list-item>
      </text:list>
      <text:p text:style-name="P294"><text:span/><text:span/></text:p>
      <text:list text:style-name="WWNum6" text:continue-numbering="true">
        <text:list-item>
          <text:p text:style-name="P295"><text:span text:style-name="T2251">Each</text:span><text:span text:style-name="T2252"><text:s/></text:span><text:span text:style-name="T2253">subsequent</text:span><text:span text:style-name="T2254"><text:s/></text:span><text:span text:style-name="T2255">transaction</text:span><text:span text:style-name="T2256"><text:s/></text:span><text:span text:style-name="T2257">follows</text:span><text:span text:style-name="T2258"><text:s/></text:span><text:span text:style-name="T2259">the</text:span><text:span text:style-name="T2260"><text:s/></text:span><text:span text:style-name="T2261">same</text:span><text:span text:style-name="T2262"><text:s/></text:span><text:span text:style-name="T2263">process</text:span><text:span text:style-name="T2264"><text:s/></text:span><text:span text:style-name="T2265">as</text:span><text:span text:style-name="T2266"><text:s/></text:span><text:span text:style-name="T2267">above.</text:span><text:span text:style-name="T2268"><text:s/></text:span><text:span text:style-name="T2269">Only</text:span><text:span text:style-name="T2270"><text:s/></text:span><text:span text:style-name="T2271">when</text:span><text:span text:style-name="T2272"><text:s/></text:span><text:span text:style-name="T2273">a</text:span><text:span text:style-name="T2274"><text:s/></text:span><text:span text:style-name="T2275">block needs to be forged from the mempool, all of the GCR Preprocessor registry items are executed one by one in the right order on a copy of the GCR.</text:span><text:span/></text:p>
        </text:list-item>
      </text:list>
      <text:p text:style-name="P296"><text:span/><text:span/></text:p>
      <text:list text:style-name="WWNum6" text:continue-numbering="true">
        <text:list-item>
          <text:p text:style-name="P297"><text:span text:style-name="T2276">If</text:span><text:span text:style-name="T2277"><text:s/></text:span><text:span text:style-name="T2278">a</text:span><text:span text:style-name="T2279"><text:s/></text:span><text:span text:style-name="T2280">transaction</text:span><text:span text:style-name="T2281"><text:s/></text:span><text:span text:style-name="T2282">produces</text:span><text:span text:style-name="T2283"><text:s/></text:span><text:span text:style-name="T2284">an</text:span><text:span text:style-name="T2285"><text:s/></text:span><text:span text:style-name="T2286">invalid</text:span><text:span text:style-name="T2287"><text:s/></text:span><text:span text:style-name="T2288">result</text:span><text:span text:style-name="T2289"><text:s/></text:span><text:span text:style-name="T2290">in</text:span><text:span text:style-name="T2291"><text:s/></text:span><text:span text:style-name="T2292">the</text:span><text:span text:style-name="T2293"><text:s/></text:span><text:span text:style-name="T2294">GCR,</text:span><text:span text:style-name="T2295"><text:s/></text:span><text:span text:style-name="T2296">it</text:span><text:span text:style-name="T2297"><text:s/></text:span><text:span text:style-name="T2298">is</text:span><text:span text:style-name="T2299"><text:s/></text:span><text:span text:style-name="T2300">rejected</text:span><text:span text:style-name="T2301"><text:s/></text:span><text:span text:style-name="T2302">or</text:span><text:span text:style-name="T2303"><text:s/></text:span><text:span text:style-name="T2304">reverted. Otherwise, the GCR gets permanently modified once the block is emitted by the consensus mechanism.</text:span><text:span/></text:p>
        </text:list-item>
      </text:list>
      <text:p text:style-name="P298"><text:span text:style-name="T2305"/><text:span text:style-name="T2306"/></text:p>
      <text:p text:style-name="P299"><text:span/><text:bookmark-start text:name="Key_Features_and_Solutions_"/><text:span/><text:bookmark-end text:name="Key_Features_and_Solutions_"/><text:span text:style-name="T2307">Key</text:span><text:span text:style-name="T2308"><text:s/></text:span><text:span text:style-name="T2309">Features</text:span><text:span text:style-name="T2310"><text:s/></text:span><text:span text:style-name="T2311">and</text:span><text:span text:style-name="T2312"><text:s/></text:span><text:span text:style-name="T2313">Solutions</text:span><text:span/></text:p>
      <text:p text:style-name="P300"><text:span text:style-name="T2314"/><text:span text:style-name="T2315"/></text:p>
      <text:list text:style-name="WWNum7" text:continue-numbering="true">
        <text:list-item>
          <text:h text:outline-level="6" text:restart-numbering="0" text:is-list-header="0" text:style-name="P301"><text:span/><text:span/><text:span>Predictive</text:span><text:span text:style-name="T2316"><text:s/></text:span><text:span>Transaction</text:span><text:span text:style-name="T2317"><text:s/></text:span><text:span text:style-name="T2318">Validation</text:span><text:span/><text:span/><text:span/></text:h>
        </text:list-item>
      </text:list>
      <text:p text:style-name="P302"><text:span text:style-name="T2319"/><text:span text:style-name="T2320"/></text:p>
      <text:p text:style-name="P303"><text:span>Thanks to the local GCR, each node is able to predict with reasonable precision </text:span><text:span text:style-name="T2321">if</text:span><text:span/></text:p>
      <text:p text:style-name="P304"><text:span>a</text:span><text:span text:style-name="T2322"><text:s/></text:span><text:span>transaction</text:span><text:span text:style-name="T2323"><text:s/></text:span><text:span>will</text:span><text:span text:style-name="T2324"><text:s/></text:span><text:span>fail</text:span><text:span text:style-name="T2325"><text:s/></text:span><text:span>or</text:span><text:span text:style-name="T2326"><text:s/></text:span><text:span>will</text:span><text:span text:style-name="T2327"><text:s/></text:span><text:span>succeed.</text:span><text:span text:style-name="T2328"><text:s/></text:span><text:span>Even</text:span><text:span text:style-name="T2329"><text:s/></text:span><text:span>before</text:span><text:span text:style-name="T2330"><text:s/></text:span><text:span>the</text:span><text:span text:style-name="T2331"><text:s/></text:span><text:span>next</text:span><text:span text:style-name="T2332"><text:s/></text:span><text:span>block</text:span><text:span text:style-name="T2333"><text:s/></text:span><text:span>is</text:span><text:span text:style-name="T2334"><text:s/></text:span><text:span>emitted,</text:span><text:span text:style-name="T2335"><text:s/></text:span><text:span>many</text:span><text:span text:style-name="T2336"><text:s/></text:span><text:span>elements and mechanisms allow a transaction to be simulated with efficiency and rapidity.</text:span><text:span/></text:p>
      <text:p text:style-name="P305"><text:span/><text:span/></text:p>
      <text:list text:style-name="WWNum7" text:continue-numbering="true">
        <text:list-item>
          <text:h text:outline-level="6" text:restart-numbering="0" text:is-list-header="0" text:style-name="P306"><text:span/><text:span/><text:span>Resource-Friendly </text:span><text:span text:style-name="T2337">Rollbacks</text:span><text:span/><text:span/><text:span/></text:h>
        </text:list-item>
      </text:list>
      <text:p text:style-name="P307"><text:span text:style-name="T2338"/><text:span text:style-name="T2339"/></text:p>
      <text:p text:style-name="P308"><text:span>For the same reason, as the GCR is not enforced until the block is emitted, it </text:span><text:span text:style-name="T2340">is</text:span><text:span/></text:p>
      <text:p text:style-name="P309"><text:span>very easy to track and roll back invalid, malicious, or malformed transactions. Even if a transaction makes it into the GCR registry, once the consensus validator parses it and flags</text:span><text:span text:style-name="T2341"><text:s/></text:span><text:span>it</text:span><text:span text:style-name="T2342"><text:s/></text:span><text:span>as</text:span><text:span text:style-name="T2343"><text:s/></text:span><text:span>invalid</text:span><text:span text:style-name="T2344"><text:s/></text:span><text:span>there</text:span><text:span text:style-name="T2345"><text:s/></text:span><text:span>is</text:span><text:span text:style-name="T2346"><text:s/></text:span><text:span>no</text:span><text:span text:style-name="T2347"><text:s/></text:span><text:span>need</text:span><text:span text:style-name="T2348"><text:s/></text:span><text:span>to</text:span><text:span text:style-name="T2349"><text:s/></text:span><text:span>do</text:span><text:span text:style-name="T2350"><text:s/></text:span><text:span>anything</text:span><text:span text:style-name="T2351"><text:s/></text:span><text:span>else</text:span><text:span text:style-name="T2352"><text:s/></text:span><text:span>other</text:span><text:span text:style-name="T2353"><text:s/></text:span><text:span>than</text:span><text:span text:style-name="T2354"><text:s/></text:span><text:span>scrapping</text:span><text:span text:style-name="T2355"><text:s/></text:span><text:span>the</text:span><text:span text:style-name="T2356"><text:s/></text:span><text:span>transaction.</text:span><text:span/></text:p>
      <text:p text:style-name="P310"><text:span text:style-name="T2357">Advantages</text:span><text:span/></text:p>
      <text:p text:style-name="P311"><text:span text:style-name="T2358"/><text:span text:style-name="T2359"/></text:p>
      <text:list text:style-name="WWNum8" text:continue-numbering="true">
        <text:list-item>
          <text:h text:outline-level="6" text:restart-numbering="0" text:is-list-header="0" text:style-name="P312"><text:span/><text:span/><text:span text:style-name="T2360">Scalability</text:span><text:span/><text:span/><text:span/></text:h>
        </text:list-item>
      </text:list>
      <text:p text:style-name="P313"><text:span text:style-name="T2361"/><text:span text:style-name="T2362"/></text:p>
      <text:p text:style-name="P314"><text:span>GCR</text:span><text:span text:style-name="T2363"><text:s/></text:span><text:span>leverages</text:span><text:span text:style-name="T2364"><text:s/></text:span><text:span>parallel</text:span><text:span text:style-name="T2365"><text:s/></text:span><text:span>processing</text:span><text:span text:style-name="T2366"><text:s/></text:span><text:span>of</text:span><text:span text:style-name="T2367"><text:s/></text:span><text:span>transactions</text:span><text:span text:style-name="T2368"><text:s/></text:span><text:span>within</text:span><text:span text:style-name="T2369"><text:s/></text:span><text:span>individual</text:span><text:span text:style-name="T2370"><text:s/></text:span><text:span>nodes</text:span><text:span text:style-name="T2371"><text:s/></text:span><text:span>and</text:span><text:span text:style-name="T2372"><text:s/></text:span><text:span>employs efficient global state management techniques to significantly enhance the network's </text:span><text:span text:style-name="T2373">capacity.</text:span><text:span/></text:p>
      <text:p text:style-name="P315"><text:span/><text:span/></text:p>
      <text:list text:style-name="WWNum8" text:continue-numbering="true">
        <text:list-item>
          <text:h text:outline-level="6" text:restart-numbering="0" text:is-list-header="0" text:style-name="P316"><text:span/><text:span/><text:span text:style-name="T2374">Efficiency</text:span><text:span/><text:span/><text:span/></text:h>
        </text:list-item>
      </text:list>
      <text:p text:style-name="P317"><text:span text:style-name="T2375"/><text:span text:style-name="T2376"/></text:p>
      <text:p text:style-name="P318"><text:span>The employed strategy effectively minimizes cross-node communication overhead</text:span><text:span text:style-name="T2377"><text:s/></text:span><text:span>and</text:span><text:span text:style-name="T2378"><text:s/></text:span><text:span>optimizes</text:span><text:span text:style-name="T2379"><text:s/></text:span><text:span>GCR</text:span><text:span text:style-name="T2380"><text:s/></text:span><text:span>updates,</text:span><text:span text:style-name="T2381"><text:s/></text:span><text:span>thereby</text:span><text:span text:style-name="T2382"><text:s/></text:span><text:span>achieving</text:span><text:span text:style-name="T2383"><text:s/></text:span><text:span>a</text:span><text:span text:style-name="T2384"><text:s/></text:span><text:span>notably</text:span><text:span text:style-name="T2385"><text:s/></text:span><text:span>high</text:span><text:span text:style-name="T2386"><text:s/></text:span><text:span>level</text:span><text:span text:style-name="T2387"><text:s/></text:span><text:span>of operational efficiency.</text:span><text:span/></text:p>
      <text:p text:style-name="P319"><text:span/><text:span/></text:p>
      <text:list text:style-name="WWNum8" text:continue-numbering="true">
        <text:list-item>
          <text:h text:outline-level="6" text:restart-numbering="0" text:is-list-header="0" text:style-name="P320"><text:span/><text:span/><text:span text:style-name="T2388">Consistency</text:span><text:span/><text:span/><text:span/></text:h>
        </text:list-item>
      </text:list>
      <text:p text:style-name="P321"><text:span text:style-name="T2389"/><text:span text:style-name="T2390"/></text:p>
      <text:p text:style-name="P322"><text:span>By diligently maintaining a synchronized state of the blockchain across </text:span><text:span text:style-name="T2391">all</text:span><text:span/></text:p>
      <text:p text:style-name="P323"><text:span>nodes,</text:span><text:span text:style-name="T2392"><text:s/></text:span><text:span>GCR</text:span><text:span text:style-name="T2393"><text:s/></text:span><text:span>ensures</text:span><text:span text:style-name="T2394"><text:s/></text:span><text:span>a</text:span><text:span text:style-name="T2395"><text:s/></text:span><text:span>unanimous</text:span><text:span text:style-name="T2396"><text:s/></text:span><text:span>agreement</text:span><text:span text:style-name="T2397"><text:s/></text:span><text:span>among</text:span><text:span text:style-name="T2398"><text:s/></text:span><text:span>all</text:span><text:span text:style-name="T2399"><text:s/></text:span><text:span>network</text:span><text:span text:style-name="T2400"><text:s/></text:span><text:span>nodes</text:span><text:span text:style-name="T2401"><text:s/></text:span><text:span>regarding</text:span><text:span text:style-name="T2402"><text:s/></text:span><text:span>the current network state.</text:span><text:span/></text:p>
      <text:p text:style-name="P324"><text:span/><text:span/></text:p>
      <text:list text:style-name="WWNum8" text:continue-numbering="true">
        <text:list-item>
          <text:h text:outline-level="6" text:restart-numbering="0" text:is-list-header="0" text:style-name="P325"><text:span/><text:span/><text:span>Enhanced </text:span><text:span text:style-name="T2403">Interoperability</text:span><text:span/><text:span/><text:span/></text:h>
        </text:list-item>
      </text:list>
      <text:p text:style-name="P326"><text:span text:style-name="T2404"/><text:span text:style-name="T2405"/></text:p>
      <text:p text:style-name="P327"><text:span>The incorporation of GCR in the system facilitates improved interoperability among different</text:span><text:span text:style-name="T2406"><text:s/></text:span><text:span>nodes</text:span><text:span text:style-name="T2407"><text:s/></text:span><text:span>within</text:span><text:span text:style-name="T2408"><text:s/></text:span><text:span>the</text:span><text:span text:style-name="T2409"><text:s/></text:span><text:span>blockchain</text:span><text:span text:style-name="T2410"><text:s/></text:span><text:span>network.</text:span><text:span text:style-name="T2411"><text:s/></text:span><text:span>Consequently,</text:span><text:span text:style-name="T2412"><text:s/></text:span><text:span>any</text:span><text:span text:style-name="T2413"><text:s/></text:span><text:span>node</text:span><text:span text:style-name="T2414"><text:s/></text:span><text:span>gains</text:span><text:span text:style-name="T2415"><text:s/></text:span><text:span>the</text:span><text:span text:style-name="T2416"><text:s/></text:span><text:span>ability</text:span><text:span text:style-name="T2417"><text:s/></text:span><text:span>to seamlessly access the state of any address present across the entire network.</text:span><text:span/></text:p>
      <text:list>
        <text:list-item>
          <text:h text:outline-level="3" text:restart-numbering="0" text:is-list-header="0" text:style-name="P328"><text:span/><text:bookmark-start text:name="_Toc11"/><text:span/><text:span/><text:bookmark-start text:name="Proof-of-Representation_with_Byzantine_F"/><text:span/><text:bookmark-end text:name="Proof-of-Representation_with_Byzantine_F"/><text:span>Proof-of-Representation</text:span><text:span text:style-name="T2418"><text:s/></text:span><text:span>with</text:span><text:span text:style-name="T2419"><text:s/></text:span><text:span>Byzantine</text:span><text:span text:style-name="T2420"><text:s/></text:span><text:span>Fault</text:span><text:span text:style-name="T2421"><text:s/></text:span><text:span>Tolerance </text:span><text:span text:style-name="T2422">(PoR-BFT)</text:span><text:span/><text:bookmark-end text:name="_Toc11"/><text:span/><text:span/></text:h>
        </text:list-item>
      </text:list>
      <text:p text:style-name="P329"><text:span text:style-name="T2423"/><text:span text:style-name="T2424"/></text:p>
      <text:p text:style-name="P330"><text:span text:style-name="T2425">Figure 4: Proof of </text:span><text:span text:style-name="T2426">Representation</text:span><text:span/></text:p>
      <text:p text:style-name="P331"><text:span/><draw:frame draw:name="image4.png" draw:style-name="gr4" draw:z-index="4" text:anchor-type="paragraph" svg:width="16.98cm" svg:height="10.57cm" svg:x="2.053cm" svg:y="0.49cm"><draw:image xlink:href="Pictures/image2.png" xlink:type="simple" xlink:show="embed" xlink:actuate="onLoad"/></draw:frame><text:span/></text:p>
      <text:p text:style-name="P332"><text:span text:style-name="T2427"/><text:span text:style-name="T2428"/></text:p>
      <text:p text:style-name="P333"><text:span text:style-name="T2429"/><text:span text:style-name="T2430"/></text:p>
      <text:p text:style-name="P334"><text:span>Proof-of-Representation with Byzantine Fault Tolerance (PoR-BFT) is an advanced consensus mechanism that operates at a heightened level of technical sophistication, effectively</text:span><text:span text:style-name="T2431"><text:s/></text:span><text:span>ensuring</text:span><text:span text:style-name="T2432"><text:s/></text:span><text:span>network</text:span><text:span text:style-name="T2433"><text:s/></text:span><text:span>stability,</text:span><text:span text:style-name="T2434"><text:s/></text:span><text:span>efficiency,</text:span><text:span text:style-name="T2435"><text:s/></text:span><text:span>and</text:span><text:span text:style-name="T2436"><text:s/></text:span><text:span>security</text:span><text:span text:style-name="T2437"><text:s/></text:span><text:span>within</text:span><text:span text:style-name="T2438"><text:s/></text:span><text:span>a</text:span><text:span text:style-name="T2439"><text:s/></text:span><text:span>blockchain</text:span><text:span text:style-name="T2440"><text:s/></text:span><text:span>system.</text:span><text:span/></text:p>
      <text:p text:style-name="P335"><text:span/><text:span/></text:p>
      <text:p text:style-name="P336"><text:span>It accomplishes this through the integration of a Byzantine Fault Tolerance (BFT) consensus</text:span><text:span text:style-name="T2441"><text:s/></text:span><text:span>mechanism</text:span><text:span text:style-name="T2442"><text:s/></text:span><text:span>within</text:span><text:span text:style-name="T2443"><text:s/></text:span><text:span>a</text:span><text:span text:style-name="T2444"><text:s/></text:span><text:span>Shard </text:span><text:span>representing</text:span><text:span text:style-name="T2445"><text:s/></text:span><text:span>the</text:span><text:span text:style-name="T2446"><text:s/></text:span><text:span>entire</text:span><text:span text:style-name="T2447"><text:s/></text:span><text:span>validator</text:span><text:span text:style-name="T2448"><text:s/></text:span><text:span>network,</text:span><text:span text:style-name="T2449"><text:s/></text:span><text:span>selected with the utilization of Proof-of-Representation (PoR) for the proposal of blocks to the Global Change Registry (GCR).</text:span><text:span/></text:p>
      <text:p text:style-name="P337"><text:span/><text:span/></text:p>
      <text:p text:style-name="P338"><text:span>This Shard is called the Representative Shard and is composed of the result of an algorithm that, using the deterministic property of the transactions in the mempool, ensures</text:span><text:span text:style-name="T2450"><text:s/></text:span><text:span>the</text:span><text:span text:style-name="T2451"><text:s/></text:span><text:span>same</text:span><text:span text:style-name="T2452"><text:s/></text:span><text:span>group</text:span><text:span text:style-name="T2453"><text:s/></text:span><text:span>of</text:span><text:span text:style-name="T2454"><text:s/></text:span><text:span>validators</text:span><text:span text:style-name="T2455"><text:s/></text:span><text:span>are</text:span><text:span text:style-name="T2456"><text:s/></text:span><text:span>chosen</text:span><text:span text:style-name="T2457"><text:s/></text:span><text:span>by</text:span><text:span text:style-name="T2458"><text:s/></text:span><text:span>all</text:span><text:span text:style-name="T2459"><text:s/></text:span><text:span>the</text:span><text:span text:style-name="T2460"><text:s/></text:span><text:span>legitimate</text:span><text:span text:style-name="T2461"><text:s/></text:span><text:span>nodes</text:span><text:span text:style-name="T2462"><text:s/></text:span><text:span>without</text:span><text:span text:style-name="T2463"><text:s/></text:span><text:span>the need for data transfer.</text:span><text:span/></text:p>
      <text:p text:style-name="P339"><text:span/><text:bookmark-start text:name="The_Two_Consensus_Tiers_"/><text:span/><text:bookmark-end text:name="The_Two_Consensus_Tiers_"/><text:span text:style-name="T2464">The</text:span><text:span text:style-name="T2465"><text:s/></text:span><text:span text:style-name="T2466">Two</text:span><text:span text:style-name="T2467"><text:s/></text:span><text:span text:style-name="T2468">Consensus</text:span><text:span text:style-name="T2469"><text:s/></text:span><text:span text:style-name="T2470">Tiers</text:span><text:span/></text:p>
      <text:p text:style-name="P340"><text:span text:style-name="T2471"/><text:span text:style-name="T2472"/></text:p>
      <text:list text:style-name="WWNum9" text:continue-numbering="true">
        <text:list-item>
          <text:h text:outline-level="5" text:restart-numbering="0" text:is-list-header="0" text:style-name="P341"><text:span/><text:span/><text:span/><text:bookmark-start text:name="1._Byzantine_Fault_Tolerance_(BFT)_withi"/><text:span/><text:bookmark-end text:name="1._Byzantine_Fault_Tolerance_(BFT)_withi"/><text:span>Byzantine</text:span><text:span text:style-name="T2473"><text:s/></text:span><text:span>Fault</text:span><text:span text:style-name="T2474"><text:s/></text:span><text:span>Tolerance</text:span><text:span text:style-name="T2475"><text:s/></text:span><text:span>(BFT)</text:span><text:span text:style-name="T2476"><text:s/></text:span><text:span>within</text:span><text:span text:style-name="T2477"><text:s/></text:span><text:span>a</text:span><text:span text:style-name="T2478"><text:s/></text:span><text:span text:style-name="T2479">Shard</text:span><text:span/><text:span/><text:span/></text:h>
        </text:list-item>
      </text:list>
      <text:p text:style-name="P342"><text:span text:style-name="T2480"/><text:span text:style-name="T2481"/></text:p>
      <text:p text:style-name="P343"><text:span>The PoR-BFT system leverages the Byzantine Fault Tolerance consensus mechanism. BFT enables rapid validation and agreement of transactions within the shard, even when confronted</text:span><text:span text:style-name="T2482"><text:s/></text:span><text:span>with</text:span><text:span text:style-name="T2483"><text:s/></text:span><text:span>the</text:span><text:span text:style-name="T2484"><text:s/></text:span><text:span>presence</text:span><text:span text:style-name="T2485"><text:s/></text:span><text:span>of</text:span><text:span text:style-name="T2486"><text:s/></text:span><text:span>malicious</text:span><text:span text:style-name="T2487"><text:s/></text:span><text:span>or</text:span><text:span text:style-name="T2488"><text:s/></text:span><text:span>faulty</text:span><text:span text:style-name="T2489"><text:s/></text:span><text:span>nodes.</text:span><text:span text:style-name="T2490"><text:s/></text:span><text:span>By</text:span><text:span text:style-name="T2491"><text:s/></text:span><text:span>mandating</text:span><text:span text:style-name="T2492"><text:s/></text:span><text:span>the</text:span><text:span text:style-name="T2493"><text:s/></text:span><text:span>agreement</text:span><text:span text:style-name="T2494"><text:s/></text:span><text:span>of a supermajority (typically 2/3+1) of nodes prior to appending a new block to the shard's blockchain, BFT ensures efficient operation and robust security within a group of </text:span><text:span text:style-name="T2495">validators.</text:span><text:span/></text:p>
      <text:p text:style-name="P344"><text:span text:style-name="T2496"/><text:span text:style-name="T2497"/></text:p>
      <text:list text:style-name="WWNum9" text:continue-numbering="true">
        <text:list-item>
          <text:h text:outline-level="5" text:restart-numbering="0" text:is-list-header="0" text:style-name="P345"><text:span/><text:span/><text:span/><text:bookmark-start text:name="2._Proof-of-Representation_(PoR)_for_a_R"/><text:span/><text:bookmark-end text:name="2._Proof-of-Representation_(PoR)_for_a_R"/><text:span>Proof-of-Representation</text:span><text:span text:style-name="T2498"><text:s/></text:span><text:span>(PoR)</text:span><text:span text:style-name="T2499"><text:s/></text:span><text:span>for</text:span><text:span text:style-name="T2500"><text:s/></text:span><text:span>a</text:span><text:span text:style-name="T2501"><text:s/></text:span><text:span>Representative</text:span><text:span text:style-name="T2502"><text:s/></text:span><text:span text:style-name="T2503">Shard</text:span><text:span/><text:span/><text:span/></text:h>
        </text:list-item>
      </text:list>
      <text:p text:style-name="P346"><text:span text:style-name="T2504"/><text:span text:style-name="T2505"/></text:p>
      <text:p text:style-name="P347"><text:span>To elect the Representative Shard, the PoR-BFT system employs the PoR mechanism. Validators selected for this pr</text:span><text:span>ocess are chosen based on deterministic values contained in the GCR and in the intrinsic blockchain properties, which will always be identical for all the nodes that act on the same, untampered and verified data. This way, malicious nodes or malfunctioning</text:span><text:span text:style-name="T2506"><text:s/></text:span><text:span>nodes</text:span><text:span text:style-name="T2507"><text:s/></text:span><text:span>are</text:span><text:span text:style-name="T2508"><text:s/></text:span><text:span>automatically</text:span><text:span text:style-name="T2509"><text:s/></text:span><text:span>excluded</text:span><text:span text:style-name="T2510"><text:s/></text:span><text:span>from</text:span><text:span text:style-name="T2511"><text:s/></text:span><text:span>the</text:span><text:span text:style-name="T2512"><text:s/></text:span><text:span>consensus</text:span><text:span text:style-name="T2513"><text:s/></text:span><text:span>selection</text:span><text:span text:style-name="T2514"><text:s/></text:span><text:span>without</text:span><text:span text:style-name="T2515"><text:s/></text:span><text:span>any network overhead.</text:span><text:span/></text:p>
      <text:p text:style-name="P348"><text:span/><text:span/></text:p>
      <text:p text:style-name="P349"><text:span>The</text:span><text:span text:style-name="T2516"><text:s/></text:span><text:span>exact</text:span><text:span text:style-name="T2517"><text:s/></text:span><text:span>mechanism</text:span><text:span text:style-name="T2518"><text:s/></text:span><text:span>that</text:span><text:span text:style-name="T2519"><text:s/></text:span><text:span>allows</text:span><text:span text:style-name="T2520"><text:s/></text:span><text:span>this</text:span><text:span text:style-name="T2521"><text:s/></text:span><text:span>to</text:span><text:span text:style-name="T2522"><text:s/></text:span><text:span>happen</text:span><text:span text:style-name="T2523"><text:s/></text:span><text:span>is</text:span><text:span text:style-name="T2524"><text:s/></text:span><text:span>described</text:span><text:span text:style-name="T2525"><text:s/></text:span><text:span>in</text:span><text:span text:style-name="T2526"><text:s/></text:span><text:span>the</text:span><text:span text:style-name="T2527"><text:s/></text:span><text:span>‘</text:span><text:span text:style-name="T2528">Shard</text:span><text:span text:style-name="T2529"><text:s/></text:span><text:span text:style-name="T2530">Generation</text:span><text:span text:style-name="T2531"><text:s/></text:span><text:span text:style-name="T2532">and</text:span><text:span text:style-name="T2533"><text:s/></text:span><text:span text:style-name="T2534">Validators Choice with a Common Validator Selection Algorithm (CVSA)</text:span><text:span>’ section.</text:span><text:span/></text:p>
      <text:p text:style-name="P350"><text:span text:style-name="T2535"/><text:span text:style-name="T2536"/></text:p>
      <text:p text:style-name="P351"><text:span text:style-name="T2537"/><text:span text:style-name="T2538"/></text:p>
      <text:list>
        <text:list-item>
          <text:h text:outline-level="5" text:restart-numbering="0" text:is-list-header="0" text:style-name="P352"><text:span/><text:span/><text:span text:style-name="T2539">Ad</text:span><text:bookmark-start text:name="​​_"/><text:span/><text:bookmark-end text:name="​​_"/><text:span text:style-name="T2540">vantages</text:span><text:span/><text:span/><text:span/></text:h>
        </text:list-item>
      </text:list>
      <text:p text:style-name="P353"><text:span text:style-name="T2541"/><text:span text:style-name="T2542"/></text:p>
      <text:list text:style-name="WWNum10" text:continue-numbering="true">
        <text:list-item>
          <text:h text:outline-level="6" text:restart-numbering="0" text:is-list-header="0" text:style-name="P354"><text:span/><text:span/><text:span text:style-name="T2543">Efficiency</text:span><text:span/><text:span/><text:span/></text:h>
        </text:list-item>
      </text:list>
      <text:p text:style-name="P355"><text:span text:style-name="T2544"/><text:span text:style-name="T2545"/></text:p>
      <text:p text:style-name="P356"><text:span>The utilization of a Byzantine Fault Tolerant (BFT) consensus mechanism within a Representative</text:span><text:span text:style-name="T2546"><text:s/></text:span><text:span>Shard</text:span><text:span text:style-name="T2547"><text:s/></text:span><text:span>facilitates</text:span><text:span text:style-name="T2548"><text:s/></text:span><text:span>rapid</text:span><text:span text:style-name="T2549"><text:s/></text:span><text:span>transaction</text:span><text:span text:style-name="T2550"><text:s/></text:span><text:span>processing</text:span><text:span text:style-name="T2551"><text:s/></text:span><text:span>and</text:span><text:span text:style-name="T2552"><text:s/></text:span><text:span>streamlined</text:span><text:span text:style-name="T2553"><text:s/></text:span><text:span>intra-Shard </text:span><text:span text:style-name="T2554">operations.</text:span><text:span/></text:p>
      <text:p text:style-name="P357"><text:span text:style-name="T2555"/><text:span text:style-name="T2556"/></text:p>
      <text:p text:style-name="P358"><text:span text:style-name="T2557"/><text:span text:style-name="T2558"/></text:p>
      <text:list text:style-name="WWNum10" text:continue-numbering="true">
        <text:list-item>
          <text:h text:outline-level="6" text:restart-numbering="0" text:is-list-header="0" text:style-name="P359"><text:span/><text:span/><text:span>Augmented </text:span><text:span text:style-name="T2559">Security</text:span><text:span/><text:span/><text:span/></text:h>
        </text:list-item>
      </text:list>
      <text:p text:style-name="P360"><text:span text:style-name="T2560"/><text:span text:style-name="T2561"/></text:p>
      <text:p text:style-name="P361"><text:span>The Proof of Representation (PoR) consensus mechanism significantly strengthens</text:span><text:span text:style-name="T2562"><text:s/></text:span><text:span>security</text:span><text:span text:style-name="T2563"><text:s/></text:span><text:span>measures</text:span><text:span text:style-name="T2564"><text:s/></text:span><text:span>during</text:span><text:span text:style-name="T2565"><text:s/></text:span><text:span>the</text:span><text:span text:style-name="T2566"><text:s/></text:span><text:span>validators'</text:span><text:span text:style-name="T2567"><text:s/></text:span><text:span>election</text:span><text:span text:style-name="T2568"><text:s/></text:span><text:span>process</text:span><text:span text:style-name="T2569"><text:s/></text:span><text:span>for</text:span><text:span text:style-name="T2570"><text:s/></text:span><text:span>the</text:span><text:span text:style-name="T2571"><text:s/></text:span><text:span>next</text:span><text:span/></text:p>
      <text:p text:style-name="P362"><text:span>consensus round. By selecting nodes using a deterministic approach based on data integrity,</text:span><text:span text:style-name="T2572"><text:s/></text:span><text:span>PoR</text:span><text:span text:style-name="T2573"><text:s/></text:span><text:span>effectively</text:span><text:span text:style-name="T2574"><text:s/></text:span><text:span>mitigates</text:span><text:span text:style-name="T2575"><text:s/></text:span><text:span>the</text:span><text:span text:style-name="T2576"><text:s/></text:span><text:span>risks</text:span><text:span text:style-name="T2577"><text:s/></text:span><text:span>associated</text:span><text:span text:style-name="T2578"><text:s/></text:span><text:span>with</text:span><text:span text:style-name="T2579"><text:s/></text:span><text:span>malicious</text:span><text:span text:style-name="T2580"><text:s/></text:span><text:span>activities,</text:span><text:span text:style-name="T2581"><text:s/></text:span><text:span>fostering heightened integrity and efficiency within the blockchain system.</text:span><text:span/></text:p>
      <text:list text:style-name="WWNum10" text:continue-numbering="true">
        <text:list-item>
          <text:h text:outline-level="6" text:restart-numbering="0" text:is-list-header="0" text:style-name="P363"><text:span/><text:span/><text:span text:style-name="T2582">Scalability</text:span><text:span/><text:span/><text:span/></text:h>
        </text:list-item>
      </text:list>
      <text:p text:style-name="P364"><text:span text:style-name="T2583"/><text:span text:style-name="T2584"/></text:p>
      <text:p text:style-name="P365"><text:span>The PoR-BFT approach offers an advanced and scalable solution that can effectively manage a substantial volume of transactions. This approach ensures consistency</text:span><text:span text:style-name="T2585"><text:s/></text:span><text:span>and</text:span><text:span text:style-name="T2586"><text:s/></text:span><text:span>reliability</text:span><text:span text:style-name="T2587"><text:s/></text:span><text:span>within</text:span><text:span text:style-name="T2588"><text:s/></text:span><text:span>the</text:span><text:span text:style-name="T2589"><text:s/></text:span><text:span>GCR,</text:span><text:span text:style-name="T2590"><text:s/></text:span><text:span>even</text:span><text:span text:style-name="T2591"><text:s/></text:span><text:span>in</text:span><text:span text:style-name="T2592"><text:s/></text:span><text:span>the</text:span><text:span text:style-name="T2593"><text:s/></text:span><text:span>face</text:span><text:span text:style-name="T2594"><text:s/></text:span><text:span>of</text:span><text:span text:style-name="T2595"><text:s/></text:span><text:span>high</text:span><text:span text:style-name="T2596"><text:s/></text:span><text:span>transaction</text:span><text:span text:style-name="T2597"><text:s/></text:span><text:span>loads, thereby enabling the system to seamlessly handle increased demands without compromising</text:span><text:span text:style-name="T2598"><text:s/></text:span><text:span>performance.</text:span><text:span text:style-name="T2599"><text:s/></text:span><text:span>This</text:span><text:span text:style-name="T2600"><text:s/></text:span><text:span>is</text:span><text:span text:style-name="T2601"><text:s/></text:span><text:span>done</text:span><text:span text:style-name="T2602"><text:s/></text:span><text:span>by</text:span><text:span text:style-name="T2603"><text:s/></text:span><text:span>changing</text:span><text:span text:style-name="T2604"><text:s/></text:span><text:span>the</text:span><text:span text:style-name="T2605"><text:s/></text:span><text:span>size</text:span><text:span text:style-name="T2606"><text:s/></text:span><text:span>of</text:span><text:span text:style-name="T2607"><text:s/></text:span><text:span>the</text:span><text:span text:style-name="T2608"><text:s/></text:span><text:span>Representative Shard to facilitate computation and data transfer even in the case of massive traffic.</text:span><text:span/></text:p>
      <text:p text:style-name="P366"><text:span/><text:span/></text:p>
      <text:list text:style-name="WWNum10" text:continue-numbering="true">
        <text:list-item>
          <text:h text:outline-level="6" text:restart-numbering="0" text:is-list-header="0" text:style-name="P367"><text:span/><text:span/><text:span text:style-name="T2609">Stability</text:span><text:span/><text:span/><text:span/></text:h>
        </text:list-item>
      </text:list>
      <text:p text:style-name="P368"><text:span text:style-name="T2610"/><text:span text:style-name="T2611"/></text:p>
      <text:p text:style-name="P369"><text:span>The PoR mechanism promotes stability within the blockchain network by avoiding data overhead and by incentivizing long-term participation from network nodes. </text:span><text:span text:style-name="T2612">By</text:span><text:span/></text:p>
      <text:p text:style-name="P370"><text:span>dynamically selecting a Representative Shard for the whole blockchain, PoR fosters an environment</text:span><text:span text:style-name="T2613"><text:s/></text:span><text:span>of</text:span><text:span text:style-name="T2614"><text:s/></text:span><text:span>reliability</text:span><text:span text:style-name="T2615"><text:s/></text:span><text:span>and</text:span><text:span text:style-name="T2616"><text:s/></text:span><text:span>predictability,</text:span><text:span text:style-name="T2617"><text:s/></text:span><text:span>ensuring</text:span><text:span text:style-name="T2618"><text:s/></text:span><text:span>the</text:span><text:span text:style-name="T2619"><text:s/></text:span><text:span>overall</text:span><text:span text:style-name="T2620"><text:s/></text:span><text:span>stability</text:span><text:span text:style-name="T2621"><text:s/></text:span><text:span>of</text:span><text:span text:style-name="T2622"><text:s/></text:span><text:span>the</text:span><text:span text:style-name="T2623"><text:s/></text:span><text:span>blockchain </text:span><text:span text:style-name="T2624">system.</text:span><text:span/></text:p>
      <text:list>
        <text:list-item>
          <text:h text:outline-level="3" text:restart-numbering="0" text:is-list-header="0" text:style-name="P371"><text:span/><text:bookmark-start text:name="_Toc12"/><text:span/><text:span>Shard</text:span><text:span text:style-name="T2625"><text:s/></text:span><text:span>Generation</text:span><text:span text:style-name="T2626"><text:s/></text:span><text:span>and</text:span><text:span text:style-name="T2627"><text:s/></text:span><text:span>Validators</text:span><text:span text:style-name="T2628"><text:s/></text:span><text:span>Choice</text:span><text:span text:style-name="T2629"><text:s/></text:span><text:span>with</text:span><text:span text:style-name="T2630"><text:s/></text:span><text:span>a</text:span><text:span text:style-name="T2631"><text:s/></text:span><text:span>Common Validator Selection Algorithm (CVSA)</text:span><text:span/><text:bookmark-end text:name="_Toc12"/><text:span/><text:span/></text:h>
        </text:list-item>
      </text:list>
      <text:p text:style-name="P372"><text:span text:style-name="T2632"/><text:span text:style-name="T2633"/></text:p>
      <text:p text:style-name="P373"><text:span>The</text:span><text:span text:style-name="T2634"><text:s/></text:span><text:span>process</text:span><text:span text:style-name="T2635"><text:s/></text:span><text:span>of</text:span><text:span text:style-name="T2636"><text:s/></text:span><text:span>Shard </text:span><text:span>generation</text:span><text:span text:style-name="T2637"><text:s/></text:span><text:span>using</text:span><text:span text:style-name="T2638"><text:s/></text:span><text:span>a</text:span><text:span text:style-name="T2639"><text:s/></text:span><text:span>Common</text:span><text:span text:style-name="T2640"><text:s/></text:span><text:span>Validator</text:span><text:span text:style-name="T2641"><text:s/></text:span><text:span>Selection</text:span><text:span text:style-name="T2642"><text:s/></text:span><text:span>Algorithm</text:span><text:span text:style-name="T2643"><text:s/></text:span><text:span>(CVSA) involves creating a shared, deterministic source of randomness to ensure all nodes generate the same Shard configuration given the same network state.</text:span><text:span/></text:p>
      <text:p text:style-name="P374"><text:span text:style-name="T2644"/><text:span text:style-name="T2645"/></text:p>
      <text:p text:style-name="P375"><text:span text:style-name="T2646"/><text:span text:style-name="T2647"/></text:p>
      <text:p text:style-name="P376"><text:span/><text:bookmark-start text:name="Phase_1_-_Initiate_CVSA_Prerequisites_"/><text:span/><text:bookmark-end text:name="Phase_1_-_Initiate_CVSA_Prerequisites_"/><text:span text:style-name="T2648">Phase</text:span><text:span text:style-name="T2649"><text:s/></text:span><text:span text:style-name="T2650">1</text:span><text:span text:style-name="T2651"><text:s/></text:span><text:span text:style-name="T2652">-</text:span><text:span text:style-name="T2653"><text:s/></text:span><text:span text:style-name="T2654">Initiate</text:span><text:span text:style-name="T2655"><text:s/></text:span><text:span text:style-name="T2656">CVSA</text:span><text:span text:style-name="T2657"><text:s/></text:span><text:span text:style-name="T2658">Prerequisites</text:span><text:span text:style-name="T2659"/><text:span/></text:p>
      <text:p text:style-name="P377"><text:span text:style-name="T2660"/><text:span text:style-name="T2661"/></text:p>
      <text:p text:style-name="P378"><text:span>At</text:span><text:span text:style-name="T2662"><text:s/></text:span><text:span>the</text:span><text:span text:style-name="T2663"><text:s/></text:span><text:span>commencement</text:span><text:span text:style-name="T2664"><text:s/></text:span><text:span>of</text:span><text:span text:style-name="T2665"><text:s/></text:span><text:span>each</text:span><text:span text:style-name="T2666"><text:s/></text:span><text:span>validation</text:span><text:span text:style-name="T2667"><text:s/></text:span><text:span>round,</text:span><text:span text:style-name="T2668"><text:s/></text:span><text:span>the</text:span><text:span text:style-name="T2669"><text:s/></text:span><text:span>blockchain</text:span><text:span text:style-name="T2670"><text:s/></text:span><text:span>system</text:span><text:span text:style-name="T2671"><text:s/></text:span><text:span>initiates</text:span><text:span text:style-name="T2672"><text:s/></text:span><text:span>the</text:span><text:span text:style-name="T2673"><text:s/></text:span><text:span>CVSA process. This process commences by selecting an initial input, commonly denoted as the "seed." </text:span><text:span/><text:span>This seed is derived from the last block hash, which in turn incorporates the Global </text:span><text:span text:style-name="T2674">Change</text:span><text:span text:style-name="T2675"><text:s/></text:span><text:span>Registry (GCR) hash (refer to the GCR section for further details)</text:span><text:span text:style-name="T2676">.</text:span><text:span/></text:p>
      <text:p text:style-name="P379"><text:span text:style-name="T2677"/><text:span text:style-name="T2678"/></text:p>
      <text:p text:style-name="P380"><text:span/><text:bookmark-start text:name="Phase_2_-_Apply_CVSA_"/><text:span/><text:bookmark-end text:name="Phase_2_-_Apply_CVSA_"/><text:span text:style-name="T2679">Phase</text:span><text:span text:style-name="T2680"><text:s/></text:span><text:span text:style-name="T2681">2</text:span><text:span text:style-name="T2682"><text:s/></text:span><text:span text:style-name="T2683">-</text:span><text:span text:style-name="T2684"><text:s/></text:span><text:span text:style-name="T2685">Apply</text:span><text:span text:style-name="T2686"><text:s/></text:span><text:span text:style-name="T2687">CVSA</text:span><text:span/></text:p>
      <text:p text:style-name="P381"><text:span text:style-name="T2688"/><text:span text:style-name="T2689"/></text:p>
      <text:p text:style-name="P382"><text:span>The</text:span><text:span text:style-name="T2690"><text:s/></text:span><text:span>selected</text:span><text:span text:style-name="T2691"><text:s/></text:span><text:span>seed</text:span><text:span text:style-name="T2692"><text:s/></text:span><text:span>is</text:span><text:span text:style-name="T2693"><text:s/></text:span><text:span>then</text:span><text:span text:style-name="T2694"><text:s/></text:span><text:span>input</text:span><text:span text:style-name="T2695"><text:s/></text:span><text:span>into</text:span><text:span text:style-name="T2696"><text:s/></text:span><text:span>a</text:span><text:span text:style-name="T2697"><text:s/></text:span><text:span>pseudo-random</text:span><text:span text:style-name="T2698"><text:s/></text:span><text:span>number</text:span><text:span text:style-name="T2699"><text:s/></text:span><text:span>generator</text:span><text:span text:style-name="T2700"><text:s/></text:span><text:span>to</text:span><text:span text:style-name="T2701"><text:s/></text:span><text:span>generate</text:span><text:span text:style-name="T2702"><text:s/></text:span><text:span>a CVSA. The CVSA will be identical for those nodes compliant wi</text:span><text:span>th the blockchain mechanism whilst will be different for malicious or malfunctioning nodes. The output remains impervious to prediction until the computation is finalized and needs to be demonstrated by cryptography, ensuring security and unpredictability.</text:span><text:span/></text:p>
      <text:p text:style-name="P383"><text:span text:style-name="T2703"/><text:span text:style-name="T2704"/></text:p>
      <text:p text:style-name="P384"><text:span/><text:bookmark-start text:name="Phase_3_-_Verification_and_Distribution_"/><text:span/><text:bookmark-end text:name="Phase_3_-_Verification_and_Distribution_"/><text:span text:style-name="T2705">Phase</text:span><text:span text:style-name="T2706"><text:s/></text:span><text:span text:style-name="T2707">3</text:span><text:span text:style-name="T2708"><text:s/></text:span><text:span text:style-name="T2709">-</text:span><text:span text:style-name="T2710"><text:s/></text:span><text:span text:style-name="T2711">Verification</text:span><text:span text:style-name="T2712"><text:s/></text:span><text:span text:style-name="T2713">and</text:span><text:span text:style-name="T2714"><text:s/></text:span><text:span text:style-name="T2715">Distribution</text:span><text:span/></text:p>
      <text:p text:style-name="P385"><text:span text:style-name="T2716"/><text:span text:style-name="T2717"/></text:p>
      <text:p text:style-name="P386"><text:span>Once the CVSA has generated the output, all other nodes will possess the same information</text:span><text:span text:style-name="T2718"><text:s/></text:span><text:span>without</text:span><text:span text:style-name="T2719"><text:s/></text:span><text:span>the</text:span><text:span text:style-name="T2720"><text:s/></text:span><text:span>need</text:span><text:span text:style-name="T2721"><text:s/></text:span><text:span>for</text:span><text:span text:style-name="T2722"><text:s/></text:span><text:span>transmission.</text:span><text:span text:style-name="T2723"><text:s/></text:span><text:span>The</text:span><text:span text:style-name="T2724"><text:s/></text:span><text:span>inherent</text:span><text:span text:style-name="T2725"><text:s/></text:span><text:span>property</text:span><text:span text:style-name="T2726"><text:s/></text:span><text:span>of</text:span><text:span text:style-name="T2727"><text:s/></text:span><text:span>rapid</text:span><text:span text:style-name="T2728"><text:s/></text:span><text:span>verification</text:span><text:span text:style-name="T2729"><text:s/></text:span><text:span>in the CVSA guarantees simultaneous propagation of the output to all nodes.</text:span><text:span/></text:p>
      <text:p text:style-name="P387"><text:span text:style-name="T2730"/><text:span text:style-name="T2731"/></text:p>
      <text:p text:style-name="P388"><text:span/><text:bookmark-start text:name="Phase_4_-_Shard_Generation_"/><text:span/><text:bookmark-end text:name="Phase_4_-_Shard_Generation_"/><text:span text:style-name="T2732">Phase</text:span><text:span text:style-name="T2733"><text:s/></text:span><text:span text:style-name="T2734">4</text:span><text:span text:style-name="T2735"><text:s/></text:span><text:span text:style-name="T2736">-</text:span><text:span text:style-name="T2737"><text:s/></text:span><text:span text:style-name="T2738">Shard</text:span><text:span text:style-name="T2739"><text:s/></text:span><text:span text:style-name="T2740">Generation</text:span><text:span/></text:p>
      <text:p text:style-name="P389"><text:span text:style-name="T2741"/><text:span text:style-name="T2742"/></text:p>
      <text:p text:style-name="P390"><text:span>Each node in the network uses this output as the seed for Shard generation and validation assignment. Since the seed is identical for all nodes, the Shard generation process results in</text:span><text:span text:style-name="T2743"><text:s/></text:span><text:span>the</text:span><text:span text:style-name="T2744"><text:s/></text:span><text:span>same</text:span><text:span text:style-name="T2745"><text:s/></text:span><text:span>set</text:span><text:span text:style-name="T2746"><text:s/></text:span><text:span>of</text:span><text:span text:style-name="T2747"><text:s/></text:span><text:span>shards</text:span><text:span text:style-name="T2748"><text:s/></text:span><text:span>across</text:span><text:span text:style-name="T2749"><text:s/></text:span><text:span>the</text:span><text:span text:style-name="T2750"><text:s/></text:span><text:span>entire</text:span><text:span text:style-name="T2751"><text:s/></text:span><text:span>network.</text:span><text:span text:style-name="T2752"><text:s/></text:span><text:span>The</text:span><text:span text:style-name="T2753"><text:s/></text:span><text:span>nodes</text:span><text:span text:style-name="T2754"><text:s/></text:span><text:span>are</text:span><text:span text:style-name="T2755"><text:s/></text:span><text:span>then</text:span><text:span text:style-name="T2756"><text:s/></text:span><text:span>assigned</text:span><text:span text:style-name="T2757"><text:s/></text:span><text:span>to</text:span><text:span text:style-name="T2758"><text:s/></text:span><text:span>these shards based on the deterministic process using the same seed, ensuring uniform distribution and a balanced workload.</text:span><text:span/></text:p>
      <text:p text:style-name="P391"><text:span/><text:bookmark-start text:name="Phase_5_-_Begin_Epoch_Operations_"/><text:span/><text:bookmark-end text:name="Phase_5_-_Begin_Epoch_Operations_"/><text:span text:style-name="T2759">Phase</text:span><text:span text:style-name="T2760"><text:s/></text:span><text:span text:style-name="T2761">5</text:span><text:span text:style-name="T2762"><text:s/></text:span><text:span text:style-name="T2763">-</text:span><text:span text:style-name="T2764"><text:s/></text:span><text:span text:style-name="T2765">Begin</text:span><text:span text:style-name="T2766"><text:s/></text:span><text:span text:style-name="T2767">Epoch</text:span><text:span text:style-name="T2768"><text:s/></text:span><text:span text:style-name="T2769">Operations</text:span><text:span/></text:p>
      <text:p text:style-name="P392"><text:span text:style-name="T2770"/><text:span text:style-name="T2771"/></text:p>
      <text:p text:style-name="P393"><text:span/><text:span>Following shard generation and node assignment, the blockchain network proceeds with its operations for the new epoch, processing transactions within </text:span><text:span text:style-name="T2772">the</text:span><text:span text:style-name="T2773"><text:s/></text:span><text:span>Shard once the consensus cycle begins, and committing state changes to the Global </text:span><text:span text:style-name="T2774">Change</text:span><text:span text:style-name="T2775"><text:s/></text:span><text:span>Registry </text:span><text:span>(GCR) in a predictable yet secure manner.</text:span><text:span/><text:span/></text:p>
      <text:p text:style-name="P394"><text:span/><text:span/></text:p>
      <text:p text:style-name="P395"><text:span>The</text:span><text:span text:style-name="T2776"><text:s/></text:span><text:span>utilization</text:span><text:span text:style-name="T2777"><text:s/></text:span><text:span>of</text:span><text:span text:style-name="T2778"><text:s/></text:span><text:span>a</text:span><text:span text:style-name="T2779"><text:s/></text:span><text:span>CVSA</text:span><text:span text:style-name="T2780"><text:s/></text:span><text:span>within</text:span><text:span text:style-name="T2781"><text:s/></text:span><text:span>the</text:span><text:span text:style-name="T2782"><text:s/></text:span><text:span>randomness</text:span><text:span text:style-name="T2783"><text:s/></text:span><text:span>layer</text:span><text:span text:style-name="T2784"><text:s/></text:span><text:span>provides</text:span><text:span text:style-name="T2785"><text:s/></text:span><text:span>a</text:span><text:span text:style-name="T2786"><text:s/></text:span><text:span>secure,</text:span><text:span text:style-name="T2787"><text:s/></text:span><text:span>verifiable</text:span><text:span text:style-name="T2788"><text:s/></text:span><text:span>source of randomness, enabling consistent Shard generation across the network, enhancing security, and ensuring scalability.</text:span><text:span/></text:p>
      <text:p text:style-name="P396"><text:span text:style-name="T2789"/><text:span text:style-name="T2790"/></text:p>
      <text:list>
        <text:list-item>
          <text:h text:outline-level="3" text:restart-numbering="0" text:is-list-header="0" text:style-name="P397"><text:span/><text:bookmark-start text:name="_Toc13"/><text:span/><text:span>Dynamic</text:span><text:span text:style-name="T2791"><text:s/></text:span><text:span>Validation</text:span><text:span text:style-name="T2792"><text:s/></text:span><text:span>Shard</text:span><text:span text:style-name="T2793"><text:s/></text:span><text:span text:style-name="T2794">Size</text:span><text:span/><text:bookmark-end text:name="_Toc13"/><text:span/><text:span/></text:h>
        </text:list-item>
      </text:list>
      <text:p text:style-name="P398"><text:span text:style-name="T2795"/><text:span text:style-name="T2796"/></text:p>
      <text:p text:style-name="P399"><text:span>Dynamic Validation Shard Size entails the implementation of a sophisticated approach wherein the</text:span><text:span> number of nodes chosen within the network to operate the consensus, known as Representative Shard, can be dynamically adjusted in response to variations in transaction load and node distribution. This adaptability grants the blockchain network the ability</text:span><text:span text:style-name="T2797"><text:s/></text:span><text:span>to</text:span><text:span text:style-name="T2798"><text:s/></text:span><text:span>uphold</text:span><text:span text:style-name="T2799"><text:s/></text:span><text:span>optimal</text:span><text:span text:style-name="T2800"><text:s/></text:span><text:span>performance</text:span><text:span text:style-name="T2801"><text:s/></text:span><text:span>levels</text:span><text:span text:style-name="T2802"><text:s/></text:span><text:span>across</text:span><text:span text:style-name="T2803"><text:s/></text:span><text:span>a</text:span><text:span text:style-name="T2804"><text:s/></text:span><text:span>diverse</text:span><text:span text:style-name="T2805"><text:s/></text:span><text:span>range</text:span><text:span text:style-name="T2806"><text:s/></text:span><text:span>of</text:span><text:span text:style-name="T2807"><text:s/></text:span><text:span>conditions,</text:span><text:span text:style-name="T2808"><text:s/></text:span><text:span>spanning from scenarios of low to high transactional demand.</text:span><text:span/></text:p>
      <text:p text:style-name="P400"><text:span text:style-name="T2809"/><text:span text:style-name="T2810"/></text:p>
      <text:p text:style-name="P401"><text:span/><text:bookmark-start text:name="Design_and_Mechanism_"/><text:span/><text:bookmark-end text:name="Design_and_Mechanism_"/><text:span text:style-name="T2811">Design</text:span><text:span text:style-name="T2812"><text:s/></text:span><text:span text:style-name="T2813">and</text:span><text:span text:style-name="T2814"><text:s/></text:span><text:span text:style-name="T2815">Mechanism</text:span><text:span/></text:p>
      <text:p text:style-name="P402"><text:span text:style-name="T2816"/><text:span text:style-name="T2817"/></text:p>
      <text:list text:style-name="WWNum13" text:continue-numbering="true">
        <text:list-item>
          <text:p text:style-name="P403"><text:span text:style-name="T2818">Choosing a Representative Shard: </text:span><text:span text:style-name="T2819"/><text:span text:style-name="T2820">each time a consensus cycle is completed by the validation shard</text:span><text:span text:style-name="T2821">, the Demos blockchain utilizes a deterministic</text:span><text:span text:style-name="T2822"><text:s/></text:span><text:span text:style-name="T2823">algorithm</text:span><text:span text:style-name="T2824"><text:s/></text:span><text:span text:style-name="T2825">that</text:span><text:span text:style-name="T2826"><text:s/></text:span><text:span text:style-name="T2827">returns</text:span><text:span text:style-name="T2828"><text:s/></text:span><text:span text:style-name="T2829">the</text:span><text:span text:style-name="T2830"><text:s/></text:span><text:span text:style-name="T2831">same</text:span><text:span text:style-name="T2832"><text:s/></text:span><text:span text:style-name="T2833">exact</text:span><text:span text:style-name="T2834"><text:s/></text:span><text:span text:style-name="T2835">result</text:span><text:span text:style-name="T2836"><text:s/></text:span><text:span text:style-name="T2837">on</text:span><text:span text:style-name="T2838"><text:s/></text:span><text:span text:style-name="T2839">all</text:span><text:span text:style-name="T2840"><text:s/></text:span><text:span text:style-name="T2841">the</text:span><text:span text:style-name="T2842"><text:s/></text:span><text:span text:style-name="T2843">nodes</text:span><text:span text:style-name="T2844"><text:s/></text:span><text:span text:style-name="T2845">that</text:span><text:span text:style-name="T2846"><text:s/></text:span><text:span text:style-name="T2847">have</text:span><text:span text:style-name="T2848"><text:s/></text:span><text:span text:style-name="T2849">the same data in their mempool and in their blockchain. This way, all the nodes are able to instantly know who the participants </text:span><text:span text:style-name="T2850">will be in the next Shard </text:span><text:span text:style-name="T2851">without any communication needed.</text:span><text:span/></text:p>
        </text:list-item>
      </text:list>
      <text:p text:style-name="P404"><text:span text:style-name="T2852"/><text:span text:style-name="T2853"/></text:p>
      <text:p text:style-name="P405"><text:span text:style-name="T2854"/><text:span text:style-name="T2855"/></text:p>
      <text:list text:style-name="WWNum13" text:continue-numbering="true">
        <text:list-item>
          <text:p text:style-name="P406"><text:span text:style-name="T2856">Parameters:</text:span><text:span text:style-name="T2857"><text:s/></text:span><text:span text:style-name="T2858">to</text:span><text:span text:style-name="T2859"><text:s/></text:span><text:span text:style-name="T2860">create</text:span><text:span text:style-name="T2861"><text:s/></text:span><text:span text:style-name="T2862">the</text:span><text:span text:style-name="T2863"><text:s/></text:span><text:span text:style-name="T2864">Representative</text:span><text:span text:style-name="T2865"><text:s/></text:span><text:span text:style-name="T2866">Shard,</text:span><text:span text:style-name="T2867"><text:s/></text:span><text:span text:style-name="T2868">parameters</text:span><text:span text:style-name="T2869"><text:s/></text:span><text:span text:style-name="T2870">based</text:span><text:span text:style-name="T2871"><text:s/></text:span><text:span text:style-name="T2872">on</text:span><text:span text:style-name="T2873"><text:s/></text:span><text:span text:style-name="T2874">the</text:span><text:span text:style-name="T2875"><text:s/></text:span><text:span text:style-name="T2876">chain</text:span><text:span text:style-name="T2877"><text:s/></text:span><text:span text:style-name="T2878">load, throughput, and specific conditions are enforced to determine the size of the Representative Shard.</text:span><text:span/></text:p>
        </text:list-item>
        <text:soft-page-break/>
      </text:list>
      <text:list>
        <text:list-item>
          <text:h text:outline-level="3" text:restart-numbering="0" text:is-list-header="0" text:style-name="P407"><text:span/><text:bookmark-start text:name="_Toc14"/><text:span/><text:span text:style-name="T2879">Recap</text:span><text:span/><text:bookmark-end text:name="_Toc14"/><text:span/><text:span/></text:h>
        </text:list-item>
      </text:list>
      <text:p text:style-name="P408"><text:span text:style-name="T2880"/><text:span text:style-name="T2881"/></text:p>
      <text:p text:style-name="P409"><text:span>The</text:span><text:span text:style-name="T2882"><text:s/></text:span><text:span>newly</text:span><text:span text:style-name="T2883"><text:s/></text:span><text:span>proposed</text:span><text:span text:style-name="T2884"><text:s/></text:span><text:span>blockchain</text:span><text:span text:style-name="T2885"><text:s/></text:span><text:span>consensus</text:span><text:span text:style-name="T2886"><text:s/></text:span><text:span>mechanism</text:span><text:span text:style-name="T2887"><text:s/></text:span><text:span>presents</text:span><text:span text:style-name="T2888"><text:s/></text:span><text:span>a</text:span><text:span text:style-name="T2889"><text:s/></text:span><text:span>robust,</text:span><text:span text:style-name="T2890"><text:s/></text:span><text:span>scalable,</text:span><text:span text:style-name="T2891"><text:s/></text:span><text:span>and innovative solution, integrating features of Global Change Registry (GCR),</text:span><text:span/></text:p>
      <text:p text:style-name="P410"><text:span>Proof-of-Representation with Byzantine Fault Tolerance (PoR-BFT), </text:span><text:span>Dynamic</text:span><text:span text:style-name="T2892"><text:s/></text:span><text:span>Validation</text:span><text:span text:style-name="T2893"><text:s/></text:span><text:span>Shard</text:span><text:span text:style-name="T2894"><text:s/></text:span><text:span>Size,</text:span><text:span text:style-name="T2895"><text:s/></text:span><text:span>and</text:span><text:span text:style-name="T2896"><text:s/></text:span><text:span>a</text:span><text:span text:style-name="T2897"><text:s/></text:span><text:span>secure</text:span><text:span text:style-name="T2898"><text:s/></text:span><text:span>Randomness</text:span><text:span text:style-name="T2899"><text:s/></text:span><text:span>Layer powered by a Common Validator Selection Algorithm (CVSA).</text:span><text:span/></text:p>
      <text:p text:style-name="P411"><text:span text:style-name="T2900"/><text:span text:style-name="T2901"/></text:p>
      <text:p text:style-name="P412"><text:span>Through GCR, the system efficiently manages transaction processing and data storage across</text:span><text:span text:style-name="T2902"><text:s/></text:span><text:span>various</text:span><text:span text:style-name="T2903"><text:s/></text:span><text:span>shards,</text:span><text:span text:style-name="T2904"><text:s/></text:span><text:span>enhancing</text:span><text:span text:style-name="T2905"><text:s/></text:span><text:span>scalability</text:span><text:span text:style-name="T2906"><text:s/></text:span><text:span>while</text:span><text:span text:style-name="T2907"><text:s/></text:span><text:span>ensuring</text:span><text:span text:style-name="T2908"><text:s/></text:span><text:span>a</text:span><text:span text:style-name="T2909"><text:s/></text:span><text:span>consistent</text:span><text:span text:style-name="T2910"><text:s/></text:span><text:span>view</text:span><text:span text:style-name="T2911"><text:s/></text:span><text:span>of</text:span><text:span text:style-name="T2912"><text:s/></text:span><text:span>the</text:span><text:span text:style-name="T2913"><text:s/></text:span><text:span>global </text:span><text:span text:style-name="T2914">state.</text:span><text:span/></text:p>
      <text:p text:style-name="P413"><text:span/><text:span/></text:p>
      <text:p text:style-name="P414"><text:span>The</text:span><text:span text:style-name="T2915"><text:s/></text:span><text:span>PoR-BFT</text:span><text:span text:style-name="T2916"><text:s/></text:span><text:span>consensus</text:span><text:span text:style-name="T2917"><text:s/></text:span><text:span>model</text:span><text:span text:style-name="T2918"><text:s/></text:span><text:span>integrates</text:span><text:span text:style-name="T2919"><text:s/></text:span><text:span>a</text:span><text:span text:style-name="T2920"><text:s/></text:span><text:span>Byzantine</text:span><text:span text:style-name="T2921"><text:s/></text:span><text:span>Fault</text:span><text:span text:style-name="T2922"><text:s/></text:span><text:span>Tolerance</text:span><text:span text:style-name="T2923"><text:s/></text:span><text:span>consensus</text:span><text:span text:style-name="T2924"><text:s/></text:span><text:span>within each Shard with a Proof-of-Representation mechanism for global block proposals, optimizing both intra-Shard and inter-Shard operations.</text:span><text:span/></text:p>
      <text:p text:style-name="P415"><text:span/><text:span/></text:p>
      <text:p text:style-name="P416"><text:span>Dynami</text:span><text:span>c Validation Shard Size enhances the system's adaptability, ensuring optimal performance and resource utilization regardless of network load. This, combined with the integration of a CVSA-powered Randomness Layer, ensures secure, verifiable, and consistent</text:span><text:span text:style-name="T2925"><text:s/></text:span><text:span>Shard </text:span><text:span>generation,</text:span><text:span text:style-name="T2926"><text:s/></text:span><text:span>further</text:span><text:span text:style-name="T2927"><text:s/></text:span><text:span>contributing</text:span><text:span text:style-name="T2928"><text:s/></text:span><text:span>to</text:span><text:span text:style-name="T2929"><text:s/></text:span><text:span>the</text:span><text:span text:style-name="T2930"><text:s/></text:span><text:span>network's</text:span><text:span text:style-name="T2931"><text:s/></text:span><text:span>robustness</text:span><text:span text:style-name="T2932"><text:s/></text:span><text:span>and</text:span><text:span text:style-name="T2933"><text:s/></text:span><text:span>security.</text:span><text:span/></text:p>
      <text:p text:style-name="P417"><text:span/><text:span/></text:p>
      <text:p text:style-name="P418"><text:span>CVSA</text:span><text:span text:style-name="T2934"><text:s/></text:span><text:span>provides</text:span><text:span text:style-name="T2935"><text:s/></text:span><text:span>an</text:span><text:span text:style-name="T2936"><text:s/></text:span><text:span>innovative</text:span><text:span text:style-name="T2937"><text:s/></text:span><text:span>approach</text:span><text:span text:style-name="T2938"><text:s/></text:span><text:span>to</text:span><text:span text:style-name="T2939"><text:s/></text:span><text:span>generating</text:span><text:span text:style-name="T2940"><text:s/></text:span><text:span>shared</text:span><text:span text:style-name="T2941"><text:s/></text:span><text:span>randomness</text:span><text:span text:style-name="T2942"><text:s/></text:span><text:span>that</text:span><text:span text:style-name="T2943"><text:s/></text:span><text:span>enables</text:span><text:span text:style-name="T2944"><text:s/></text:span><text:span>the system</text:span><text:span text:style-name="T2945"><text:s/></text:span><text:span>to</text:span><text:span text:style-name="T2946"><text:s/></text:span><text:span>maintain</text:span><text:span text:style-name="T2947"><text:s/></text:span><text:span>uniformity</text:span><text:span text:style-name="T2948"><text:s/></text:span><text:span>and</text:span><text:span text:style-name="T2949"><text:s/></text:span><text:span>fairness</text:span><text:span text:style-name="T2950"><text:s/></text:span><text:span>in</text:span><text:span text:style-name="T2951"><text:s/></text:span><text:span>the</text:span><text:span text:style-name="T2952"><text:s/></text:span><text:span>node</text:span><text:span text:style-name="T2953"><text:s/></text:span><text:span>distribution</text:span><text:span text:style-name="T2954"><text:s/></text:span><text:span>and</text:span><text:span text:style-name="T2955"><text:s/></text:span><text:span>workload</text:span><text:span text:style-name="T2956"><text:s/></text:span><text:span>allocation, further enhancing the network's scalability.</text:span><text:span/></text:p>
      <text:p text:style-name="P419"><text:span/><text:span/></text:p>
      <text:p text:style-name="P420"><text:span>This novel blockchain system design showcases the potential of integrating various advanced concepts and technologies in building a blockchain network that is not only secure,</text:span><text:span text:style-name="T2957"><text:s/></text:span><text:span>robust,</text:span><text:span text:style-name="T2958"><text:s/></text:span><text:span>and</text:span><text:span text:style-name="T2959"><text:s/></text:span><text:span>efficient</text:span><text:span text:style-name="T2960"><text:s/></text:span><text:span>but</text:span><text:span text:style-name="T2961"><text:s/></text:span><text:span>also</text:span><text:span text:style-name="T2962"><text:s/></text:span><text:span>highly</text:span><text:span text:style-name="T2963"><text:s/></text:span><text:span>scalable</text:span><text:span text:style-name="T2964"><text:s/></text:span><text:span>and</text:span><text:span text:style-name="T2965"><text:s/></text:span><text:span>adaptable</text:span><text:span text:style-name="T2966"><text:s/></text:span><text:span>to</text:span><text:span text:style-name="T2967"><text:s/></text:span><text:span>varying</text:span><text:span text:style-name="T2968"><text:s/></text:span><text:span>network </text:span><text:span text:style-name="T2969">conditions.</text:span><text:span/></text:p>
      <text:list>
        <text:list-item>
          <text:h text:outline-level="2" text:restart-numbering="0" text:is-list-header="0" text:style-name="P421"><text:span/><text:bookmark-start text:name="_Toc15"/><text:span/><text:span/><text:bookmark-start text:name="The_Importance_of_Being_Futureproof:_Pos"/><text:span/><text:bookmark-end text:name="The_Importance_of_Being_Futureproof:_Pos"/><text:span>The</text:span><text:span text:style-name="T2970"><text:s/></text:span><text:span>Importance</text:span><text:span text:style-name="T2971"><text:s/></text:span><text:span>of</text:span><text:span text:style-name="T2972"><text:s/></text:span><text:span>Being</text:span><text:span text:style-name="T2973"><text:s/></text:span><text:span>Futureproof:</text:span><text:span text:style-name="T2974"><text:s/></text:span><text:span>Post</text:span><text:span text:style-name="T2975"><text:s/></text:span><text:span>Quantum </text:span><text:span text:style-name="T2976">Cryptography</text:span><text:span/><text:bookmark-end text:name="_Toc15"/><text:span/><text:span/></text:h>
        </text:list-item>
      </text:list>
      <text:p text:style-name="P422"><text:span text:style-name="T2977"/><text:span text:style-name="T2978"/></text:p>
      <text:p text:style-name="P423"><text:span>Blockchains depend heavily on cryptography to ensure a robust level of security while handling</text:span><text:span text:style-name="T2979"><text:s/></text:span><text:span>highly</text:span><text:span text:style-name="T2980"><text:s/></text:span><text:span>sensitive</text:span><text:span text:style-name="T2981"><text:s/></text:span><text:span>information.</text:span><text:span text:style-name="T2982"><text:s/></text:span><text:span>For</text:span><text:span text:style-name="T2983"><text:s/></text:span><text:span>an</text:span><text:span text:style-name="T2984"><text:s/></text:span><text:span>algorithm</text:span><text:span text:style-name="T2985"><text:s/></text:span><text:span>to</text:span><text:span text:style-name="T2986"><text:s/></text:span><text:span>be</text:span><text:span text:style-name="T2987"><text:s/></text:span><text:span>considered</text:span><text:span text:style-name="T2988"><text:s/></text:span><text:span>secure,</text:span><text:span text:style-name="T2989"><text:s/></text:span><text:span>it</text:span><text:span text:style-name="T2990"><text:s/></text:span><text:span>must stand the test of time, a criterion met by widely used algorithms such as ed25519 and </text:span><text:span text:style-name="T2991">RSA.</text:span><text:span/></text:p>
      <text:p text:style-name="P424"><text:span>These algorithms are particularly favored for their implementation in user-friendly environments.</text:span><text:span text:style-name="T2992"><text:s/></text:span><text:span>However,</text:span><text:span text:style-name="T2993"><text:s/></text:span><text:span>the</text:span><text:span text:style-name="T2994"><text:s/></text:span><text:span>ability</text:span><text:span text:style-name="T2995"><text:s/></text:span><text:span>to</text:span><text:span text:style-name="T2996"><text:s/></text:span><text:span>withstand</text:span><text:span text:style-name="T2997"><text:s/></text:span><text:span>the</text:span><text:span text:style-name="T2998"><text:s/></text:span><text:span>test</text:span><text:span text:style-name="T2999"><text:s/></text:span><text:span>of</text:span><text:span text:style-name="T3000"><text:s/></text:span><text:span>time</text:span><text:span text:style-name="T3001"><text:s/></text:span><text:span>is</text:span><text:span text:style-name="T3002"><text:s/></text:span><text:span>not</text:span><text:span text:style-name="T3003"><text:s/></text:span><text:span>infinite</text:span><text:span text:style-name="T3004"><text:s/></text:span><text:span>for</text:span><text:span text:style-name="T3005"><text:s/></text:span><text:span>ed25519 and RSA, and this limitation applies to blockchains that utilize different, often weaker, algorithms as well.</text:span><text:span/></text:p>
      <text:p text:style-name="P425"><text:span>The emerging field of quantum computing poses a significant challenge. Quantum processors,</text:span><text:span text:style-name="T3006"><text:s/></text:span><text:span>while</text:span><text:span text:style-name="T3007"><text:s/></text:span><text:span>not</text:span><text:span text:style-name="T3008"><text:s/></text:span><text:span>yet</text:span><text:span text:style-name="T3009"><text:s/></text:span><text:span>consumer-grade,</text:span><text:span text:style-name="T3010"><text:s/></text:span><text:span>have</text:span><text:span text:style-name="T3011"><text:s/></text:span><text:span>already</text:span><text:span text:style-name="T3012"><text:s/></text:span><text:span>shown</text:span><text:span text:style-name="T3013"><text:s/></text:span><text:span>substantial</text:span><text:span text:style-name="T3014"><text:s/></text:span><text:span>improvements in efficiency and computational power. The advent of quantum computing becoming accessible to the general public, or at least to a well-connected subset, is not far off.</text:span><text:span/></text:p>
      <text:p text:style-name="P426"><text:span>So,</text:span><text:span text:style-name="T3015"><text:s/></text:span><text:span>what</text:span><text:span text:style-name="T3016"><text:s/></text:span><text:span>is</text:span><text:span text:style-name="T3017"><text:s/></text:span><text:span>the</text:span><text:span text:style-name="T3018"><text:s/></text:span><text:span>solution</text:span><text:span text:style-name="T3019"><text:s/></text:span><text:span>if</text:span><text:span text:style-name="T3020"><text:s/></text:span><text:span>even</text:span><text:span text:style-name="T3021"><text:s/></text:span><text:span>the</text:span><text:span text:style-name="T3022"><text:s/></text:span><text:span>most</text:span><text:span text:style-name="T3023"><text:s/></text:span><text:span>secure</text:span><text:span text:style-name="T3024"><text:s/></text:span><text:span>algorithms</text:span><text:span text:style-name="T3025"><text:s/></text:span><text:span>may</text:span><text:span text:style-name="T3026"><text:s/></text:span><text:span>eventually</text:span><text:span text:style-name="T3027"><text:s/></text:span><text:span>fail?</text:span><text:span text:style-name="T3028"><text:s/></text:span><text:span>The National Institute of Standards and Technology (NIST) is actively encouraging the development of quantum-resistant cryptography. They regularly publish a list of recommended algorithms for public study.</text:span><text:span/></text:p>
      <text:p text:style-name="P427"><text:span>Demos, designed to withstand this issue, is capable of switching its cryptography and hashing</text:span><text:span text:style-name="T3029"><text:s/></text:span><text:span>modules</text:span><text:span text:style-name="T3030"><text:s/></text:span><text:span>to</text:span><text:span text:style-name="T3031"><text:s/></text:span><text:span>entirely</text:span><text:span text:style-name="T3032"><text:s/></text:span><text:span>new</text:span><text:span text:style-name="T3033"><text:s/></text:span><text:span>algorithms</text:span><text:span text:style-name="T3034"><text:s/></text:span><text:span>upon</text:span><text:span text:style-name="T3035"><text:s/></text:span><text:span>consensus.</text:span><text:span text:style-name="T3036"><text:s/></text:span><text:span>Post</text:span><text:span text:style-name="T3037"><text:s/></text:span><text:span>Quantum</text:span><text:span text:style-name="T3038"><text:s/></text:span><text:span>Cryptography modules are already integrat</text:span><text:span>ed into the Demos source code, awaiting activation or updates. While we are actively testing and verifying highly regarded algorithms such as Lattice-based solutions, the Demos network is designed to continuously update its "backup" algorithms.</text:span><text:span/></text:p>
      <text:p text:style-name="P428"><text:span>Demos</text:span><text:span text:style-name="T3039"><text:s/></text:span><text:span>Network</text:span><text:span text:style-name="T3040"><text:s/></text:span><text:span>specifies</text:span><text:span text:style-name="T3041"><text:s/></text:span><text:span>and</text:span><text:span text:style-name="T3042"><text:s/></text:span><text:span>ships</text:span><text:span text:style-name="T3043"><text:s/></text:span><text:span>additional</text:span><text:span text:style-name="T3044"><text:s/></text:span><text:span>cryptography</text:span><text:span text:style-name="T3045"><text:s/></text:span><text:span>modules</text:span><text:span text:style-name="T3046"><text:s/></text:span><text:span>exposing</text:span><text:span text:style-name="T3047"><text:s/></text:span><text:span>the</text:span><text:span text:style-name="T3048"><text:s/></text:span><text:span>exact same interfaces as the default modules.</text:span><text:span/></text:p>
      <text:p text:style-name="P429"><text:span text:style-name="T3049"/><text:span text:style-name="T3050"/><text:span>Demos supports both ed25519 and RSA for identity management and encryption</text:span><text:span text:style-name="T3051">.</text:span><text:span text:style-name="T3052"/><text:span text:style-name="T3053"><text:s/></text:span><text:span>Those</text:span><text:span text:style-name="T3054"><text:s/></text:span><text:span>algorithms</text:span><text:span text:style-name="T3055"><text:s/></text:span><text:span>are</text:span><text:span text:style-name="T3056"><text:s/></text:span><text:span>more</text:span><text:span text:style-name="T3057"><text:s/></text:span><text:span>than</text:span><text:span text:style-name="T3058"><text:s/></text:span><text:span>battle</text:span><text:span text:style-name="T3059"><text:s/></text:span><text:span>proven</text:span><text:span text:style-name="T3060"><text:s/></text:span><text:span>but</text:span><text:span text:style-name="T3061"><text:s/></text:span><text:span>they</text:span><text:span text:style-name="T3062"><text:s/></text:span><text:span>are</text:span><text:span text:style-name="T3063"><text:s/></text:span><text:span>not</text:span><text:span text:style-name="T3064"><text:s/></text:span><text:span>guaranteed against Quantum attacks.</text:span><text:span text:style-name="T3065"/><text:span/></text:p>
      <text:p text:style-name="P430"><text:span>That’s why Demos specifications are constantly updated to reflect the cutting edge algorithms</text:span><text:span text:style-name="T3066"><text:s/></text:span><text:span>available</text:span><text:span text:style-name="T3067"><text:s/></text:span><text:span>for</text:span><text:span text:style-name="T3068"><text:s/></text:span><text:span>implementation.</text:span><text:span text:style-name="T3069"><text:s/></text:span><text:span>If,</text:span><text:span text:style-name="T3070"><text:s/></text:span><text:span>in</text:span><text:span text:style-name="T3071"><text:s/></text:span><text:span>any</text:span><text:span text:style-name="T3072"><text:s/></text:span><text:span>moment,</text:span><text:span text:style-name="T3073"><text:s/></text:span><text:span>the</text:span><text:span text:style-name="T3074"><text:s/></text:span><text:span>Network</text:span><text:span text:style-name="T3075"><text:s/></text:span><text:span>should</text:span><text:span text:style-name="T3076"><text:s/></text:span><text:span>be</text:span><text:span text:style-name="T3077"><text:s/></text:span><text:span>in</text:span><text:span text:style-name="T3078"><text:s/></text:span><text:span>need of using those algorithms, through the usual consensus they can be used as drop-in replacements without any downtime or compatibility issue.</text:span><text:span/></text:p>
      <text:p text:style-name="P431"><text:span text:style-name="T3079"/><text:span>Demos currently implements a system named Unified Cryptography, which provides easy-to-use APIs for developers and users, enabling the seamless utilization of various cryptographic schemes. Leveraging clear specifications, Demos nodes can determine the app</text:span><text:span>ropriate cryptographic scheme based on the client's requirements (whether a dApp or a developer).</text:span><text:span text:style-name="T3080"/><text:span text:style-name="T3081"/></text:p>
      <text:p text:style-name="P432"><text:span>The Post-Quantum Cryptography (PQC) Module is perhaps the best example of how modularity</text:span><text:span text:style-name="T3082"><text:s/></text:span><text:span>can</text:span><text:span text:style-name="T3083"><text:s/></text:span><text:span>benefit</text:span><text:span text:style-name="T3084"><text:s/></text:span><text:span>a</text:span><text:span text:style-name="T3085"><text:s/></text:span><text:span>blockchain</text:span><text:span text:style-name="T3086"> in such a context</text:span><text:span>,</text:span><text:span text:style-name="T3087"><text:s/></text:span><text:span>whilst</text:span><text:span text:style-name="T3088"><text:s/></text:span><text:span>also</text:span><text:span text:style-name="T3089"><text:s/></text:span><text:span>allowing</text:span><text:span text:style-name="T3090"><text:s/></text:span><text:span>us</text:span><text:span text:style-name="T3091"><text:s/></text:span><text:span>to</text:span><text:span text:style-name="T3092"><text:s/></text:span><text:span>delve</text:span><text:span text:style-name="T3093"><text:s/></text:span><text:span>deeper</text:span><text:span text:style-name="T3094"><text:s/></text:span><text:span>into</text:span><text:span text:style-name="T3095"><text:s/></text:span><text:span>this</text:span><text:span text:style-name="T3096"><text:s/></text:span><text:span>aspect of blockchain development.</text:span><text:span/></text:p>
      <text:list>
        <text:list-item>
          <text:h text:outline-level="3" text:restart-numbering="0" text:is-list-header="0" text:style-name="P433"><text:span/><text:bookmark-start text:name="_Toc16"/><text:span/><text:span>The</text:span><text:span text:style-name="T3097"><text:s/></text:span><text:span>Demos</text:span><text:span text:style-name="T3098"><text:s/></text:span><text:span>PQC</text:span><text:span text:style-name="T3099"><text:s/></text:span><text:span text:style-name="T3100">Stack</text:span><text:span/><text:bookmark-end text:name="_Toc16"/><text:span/><text:span/></text:h>
        </text:list-item>
      </text:list>
      <text:p text:style-name="P434"><text:span text:style-name="T3101"/><text:span text:style-name="T3102"/></text:p>
      <text:p text:style-name="P435"><text:span text:style-name="T3103">T</text:span><text:span>he Demos Network specifications, inherently dynamic due to ongoing research in the Post-Quantum Cryptography (PQC) field, present a selection of algorithms balancing efficiency and security. We support state-of-the-art algorithms by closely adhering to NIS</text:span><text:span>T recommendations.</text:span><text:span text:style-name="T3104"/><text:span/></text:p>
      <text:p text:style-name="P436"><text:span/><text:span/></text:p>
      <text:p text:style-name="P437"><text:span text:style-name="T3105">The chosen algorithms are:</text:span><text:span text:style-name="T3106"/></text:p>
      <text:list text:style-name="WWNum23" text:continue-numbering="true">
        <text:list-item>
          <text:p text:style-name="P438"><text:span text:style-name="T3107">ML-DSA</text:span><text:span text:style-name="T3108"/></text:p>
        </text:list-item>
        <text:list-item>
          <text:p text:style-name="P439"><text:span text:style-name="T3109">Falcon</text:span><text:span text:style-name="T3110"/></text:p>
        </text:list-item>
        <text:list-item>
          <text:p text:style-name="P440"><text:span text:style-name="T3111">ML-KEM with AES</text:span><text:span text:style-name="T3112"/></text:p>
        </text:list-item>
      </text:list>
      <text:p text:style-name="P441"><text:span/><text:span/></text:p>
      <text:p text:style-name="P442"><text:span text:style-name="T3113">Each one serves a specific purpose.</text:span><text:span text:style-name="T3114"/></text:p>
      <text:p text:style-name="P443"><text:span/><text:span/></text:p>
      <text:list>
        <text:list-item>
          <text:p text:style-name="P444"><text:span/><text:bookmark-start text:name="_Toc17"/><text:span/><text:span text:style-name="T3115">ML-DSA</text:span><text:span/><text:bookmark-end text:name="_Toc17"/><text:span/><text:span text:style-name="T3116"/></text:p>
        </text:list-item>
        <text:list-item>
          <text:p text:style-name="P445"><text:span/><text:span/></text:p>
        </text:list-item>
      </text:list>
      <text:p text:style-name="P446"><text:span/><text:bookmark-start text:name="_Toc18"/><text:span>The ml-dsa, a digital signature scheme, is the module-lattice (ml) based algorithm known as Dilithium. Demos implements the ml-dsa-65 variant, which includes the following features:</text:span><text:span/><text:bookmark-end text:name="_Toc18"/><text:span/><text:span text:style-name="T3117"/></text:p>
      <text:p text:style-name="P447"><text:span text:style-name="T3118"/><text:span text:style-name="T3119"/></text:p>
      <table:table table:style-name="ta1">
        <table:table-columns>
          <table:table-column table:style-name="co1"/>
          <table:table-column table:style-name="co2"/>
          <table:table-column table:style-name="co3"/>
        </table:table-columns>
        <table:table-header-columns/>
        <table:table-row table:style-name="ro1" table:default-cell-style-name="ce1">
          <table:table-cell table:style-name="ce2">
            <text:p text:style-name="P448"><text:span/><text:bookmark-start text:name="_Toc19"/><text:span text:style-name="T3120">Public Key Size (Bytes)</text:span><text:span/><text:bookmark-end text:name="_Toc19"/><text:span/><text:span text:style-name="T3121"/></text:p>
          </table:table-cell>
          <table:table-cell table:style-name="ce3">
            <text:p text:style-name="P449"><text:span/><text:bookmark-start text:name="_Toc20"/><text:span text:style-name="T3122">Private Key Size (Bytes)</text:span><text:span/><text:bookmark-end text:name="_Toc20"/><text:span/><text:span text:style-name="T3123"/></text:p>
          </table:table-cell>
          <table:table-cell table:style-name="ce4">
            <text:p text:style-name="P450"><text:span/><text:bookmark-start text:name="_Toc21"/><text:span text:style-name="T3124">Signature Size (Bytes)</text:span><text:span/><text:bookmark-end text:name="_Toc21"/><text:span/><text:span text:style-name="T3125"/></text:p>
          </table:table-cell>
        </table:table-row>
        <table:table-row table:style-name="ro2" table:default-cell-style-name="ce1">
          <table:table-cell table:style-name="ce5">
            <text:p text:style-name="P451"><text:span/><text:bookmark-start text:name="_Toc22"/><text:span text:style-name="T3126">1952</text:span><text:span/><text:bookmark-end text:name="_Toc22"/><text:span/><text:span text:style-name="T3127"/></text:p>
          </table:table-cell>
          <table:table-cell table:style-name="ce6">
            <text:p text:style-name="P452"><text:span/><text:bookmark-start text:name="_Toc23"/><text:span text:style-name="T3128">4032</text:span><text:span/><text:bookmark-end text:name="_Toc23"/><text:span/><text:span text:style-name="T3129"/></text:p>
          </table:table-cell>
          <table:table-cell table:style-name="ce7">
            <text:p text:style-name="P453"><text:span/><text:bookmark-start text:name="_Toc24"/><text:span text:style-name="T3130">3309</text:span><text:span/><text:bookmark-end text:name="_Toc24"/><text:span/><text:span text:style-name="T3131"/></text:p>
          </table:table-cell>
        </table:table-row>
      </table:table>
      <text:p text:style-name="P454"><text:span/><text:span/></text:p>
      <text:p text:style-name="P455"><text:span/><text:bookmark-start text:name="_Toc25"/><text:span>This schema targets level 3 of NIST recommendations.</text:span><text:span/><text:bookmark-end text:name="_Toc25"/><text:span/><text:span/></text:p>
      <text:p text:style-name="P456"><text:span/><text:span/></text:p>
      <text:p text:style-name="P457"><text:span/><text:bookmark-start text:name="_Toc26"/><text:span text:style-name="T3132">You can read more about ml-dsa at </text:span><text:span text:style-name="T3133"/><text:a xlink:href="https://openquantumsafe.org/liboqs/algorithms/sig/ml-dsa.html" xlink:type="simple"><text:span text:style-name="T3134">https://openquantumsafe.org/liboqs/algorithms/sig/ml-dsa.html</text:span><text:span text:style-name="T3135"/></text:a><text:span text:style-name="T3136"><text:s/></text:span><text:span/><text:bookmark-end text:name="_Toc26"/><text:span/><text:span/></text:p>
      <text:list>
        <text:list-item>
          <text:p text:style-name="P458"><text:span/><text:span/></text:p>
        </text:list-item>
        <text:list-item>
          <text:p text:style-name="P459"><text:span/><text:bookmark-start text:name="_Toc27"/><text:span text:style-name="T3137">Falcon</text:span><text:span/><text:bookmark-end text:name="_Toc27"/><text:span/><text:span text:style-name="T3138"/></text:p>
        </text:list-item>
        <text:list-item>
          <text:p text:style-name="P460"><text:span/><text:span/></text:p>
        </text:list-item>
      </text:list>
      <text:p text:style-name="P461"><text:span text:style-name="T3139"/><text:span>Falcon, another digital signature scheme, is distinguished by its smaller key and signature sizes relative to ml-dsa. Although it offers a marginally reduced level of post-quantum security, it is still deemed adequate. Demos implements Falcon-512, incorpor</text:span><text:span>ating the following features</text:span><text:span text:style-name="T3140">:</text:span><text:span/></text:p>
      <text:p text:style-name="P462"><text:span/><text:span/></text:p>
      <table:table table:style-name="ta2">
        <table:table-columns>
          <table:table-column table:style-name="co4"/>
          <table:table-column table:style-name="co5"/>
          <table:table-column table:style-name="co6"/>
        </table:table-columns>
        <table:table-header-columns/>
        <table:table-row table:style-name="ro3" table:default-cell-style-name="ce8">
          <table:table-cell table:style-name="ce9">
            <text:p text:style-name="P463"><text:span text:style-name="T3141">Public Key Size (Bytes)</text:span><text:span text:style-name="T3142"/></text:p>
          </table:table-cell>
          <table:table-cell table:style-name="ce10">
            <text:p text:style-name="P464"><text:span text:style-name="T3143">Private Key Size (Bytes)</text:span><text:span text:style-name="T3144"/></text:p>
          </table:table-cell>
          <table:table-cell table:style-name="ce11">
            <text:p text:style-name="P465"><text:span text:style-name="T3145">Signature Size (Bytes)</text:span><text:span text:style-name="T3146"/></text:p>
          </table:table-cell>
        </table:table-row>
        <table:table-row table:style-name="ro4" table:default-cell-style-name="ce8">
          <table:table-cell table:style-name="ce12">
            <text:p text:style-name="P466"><text:span text:style-name="T3147">897</text:span><text:span text:style-name="T3148"/></text:p>
          </table:table-cell>
          <table:table-cell table:style-name="ce13">
            <text:p text:style-name="P467"><text:span text:style-name="T3149">1281</text:span><text:span text:style-name="T3150"/></text:p>
          </table:table-cell>
          <table:table-cell table:style-name="ce14">
            <text:p text:style-name="P468"><text:span text:style-name="T3151">752</text:span><text:span text:style-name="T3152"/></text:p>
          </table:table-cell>
        </table:table-row>
      </table:table>
      <text:p text:style-name="P469"><text:span/><text:span/></text:p>
      <text:p text:style-name="P470"><text:span text:style-name="T3153">This schema targets level 1 of NIST recommendations.</text:span><text:span text:style-name="T3154"/></text:p>
      <text:p text:style-name="P471"><text:span/><text:span/></text:p>
      <text:p text:style-name="P472"><text:span text:style-name="T3155">You can read more about Falcon at </text:span><text:span text:style-name="T3156"/><text:a xlink:href="https://openquantumsafe.org/liboqs/algorithms/sig/falcon.html" xlink:type="simple"><text:span text:style-name="T3157">https://openquantumsafe.org/liboqs/algorithms/sig/falcon.html</text:span><text:span text:style-name="T3158"/></text:a><text:span text:style-name="T3159"><text:s/></text:span><text:span text:style-name="T3160"/></text:p>
      <text:list>
        <text:list-item>
          <text:p text:style-name="P473"><text:span/><text:span/></text:p>
        </text:list-item>
      </text:list>
      <text:p text:style-name="P474"><text:span text:style-name="T3161"><text:soft-page-break/></text:span><text:span text:style-name="T3162"/></text:p>
      <text:list>
        <text:list-item>
          <text:p text:style-name="P475"><text:span/><text:bookmark-start text:name="_Toc28"/><text:span/><text:span text:style-name="T3163">ML-KEM with AES</text:span><text:span/><text:bookmark-end text:name="_Toc28"/><text:span/><text:span text:style-name="T3164"/></text:p>
        </text:list-item>
        <text:list-item>
          <text:p text:style-name="P476"><text:span/><text:span/></text:p>
        </text:list-item>
      </text:list>
      <text:p text:style-name="P477"><text:span/><text:bookmark-start text:name="_Toc29"/><text:span>The ml-kem is a Key Encapsulation Mechanism (KEM), a cryptographic scheme designed for secure key establishment. It provides a quantum-resistant method where a shared secret is securely encapsulated for a specific recipient using public-key cryptography. Th</text:span><text:span>is enables the communicating parties to establish a symmetric key for subsequent secure communications. Demos implements ml-kem-768 with the following features</text:span><text:span text:style-name="T3165">:</text:span><text:span/><text:bookmark-end text:name="_Toc29"/><text:span/><text:span text:style-name="T3166"/></text:p>
      <text:p text:style-name="P478"><text:span text:style-name="T3167"/><text:span text:style-name="T3168"/></text:p>
      <text:p text:style-name="P479"><text:span text:style-name="T3169"/><text:span text:style-name="T3170"/></text:p>
      <table:table table:style-name="ta3">
        <table:table-columns>
          <table:table-column table:style-name="co7"/>
          <table:table-column table:style-name="co8"/>
          <table:table-column table:style-name="co9"/>
          <table:table-column table:style-name="co10"/>
          <table:table-column table:style-name="co11"/>
        </table:table-columns>
        <table:table-header-columns/>
        <table:table-row table:style-name="ro5" table:default-cell-style-name="ce15">
          <table:table-cell table:style-name="ce16">
            <text:p text:style-name="P480"><text:span/><text:bookmark-start text:name="_Toc30"/><text:span text:style-name="T3171">Public Key</text:span><text:span/><text:bookmark-end text:name="_Toc30"/><text:span/><text:span text:style-name="T3172"/></text:p>
          </table:table-cell>
          <table:table-cell table:style-name="ce17">
            <text:p text:style-name="P481"><text:span/><text:bookmark-start text:name="_Toc31"/><text:span text:style-name="T3173">Private Key</text:span><text:span/><text:bookmark-end text:name="_Toc31"/><text:span/><text:span text:style-name="T3174"/></text:p>
          </table:table-cell>
          <table:table-cell table:style-name="ce18">
            <text:p text:style-name="P482"><text:span/><text:bookmark-start text:name="_Toc32"/><text:span text:style-name="T3175">Ciphertext</text:span><text:span/><text:bookmark-end text:name="_Toc32"/><text:span/><text:span text:style-name="T3176"/></text:p>
          </table:table-cell>
          <table:table-cell table:style-name="ce19">
            <text:p text:style-name="P483"><text:span/><text:bookmark-start text:name="_Toc33"/><text:span text:style-name="T3177">Shared Secret</text:span><text:span/><text:bookmark-end text:name="_Toc33"/><text:span/><text:span text:style-name="T3178"/></text:p>
          </table:table-cell>
          <table:table-cell table:style-name="ce20">
            <text:p text:style-name="P484"><text:span/><text:bookmark-start text:name="_Toc34"/><text:span text:style-name="T3179">Keypair Seed</text:span><text:span/><text:bookmark-end text:name="_Toc34"/><text:span/><text:span text:style-name="T3180"/></text:p>
          </table:table-cell>
        </table:table-row>
        <table:table-row table:style-name="ro6" table:default-cell-style-name="ce15">
          <table:table-cell table:style-name="ce21">
            <text:p text:style-name="P485"><text:span/><text:bookmark-start text:name="_Toc35"/><text:span>1184</text:span><text:span/><text:bookmark-end text:name="_Toc35"/><text:span/><text:span/></text:p>
          </table:table-cell>
          <table:table-cell table:style-name="ce22">
            <text:p text:style-name="P486"><text:span/><text:bookmark-start text:name="_Toc36"/><text:span>2400</text:span><text:span/><text:bookmark-end text:name="_Toc36"/><text:span/><text:span/></text:p>
          </table:table-cell>
          <table:table-cell table:style-name="ce23">
            <text:p text:style-name="P487"><text:span/><text:bookmark-start text:name="_Toc37"/><text:span>1088</text:span><text:span/><text:bookmark-end text:name="_Toc37"/><text:span/><text:span/></text:p>
          </table:table-cell>
          <table:table-cell table:style-name="ce24">
            <text:p text:style-name="P488"><text:span/><text:bookmark-start text:name="_Toc38"/><text:span>32</text:span><text:span/><text:bookmark-end text:name="_Toc38"/><text:span/><text:span/></text:p>
          </table:table-cell>
          <table:table-cell table:style-name="ce25">
            <text:p text:style-name="P489"><text:span/><text:bookmark-start text:name="_Toc39"/><text:span>64</text:span><text:span/><text:bookmark-end text:name="_Toc39"/><text:span/><text:span/></text:p>
          </table:table-cell>
        </table:table-row>
      </table:table>
      <text:p text:style-name="P490"><text:span/><text:span/></text:p>
      <text:p text:style-name="P491"><text:span/><text:bookmark-start text:name="_Toc40"/><text:span text:style-name="T3181">This schema targets level 3 of NIST recommendations.</text:span><text:span/><text:bookmark-end text:name="_Toc40"/><text:span/><text:span text:style-name="T3182"/></text:p>
      <text:p text:style-name="P492"><text:span/><text:span/></text:p>
      <text:p text:style-name="P493"><text:span/><text:bookmark-start text:name="_Toc41"/><text:span text:style-name="T3183">You can read more about ml-kem at </text:span><text:span text:style-name="T3184"/><text:a xlink:href="https://openquantumsafe.org/liboqs/algorithms/kem/ml-kem.html" xlink:type="simple"><text:span text:style-name="T3185">https://openquantumsafe.org/liboqs/algorithms/kem/ml-kem.html</text:span><text:span text:style-name="T3186"/></text:a><text:span text:style-name="T3187"><text:s/></text:span><text:span/><text:bookmark-end text:name="_Toc41"/><text:span/><text:span text:style-name="T3188"/></text:p>
      <text:p text:style-name="P494"><text:span/><text:span/></text:p>
      <text:p text:style-name="P495"><text:span/><text:bookmark-start text:name="_Toc42"/><text:span>To ensure data confidentiality, secrets established via ml-kem are utilized with the well-established AES algorithm for symmetric encryption.</text:span><text:span/><text:bookmark-end text:name="_Toc42"/><text:span/><text:span text:style-name="T3189"/></text:p>
      <text:list>
        <text:list-item>
          <text:h text:outline-level="2" text:restart-numbering="0" text:is-list-header="0" text:style-name="P496"><text:span/><text:bookmark-start text:name="_Toc43"/><text:span/><text:span>Demos </text:span><text:span text:style-name="T3190">Modularity</text:span><text:span/><text:bookmark-end text:name="_Toc43"/><text:span/><text:span/></text:h>
        </text:list-item>
      </text:list>
      <text:p text:style-name="P497"><text:span>As a highly dynamic blockchain with a growing number of integrations, features and contexts, the Demos network has been designed with modularity in mind since day </text:span><text:span text:style-name="T3191">0.</text:span><text:span/></text:p>
      <text:p text:style-name="P498"><text:span>Modularity is a broad concept and is often used as a synonym for "extensibility". While modules</text:span><text:span text:style-name="T3192"><text:s/></text:span><text:span>can</text:span><text:span text:style-name="T3193"><text:s/></text:span><text:span>certainly</text:span><text:span text:style-name="T3194"><text:s/></text:span><text:span>extend</text:span><text:span text:style-name="T3195"><text:s/></text:span><text:span>the</text:span><text:span text:style-name="T3196"><text:s/></text:span><text:span>capabilities</text:span><text:span text:style-name="T3197"><text:s/></text:span><text:span>of</text:span><text:span text:style-name="T3198"><text:s/></text:span><text:span>a</text:span><text:span text:style-name="T3199"><text:s/></text:span><text:span>network,</text:span><text:span text:style-name="T3200"><text:s/></text:span><text:span>it</text:span><text:span text:style-name="T3201"><text:s/></text:span><text:span>wouldn't</text:span><text:span text:style-name="T3202"><text:s/></text:span><text:span>be</text:span><text:span text:style-name="T3203"><text:s/></text:span><text:span>fair</text:span><text:span text:style-name="T3204"><text:s/></text:span><text:span>to</text:span><text:span text:style-name="T3205"><text:s/></text:span><text:span>exclude</text:span><text:span text:style-name="T3206"><text:s/></text:span><text:span>the other key benefit: maintainability.</text:span><text:span/></text:p>
      <text:p text:style-name="P499"><text:span>In</text:span><text:span text:style-name="T3207"><text:s/></text:span><text:span>the</text:span><text:span text:style-name="T3208"><text:s/></text:span><text:span>following</text:span><text:span text:style-name="T3209"><text:s/></text:span><text:span>paragraphs</text:span><text:span text:style-name="T3210"><text:s/></text:span><text:span>we</text:span><text:span text:style-name="T3211"><text:s/></text:span><text:span>will</text:span><text:span text:style-name="T3212"><text:s/></text:span><text:span>examine</text:span><text:span text:style-name="T3213"><text:s/></text:span><text:span>both,</text:span><text:span text:style-name="T3214"><text:s/></text:span><text:span>as</text:span><text:span text:style-name="T3215"><text:s/></text:span><text:span>they</text:span><text:span text:style-name="T3216"><text:s/></text:span><text:span>are</text:span><text:span text:style-name="T3217"><text:s/></text:span><text:span>defined</text:span><text:span text:style-name="T3218"><text:s/></text:span><text:span>in</text:span><text:span text:style-name="T3219"><text:s/></text:span><text:span>the</text:span><text:span text:style-name="T3220"><text:s/></text:span><text:span>Demos network specifications.</text:span><text:span/></text:p>
      <text:list>
        <text:list-item>
          <text:h text:outline-level="6" text:restart-numbering="0" text:is-list-header="0" text:style-name="P500"><text:span/><text:span/><text:span text:style-name="T3221">Extensibility</text:span><text:span/><text:span/><text:span/></text:h>
        </text:list-item>
      </text:list>
      <text:p text:style-name="P501"><text:span>The first consequence of modularity is of course extensibility. This means that every Demos</text:span><text:span text:style-name="T3222"><text:s/></text:span><text:span>client</text:span><text:span text:style-name="T3223"><text:s/></text:span><text:span>has</text:span><text:span text:style-name="T3224"><text:s/></text:span><text:span>to</text:span><text:span text:style-name="T3225"><text:s/></text:span><text:span>follow</text:span><text:span text:style-name="T3226"><text:s/></text:span><text:span>common</text:span><text:span text:style-name="T3227"><text:s/></text:span><text:span>and</text:span><text:span text:style-name="T3228"><text:s/></text:span><text:span>standard</text:span><text:span text:style-name="T3229"><text:s/></text:span><text:span>practices</text:span><text:span text:style-name="T3230"><text:s/></text:span><text:span>defined</text:span><text:span text:style-name="T3231"><text:s/></text:span><text:span>by</text:span><text:span text:style-name="T3232"><text:s/></text:span><text:span>the</text:span><text:span text:style-name="T3233"><text:s/></text:span><text:span>Network</text:span><text:span text:style-name="T3234"><text:s/></text:span><text:span>so</text:span><text:span text:style-name="T3235"><text:s/></text:span><text:span>that it can quickly update its features if requested.</text:span><text:span/></text:p>
      <text:p text:style-name="P502"><text:span>The</text:span><text:span text:style-name="T3236"><text:s/></text:span><text:span>Demos</text:span><text:span text:style-name="T3237"><text:s/></text:span><text:span>Network</text:span><text:span text:style-name="T3238"><text:s/></text:span><text:span>is</text:span><text:span text:style-name="T3239"><text:s/></text:span><text:span>able</text:span><text:span text:style-name="T3240"><text:s/></text:span><text:span>to,</text:span><text:span text:style-name="T3241"><text:s/></text:span><text:span>through</text:span><text:span text:style-name="T3242"><text:s/></text:span><text:span>consensus,</text:span><text:span text:style-name="T3243"><text:s/></text:span><text:span>insert</text:span><text:span text:style-name="T3244"><text:s/></text:span><text:span>or</text:span><text:span text:style-name="T3245"><text:s/></text:span><text:span>remove</text:span><text:span text:style-name="T3246"><text:s/></text:span><text:span>certain</text:span><text:span text:style-name="T3247"><text:s/></text:span><text:span>features.</text:span><text:span text:style-name="T3248"><text:s/></text:span><text:span>In that case, the consensus outcome must be followed so that the new features are both implemented and tested.</text:span><text:span/></text:p>
      <text:list>
        <text:list-item>
          <text:h text:outline-level="6" text:restart-numbering="0" text:is-list-header="0" text:style-name="P503"><text:span/><text:span/><text:span text:style-name="T3249">Maintainability</text:span><text:span/><text:span/><text:span/></text:h>
        </text:list-item>
      </text:list>
      <text:p text:style-name="P504"><text:span>The</text:span><text:span text:style-name="T3250"><text:s/></text:span><text:span>second</text:span><text:span text:style-name="T3251"><text:s/></text:span><text:span>but</text:span><text:span text:style-name="T3252"><text:s/></text:span><text:span>not</text:span><text:span text:style-name="T3253"><text:s/></text:span><text:span>less</text:span><text:span text:style-name="T3254"><text:s/></text:span><text:span>important</text:span><text:span text:style-name="T3255"><text:s/></text:span><text:span>consequence</text:span><text:span text:style-name="T3256"><text:s/></text:span><text:span>of</text:span><text:span text:style-name="T3257"><text:s/></text:span><text:span>modularity</text:span><text:span text:style-name="T3258"><text:s/></text:span><text:span>is</text:span><text:span text:style-name="T3259"><text:s/></text:span><text:span>maintainability.</text:span><text:span text:style-name="T3260"><text:s/></text:span><text:span>As</text:span><text:span text:style-name="T3261"><text:s/></text:span><text:span>stated above,</text:span><text:span text:style-name="T3262"><text:s/></text:span><text:span>the</text:span><text:span text:style-name="T3263"><text:s/></text:span><text:span>Demos</text:span><text:span text:style-name="T3264"><text:s/></text:span><text:span>Network</text:span><text:span text:style-name="T3265"><text:s/></text:span><text:span>is</text:span><text:span text:style-name="T3266"><text:s/></text:span><text:span>able</text:span><text:span text:style-name="T3267"><text:s/></text:span><text:span>to</text:span><text:span text:style-name="T3268"><text:s/></text:span><text:span>quickly</text:span><text:span text:style-name="T3269"><text:s/></text:span><text:span>propagate</text:span><text:span text:style-name="T3270"><text:s/></text:span><text:span>updates</text:span><text:span text:style-name="T3271"><text:s/></text:span><text:span>in</text:span><text:span text:style-name="T3272"><text:s/></text:span><text:span>a</text:span><text:span text:style-name="T3273"><text:s/></text:span><text:span>safe</text:span><text:span text:style-name="T3274"><text:s/></text:span><text:span>way,</text:span><text:span text:style-name="T3275"><text:s/></text:span><text:span>leveraging the blockchain’s consensus and traceability so that both patches and rollbacks are possible without hindering the network security.</text:span><text:span/></text:p>
      <text:list>
        <text:list-item>
          <text:h text:outline-level="2" text:restart-numbering="0" text:is-list-header="0" text:style-name="P505"><text:span/><text:bookmark-start text:name="_Toc44"/><text:span/><text:span/><text:bookmark-start text:name="On-chain_Web2_"/><text:span/><text:bookmark-end text:name="On-chain_Web2_"/><text:span>On-chain </text:span><text:span text:style-name="T3276">Web2</text:span><text:span/><text:bookmark-end text:name="_Toc44"/><text:span/><text:span/></text:h>
        </text:list-item>
      </text:list>
      <text:p text:style-name="P506"><text:span text:style-name="T3277"/><text:span text:style-name="T3278"/></text:p>
      <text:p text:style-name="P507"><text:span>The</text:span><text:span text:style-name="T3279"><text:s/></text:span><text:span>establishment</text:span><text:span text:style-name="T3280"><text:s/></text:span><text:span>of</text:span><text:span text:style-name="T3281"><text:s/></text:span><text:span>a</text:span><text:span text:style-name="T3282"><text:s/></text:span><text:span>seamless</text:span><text:span text:style-name="T3283"><text:s/></text:span><text:span>linkage</text:span><text:span text:style-name="T3284"><text:s/></text:span><text:span>between</text:span><text:span text:style-name="T3285"><text:s/></text:span><text:span>Web2</text:span><text:span text:style-name="T3286"><text:s/></text:span><text:span>and</text:span><text:span text:style-name="T3287"><text:s/></text:span><text:span>Web3</text:span><text:span text:style-name="T3288"><text:s/></text:span><text:span>serves</text:span><text:span text:style-name="T3289"><text:s/></text:span><text:span>as</text:span><text:span text:style-name="T3290"><text:s/></text:span><text:span>a</text:span><text:span text:style-name="T3291"><text:s/></text:span><text:span>crucial solution to a significant impediment hindering the emergence and flourishing of many projects and technologies.</text:span><text:span/></text:p>
      <text:p text:style-name="P508"><text:span/><text:span/></text:p>
      <text:p text:style-name="P509"><text:span>Demos</text:span><text:span text:style-name="T3292"><text:s/></text:span><text:span>Network</text:span><text:span text:style-name="T3293"><text:s/></text:span><text:span>leverages</text:span><text:span text:style-name="T3294"><text:s/></text:span><text:span>its</text:span><text:span text:style-name="T3295"><text:s/></text:span><text:span>decentralized</text:span><text:span text:style-name="T3296"><text:s/></text:span><text:span>structure</text:span><text:span text:style-name="T3297"><text:s/></text:span><text:span>and</text:span><text:span text:style-name="T3298"><text:s/></text:span><text:span>battle-proven</text:span><text:span text:style-name="T3299"><text:s/></text:span><text:span>cryptographic algorithms to provide seamless, native, and trustless access to Web2 resources from within blockchains.</text:span><text:span/></text:p>
      <text:p text:style-name="P510"><text:span text:style-name="T3300"/><text:span text:style-name="T3301"/></text:p>
      <text:list>
        <text:list-item>
          <text:h text:outline-level="3" text:restart-numbering="0" text:is-list-header="0" text:style-name="P511"><text:span/><text:bookmark-start text:name="_Toc45"/><text:span/><text:span>Design</text:span><text:span text:style-name="T3302"><text:s/></text:span><text:span>and</text:span><text:span text:style-name="T3303"><text:s/></text:span><text:span text:style-name="T3304">Mechanism</text:span><text:span/><text:bookmark-end text:name="_Toc45"/><text:span/><text:span/></text:h>
        </text:list-item>
      </text:list>
      <text:p text:style-name="P512"><text:span text:style-name="T3305"/><text:span text:style-name="T3306"/></text:p>
      <text:p text:style-name="P513"><text:span>At the core of Web2 i</text:span><text:span>ntegration, there is a specific endpoint available to dApps and clients that allows actors to ask for a specific resource such as an API, a GraphQL request or a plain HTTP(S) session. Once the RPC receives a correctly compiled request on the Web2 endpoint,</text:span><text:span text:style-name="T3307"><text:s/></text:span><text:span>it</text:span><text:span text:style-name="T3308"><text:s/></text:span><text:span>first</text:span><text:span text:style-name="T3309"><text:s/></text:span><text:span>validates</text:span><text:span text:style-name="T3310"><text:s/></text:span><text:span>the</text:span><text:span text:style-name="T3311"><text:s/></text:span><text:span>request</text:span><text:span text:style-name="T3312"><text:s/></text:span><text:span>by</text:span><text:span text:style-name="T3313"><text:s/></text:span><text:span>checking</text:span><text:span text:style-name="T3314"><text:s/></text:span><text:span>the</text:span><text:span text:style-name="T3315"><text:s/></text:span><text:span>hash</text:span><text:span text:style-name="T3316"><text:s/></text:span><text:span>of</text:span><text:span text:style-name="T3317"><text:s/></text:span><text:span>the</text:span><text:span text:style-name="T3318"><text:s/></text:span><text:span>request</text:span><text:span text:style-name="T3319"><text:s/></text:span><text:span>and</text:span><text:span text:style-name="T3320"><text:s/></text:span><text:span>its</text:span><text:span text:style-name="T3321"><text:s/></text:span><text:span>signature to ensure authenticity and integrity.</text:span><text:span/></text:p>
      <text:p text:style-name="P514"><text:span/><text:span/></text:p>
      <text:p text:style-name="P515"><text:span>It</text:span><text:span text:style-name="T3322"><text:s/></text:span><text:span>then</text:span><text:span text:style-name="T3323"><text:s/></text:span><text:span>creates</text:span><text:span text:style-name="T3324"><text:s/></text:span><text:span>an</text:span><text:span text:style-name="T3325"><text:s/></text:span><text:span>HTTP(S)</text:span><text:span text:style-name="T3326"><text:s/></text:span><text:span>proxy</text:span><text:span text:style-name="T3327"><text:s/></text:span><text:span>between</text:span><text:span text:style-name="T3328"><text:s/></text:span><text:span>the</text:span><text:span text:style-name="T3329"><text:s/></text:span><text:span>client</text:span><text:span text:style-name="T3330"><text:s/></text:span><text:span>and</text:span><text:span text:style-name="T3331"><text:s/></text:span><text:span>the</text:span><text:span text:style-name="T3332"><text:s/></text:span><text:span>requested</text:span><text:span text:style-name="T3333"><text:s/></text:span><text:span>resource,</text:span><text:span text:style-name="T3334"><text:s/></text:span><text:span>allowing direct communication between the two, while being able to monitor the communication process to ensure that no tampering or malicious actions have taken place.</text:span><text:span/></text:p>
      <text:p text:style-name="P516"><text:span/><text:span/></text:p>
      <text:p text:style-name="P517"><text:span>While the communication is in progress, the RPC can attest to its validity, integrity and legitimacy</text:span><text:span text:style-name="T3335"><text:s/></text:span><text:span>without</text:span><text:span text:style-name="T3336"><text:s/></text:span><text:span>having</text:span><text:span text:style-name="T3337"><text:s/></text:span><text:span>to</text:span><text:span text:style-name="T3338"><text:s/></text:span><text:span>decrypt</text:span><text:span text:style-name="T3339"><text:s/></text:span><text:span>the</text:span><text:span text:style-name="T3340"><text:s/></text:span><text:span>data</text:span><text:span text:style-name="T3341"><text:s/></text:span><text:span>it</text:span><text:span text:style-name="T3342"><text:s/></text:span><text:span>contains.</text:span><text:span text:style-name="T3343"><text:s/></text:span><text:span>In</text:span><text:span text:style-name="T3344"><text:s/></text:span><text:span>this</text:span><text:span text:style-name="T3345"><text:s/></text:span><text:span>way,</text:span><text:span text:style-name="T3346"><text:s/></text:span><text:span>even</text:span><text:span text:style-name="T3347"><text:s/></text:span><text:span>if</text:span><text:span text:style-name="T3348"><text:s/></text:span><text:span>a</text:span><text:span text:style-name="T3349"><text:s/></text:span><text:span>request</text:span><text:span text:style-name="T3350"><text:s/></text:span><text:span>is encrypted</text:span><text:span text:style-name="T3351"><text:s/></text:span><text:span>using</text:span><text:span text:style-name="T3352"><text:s/></text:span><text:span>HTTPS,</text:span><text:span text:style-name="T3353"><text:s/></text:span><text:span>the</text:span><text:span text:style-name="T3354"><text:s/></text:span><text:span>RPC</text:span><text:span text:style-name="T3355"><text:s/></text:span><text:span>is</text:span><text:span text:style-name="T3356"><text:s/></text:span><text:span>able</text:span><text:span text:style-name="T3357"><text:s/></text:span><text:span>to</text:span><text:span text:style-name="T3358"><text:s/></text:span><text:span>maintain</text:span><text:span text:style-name="T3359"><text:s/></text:span><text:span>the</text:span><text:span text:style-name="T3360"><text:s/></text:span><text:span>security</text:span><text:span text:style-name="T3361"><text:s/></text:span><text:span>of</text:span><text:span text:style-name="T3362"><text:s/></text:span><text:span>the</text:span><text:span text:style-name="T3363"><text:s/></text:span><text:span>communication channel without compromising the user's privacy.</text:span><text:span/></text:p>
      <text:p text:style-name="P518"><text:span/><text:span/></text:p>
      <text:p text:style-name="P519"><text:span>The employed hashing algorithm used to guarantee the cryptographic security of the communication channel is SHA256, and the signature method utilized is ed25519. This empowers</text:span><text:span text:style-name="T3364"><text:s/></text:span><text:span>the</text:span><text:span text:style-name="T3365"><text:s/></text:span><text:span>on-chain</text:span><text:span text:style-name="T3366"><text:s/></text:span><text:span>retrieval</text:span><text:span text:style-name="T3367"><text:s/></text:span><text:span>and</text:span><text:span text:style-name="T3368"><text:s/></text:span><text:span>provision</text:span><text:span text:style-name="T3369"><text:s/></text:span><text:span>of</text:span><text:span text:style-name="T3370"><text:s/></text:span><text:span>Web2</text:span><text:span text:style-name="T3371"><text:s/></text:span><text:span>data</text:span><text:span text:style-name="T3372"><text:s/></text:span><text:span>without</text:span><text:span text:style-name="T3373"><text:s/></text:span><text:span>reliance</text:span><text:span text:style-name="T3374"><text:s/></text:span><text:span>on</text:span><text:span text:style-name="T3375"><text:s/></text:span><text:span>external oracles or centralized solutions.</text:span><text:span/></text:p>
      <text:p text:style-name="P520"><text:span/><text:span/></text:p>
      <text:p text:style-name="P521"><text:span>While</text:span><text:span text:style-name="T3376"><text:s/></text:span><text:span>this</text:span><text:span text:style-name="T3377"><text:s/></text:span><text:span>mechanism</text:span><text:span text:style-name="T3378"><text:s/></text:span><text:span>is</text:span><text:span text:style-name="T3379"><text:s/></text:span><text:span>secure</text:span><text:span text:style-name="T3380"><text:s/></text:span><text:span>enough</text:span><text:span text:style-name="T3381"><text:s/></text:span><text:span>to</text:span><text:span text:style-name="T3382"><text:s/></text:span><text:span>be</text:span><text:span text:style-name="T3383"><text:s/></text:span><text:span>trusted,</text:span><text:span text:style-name="T3384"><text:s/></text:span><text:span>control</text:span><text:span text:style-name="T3385"><text:s/></text:span><text:span>mechanisms</text:span><text:span text:style-name="T3386"><text:s/></text:span><text:span>are</text:span><text:span text:style-name="T3387"><text:s/></text:span><text:span>in</text:span><text:span text:style-name="T3388"><text:s/></text:span><text:span>place</text:span><text:span text:style-name="T3389"><text:s/></text:span><text:span>to also ensure performance, error handling, and the resolution of specific exceptions that may occur during the integration of Web2 and Web3.</text:span><text:span/></text:p>
      <text:p text:style-name="P522"><text:span/><text:bookmark-start text:name="Securing_Web2_Context:_Data_Agnostic_HTT"/><text:span/><text:bookmark-end text:name="Securing_Web2_Context:_Data_Agnostic_HTT"/><text:span text:style-name="T3390">Securing</text:span><text:span text:style-name="T3391"><text:s/></text:span><text:span text:style-name="T3392">Web2</text:span><text:span text:style-name="T3393"><text:s/></text:span><text:span text:style-name="T3394">Context:</text:span><text:span text:style-name="T3395"><text:s/></text:span><text:span text:style-name="T3396">Data</text:span><text:span text:style-name="T3397"><text:s/></text:span><text:span text:style-name="T3398">Agnostic</text:span><text:span text:style-name="T3399"><text:s/></text:span><text:span text:style-name="T3400">HTTP(S)</text:span><text:span text:style-name="T3401"><text:s/></text:span><text:span text:style-name="T3402">Relay</text:span><text:span text:style-name="T3403"><text:s/></text:span><text:span text:style-name="T3404">Proxies</text:span><text:span/></text:p>
      <text:p text:style-name="P523"><text:span>To ensure a verifiable, robust and trustless way of accessing Web2 data on demand, the Demos</text:span><text:span text:style-name="T3405"><text:s/></text:span><text:span>network</text:span><text:span text:style-name="T3406"><text:s/></text:span><text:span>follows</text:span><text:span text:style-name="T3407"><text:s/></text:span><text:span>strict</text:span><text:span text:style-name="T3408"><text:s/></text:span><text:span>specifications</text:span><text:span text:style-name="T3409"><text:s/></text:span><text:span>to</text:span><text:span text:style-name="T3410"><text:s/></text:span><text:span>be</text:span><text:span text:style-name="T3411"><text:s/></text:span><text:span>able</text:span><text:span text:style-name="T3412"><text:s/></text:span><text:span>to</text:span><text:span text:style-name="T3413"><text:s/></text:span><text:span>build,</text:span><text:span text:style-name="T3414"><text:s/></text:span><text:span>spawn</text:span><text:span text:style-name="T3415"><text:s/></text:span><text:span>and</text:span><text:span text:style-name="T3416"><text:s/></text:span><text:span>control</text:span><text:span text:style-name="T3417"><text:s/></text:span><text:span>a</text:span><text:span text:style-name="T3418"><text:s/></text:span><text:span>chain of trust.</text:span><text:span/></text:p>
      <text:p text:style-name="P524"><text:span>This</text:span><text:span text:style-name="T3419"><text:s/></text:span><text:span>means</text:span><text:span text:style-name="T3420"><text:s/></text:span><text:span>that</text:span><text:span text:style-name="T3421"><text:s/></text:span><text:span>a</text:span><text:span text:style-name="T3422"><text:s/></text:span><text:span>Web2</text:span><text:span text:style-name="T3423"><text:s/></text:span><text:span>transaction</text:span><text:span text:style-name="T3424"><text:s/></text:span><text:span>follows</text:span><text:span text:style-name="T3425"><text:s/></text:span><text:span>a</text:span><text:span text:style-name="T3426"><text:s/></text:span><text:span>very</text:span><text:span text:style-name="T3427"><text:s/></text:span><text:span>rigorous</text:span><text:span text:style-name="T3428"><text:s/></text:span><text:span>workflow</text:span><text:span text:style-name="T3429"><text:s/></text:span><text:span>that</text:span><text:span text:style-name="T3430"><text:s/></text:span><text:span>is</text:span><text:span text:style-name="T3431"><text:s/></text:span><text:span>designed</text:span><text:span text:style-name="T3432"><text:s/></text:span><text:span>to avoid both data tampering and uncertainty.</text:span><text:span/></text:p>
      <text:p text:style-name="P525"><text:span>To</text:span><text:span text:style-name="T3433"><text:s/></text:span><text:span>better</text:span><text:span text:style-name="T3434"><text:s/></text:span><text:span>illustrate</text:span><text:span text:style-name="T3435"><text:s/></text:span><text:span>the</text:span><text:span text:style-name="T3436"><text:s/></text:span><text:span>above</text:span><text:span text:style-name="T3437"><text:s/></text:span><text:span>explanation,</text:span><text:span text:style-name="T3438"><text:s/></text:span><text:span>let’s</text:span><text:span text:style-name="T3439"><text:s/></text:span><text:span>examine</text:span><text:span text:style-name="T3440"><text:s/></text:span><text:span>the</text:span><text:span text:style-name="T3441"><text:s/></text:span><text:span>typical</text:span><text:span text:style-name="T3442"><text:s/></text:span><text:span>flow</text:span><text:span text:style-name="T3443"><text:s/></text:span><text:span>of</text:span><text:span text:style-name="T3444"><text:s/></text:span><text:span>a</text:span><text:span text:style-name="T3445"><text:s/></text:span><text:span>Web2 </text:span><text:span text:style-name="T3446">transaction:</text:span><text:span/></text:p>
      <text:list text:style-name="WWNum15" text:continue-numbering="true">
        <text:list-item>
          <text:p text:style-name="P526"><text:span text:style-name="T3447">The</text:span><text:span text:style-name="T3448"><text:s/></text:span><text:span text:style-name="T3449">client</text:span><text:span text:style-name="T3450"><text:s/></text:span><text:span text:style-name="T3451">produces</text:span><text:span text:style-name="T3452"><text:s/></text:span><text:span text:style-name="T3453">a</text:span><text:span text:style-name="T3454"><text:s/></text:span><text:span text:style-name="T3455">valid</text:span><text:span text:style-name="T3456"><text:s/></text:span><text:span text:style-name="T3457">Web2</text:span><text:span text:style-name="T3458"><text:s/></text:span><text:span text:style-name="T3459">transaction</text:span><text:span text:style-name="T3460"><text:s/></text:span><text:span text:style-name="T3461">and</text:span><text:span text:style-name="T3462"><text:s/></text:span><text:span text:style-name="T3463">sends</text:span><text:span text:style-name="T3464"><text:s/></text:span><text:span text:style-name="T3465">it</text:span><text:span text:style-name="T3466"><text:s/></text:span><text:span text:style-name="T3467">to</text:span><text:span text:style-name="T3468"><text:s/></text:span><text:span text:style-name="T3469">the</text:span><text:span text:style-name="T3470"><text:s/></text:span><text:span text:style-name="T3471">chosen</text:span><text:span text:style-name="T3472"><text:s/></text:span><text:span text:style-name="T3473">Demos </text:span><text:span text:style-name="T3474">RPC</text:span><text:span/></text:p>
        </text:list-item>
        <text:list-item>
          <text:p text:style-name="P527"><text:span text:style-name="T3475">The Demos RPC generates a dedicated DAHR </text:span><text:span text:style-name="T3476">(Data Agnostic HTTP(S) </text:span><text:span text:style-name="T3477">Relay)</text:span><text:span/></text:p>
        </text:list-item>
      </text:list>
      <text:p text:style-name="P528"><text:span text:style-name="T3478">Proxy</text:span><text:span/></text:p>
      <text:list text:style-name="WWNum15" text:continue-numbering="true">
        <text:list-item>
          <text:p text:style-name="P529"><text:span text:style-name="T3479">The</text:span><text:span text:style-name="T3480"><text:s/></text:span><text:span text:style-name="T3481">DAHR</text:span><text:span text:style-name="T3482"><text:s/></text:span><text:span text:style-name="T3483">proxy</text:span><text:span text:style-name="T3484"><text:s/></text:span><text:span text:style-name="T3485">is</text:span><text:span text:style-name="T3486"><text:s/></text:span><text:span text:style-name="T3487">presented</text:span><text:span text:style-name="T3488"><text:s/></text:span><text:span text:style-name="T3489">to</text:span><text:span text:style-name="T3490"><text:s/></text:span><text:span text:style-name="T3491">the</text:span><text:span text:style-name="T3492"><text:s/></text:span><text:span text:style-name="T3493">client,</text:span><text:span text:style-name="T3494"><text:s/></text:span><text:span text:style-name="T3495">which</text:span><text:span text:style-name="T3496"><text:s/></text:span><text:span text:style-name="T3497">uses</text:span><text:span text:style-name="T3498"><text:s/></text:span><text:span text:style-name="T3499">it</text:span><text:span text:style-name="T3500"><text:s/></text:span><text:span text:style-name="T3501">to</text:span><text:span text:style-name="T3502"><text:s/></text:span><text:span text:style-name="T3503">communicate</text:span><text:span text:style-name="T3504"><text:s/></text:span><text:span text:style-name="T3505">natively with the requested resource.</text:span><text:span/></text:p>
        </text:list-item>
        <text:list-item>
          <text:p text:style-name="P530"><text:span text:style-name="T3506">The</text:span><text:span text:style-name="T3507"><text:s/></text:span><text:span text:style-name="T3508">client</text:span><text:span text:style-name="T3509"><text:s/></text:span><text:span text:style-name="T3510">is</text:span><text:span text:style-name="T3511"><text:s/></text:span><text:span text:style-name="T3512">now</text:span><text:span text:style-name="T3513"><text:s/></text:span><text:span text:style-name="T3514">able</text:span><text:span text:style-name="T3515"><text:s/></text:span><text:span text:style-name="T3516">to</text:span><text:span text:style-name="T3517"><text:s/></text:span><text:span text:style-name="T3518">process</text:span><text:span text:style-name="T3519"><text:s/></text:span><text:span text:style-name="T3520">and</text:span><text:span text:style-name="T3521"><text:s/></text:span><text:span text:style-name="T3522">maintain</text:span><text:span text:style-name="T3523"><text:s/></text:span><text:span text:style-name="T3524">proper</text:span><text:span text:style-name="T3525"><text:s/></text:span><text:span text:style-name="T3526">communication</text:span><text:span text:style-name="T3527"><text:s/></text:span><text:span text:style-name="T3528">with</text:span><text:span text:style-name="T3529"><text:s/></text:span><text:span text:style-name="T3530">the Web2 resource without the classic limitations of an on-chain oracle.</text:span><text:span/></text:p>
        </text:list-item>
        <text:list-item>
          <text:p text:style-name="P531"><text:span text:style-name="T3531">At</text:span><text:span text:style-name="T3532"><text:s/></text:span><text:span text:style-name="T3533">the</text:span><text:span text:style-name="T3534"><text:s/></text:span><text:span text:style-name="T3535">same</text:span><text:span text:style-name="T3536"><text:s/></text:span><text:span text:style-name="T3537">time,</text:span><text:span text:style-name="T3538"><text:s/></text:span><text:span text:style-name="T3539">the</text:span><text:span text:style-name="T3540"><text:s/></text:span><text:span text:style-name="T3541">RPCs</text:span><text:span text:style-name="T3542"><text:s/></text:span><text:span text:style-name="T3543">monitor</text:span><text:span text:style-name="T3544"><text:s/></text:span><text:span text:style-name="T3545">this</text:span><text:span text:style-name="T3546"><text:s/></text:span><text:span text:style-name="T3547">communication</text:span><text:span text:style-name="T3548"><text:s/></text:span><text:span text:style-name="T3549">channel</text:span><text:span text:style-name="T3550"><text:s/></text:span><text:span text:style-name="T3551">by</text:span><text:span text:style-name="T3552"><text:s/></text:span><text:span text:style-name="T3553">observing</text:span><text:span text:style-name="T3554"><text:s/></text:span><text:span text:style-name="T3555">and certifying it without interfering.</text:span><text:span/></text:p>
        </text:list-item>
        <text:list-item>
          <text:p text:style-name="P532"><text:span text:style-name="T3556">In this way, the client not only receives the resource immediately, guaranteeing immediate</text:span><text:span text:style-name="T3557"><text:s/></text:span><text:span text:style-name="T3558">finality,</text:span><text:span text:style-name="T3559"><text:s/></text:span><text:span text:style-name="T3560">but</text:span><text:span text:style-name="T3561"><text:s/></text:span><text:span text:style-name="T3562">is</text:span><text:span text:style-name="T3563"><text:s/></text:span><text:span text:style-name="T3564">also</text:span><text:span text:style-name="T3565"><text:s/></text:span><text:span text:style-name="T3566">always</text:span><text:span text:style-name="T3567"><text:s/></text:span><text:span text:style-name="T3568">aware</text:span><text:span text:style-name="T3569"><text:s/></text:span><text:span text:style-name="T3570">of</text:span><text:span text:style-name="T3571"><text:s/></text:span><text:span text:style-name="T3572">the</text:span><text:span text:style-name="T3573"><text:s/></text:span><text:span text:style-name="T3574">integrity</text:span><text:span text:style-name="T3575"><text:s/></text:span><text:span text:style-name="T3576">of</text:span><text:span text:style-name="T3577"><text:s/></text:span><text:span text:style-name="T3578">the</text:span><text:span text:style-name="T3579"><text:s/></text:span><text:span text:style-name="T3580">communication.</text:span><text:span/></text:p>
        </text:list-item>
        <text:list-item>
          <text:p text:style-name="P533"><text:span text:style-name="T3581">When</text:span><text:span text:style-name="T3582"><text:s/></text:span><text:span text:style-name="T3583">the</text:span><text:span text:style-name="T3584"><text:s/></text:span><text:span text:style-name="T3585">next</text:span><text:span text:style-name="T3586"><text:s/></text:span><text:span text:style-name="T3587">block</text:span><text:span text:style-name="T3588"><text:s/></text:span><text:span text:style-name="T3589">is</text:span><text:span text:style-name="T3590"><text:s/></text:span><text:span text:style-name="T3591">mined,</text:span><text:span text:style-name="T3592"><text:s/></text:span><text:span text:style-name="T3593">the</text:span><text:span text:style-name="T3594"><text:s/></text:span><text:span text:style-name="T3595">current</text:span><text:span text:style-name="T3596"><text:s/></text:span><text:span text:style-name="T3597">attestation</text:span><text:span text:style-name="T3598"><text:s/></text:span><text:span text:style-name="T3599">data</text:span><text:span text:style-name="T3600"><text:s/></text:span><text:span text:style-name="T3601">and</text:span><text:span text:style-name="T3602"><text:s/></text:span><text:span text:style-name="T3603">status</text:span><text:span text:style-name="T3604"><text:s/></text:span><text:span text:style-name="T3605">for</text:span><text:span text:style-name="T3606"><text:s/></text:span><text:span text:style-name="T3607">that</text:span><text:span text:style-name="T3608"><text:s/></text:span><text:span text:style-name="T3609">DAHR proxy will be added to the blockchain.</text:span><text:span/></text:p>
        </text:list-item>
      </text:list>
      <text:p text:style-name="P534"><text:span>This</text:span><text:span text:style-name="T3610"><text:s/></text:span><text:span>way,</text:span><text:span text:style-name="T3611"><text:s/></text:span><text:span>while</text:span><text:span text:style-name="T3612"><text:s/></text:span><text:span>allowing</text:span><text:span text:style-name="T3613"><text:s/></text:span><text:span>customizations</text:span><text:span text:style-name="T3614"><text:s/></text:span><text:span>in</text:span><text:span text:style-name="T3615"><text:s/></text:span><text:span>terms</text:span><text:span text:style-name="T3616"><text:s/></text:span><text:span>of</text:span><text:span text:style-name="T3617"><text:s/></text:span><text:span>speed</text:span><text:span text:style-name="T3618"><text:s/></text:span><text:span>and</text:span><text:span text:style-name="T3619"><text:s/></text:span><text:span>security,</text:span><text:span text:style-name="T3620"><text:s/></text:span><text:span>Demos</text:span><text:span text:style-name="T3621"><text:s/></text:span><text:span>is</text:span><text:span text:style-name="T3622"><text:s/></text:span><text:span>able</text:span><text:span text:style-name="T3623"><text:s/></text:span><text:span>to guarantee integrity and verifiability of the data provided.</text:span><text:span/></text:p>
      <text:p text:style-name="P535"><text:span>The novel approach to Web2 data pulling on chain exemplifies the need of a paradigm shift</text:span><text:span text:style-name="T3624"><text:s/></text:span><text:span>from</text:span><text:span text:style-name="T3625"><text:s/></text:span><text:span>a</text:span><text:span text:style-name="T3626"><text:s/></text:span><text:span>push-oriented,</text:span><text:span text:style-name="T3627"><text:s/></text:span><text:span>controlled</text:span><text:span text:style-name="T3628"><text:s/></text:span><text:span>and</text:span><text:span text:style-name="T3629"><text:s/></text:span><text:span>limited</text:span><text:span text:style-name="T3630"><text:s/></text:span><text:span>offering</text:span><text:span text:style-name="T3631"><text:s/></text:span><text:span>of</text:span><text:span text:style-name="T3632"><text:s/></text:span><text:span>oracles</text:span><text:span text:style-name="T3633"><text:s/></text:span><text:span>to</text:span><text:span text:style-name="T3634"><text:s/></text:span><text:span>the</text:span><text:span text:style-name="T3635"><text:s/></text:span><text:span>pull-oriented,</text:span><text:span text:style-name="T3636"><text:s/></text:span><text:span>on demand and self-verifiable offering of data feeds.</text:span><text:span/></text:p>
      <text:p text:style-name="P536"><text:span text:style-name="T3637">Figure 5: Architecture of a DAHR </text:span><text:span text:style-name="T3638">Proxy</text:span><text:span/></text:p>
      <text:p text:style-name="P537"><text:span/><draw:frame draw:name="image5.jpeg" draw:style-name="gr5" draw:z-index="5" text:anchor-type="paragraph" svg:width="16.92cm" svg:height="13.05cm" svg:x="2.053cm" svg:y="0.459cm"><draw:image xlink:href="Pictures/image3.jpg" xlink:type="simple" xlink:show="embed" xlink:actuate="onLoad"/></draw:frame><text:span/></text:p>
      <text:list>
        <text:list-item>
          <text:h text:outline-level="3" text:restart-numbering="0" text:is-list-header="0" text:style-name="P538"><text:span/><text:bookmark-start text:name="_Toc46"/><text:span/><text:span>Ensuring</text:span><text:span text:style-name="T3639"><text:s/></text:span><text:span>Integrity</text:span><text:span text:style-name="T3640"><text:s/></text:span><text:span>and</text:span><text:span text:style-name="T3641"><text:s/></text:span><text:span text:style-name="T3642">Stability</text:span><text:span/><text:bookmark-end text:name="_Toc46"/><text:span/><text:span/></text:h>
        </text:list-item>
      </text:list>
      <text:p text:style-name="P539"><text:span text:style-name="T3643"/><text:span text:style-name="T3644"/></text:p>
      <text:p text:style-name="P540"><text:span>To</text:span><text:span text:style-name="T3645"><text:s/></text:span><text:span>mitigate</text:span><text:span text:style-name="T3646"><text:s/></text:span><text:span>the</text:span><text:span text:style-name="T3647"><text:s/></text:span><text:span>unpredictable</text:span><text:span text:style-name="T3648"><text:s/></text:span><text:span>nature</text:span><text:span text:style-name="T3649"><text:s/></text:span><text:span>of</text:span><text:span text:style-name="T3650"><text:s/></text:span><text:span>Web2</text:span><text:span text:style-name="T3651"><text:s/></text:span><text:span>data</text:span><text:span text:style-name="T3652"><text:s/></text:span><text:span>retrieval</text:span><text:span text:style-name="T3653"><text:s/></text:span><text:span>and</text:span><text:span text:style-name="T3654"><text:s/></text:span><text:span>prevent</text:span><text:span text:style-name="T3655"><text:s/></text:span><text:span>potential</text:span><text:span text:style-name="T3656"><text:s/></text:span><text:span>clogging and security concerns, a robust system must be put in place. This system employs a multitude of techniques such as request throttling, End-To-End validation, and replication verification to ensure optimal performance and security.</text:span><text:span/></text:p>
      <text:p text:style-name="P541"><text:span text:style-name="T3657"/><text:span text:style-name="T3658"/></text:p>
      <text:p text:style-name="P542"><text:span/><text:bookmark-start text:name="Request_Throttling_"/><text:span/><text:bookmark-end text:name="Request_Throttling_"/><text:span text:style-name="T3659">Request</text:span><text:span text:style-name="T3660"><text:s/></text:span><text:span text:style-name="T3661">Throttling</text:span><text:span/></text:p>
      <text:p text:style-name="P543"><text:span text:style-name="T3662"/><text:span text:style-name="T3663"/></text:p>
      <text:p text:style-name="P544"><text:span>To prevent overloading low-performance endpoints and to ensure that responses are received within an acceptable time frame, request throttling is employed. This technique involves</text:span><text:span text:style-name="T3664"><text:s/></text:span><text:span>limiting</text:span><text:span text:style-name="T3665"><text:s/></text:span><text:span>the</text:span><text:span text:style-name="T3666"><text:s/></text:span><text:span>number</text:span><text:span text:style-name="T3667"><text:s/></text:span><text:span>of</text:span><text:span text:style-name="T3668"><text:s/></text:span><text:span>requests</text:span><text:span text:style-name="T3669"><text:s/></text:span><text:span>that</text:span><text:span text:style-name="T3670"><text:s/></text:span><text:span>can</text:span><text:span text:style-name="T3671"><text:s/></text:span><text:span>be</text:span><text:span text:style-name="T3672"><text:s/></text:span><text:span>made</text:span><text:span text:style-name="T3673"><text:s/></text:span><text:span>within</text:span><text:span text:style-name="T3674"><text:s/></text:span><text:span>a</text:span><text:span text:style-name="T3675"><text:s/></text:span><text:span>specific</text:span><text:span text:style-name="T3676"><text:s/></text:span><text:span>timeframe.</text:span><text:span text:style-name="T3677"><text:s/></text:span><text:span>By implementing request throttling, Web2 systems effectively manage their resources, preventing congestion and optimizing performance.</text:span><text:span/></text:p>
      <text:p text:style-name="P545"><text:span/><text:span/></text:p>
      <text:p text:style-name="P546"><text:span>Request</text:span><text:span text:style-name="T3678"><text:s/></text:span><text:span>throttling</text:span><text:span text:style-name="T3679"><text:s/></text:span><text:span>is</text:span><text:span text:style-name="T3680"><text:s/></text:span><text:span>implemented</text:span><text:span text:style-name="T3681"><text:s/></text:span><text:span>using</text:span><text:span text:style-name="T3682"><text:s/></text:span><text:span>various</text:span><text:span text:style-name="T3683"><text:s/></text:span><text:span>techniques</text:span><text:span text:style-name="T3684"><text:s/></text:span><text:span>built</text:span><text:span text:style-name="T3685"><text:s/></text:span><text:span>on</text:span><text:span text:style-name="T3686"><text:s/></text:span><text:span>two</text:span><text:span text:style-name="T3687"><text:s/></text:span><text:span>main</text:span><text:span text:style-name="T3688"><text:s/></text:span><text:span>paradigms: rate limiters, which restrict the number of requests based on a predetermined rate, and timeframe restriction, which restricts the timeframe in which a request can be retrieved, attested, and sent back.</text:span><text:span/></text:p>
      <text:p text:style-name="P547"><text:span text:style-name="T3689"/><text:span text:style-name="T3690"/></text:p>
      <text:p text:style-name="P548"><text:span/><text:bookmark-start text:name="End-to-End_Validation_"/><text:span/><text:bookmark-end text:name="End-to-End_Validation_"/><text:span text:style-name="T3691">End-to-End</text:span><text:span text:style-name="T3692"><text:s/></text:span><text:span text:style-name="T3693">Validation</text:span><text:span/></text:p>
      <text:p text:style-name="P549"><text:span text:style-name="T3694"/><text:span text:style-name="T3695"/></text:p>
      <text:p text:style-name="P550"><text:span>End-to-End (E2E) validation constitutes a crucial technique for guaranteeing the authenticity of Web2 data retrieval. This process involves thorough verification of the identities</text:span><text:span text:style-name="T3696"><text:s/></text:span><text:span>of</text:span><text:span text:style-name="T3697"><text:s/></text:span><text:span>all</text:span><text:span text:style-name="T3698"><text:s/></text:span><text:span>parts</text:span><text:span text:style-name="T3699"><text:s/></text:span><text:span>involved</text:span><text:span text:style-name="T3700"><text:s/></text:span><text:span>before</text:span><text:span text:style-name="T3701"><text:s/></text:span><text:span>any</text:span><text:span text:style-name="T3702"><text:s/></text:span><text:span>data</text:span><text:span text:style-name="T3703"><text:s/></text:span><text:span>exchange</text:span><text:span text:style-name="T3704"><text:s/></text:span><text:span>takes</text:span><text:span text:style-name="T3705"><text:s/></text:span><text:span>place.</text:span><text:span text:style-name="T3706"><text:s/></text:span><text:span>By</text:span><text:span text:style-name="T3707"><text:s/></text:span><text:span>enforcing</text:span><text:span text:style-name="T3708"><text:s/></text:span><text:span>E2E validation, Web2 systems effectively counter potential security threats, such as</text:span><text:span/></text:p>
      <text:p text:style-name="P551"><text:span>man-in-the-middle attacks and unauthorized </text:span><text:span text:style-name="T3709">access.</text:span><text:span/></text:p>
      <text:p text:style-name="P552"><text:span/><text:span/></text:p>
      <text:p text:style-name="P553"><text:span>On the Web3 side of the request, E2E validation is implemented using on-chain signature-based</text:span><text:span text:style-name="T3710"><text:s/></text:span><text:span>identity</text:span><text:span text:style-name="T3711"><text:s/></text:span><text:span>verification,</text:span><text:span text:style-name="T3712"><text:s/></text:span><text:span>while</text:span><text:span text:style-name="T3713"><text:s/></text:span><text:span>digital</text:span><text:span text:style-name="T3714"><text:s/></text:span><text:span>certificates</text:span><text:span text:style-name="T3715"><text:s/></text:span><text:span>are</text:span><text:span text:style-name="T3716"><text:s/></text:span><text:span>employed</text:span><text:span text:style-name="T3717"><text:s/></text:span><text:span>on</text:span><text:span text:style-name="T3718"><text:s/></text:span><text:span>the</text:span><text:span text:style-name="T3719"><text:s/></text:span><text:span>Web2 side to ensure the integrity of the request and response flow.</text:span><text:span/></text:p>
      <text:p text:style-name="P554"><text:span text:style-name="T3720"/><text:span text:style-name="T3721"/></text:p>
      <text:p text:style-name="P555"><text:span text:style-name="T3722"/><text:span text:style-name="T3723"/></text:p>
      <text:p text:style-name="P556"><text:span/><text:bookmark-start text:name="Session_Based_Approach_"/><text:span/><text:bookmark-end text:name="Session_Based_Approach_"/><text:span text:style-name="T3724">Session</text:span><text:span text:style-name="T3725"><text:s/></text:span><text:span text:style-name="T3726">Based</text:span><text:span text:style-name="T3727"><text:s/></text:span><text:span text:style-name="T3728">Approach</text:span><text:span/></text:p>
      <text:p text:style-name="P557"><text:span text:style-name="T3729"/><text:span text:style-name="T3730"/></text:p>
      <text:p text:style-name="P558"><text:span>Derived</text:span><text:span text:style-name="T3731"><text:s/></text:span><text:span>from</text:span><text:span text:style-name="T3732"><text:s/></text:span><text:span>the</text:span><text:span text:style-name="T3733"><text:s/></text:span><text:span>DAHR</text:span><text:span text:style-name="T3734"><text:s/></text:span><text:span>Proxies</text:span><text:span text:style-name="T3735"><text:s/></text:span><text:span>design,</text:span><text:span text:style-name="T3736"><text:s/></text:span><text:span>Web2</text:span><text:span text:style-name="T3737"><text:s/></text:span><text:span>Retrieval</text:span><text:span text:style-name="T3738"><text:s/></text:span><text:span>on</text:span><text:span text:style-name="T3739"><text:s/></text:span><text:span>the</text:span><text:span text:style-name="T3740"><text:s/></text:span><text:span>Demos</text:span><text:span text:style-name="T3741"><text:s/></text:span><text:span>chain</text:span><text:span text:style-name="T3742"><text:s/></text:span><text:span>supports</text:span><text:span text:style-name="T3743"><text:s/></text:span><text:span>and encourages a session-based approach. This means that a client is able t</text:span><text:span>o negotiate a fixed, prepaid gas charge with the RPC so that it is able to access data in a continuous way, for example by creating a streaming session with the resource (such as WebSockets), without having to pay a fee each time the resource is refreshed.</text:span><text:span/></text:p>
      <text:p text:style-name="P559"><text:span/><text:span/></text:p>
      <text:p text:style-name="P560"><text:span>Not</text:span><text:span text:style-name="T3744"><text:s/></text:span><text:span>only</text:span><text:span text:style-name="T3745"><text:s/></text:span><text:span>does</text:span><text:span text:style-name="T3746"><text:s/></text:span><text:span>this</text:span><text:span text:style-name="T3747"><text:s/></text:span><text:span>help</text:span><text:span text:style-name="T3748"><text:s/></text:span><text:span>to</text:span><text:span text:style-name="T3749"><text:s/></text:span><text:span>keep</text:span><text:span text:style-name="T3750"><text:s/></text:span><text:span>costs</text:span><text:span text:style-name="T3751"><text:s/></text:span><text:span>at</text:span><text:span text:style-name="T3752"><text:s/></text:span><text:span>an</text:span><text:span text:style-name="T3753"><text:s/></text:span><text:span>acceptable</text:span><text:span text:style-name="T3754"><text:s/></text:span><text:span>level</text:span><text:span text:style-name="T3755"><text:s/></text:span><text:span>for</text:span><text:span text:style-name="T3756"><text:s/></text:span><text:span>both</text:span><text:span text:style-name="T3757"><text:s/></text:span><text:span>the</text:span><text:span text:style-name="T3758"><text:s/></text:span><text:span>client</text:span><text:span text:style-name="T3759"><text:s/></text:span><text:span>and</text:span><text:span text:style-name="T3760"><text:s/></text:span><text:span>the RPC,</text:span><text:span text:style-name="T3761"><text:s/></text:span><text:span>but</text:span><text:span text:style-name="T3762"><text:s/></text:span><text:span>it</text:span><text:span text:style-name="T3763"><text:s/></text:span><text:span>also</text:span><text:span text:style-name="T3764"><text:s/></text:span><text:span>drastically</text:span><text:span text:style-name="T3765"><text:s/></text:span><text:span>reduces</text:span><text:span text:style-name="T3766"><text:s/></text:span><text:span>the</text:span><text:span text:style-name="T3767"><text:s/></text:span><text:span>time</text:span><text:span text:style-name="T3768"><text:s/></text:span><text:span>required</text:span><text:span text:style-name="T3769"><text:s/></text:span><text:span>to</text:span><text:span text:style-name="T3770"><text:s/></text:span><text:span>retrieve</text:span><text:span text:style-name="T3771"><text:s/></text:span><text:span>a</text:span><text:span text:style-name="T3772"><text:s/></text:span><text:span>resource</text:span><text:span text:style-name="T3773"><text:s/></text:span><text:span>as</text:span><text:span text:style-name="T3774"><text:s/></text:span><text:span>the</text:span><text:span text:style-name="T3775"><text:s/></text:span><text:span>gas transactions are not necessarily made each time.</text:span><text:span/></text:p>
      <text:list>
        <text:list-item>
          <text:h text:outline-level="2" text:restart-numbering="0" text:is-list-header="0" text:style-name="P561"><text:span/><text:bookmark-start text:name="_Toc47"/><text:span/><text:span>Towards</text:span><text:span text:style-name="T3776"><text:s/></text:span><text:span>the</text:span><text:span text:style-name="T3777"><text:s/></text:span><text:span>Fediverse:</text:span><text:span text:style-name="T3778"><text:s/></text:span><text:span>ActivityPub</text:span><text:span text:style-name="T3779"><text:s/></text:span><text:span text:style-name="T3780">integration</text:span><text:span/><text:bookmark-end text:name="_Toc47"/><text:span/><text:span/></text:h>
        </text:list-item>
      </text:list>
      <text:p text:style-name="P562"><text:span text:style-name="T3781">Figure 6: The Fediverse brings content to </text:span><text:span text:style-name="T3782">Demos</text:span><text:span/></text:p>
      <text:p text:style-name="P563"><text:span/><draw:frame draw:name="image6.jpeg" draw:style-name="gr6" draw:z-index="6" text:anchor-type="paragraph" svg:width="15.14cm" svg:height="21.15cm" svg:x="3.323cm" svg:y="0.386cm"><draw:image xlink:href="Pictures/image4.jpg" xlink:type="simple" xlink:show="embed" xlink:actuate="onLoad"/></draw:frame><text:span/></text:p>
      <text:p text:style-name="P564"><text:span>As</text:span><text:span text:style-name="T3783"><text:s/></text:span><text:span>Demos</text:span><text:span text:style-name="T3784"><text:s/></text:span><text:span>strives</text:span><text:span text:style-name="T3785"><text:s/></text:span><text:span>to</text:span><text:span text:style-name="T3786"><text:s/></text:span><text:span>leverage</text:span><text:span text:style-name="T3787"><text:s/></text:span><text:span>existing</text:span><text:span text:style-name="T3788"><text:s/></text:span><text:span>solutions,</text:span><text:span text:style-name="T3789"><text:s/></text:span><text:span>expanding</text:span><text:span text:style-name="T3790"><text:s/></text:span><text:span>their</text:span><text:span text:style-name="T3791"><text:s/></text:span><text:span>horizons,</text:span><text:span text:style-name="T3792"><text:s/></text:span><text:span>the</text:span><text:span text:style-name="T3793"><text:s/></text:span><text:span>Fediverse</text:span><text:span text:style-name="T3794"><text:s/></text:span><text:span>is a natural target for the Network.</text:span><text:span/></text:p>
      <text:p text:style-name="P565"><text:span>The</text:span><text:span text:style-name="T3795"><text:s/></text:span><text:span>Fediverse</text:span><text:span text:style-name="T3796"><text:s/></text:span><text:span>is</text:span><text:span text:style-name="T3797"><text:s/></text:span><text:span>a</text:span><text:span text:style-name="T3798"><text:s/></text:span><text:span>network</text:span><text:span text:style-name="T3799"><text:s/></text:span><text:span>of</text:span><text:span text:style-name="T3800"><text:s/></text:span><text:span>connected</text:span><text:span text:style-name="T3801"><text:s/></text:span><text:span>social</text:span><text:span text:style-name="T3802"><text:s/></text:span><text:span>services</text:span><text:span text:style-name="T3803"><text:s/></text:span><text:span>that</text:span><text:span text:style-name="T3804"><text:s/></text:span><text:span>implements</text:span><text:span text:style-name="T3805"><text:s/></text:span><text:span>the</text:span><text:span text:style-name="T3806"><text:s/></text:span><text:span>ActivityPub protocol. By doing this, millions of users on thousands of services are able to interact between each other no matter which platform they are using.</text:span><text:span/></text:p>
      <text:p text:style-name="P566"><text:span>The</text:span><text:span text:style-name="T3807"><text:s/></text:span><text:span>most</text:span><text:span text:style-name="T3808"><text:s/></text:span><text:span>famous</text:span><text:span text:style-name="T3809"><text:s/></text:span><text:span>examples</text:span><text:span text:style-name="T3810"><text:s/></text:span><text:span>of</text:span><text:span text:style-name="T3811"><text:s/></text:span><text:span>ActivityPub</text:span><text:span text:style-name="T3812"><text:s/></text:span><text:span>social</text:span><text:span text:style-name="T3813"><text:s/></text:span><text:span>networks</text:span><text:span text:style-name="T3814"><text:s/></text:span><text:span>are</text:span><text:span text:style-name="T3815"><text:s/></text:span><text:span>Threads</text:span><text:span text:style-name="T3816"><text:s/></text:span><text:span>by</text:span><text:span text:style-name="T3817"><text:s/></text:span><text:span>Meta, Mastodon, and Lemmy.</text:span><text:span/></text:p>
      <text:p text:style-name="P567"><text:span>By</text:span><text:span text:style-name="T3818"><text:s/></text:span><text:span>incorporating</text:span><text:span text:style-name="T3819"><text:s/></text:span><text:span>ActivityPub</text:span><text:span text:style-name="T3820"><text:s/></text:span><text:span>on-chain,</text:span><text:span text:style-name="T3821"><text:s/></text:span><text:span>Demos</text:span><text:span text:style-name="T3822"><text:s/></text:span><text:span>is</text:span><text:span text:style-name="T3823"><text:s/></text:span><text:span>not</text:span><text:span text:style-name="T3824"><text:s/></text:span><text:span>just</text:span><text:span text:style-name="T3825"><text:s/></text:span><text:span>connecting</text:span><text:span text:style-name="T3826"><text:s/></text:span><text:span>social</text:span><text:span text:style-name="T3827"><text:s/></text:span><text:span>networks</text:span><text:span text:style-name="T3828"><text:s/></text:span><text:span>but</text:span><text:span text:style-name="T3829"><text:s/></text:span><text:span>is also streamlining the exchange of data between any services utilizing the</text:span><text:span> protocol. This integration is particularly impactful because it taps into an existing ecosystem of ActivityPub-compatible services, ranging from content management systems like WordPress to specialized platforms for podcasting, link aggregation, and more.</text:span><text:span/></text:p>
      <text:p text:style-name="P568"><text:span text:style-name="T3830"/><text:span text:style-name="T3831"/></text:p>
      <text:p text:style-name="P569"><text:span>The ability to transmit data across these services without the need for additional bridging software or custom integrations represents a significant leap forward in interoperability. M</text:span><text:span>oreover, the on-chain implementation of ActivityPub by Demos ensures that data transmissions are secure, transparent, and immutable, leveraging the strengths of blockchain technology. This approach not only facilitates data sharing and collaboration across</text:span><text:span text:style-name="T3832"><text:s/></text:span><text:span>various</text:span><text:span text:style-name="T3833"><text:s/></text:span><text:span>platforms</text:span><text:span text:style-name="T3834"><text:s/></text:span><text:span>but</text:span><text:span text:style-name="T3835"><text:s/></text:span><text:span>also</text:span><text:span text:style-name="T3836"><text:s/></text:span><text:span>enhances</text:span><text:span text:style-name="T3837"><text:s/></text:span><text:span>user</text:span><text:span text:style-name="T3838"><text:s/></text:span><text:span>control</text:span><text:span text:style-name="T3839"><text:s/></text:span><text:span>over</text:span><text:span text:style-name="T3840"><text:s/></text:span><text:span>their</text:span><text:span text:style-name="T3841"><text:s/></text:span><text:span>data,</text:span><text:span text:style-name="T3842"><text:s/></text:span><text:span>as</text:span><text:span text:style-name="T3843"><text:s/></text:span><text:span>they</text:span><text:span text:style-name="T3844"><text:s/></text:span><text:span>can</text:span><text:span text:style-name="T3845"><text:s/></text:span><text:span>trust the integrity of the data being transmitted on the blockchain.</text:span><text:span/></text:p>
      <text:p text:style-name="P570"><text:span/><text:span/></text:p>
      <text:p text:style-name="P571"><text:span>In essence, Demos is not just in</text:span><text:span>tegrating a social networking protocol; it is embedding a universal data transmission standard into its infrastructure. This positions Demos as a key player in the Fediverse, capable of driving forward the vision of a truly interconnected and decentralized</text:span><text:span text:style-name="T3846"><text:s/></text:span><text:span>web</text:span><text:span text:style-name="T3847"><text:s/></text:span><text:span>of</text:span><text:span text:style-name="T3848"><text:s/></text:span><text:span>services.</text:span><text:span text:style-name="T3849"><text:s/></text:span><text:span>The</text:span><text:span text:style-name="T3850"><text:s/></text:span><text:span>implications</text:span><text:span text:style-name="T3851"><text:s/></text:span><text:span>of</text:span><text:span text:style-name="T3852"><text:s/></text:span><text:span>this</text:span><text:span text:style-name="T3853"><text:s/></text:span><text:span>are</text:span><text:span text:style-name="T3854"><text:s/></text:span><text:span>vast,</text:span><text:span text:style-name="T3855"><text:s/></text:span><text:span>as</text:span><text:span text:style-name="T3856"><text:s/></text:span><text:span>it</text:span><text:span text:style-name="T3857"><text:s/></text:span><text:span>opens</text:span><text:span text:style-name="T3858"><text:s/></text:span><text:span>up</text:span><text:span text:style-name="T3859"><text:s/></text:span><text:span>possibilities for a more fluid exchange of information and a more cohesive digital ecosystem where data can flow freely between services that were previously siloed.</text:span><text:span/></text:p>
      <text:p text:style-name="P572"><text:span/><text:span/></text:p>
      <text:p text:style-name="P573"><text:span>In a practical scenario, consider a user posting an update on Threads, a social network. While Thre</text:span><text:span>ads is integrated with Instagram, the reach of the user's post is typically confined to these platforms. With Demos's ActivityPub integration, this post can be transmitted across a myriad of ActivityPub-compatible services, including those in the Fediverse</text:span><text:span text:style-name="T3860"><text:s/></text:span><text:span>like</text:span><text:span text:style-name="T3861"><text:s/></text:span><text:span>Mastodon,</text:span><text:span text:style-name="T3862"><text:s/></text:span><text:span>Pleroma,</text:span><text:span text:style-name="T3863"><text:s/></text:span><text:span>PeerTube,</text:span><text:span text:style-name="T3864"><text:s/></text:span><text:span>and</text:span><text:span text:style-name="T3865"><text:s/></text:span><text:span>Diaspora,</text:span><text:span text:style-name="T3866"><text:s/></text:span><text:span>as</text:span><text:span text:style-name="T3867"><text:s/></text:span><text:span>well</text:span><text:span text:style-name="T3868"><text:s/></text:span><text:span>as</text:span><text:span text:style-name="T3869"><text:s/></text:span><text:span>Web3</text:span><text:span text:style-name="T3870"><text:s/></text:span><text:span>platforms, protocols, chains or any other context.</text:span><text:span/></text:p>
      <text:p text:style-name="P574"><text:span/><text:span/></text:p>
      <text:p text:style-name="P575"><text:span>By</text:span><text:span text:style-name="T3871"><text:s/></text:span><text:span>definition,</text:span><text:span text:style-name="T3872"><text:s/></text:span><text:span>however,</text:span><text:span text:style-name="T3873"><text:s/></text:span><text:span>ActivityPub</text:span><text:span text:style-name="T3874"><text:s/></text:span><text:span>is</text:span><text:span text:style-name="T3875"><text:s/></text:span><text:span>designed</text:span><text:span text:style-name="T3876"><text:s/></text:span><text:span>for</text:span><text:span text:style-name="T3877"><text:s/></text:span><text:span>Web2</text:span><text:span text:style-name="T3878"><text:s/></text:span><text:span>and</text:span><text:span text:style-name="T3879"><text:s/></text:span><text:span>has</text:span><text:span text:style-name="T3880"><text:s/></text:span><text:span>no</text:span><text:span text:style-name="T3881"><text:s/></text:span><text:span>native</text:span><text:span text:style-name="T3882"><text:s/></text:span><text:span>Web3 </text:span><text:span text:style-name="T3883">capabilities.</text:span><text:span/></text:p>
      <text:p text:style-name="P576"><text:span>Demos,</text:span><text:span text:style-name="T3884"><text:s/></text:span><text:span>as</text:span><text:span text:style-name="T3885"><text:s/></text:span><text:span>a</text:span><text:span text:style-name="T3886"><text:s/></text:span><text:span>Data</text:span><text:span text:style-name="T3887"><text:s/></text:span><text:span>Interconnection</text:span><text:span text:style-name="T3888"><text:s/></text:span><text:span>Layer,</text:span><text:span text:style-name="T3889"><text:s/></text:span><text:span>implements</text:span><text:span text:style-name="T3890"><text:s/></text:span><text:span>in</text:span><text:span text:style-name="T3891"><text:s/></text:span><text:span>its</text:span><text:span text:style-name="T3892"><text:s/></text:span><text:span>specifications</text:span><text:span text:style-name="T3893"><text:s/></text:span><text:span>an</text:span><text:span text:style-name="T3894"><text:s/></text:span><text:span>ActivityPub compliant</text:span><text:span text:style-name="T3895"><text:s/></text:span><text:span>module:</text:span><text:span text:style-name="T3896"><text:s/></text:span><text:span>this</text:span><text:span text:style-name="T3897"><text:s/></text:span><text:span>way,</text:span><text:span text:style-name="T3898"><text:s/></text:span><text:span>different</text:span><text:span text:style-name="T3899"><text:s/></text:span><text:span>clients</text:span><text:span text:style-name="T3900"><text:s/></text:span><text:span>both</text:span><text:span text:style-name="T3901"><text:s/></text:span><text:span>in</text:span><text:span text:style-name="T3902"><text:s/></text:span><text:span>Web2</text:span><text:span text:style-name="T3903"><text:s/></text:span><text:span>and</text:span><text:span text:style-name="T3904"><text:s/></text:span><text:span>Web3</text:span><text:span text:style-name="T3905"><text:s/></text:span><text:span>are</text:span><text:span text:style-name="T3906"><text:s/></text:span><text:span>able</text:span><text:span text:style-name="T3907"><text:s/></text:span><text:span>to</text:span><text:span text:style-name="T3908"><text:s/></text:span><text:span>interact through the Fediverse and federate their instances.</text:span><text:span/></text:p>
      <text:p text:style-name="P577"><text:span>Let’s</text:span><text:span text:style-name="T3909"><text:s/></text:span><text:span>look</text:span><text:span text:style-name="T3910"><text:s/></text:span><text:span>at</text:span><text:span text:style-name="T3911"><text:s/></text:span><text:span>an</text:span><text:span text:style-name="T3912"><text:s/></text:span><text:span text:style-name="T3913">example:</text:span><text:span/></text:p>
      <text:list text:style-name="WWNum16" text:continue-numbering="true">
        <text:list-item>
          <text:p text:style-name="P578"><text:span text:style-name="T3914">Alice is on Threads and posts something about her </text:span><text:span text:style-name="T3915">garden</text:span><text:span/></text:p>
        </text:list-item>
        <text:list-item>
          <text:p text:style-name="P579"><text:span text:style-name="T3916">Bob is on a RandomSocial, a fictional social network fully on </text:span><text:span text:style-name="T3917">chain</text:span><text:span/></text:p>
        </text:list-item>
        <text:list-item>
          <text:p text:style-name="P580"><text:span text:style-name="T3918">RandomSocial</text:span><text:span text:style-name="T3919"><text:s/></text:span><text:span text:style-name="T3920">is</text:span><text:span text:style-name="T3921"><text:s/></text:span><text:span text:style-name="T3922">connected</text:span><text:span text:style-name="T3923"><text:s/></text:span><text:span text:style-name="T3924">with</text:span><text:span text:style-name="T3925"><text:s/></text:span><text:span text:style-name="T3926">Demos</text:span><text:span text:style-name="T3927"><text:s/></text:span><text:span text:style-name="T3928">and</text:span><text:span text:style-name="T3929"><text:s/></text:span><text:span text:style-name="T3930">thus</text:span><text:span text:style-name="T3931"><text:s/></text:span><text:span text:style-name="T3932">can</text:span><text:span text:style-name="T3933"><text:s/></text:span><text:span text:style-name="T3934">provide</text:span><text:span text:style-name="T3935"><text:s/></text:span><text:span text:style-name="T3936">Bob</text:span><text:span text:style-name="T3937"><text:s/></text:span><text:span text:style-name="T3938">with</text:span><text:span text:style-name="T3939"><text:s/></text:span><text:span text:style-name="T3940">Alice’s content seamlessly</text:span><text:span/></text:p>
        </text:list-item>
        <text:list-item>
          <text:p text:style-name="P581"><text:span text:style-name="T3941">At</text:span><text:span text:style-name="T3942"><text:s/></text:span><text:span text:style-name="T3943">the</text:span><text:span text:style-name="T3944"><text:s/></text:span><text:span text:style-name="T3945">same</text:span><text:span text:style-name="T3946"><text:s/></text:span><text:span text:style-name="T3947">time,</text:span><text:span text:style-name="T3948"><text:s/></text:span><text:span text:style-name="T3949">Bob</text:span><text:span text:style-name="T3950"><text:s/></text:span><text:span text:style-name="T3951">is</text:span><text:span text:style-name="T3952"><text:s/></text:span><text:span text:style-name="T3953">able</text:span><text:span text:style-name="T3954"><text:s/></text:span><text:span text:style-name="T3955">to</text:span><text:span text:style-name="T3956"><text:s/></text:span><text:span text:style-name="T3957">use</text:span><text:span text:style-name="T3958"><text:s/></text:span><text:span text:style-name="T3959">RandomSocial</text:span><text:span text:style-name="T3960"><text:s/></text:span><text:span text:style-name="T3961">to</text:span><text:span text:style-name="T3962"><text:s/></text:span><text:span text:style-name="T3963">reply</text:span><text:span text:style-name="T3964"><text:s/></text:span><text:span text:style-name="T3965">to</text:span><text:span text:style-name="T3966"><text:s/></text:span><text:span text:style-name="T3967">Alice</text:span><text:span text:style-name="T3968"><text:s/></text:span><text:span text:style-name="T3969">without</text:span><text:span text:style-name="T3970"><text:s/></text:span><text:span text:style-name="T3971">leaving the Web3 context</text:span><text:span/></text:p>
        </text:list-item>
      </text:list>
      <text:p text:style-name="P582"><text:span>Being</text:span><text:span text:style-name="T3972"><text:s/></text:span><text:span>channeled</text:span><text:span text:style-name="T3973"><text:s/></text:span><text:span>through</text:span><text:span text:style-name="T3974"><text:s/></text:span><text:span>the</text:span><text:span text:style-name="T3975"><text:s/></text:span><text:span>existing</text:span><text:span text:style-name="T3976"><text:s/></text:span><text:span>security</text:span><text:span text:style-name="T3977"><text:s/></text:span><text:span>features</text:span><text:span text:style-name="T3978"><text:s/></text:span><text:span>of</text:span><text:span text:style-name="T3979"><text:s/></text:span><text:span>the</text:span><text:span text:style-name="T3980"><text:s/></text:span><text:span>Demos</text:span><text:span text:style-name="T3981"><text:s/></text:span><text:span>Network,</text:span><text:span text:style-name="T3982"><text:s/></text:span><text:span>this</text:span><text:span text:style-name="T3983"><text:s/></text:span><text:span>data flow is verifiable, confidential (if requested) and consistent.</text:span><text:span/></text:p>
      <text:p text:style-name="P583"><text:span>This</text:span><text:span text:style-name="T3984"><text:s/></text:span><text:span>integration</text:span><text:span text:style-name="T3985"><text:s/></text:span><text:span>not</text:span><text:span text:style-name="T3986"><text:s/></text:span><text:span>only</text:span><text:span text:style-name="T3987"><text:s/></text:span><text:span>enhances</text:span><text:span text:style-name="T3988"><text:s/></text:span><text:span>the</text:span><text:span text:style-name="T3989"><text:s/></text:span><text:span>interoperability</text:span><text:span text:style-name="T3990"><text:s/></text:span><text:span>among</text:span><text:span text:style-name="T3991"><text:s/></text:span><text:span>different</text:span><text:span text:style-name="T3992"><text:s/></text:span><text:span>social</text:span><text:span text:style-name="T3993"><text:s/></text:span><text:span>networks</text:span><text:span text:style-name="T3994"><text:s/></text:span><text:span>and </text:span><text:span>Web3 platforms but also ensures secure, transparent, and immutable data transmissions, thanks to the inherent properties of blockchain technology. As a result, Demos is opening up the Fediverse to Web3, creating a more interconnected and expansive digital </text:span><text:span text:style-name="T3995">ecosystem.</text:span><text:span/></text:p>
      <text:list>
        <text:list-item>
          <text:h text:outline-level="2" text:restart-numbering="0" text:is-list-header="0" text:style-name="P584"><text:span/><text:bookmark-start text:name="_Toc48"/><text:span/><text:span/><text:bookmark-start text:name="TOR_Network:_A_Special_Context_Made_for_"/><text:span/><text:bookmark-end text:name="TOR_Network:_A_Special_Context_Made_for_"/><text:span>TOR</text:span><text:span text:style-name="T3996"><text:s/></text:span><text:span>Network:</text:span><text:span text:style-name="T3997"><text:s/></text:span><text:span>A</text:span><text:span text:style-name="T3998"><text:s/></text:span><text:span>Special</text:span><text:span text:style-name="T3999"><text:s/></text:span><text:span>Context</text:span><text:span text:style-name="T4000"><text:s/></text:span><text:span>Made</text:span><text:span text:style-name="T4001"><text:s/></text:span><text:span>for</text:span><text:span text:style-name="T4002"><text:s/></text:span><text:span text:style-name="T4003">Privacy</text:span><text:span/><text:bookmark-end text:name="_Toc48"/><text:span/><text:span/></text:h>
        </text:list-item>
      </text:list>
      <text:p text:style-name="P585"><text:span>As</text:span><text:span text:style-name="T4004"><text:s/></text:span><text:span>a</text:span><text:span text:style-name="T4005"><text:s/></text:span><text:span>blockchain</text:span><text:span text:style-name="T4006"><text:s/></text:span><text:span>prioritizing</text:span><text:span text:style-name="T4007"><text:s/></text:span><text:span>privacy,</text:span><text:span text:style-name="T4008"><text:s/></text:span><text:span>Demos</text:span><text:span text:style-name="T4009"><text:s/></text:span><text:span>Network</text:span><text:span text:style-name="T4010"><text:s/></text:span><text:span>specifications</text:span><text:span text:style-name="T4011"><text:s/></text:span><text:span>establish</text:span><text:span text:style-name="T4012"><text:s/></text:span><text:span>a</text:span><text:span text:style-name="T4013"><text:s/></text:span><text:span>compatibility layer with TOR (The Onion Router).</text:span><text:span/></text:p>
      <text:p text:style-name="P586"><text:span>TOR, a privacy-centric alternative network, interconnects various nodes to guarantee the anonymity</text:span><text:span text:style-name="T4014"><text:s/></text:span><text:span>of</text:span><text:span text:style-name="T4015"><text:s/></text:span><text:span>its</text:span><text:span text:style-name="T4016"><text:s/></text:span><text:span>network</text:span><text:span text:style-name="T4017"><text:s/></text:span><text:span>members.</text:span><text:span text:style-name="T4018"><text:s/></text:span><text:span>To</text:span><text:span text:style-name="T4019"><text:s/></text:span><text:span>provide</text:span><text:span text:style-name="T4020"><text:s/></text:span><text:span>a</text:span><text:span text:style-name="T4021"><text:s/></text:span><text:span>simplified</text:span><text:span text:style-name="T4022"><text:s/></text:span><text:span>insight</text:span><text:span text:style-name="T4023"><text:s/></text:span><text:span>into</text:span><text:span text:style-name="T4024"><text:s/></text:span><text:span>TOR's</text:span><text:span text:style-name="T4025"><text:s/></text:span><text:span>operation,</text:span><text:span text:style-name="T4026"><text:s/></text:span><text:span>its Onion architecture, reflected in its name, relies on the direct connection of multiple layers, each aware only of the preceding and succeeding relay.</text:span><text:span/></text:p>
      <text:p text:style-name="P587"><text:span>This</text:span><text:span text:style-name="T4027"><text:s/></text:span><text:span>approach</text:span><text:span text:style-name="T4028"><text:s/></text:span><text:span>can</text:span><text:span text:style-name="T4029"><text:s/></text:span><text:span>be</text:span><text:span text:style-name="T4030"><text:s/></text:span><text:span>viewed</text:span><text:span text:style-name="T4031"><text:s/></text:span><text:span>as</text:span><text:span text:style-name="T4032"><text:s/></text:span><text:span>"Security</text:span><text:span text:style-name="T4033"><text:s/></text:span><text:span>through</text:span><text:span text:style-name="T4034"><text:s/></text:span><text:span>Ignorance,"</text:span><text:span text:style-name="T4035"><text:s/></text:span><text:span>aligning</text:span><text:span text:style-name="T4036"><text:s/></text:span><text:span>seamlessly</text:span><text:span text:style-name="T4037"><text:s/></text:span><text:span>with the philosophy of the Demos Network.</text:span><text:span/></text:p>
      <text:p text:style-name="P588"><text:span text:style-name="T4038"/><text:span text:style-name="T4039"/></text:p>
      <text:p text:style-name="P589"><text:span text:style-name="T4040"/><text:span text:style-name="T4041"/></text:p>
      <text:list>
        <text:list-item>
          <text:h text:outline-level="3" text:restart-numbering="0" text:is-list-header="0" text:style-name="P590"><text:span/><text:bookmark-start text:name="_Toc49"/><text:span/><text:span/><text:bookmark-start text:name="Demos_Network_and_TOR:_A_Natural_Synergy"/><text:span/><text:bookmark-end text:name="Demos_Network_and_TOR:_A_Natural_Synergy"/><text:span>Demos</text:span><text:span text:style-name="T4042"><text:s/></text:span><text:span>Network</text:span><text:span text:style-name="T4043"><text:s/></text:span><text:span>and</text:span><text:span text:style-name="T4044"><text:s/></text:span><text:span>TOR:</text:span><text:span text:style-name="T4045"><text:s/></text:span><text:span>A</text:span><text:span text:style-name="T4046"><text:s/></text:span><text:span>Natural</text:span><text:span text:style-name="T4047"><text:s/></text:span><text:span text:style-name="T4048">Synergy</text:span><text:span/><text:bookmark-end text:name="_Toc49"/><text:span/><text:span/></text:h>
        </text:list-item>
      </text:list>
      <text:p text:style-name="P591"><text:span>Demos</text:span><text:span text:style-name="T4049"><text:s/></text:span><text:span>specifications</text:span><text:span text:style-name="T4050"><text:s/></text:span><text:span>establish</text:span><text:span text:style-name="T4051"><text:s/></text:span><text:span>a</text:span><text:span text:style-name="T4052"><text:s/></text:span><text:span>standardized</text:span><text:span text:style-name="T4053"><text:s/></text:span><text:span>and</text:span><text:span text:style-name="T4054"><text:s/></text:span><text:span>universal</text:span><text:span text:style-name="T4055"><text:s/></text:span><text:span>approach</text:span><text:span text:style-name="T4056"><text:s/></text:span><text:span>to</text:span><text:span text:style-name="T4057"><text:s/></text:span><text:span>accessing</text:span><text:span text:style-name="T4058"><text:s/></text:span><text:span>Web2 data. From a techni</text:span><text:span>cal standpoint, Demos is inherently compatible with TOR when appropriately configured. The specifications include a mandatory compatibility layer, enabling clients and RPCs to utilize the TOR network for requests that would typically occur on the clearnet.</text:span><text:span/></text:p>
      <text:p text:style-name="P592"><text:span>Despite the inevitable increase in delay and finality inherent to the security of the TOR protocol, the Demos Network adeptly manages tasks such as .onion links resolution, hidden</text:span><text:span text:style-name="T4059"><text:s/></text:span><text:span>services</text:span><text:span text:style-name="T4060"><text:s/></text:span><text:span>provisioning,</text:span><text:span text:style-name="T4061"><text:s/></text:span><text:span>and</text:span><text:span text:style-name="T4062"><text:s/></text:span><text:span>overall</text:span><text:span text:style-name="T4063"><text:s/></text:span><text:span>TOR-based</text:span><text:span text:style-name="T4064"><text:s/></text:span><text:span>privacy</text:span><text:span text:style-name="T4065"><text:s/></text:span><text:span>communication,</text:span><text:span text:style-name="T4066"><text:s/></text:span><text:span>particularly in the Web2 and IMP context.</text:span><text:span/></text:p>
      <text:p text:style-name="P593"><text:span>Notably,</text:span><text:span text:style-name="T4067"><text:s/></text:span><text:span>Demos</text:span><text:span text:style-name="T4068"><text:s/></text:span><text:span>specifications</text:span><text:span text:style-name="T4069"><text:s/></text:span><text:span>define</text:span><text:span text:style-name="T4070"><text:s/></text:span><text:span>the</text:span><text:span text:style-name="T4071"><text:s/></text:span><text:span>TOR</text:span><text:span text:style-name="T4072"><text:s/></text:span><text:span>compatibility</text:span><text:span text:style-name="T4073"><text:s/></text:span><text:span>layer</text:span><text:span text:style-name="T4074"><text:s/></text:span><text:span>as</text:span><text:span text:style-name="T4075"><text:s/></text:span><text:span>a</text:span><text:span text:style-name="T4076"><text:s/></text:span><text:span>module</text:span><text:span text:style-name="T4077"><text:s/></text:span><text:span>that</text:span><text:span text:style-name="T4078"><text:s/></text:span><text:span>must seamlessly integrate with any other Demos module. To illustrate a potential use case, consider a Demos transaction conducted through TOR in a Web2 scenario:</text:span><text:span/></text:p>
      <text:p text:style-name="P594"><text:span>Here</text:span><text:span text:style-name="T4079"><text:s/></text:span><text:span>is</text:span><text:span text:style-name="T4080"><text:s/></text:span><text:span>an</text:span><text:span text:style-name="T4081"><text:s/></text:span><text:span>example of</text:span><text:span text:style-name="T4082"><text:s/></text:span><text:span>a</text:span><text:span text:style-name="T4083"><text:s/></text:span><text:span>possible use</text:span><text:span text:style-name="T4084"><text:s/></text:span><text:span>of</text:span><text:span text:style-name="T4085"><text:s/></text:span><text:span>Demos</text:span><text:span text:style-name="T4086"><text:s/></text:span><text:span>through a</text:span><text:span text:style-name="T4087"><text:s/></text:span><text:span>TOR</text:span><text:span text:style-name="T4088"><text:s/></text:span><text:span>Web2 </text:span><text:span text:style-name="T4089">Transaction:</text:span><text:span/></text:p>
      <text:list text:style-name="WWNum16" text:continue-numbering="true">
        <text:list-item>
          <text:p text:style-name="P595"><text:span text:style-name="T4090">Alice,</text:span><text:span text:style-name="T4091"><text:s/></text:span><text:span text:style-name="T4092">residing</text:span><text:span text:style-name="T4093"><text:s/></text:span><text:span text:style-name="T4094">in</text:span><text:span text:style-name="T4095"><text:s/></text:span><text:span text:style-name="T4096">a</text:span><text:span text:style-name="T4097"><text:s/></text:span><text:span text:style-name="T4098">censored</text:span><text:span text:style-name="T4099"><text:s/></text:span><text:span text:style-name="T4100">country,</text:span><text:span text:style-name="T4101"><text:s/></text:span><text:span text:style-name="T4102">wishes</text:span><text:span text:style-name="T4103"><text:s/></text:span><text:span text:style-name="T4104">to</text:span><text:span text:style-name="T4105"><text:s/></text:span><text:span text:style-name="T4106">access</text:span><text:span text:style-name="T4107"><text:s/></text:span><text:span text:style-name="T4108">the</text:span><text:span text:style-name="T4109"><text:s/></text:span><text:span text:style-name="T4110">Unbiased</text:span><text:span text:style-name="T4111"><text:s/></text:span><text:span text:style-name="T4112">News</text:span><text:span text:style-name="T4113"><text:s/></text:span><text:span text:style-name="T4114">Journal</text:span><text:span/></text:p>
        </text:list-item>
        <text:list-item>
          <text:p text:style-name="P596"><text:span text:style-name="T4115">Locally,</text:span><text:span text:style-name="T4116"><text:s/></text:span><text:span text:style-name="T4117">Alice</text:span><text:span text:style-name="T4118"><text:s/></text:span><text:span text:style-name="T4119">creates</text:span><text:span text:style-name="T4120"><text:s/></text:span><text:span text:style-name="T4121">a</text:span><text:span text:style-name="T4122"><text:s/></text:span><text:span text:style-name="T4123">Demos</text:span><text:span text:style-name="T4124"><text:s/></text:span><text:span text:style-name="T4125">Transaction,</text:span><text:span text:style-name="T4126"><text:s/></text:span><text:span text:style-name="T4127">requesting</text:span><text:span text:style-name="T4128"><text:s/></text:span><text:span text:style-name="T4129">the</text:span><text:span text:style-name="T4130"><text:s/></text:span><text:span text:style-name="T4131">Web2</text:span><text:span text:style-name="T4132"><text:s/></text:span><text:span text:style-name="T4133">resource</text:span><text:span text:style-name="T4134"><text:s/></text:span><text:span text:style-name="T4135">over </text:span><text:span text:style-name="T4136">TOR</text:span><text:span/></text:p>
        </text:list-item>
        <text:list-item>
          <text:p text:style-name="P597"><text:span text:style-name="T4137">Alice transmits the encrypted Demos </text:span><text:span text:style-name="T4138">transaction</text:span><text:span/></text:p>
        </text:list-item>
        <text:list-item>
          <text:p text:style-name="P598"><text:span text:style-name="T4139">The</text:span><text:span text:style-name="T4140"><text:s/></text:span><text:span text:style-name="T4141">Demos</text:span><text:span text:style-name="T4142"><text:s/></text:span><text:span text:style-name="T4143">RPC</text:span><text:span text:style-name="T4144"><text:s/></text:span><text:span text:style-name="T4145">decrypts</text:span><text:span text:style-name="T4146"><text:s/></text:span><text:span text:style-name="T4147">the</text:span><text:span text:style-name="T4148"><text:s/></text:span><text:span text:style-name="T4149">transaction</text:span><text:span text:style-name="T4150"><text:s/></text:span><text:span text:style-name="T4151">and</text:span><text:span text:style-name="T4152"><text:s/></text:span><text:span text:style-name="T4153">initializes</text:span><text:span text:style-name="T4154"><text:s/></text:span><text:span text:style-name="T4155">the</text:span><text:span text:style-name="T4156"><text:s/></text:span><text:span text:style-name="T4157">Web2</text:span><text:span text:style-name="T4158"><text:s/></text:span><text:span text:style-name="T4159">module</text:span><text:span text:style-name="T4160"><text:s/></text:span><text:span text:style-name="T4161">with </text:span><text:span text:style-name="T4162">TOR</text:span><text:span/></text:p>
        </text:list-item>
        <text:list-item>
          <text:p text:style-name="P599"><text:span text:style-name="T4163">Upon</text:span><text:span text:style-name="T4164"><text:s/></text:span><text:span text:style-name="T4165">retrieving</text:span><text:span text:style-name="T4166"><text:s/></text:span><text:span text:style-name="T4167">the</text:span><text:span text:style-name="T4168"><text:s/></text:span><text:span text:style-name="T4169">clearnet</text:span><text:span text:style-name="T4170"><text:s/></text:span><text:span text:style-name="T4171">or</text:span><text:span text:style-name="T4172"><text:s/></text:span><text:span text:style-name="T4173">hidden</text:span><text:span text:style-name="T4174"><text:s/></text:span><text:span text:style-name="T4175">service</text:span><text:span text:style-name="T4176"><text:s/></text:span><text:span text:style-name="T4177">data,</text:span><text:span text:style-name="T4178"><text:s/></text:span><text:span text:style-name="T4179">the</text:span><text:span text:style-name="T4180"><text:s/></text:span><text:span text:style-name="T4181">result</text:span><text:span text:style-name="T4182"><text:s/></text:span><text:span text:style-name="T4183">is</text:span><text:span text:style-name="T4184"><text:s/></text:span><text:span text:style-name="T4185">encrypted</text:span><text:span text:style-name="T4186"><text:s/></text:span><text:span text:style-name="T4187">and</text:span><text:span text:style-name="T4188"><text:s/></text:span><text:span text:style-name="T4189">sent back to Alice</text:span><text:span/></text:p>
        </text:list-item>
        <text:list-item>
          <text:p text:style-name="P600"><text:span text:style-name="T4190">Only Alice possesses the capability to decrypt the message at her </text:span><text:span text:style-name="T4191">discretion</text:span><text:span/></text:p>
        </text:list-item>
        <text:list-item>
          <text:p text:style-name="P601"><text:span text:style-name="T4192">The only data retained by the RPC Node is the attestation of the </text:span><text:span text:style-name="T4193">request</text:span><text:span/></text:p>
        </text:list-item>
        <text:soft-page-break/>
      </text:list>
      <text:list>
        <text:list-item>
          <text:h text:outline-level="2" text:restart-numbering="0" text:is-list-header="0" text:style-name="P602"><text:span/><text:bookmark-start text:name="_Toc50"/><text:span/><text:span>Cross-chain Logic </text:span><text:span text:style-name="T4194">Execution</text:span><text:span/><text:bookmark-end text:name="_Toc50"/><text:span/><text:span/></text:h>
        </text:list-item>
      </text:list>
      <text:p text:style-name="P603"><text:span text:style-name="T4195"/><text:span text:style-name="T4196"/></text:p>
      <text:p text:style-name="P604"><text:span>The</text:span><text:span text:style-name="T4197"><text:s/></text:span><text:span>concept</text:span><text:span text:style-name="T4198"><text:s/></text:span><text:span>of</text:span><text:span text:style-name="T4199"><text:s/></text:span><text:span>Cross-chain</text:span><text:span text:style-name="T4200"><text:s/></text:span><text:span>Execution</text:span><text:span text:style-name="T4201"><text:s/></text:span><text:span>is</text:span><text:span text:style-name="T4202"><text:s/></text:span><text:span>the</text:span><text:span text:style-name="T4203"><text:s/></text:span><text:span>integration</text:span><text:span text:style-name="T4204"><text:s/></text:span><text:span>of</text:span><text:span text:style-name="T4205"><text:s/></text:span><text:span>diverse</text:span><text:span text:style-name="T4206"><text:s/></text:span><text:span>domains,</text:span><text:span text:style-name="T4207"><text:s/></text:span><text:span>combining attributes like security and speed by empowering developers to script, execute, and consolidate smart contracts and transactions across multiple networks.</text:span><text:span/></text:p>
      <text:p text:style-name="P605"><text:span/><text:span/></text:p>
      <text:p text:style-name="P606"><text:span>By h</text:span><text:span>arnessing the strengths of individual networks and mitigating their respective limitations, Cross-chain Execution establishes a more efficient and secure system as a whole. For instance, developers can leverage the speed and efficiency of one network while</text:span><text:span text:style-name="T4208"><text:s/></text:span><text:span>compensating</text:span><text:span text:style-name="T4209"><text:s/></text:span><text:span>for</text:span><text:span text:style-name="T4210"><text:s/></text:span><text:span>its</text:span><text:span text:style-name="T4211"><text:s/></text:span><text:span>lack</text:span><text:span text:style-name="T4212"><text:s/></text:span><text:span>of</text:span><text:span text:style-name="T4213"><text:s/></text:span><text:span>robust</text:span><text:span text:style-name="T4214"><text:s/></text:span><text:span>security</text:span><text:span text:style-name="T4215"><text:s/></text:span><text:span>features</text:span><text:span text:style-name="T4216"><text:s/></text:span><text:span>by</text:span><text:span text:style-name="T4217"><text:s/></text:span><text:span>utilizing</text:span><text:span text:style-name="T4218"><text:s/></text:span><text:span>another</text:span><text:span text:style-name="T4219"><text:s/></text:span><text:span>network</text:span><text:span text:style-name="T4220"><text:s/></text:span><text:span>that offers enhanced security capabilities.</text:span><text:span/></text:p>
      <text:p text:style-name="P607"><text:span/><text:span/></text:p>
      <text:p text:style-name="P608"><text:span>This approach offers flexibility and adaptability, enabling developers to select the most suitab</text:span><text:span>le network for each specific task, unrestricted by a single network. It fosters a decentralized ecosystem, devoid of any dominant controlling entity, by creating an interconnected layer with Demos, facilitating seamless data and functional transfer between</text:span><text:span text:style-name="T4221"><text:s/></text:span><text:span>networks.</text:span><text:span text:style-name="T4222"><text:s/></text:span><text:span>This</text:span><text:span text:style-name="T4223"><text:s/></text:span><text:span>interconnectedness</text:span><text:span text:style-name="T4224"><text:s/></text:span><text:span>allows</text:span><text:span text:style-name="T4225"><text:s/></text:span><text:span>for</text:span><text:span text:style-name="T4226"><text:s/></text:span><text:span>efficient</text:span><text:span text:style-name="T4227"><text:s/></text:span><text:span>resource</text:span><text:span text:style-name="T4228"><text:s/></text:span><text:span>exchange</text:span><text:span text:style-name="T4229"><text:s/></text:span><text:span>and utilization, promoting a cohesive and synergistic ecosystem.</text:span><text:span/></text:p>
      <text:p text:style-name="P609"><text:span text:style-name="T4230"/><text:span text:style-name="T4231"/></text:p>
      <text:list>
        <text:list-item>
          <text:h text:outline-level="3" text:restart-numbering="0" text:is-list-header="0" text:style-name="P610"><text:span/><text:bookmark-start text:name="_Toc51"/><text:span/><text:span>Design</text:span><text:span text:style-name="T4232"><text:s/></text:span><text:span>and</text:span><text:span text:style-name="T4233"><text:s/></text:span><text:span text:style-name="T4234">Principles</text:span><text:span/><text:bookmark-end text:name="_Toc51"/><text:span/><text:span/></text:h>
        </text:list-item>
      </text:list>
      <text:p text:style-name="P611"><text:span text:style-name="T4235"/><text:span text:style-name="T4236"/></text:p>
      <text:p text:style-name="P612"><text:span>Cross-chain Execution refers to a novel design principle that facilitates efficient and rapid interaction between different blockchains. This advanced concept is particularly advantageous</text:span><text:span text:style-name="T4237"><text:s/></text:span><text:span>in</text:span><text:span text:style-name="T4238"><text:s/></text:span><text:span>scenarios</text:span><text:span text:style-name="T4239"><text:s/></text:span><text:span>where</text:span><text:span text:style-name="T4240"><text:s/></text:span><text:span>smart</text:span><text:span text:style-name="T4241"><text:s/></text:span><text:span>contracts</text:span><text:span text:style-name="T4242"><text:s/></text:span><text:span>or</text:span><text:span text:style-name="T4243"><text:s/></text:span><text:span>a</text:span><text:span text:style-name="T4244"><text:s/></text:span><text:span>collection</text:span><text:span text:style-name="T4245"><text:s/></text:span><text:span>thereof</text:span><text:span text:style-name="T4246"><text:s/></text:span><text:span>necessitate</text:span><text:span text:style-name="T4247"><text:s/></text:span><text:span>a substantial computational workload.</text:span><text:span/></text:p>
      <text:p text:style-name="P613"><text:span/><text:span/></text:p>
      <text:p text:style-name="P614"><text:span>For instance, consider a dApp developer who desires to maintain the security of </text:span><text:span text:style-name="T4248">a</text:span><text:span/></text:p>
      <text:p text:style-name="P615"><text:span>gas-intensive</text:span><text:span text:style-name="T4249"><text:s/></text:span><text:span>chain</text:span><text:span text:style-name="T4250"><text:s/></text:span><text:span>like</text:span><text:span text:style-name="T4251"><text:s/></text:span><text:span>Ethereum</text:span><text:span text:style-name="T4252"><text:s/></text:span><text:span>while</text:span><text:span text:style-name="T4253"><text:s/></text:span><text:span>capitalizing</text:span><text:span text:style-name="T4254"><text:s/></text:span><text:span>on</text:span><text:span text:style-name="T4255"><text:s/></text:span><text:span>the</text:span><text:span text:style-name="T4256"><text:s/></text:span><text:span>lower</text:span><text:span text:style-name="T4257"><text:s/></text:span><text:span>gas</text:span><text:span text:style-name="T4258"><text:s/></text:span><text:span>costs</text:span><text:span text:style-name="T4259"><text:s/></text:span><text:span>associated</text:span><text:span text:style-name="T4260"><text:s/></text:span><text:span>with a less robust chain such as Binance Smart Chain (BSC). The introduction of Cross-chain Execution has made it possible to execute portions of a sm</text:span><text:span>art contract on BSC, while the ultimate outcome is validated and finalized on Ethereum. By adopting this approach, developers can harness the swiftness and efficiency of BSC while simultaneously upholding the security and functionality offered by Ethereum.</text:span><text:span/></text:p>
      <text:p text:style-name="P616"><text:span/><text:span/></text:p>
      <text:p text:style-name="P617"><text:span>Furthermore, Cross-chain Execution empowers developers to create intricate dApps that exploit</text:span><text:span text:style-name="T4261"><text:s/></text:span><text:span>the</text:span><text:span text:style-name="T4262"><text:s/></text:span><text:span>unique</text:span><text:span text:style-name="T4263"><text:s/></text:span><text:span>strengths</text:span><text:span text:style-name="T4264"><text:s/></text:span><text:span>of</text:span><text:span text:style-name="T4265"><text:s/></text:span><text:span>multiple</text:span><text:span text:style-name="T4266"><text:s/></text:span><text:span>blockchain</text:span><text:span text:style-name="T4267"><text:s/></text:span><text:span>networks,</text:span><text:span text:style-name="T4268"><text:s/></text:span><text:span>without</text:span><text:span text:style-name="T4269"><text:s/></text:span><text:span>confining</text:span><text:span text:style-name="T4270"><text:s/></text:span><text:span>themselves to a single chain.</text:span><text:span/></text:p>
      <text:p text:style-name="P618"><text:span/><text:span/></text:p>
      <text:p text:style-name="P619"><text:span>To</text:span><text:span text:style-name="T4271"><text:s/></text:span><text:span>enable</text:span><text:span text:style-name="T4272"><text:s/></text:span><text:span>the</text:span><text:span text:style-name="T4273"><text:s/></text:span><text:span>implementation</text:span><text:span text:style-name="T4274"><text:s/></text:span><text:span>of</text:span><text:span text:style-name="T4275"><text:s/></text:span><text:span>Cross-chain</text:span><text:span text:style-name="T4276"><text:s/></text:span><text:span>Execution,</text:span><text:span text:style-name="T4277"><text:s/></text:span><text:span>Demos</text:span><text:span text:style-name="T4278"><text:s/></text:span><text:span>has</text:span><text:span text:style-name="T4279"><text:s/></text:span><text:span text:style-name="T4280">developed</text:span><text:span/></text:p>
      <text:p text:style-name="P620"><text:span>user-friendly</text:span><text:span text:style-name="T4281"><text:s/></text:span><text:span>standardized</text:span><text:span text:style-name="T4282"><text:s/></text:span><text:span>endpoints</text:span><text:span text:style-name="T4283"><text:s/></text:span><text:span>and</text:span><text:span text:style-name="T4284"><text:s/></text:span><text:span>software</text:span><text:span text:style-name="T4285"><text:s/></text:span><text:span>development</text:span><text:span text:style-name="T4286"><text:s/></text:span><text:span>kit</text:span><text:span text:style-name="T4287"><text:s/></text:span><text:span>(SDK)</text:span><text:span text:style-name="T4288"><text:s/></text:span><text:span>functions.</text:span><text:span text:style-name="T4289"><text:s/></text:span><text:span>These resources facilitate Cross-chain execution for both clients and developers. The platform's unified architecture adheres to the principle of interoperability, ensuring seamless collaboration among diverse blockchain networks.</text:span><text:span/></text:p>
      <text:p text:style-name="P621"><text:span/><text:span/></text:p>
      <text:p text:style-name="P622"><text:span>Each supported chain encapsulates its available methods, such as establishing a con</text:span><text:span>nection with a provider or retrieving balances, within a standardized object that exposes identical methods across all supported chains. This standardized approach simplifies the execution of transactions across different blockchain networks, as developers</text:span><text:span text:style-name="T4290"><text:s/></text:span><text:span>can</text:span><text:span text:style-name="T4291"><text:s/></text:span><text:span>utilize</text:span><text:span text:style-name="T4292"><text:s/></text:span><text:span>a</text:span><text:span text:style-name="T4293"><text:s/></text:span><text:span>single</text:span><text:span text:style-name="T4294"><text:s/></text:span><text:span>method,</text:span><text:span text:style-name="T4295"><text:s/></text:span><text:span>such</text:span><text:span text:style-name="T4296"><text:s/></text:span><text:span>as</text:span><text:span text:style-name="T4297"><text:s/></text:span><text:span>"Connect,"</text:span><text:span text:style-name="T4298"><text:s/></text:span><text:span>which</text:span><text:span text:style-name="T4299"><text:s/></text:span><text:span>remains</text:span><text:span text:style-name="T4300"><text:s/></text:span><text:span>applicable</text:span><text:span text:style-name="T4301"><text:s/></text:span><text:span>to every supported chain.</text:span><text:span/></text:p>
      <text:p text:style-name="P623"><text:span>Moreover, the platform's SDK functions furnish developers with a straightforward and intuitive</text:span><text:span text:style-name="T4302"><text:s/></text:span><text:span>interface</text:span><text:span text:style-name="T4303"><text:s/></text:span><text:span>to</text:span><text:span text:style-name="T4304"><text:s/></text:span><text:span>interact</text:span><text:span text:style-name="T4305"><text:s/></text:span><text:span>with</text:span><text:span text:style-name="T4306"><text:s/></text:span><text:span>the</text:span><text:span text:style-name="T4307"><text:s/></text:span><text:span>blockchain</text:span><text:span text:style-name="T4308"><text:s/></text:span><text:span>network,</text:span><text:span text:style-name="T4309"><text:s/></text:span><text:span>thereby</text:span><text:span text:style-name="T4310"><text:s/></text:span><text:span>streamlining</text:span><text:span text:style-name="T4311"><text:s/></text:span><text:span>the</text:span><text:span text:style-name="T4312"><text:s/></text:span><text:span>process of building decentralized applications.</text:span><text:span/></text:p>
      <text:p text:style-name="P624"><text:span text:style-name="T4313"/><text:span text:style-name="T4314"/></text:p>
      <text:p text:style-name="P625"><text:span>The SDK undergoes continuous maintenance and updates to accommodate the expanding range of supported blockchains. Importantly, these enhancements are implemented</text:span><text:span text:style-name="T4315"><text:s/></text:span><text:span>without</text:span><text:span text:style-name="T4316"><text:s/></text:span><text:span>necessitating</text:span><text:span text:style-name="T4317"><text:s/></text:span><text:span>developers</text:span><text:span text:style-name="T4318"><text:s/></text:span><text:span>and</text:span><text:span text:style-name="T4319"><text:s/></text:span><text:span>users</text:span><text:span text:style-name="T4320"><text:s/></text:span><text:span>to</text:span><text:span text:style-name="T4321"><text:s/></text:span><text:span>make</text:span><text:span text:style-name="T4322"><text:s/></text:span><text:span>significant</text:span><text:span text:style-name="T4323"><text:s/></text:span><text:span>changes</text:span><text:span text:style-name="T4324"><text:s/></text:span><text:span>to their existing code, thereby minimizing the learning curve while preserving flexibility and </text:span><text:span text:style-name="T4325">simplicity.</text:span><text:span/></text:p>
      <text:p text:style-name="P626"><text:span/><text:span/></text:p>
      <text:p text:style-name="P627"><text:span>Similarly,</text:span><text:span text:style-name="T4326"><text:s/></text:span><text:span>transaction</text:span><text:span text:style-name="T4327"><text:s/></text:span><text:span>execution</text:span><text:span text:style-name="T4328"><text:s/></text:span><text:span>adheres</text:span><text:span text:style-name="T4329"><text:s/></text:span><text:span>to</text:span><text:span text:style-name="T4330"><text:s/></text:span><text:span>the</text:span><text:span text:style-name="T4331"><text:s/></text:span><text:span>same</text:span><text:span text:style-name="T4332"><text:s/></text:span><text:span>underlying</text:span><text:span text:style-name="T4333"><text:s/></text:span><text:span>principles,</text:span><text:span text:style-name="T4334"><text:s/></text:span><text:span>bolstered</text:span><text:span text:style-name="T4335"><text:s/></text:span><text:span>by</text:span><text:span text:style-name="T4336"><text:s/></text:span><text:span>an additional layer of security that mandates authentication of the requester before executing any write-like operation.</text:span><text:span/></text:p>
      <text:p text:style-name="P628"><text:span text:style-name="T4337"/><text:span text:style-name="T4338"/></text:p>
      <text:p text:style-name="P629"><text:span/><text:bookmark-start text:name="Securing_XM_Context_"/><text:span/><text:bookmark-end text:name="Securing_XM_Context_"/><text:span text:style-name="T4339">Securing</text:span><text:span text:style-name="T4340"><text:s/></text:span><text:span text:style-name="T4341">XM</text:span><text:span text:style-name="T4342"><text:s/></text:span><text:span text:style-name="T4343">Context</text:span><text:span/></text:p>
      <text:p text:style-name="P630"><text:span text:style-name="T4344"/><text:span text:style-name="T4345"/></text:p>
      <text:p text:style-name="P631"><text:span>Cross-chain data transfer and thus interoperability is a very delicate field. Among the myriad</text:span><text:span text:style-name="T4346"><text:s/></text:span><text:span>of</text:span><text:span text:style-name="T4347"><text:s/></text:span><text:span>possible</text:span><text:span text:style-name="T4348"><text:s/></text:span><text:span>security</text:span><text:span text:style-name="T4349"><text:s/></text:span><text:span>problems,</text:span><text:span text:style-name="T4350"><text:s/></text:span><text:span>the</text:span><text:span text:style-name="T4351"><text:s/></text:span><text:span>main</text:span><text:span text:style-name="T4352"><text:s/></text:span><text:span>barrier</text:span><text:span text:style-name="T4353"><text:s/></text:span><text:span>for</text:span><text:span text:style-name="T4354"><text:s/></text:span><text:span>developers</text:span><text:span text:style-name="T4355"><text:s/></text:span><text:span>and</text:span><text:span text:style-name="T4356"><text:s/></text:span><text:span>clients</text:span><text:span text:style-name="T4357"><text:s/></text:span><text:span>is</text:span><text:span text:style-name="T4358"><text:s/></text:span><text:span>the</text:span><text:span text:style-name="T4359"><text:s/></text:span><text:span>non existent standardization of chain operations.</text:span><text:span/></text:p>
      <text:p text:style-name="P632"><text:span>Demos</text:span><text:span text:style-name="T4360"><text:s/></text:span><text:span>implements</text:span><text:span text:style-name="T4361"><text:s/></text:span><text:span>the</text:span><text:span text:style-name="T4362"><text:s/></text:span><text:span>Demos</text:span><text:span text:style-name="T4363"><text:s/></text:span><text:span>SDK</text:span><text:span text:style-name="T4364"><text:s/></text:span><text:span>XM</text:span><text:span text:style-name="T4365"><text:s/></text:span><text:span>module.</text:span><text:span text:style-name="T4366"><text:s/></text:span><text:span>With</text:span><text:span text:style-name="T4367"><text:s/></text:span><text:span>the</text:span><text:span text:style-name="T4368"><text:s/></text:span><text:span>SDK,</text:span><text:span text:style-name="T4369"><text:s/></text:span><text:span>clients</text:span><text:span text:style-name="T4370"><text:s/></text:span><text:span>can</text:span><text:span text:style-name="T4371"><text:s/></text:span><text:span>seamless</text:span><text:span>ly construct multichain transactions in an intuitive manner or through a straightforward scripting language known as XM Script. The Demos RPC processes the XM Script, receiving it and returning the results along with attestation data from all the involved </text:span><text:span text:style-name="T4372">chains.</text:span><text:span/></text:p>
      <text:p text:style-name="P633"><text:span>While the aim of this process is to be as swift as possible, it's crucial to acknowledge that the</text:span><text:span text:style-name="T4373"><text:s/></text:span><text:span>speed</text:span><text:span text:style-name="T4374"><text:s/></text:span><text:span>of</text:span><text:span text:style-name="T4375"><text:s/></text:span><text:span>a</text:span><text:span text:style-name="T4376"><text:s/></text:span><text:span>transaction</text:span><text:span text:style-name="T4377"><text:s/></text:span><text:span>is</text:span><text:span text:style-name="T4378"><text:s/></text:span><text:span>limited</text:span><text:span text:style-name="T4379"><text:s/></text:span><text:span>by</text:span><text:span text:style-name="T4380"><text:s/></text:span><text:span>the</text:span><text:span text:style-name="T4381"><text:s/></text:span><text:span>slowest</text:span><text:span text:style-name="T4382"><text:s/></text:span><text:span>network</text:span><text:span text:style-name="T4383"><text:s/></text:span><text:span>within</text:span><text:span text:style-name="T4384"><text:s/></text:span><text:span>the</text:span><text:span text:style-name="T4385"><text:s/></text:span><text:span>operation.</text:span><text:span text:style-name="T4386"><text:s/></text:span><text:span>This</text:span><text:span text:style-name="T4387"><text:s/></text:span><text:span>holds particularly true when each transaction requires finality. However, for read-only transactions, this logic generally doesn't apply as they typically don't necessitate finality.</text:span><text:span/></text:p>
      <text:list>
        <text:list-item>
          <text:h text:outline-level="3" text:restart-numbering="0" text:is-list-header="0" text:style-name="P634"><text:span/><text:bookmark-start text:name="_Toc52"/><text:span/><text:span>Read,</text:span><text:span text:style-name="T4388"><text:s/></text:span><text:span>Write,</text:span><text:span text:style-name="T4389"><text:s/></text:span><text:span>and</text:span><text:span text:style-name="T4390"><text:s/></text:span><text:span>Cross-chain</text:span><text:span text:style-name="T4391"><text:s/></text:span><text:span text:style-name="T4392">Presence</text:span><text:span/><text:bookmark-end text:name="_Toc52"/><text:span/><text:span/></text:h>
        </text:list-item>
      </text:list>
      <text:p text:style-name="P635"><text:span text:style-name="T4393"/><text:span text:style-name="T4394"/></text:p>
      <text:p text:style-name="P636"><text:span>To enable interoperability across various blockchains, Demos employs a comprehensive framework</text:span><text:span text:style-name="T4395"><text:s/></text:span><text:span>that</text:span><text:span text:style-name="T4396"><text:s/></text:span><text:span>supports</text:span><text:span text:style-name="T4397"><text:s/></text:span><text:span>two</text:span><text:span text:style-name="T4398"><text:s/></text:span><text:span>distinct</text:span><text:span text:style-name="T4399"><text:s/></text:span><text:span>types</text:span><text:span text:style-name="T4400"><text:s/></text:span><text:span>of</text:span><text:span text:style-name="T4401"><text:s/></text:span><text:span>operations</text:span><text:span text:style-name="T4402"><text:s/></text:span><text:span>within</text:span><text:span text:style-name="T4403"><text:s/></text:span><text:span>the</text:span><text:span text:style-name="T4404"><text:s/></text:span><text:span>domain</text:span><text:span text:style-name="T4405"><text:s/></text:span><text:span>of</text:span><text:span text:style-name="T4406"><text:s/></text:span><text:span>Cross-chain </text:span><text:span text:style-name="T4407">Execution.</text:span><text:span/></text:p>
      <text:p text:style-name="P637"><text:span/><text:span/></text:p>
      <text:p text:style-name="P638"><text:span>The Read operations entail retrieving data from target networks without requiring explicit authentication, except for specific scenarios. For instance, examining the account balance on</text:span><text:span text:style-name="T4408"><text:s/></text:span><text:span>Solana</text:span><text:span text:style-name="T4409"><text:s/></text:span><text:span>does</text:span><text:span text:style-name="T4410"><text:s/></text:span><text:span>not</text:span><text:span text:style-name="T4411"><text:s/></text:span><text:span>necessitate</text:span><text:span text:style-name="T4412"><text:s/></text:span><text:span>possessing</text:span><text:span text:style-name="T4413"><text:s/></text:span><text:span>a</text:span><text:span text:style-name="T4414"><text:s/></text:span><text:span>Solana</text:span><text:span text:style-name="T4415"><text:s/></text:span><text:span>account,</text:span><text:span text:style-name="T4416"><text:s/></text:span><text:span>and</text:span><text:span text:style-name="T4417"><text:s/></text:span><text:span>this</text:span><text:span text:style-name="T4418"><text:s/></text:span><text:span>principle</text:span><text:span text:style-name="T4419"><text:s/></text:span><text:span>holds</text:span><text:span text:style-name="T4420"><text:s/></text:span><text:span>true for nearly all read operations across diverse networks. This operational category proves immensely valuable for swiftly obtaining data without the need to engage in</text:span><text:span/></text:p>
      <text:p text:style-name="P639"><text:span>time-consuming</text:span><text:span text:style-name="T4421"><text:s/></text:span><text:span>processes</text:span><text:span text:style-name="T4422"><text:s/></text:span><text:span>like</text:span><text:span text:style-name="T4423"><text:s/></text:span><text:span>handshake</text:span><text:span text:style-name="T4424"><text:s/></text:span><text:span>establishment,</text:span><text:span text:style-name="T4425"><text:s/></text:span><text:span>authentication,</text:span><text:span text:style-name="T4426"><text:s/></text:span><text:span>and</text:span><text:span text:style-name="T4427"><text:s/></text:span><text:span>data propagation associated with on-chain modifications.</text:span><text:span/></text:p>
      <text:p text:style-name="P640"><text:span/><text:span/></text:p>
      <text:p text:style-name="P641"><text:span>The</text:span><text:span text:style-name="T4428"><text:s/></text:span><text:span>Write</text:span><text:span text:style-name="T4429"><text:s/></text:span><text:span>operations</text:span><text:span text:style-name="T4430"><text:s/></text:span><text:span>demand</text:span><text:span text:style-name="T4431"><text:s/></text:span><text:span>meticulous</text:span><text:span text:style-name="T4432"><text:s/></text:span><text:span>and</text:span><text:span text:style-name="T4433"><text:s/></text:span><text:span>trusted</text:span><text:span text:style-name="T4434"><text:s/></text:span><text:span>authentication</text:span><text:span text:style-name="T4435"><text:s/></text:span><text:span>on</text:span><text:span text:style-name="T4436"><text:s/></text:span><text:span>the</text:span><text:span text:style-name="T4437"><text:s/></text:span><text:span>target</text:span><text:span text:style-name="T4438"><text:s/></text:span><text:span>network to</text:span><text:span text:style-name="T4439"><text:s/></text:span><text:span>ensure</text:span><text:span text:style-name="T4440"><text:s/></text:span><text:span>secure</text:span><text:span text:style-name="T4441"><text:s/></text:span><text:span>execution.</text:span><text:span text:style-name="T4442"><text:s/></text:span><text:span>Since</text:span><text:span text:style-name="T4443"><text:s/></text:span><text:span>these</text:span><text:span text:style-name="T4444"><text:s/></text:span><text:span>operations</text:span><text:span text:style-name="T4445"><text:s/></text:span><text:span>involve</text:span><text:span text:style-name="T4446"><text:s/></text:span><text:span>altering</text:span><text:span text:style-name="T4447"><text:s/></text:span><text:span>data</text:span><text:span text:style-name="T4448"><text:s/></text:span><text:span>on-chain,</text:span><text:span text:style-name="T4449"><text:s/></text:span><text:span>utmost caution, efficiency, and discretion must be exercised to ensure data accuracy and identity</text:span><text:span/></text:p>
      <text:p text:style-name="P642"><text:span>integrity.</text:span><text:span text:style-name="T4450"><text:s/></text:span><text:span>By</text:span><text:span text:style-name="T4451"><text:s/></text:span><text:span>leveraging</text:span><text:span text:style-name="T4452"><text:s/></text:span><text:span>client-side</text:span><text:span text:style-name="T4453"><text:s/></text:span><text:span>signatures</text:span><text:span text:style-name="T4454"><text:s/></text:span><text:span>when</text:span><text:span text:style-name="T4455"><text:s/></text:span><text:span>possible,</text:span><text:span text:style-name="T4456"><text:s/></text:span><text:span>Demos</text:span><text:span text:style-name="T4457"><text:s/></text:span><text:span>effectively</text:span><text:span text:style-name="T4458"><text:s/></text:span><text:span>serves</text:span><text:span text:style-name="T4459"><text:s/></text:span><text:span>as</text:span><text:span text:style-name="T4460"><text:s/></text:span><text:span>a virtual RPC mechanism for the target network, while concurrently exposing th</text:span><text:span>e aforementioned universal Demos methods. Consequently, Demos does not require the user's private key or sensitive information, instead acting solely on behalf of the requester for that specific request, utilizing the specific content provided by the user.</text:span><text:span/></text:p>
      <text:p text:style-name="P643"><text:span text:style-name="T4461"/><text:span text:style-name="T4462"/></text:p>
      <text:p text:style-name="P644"><text:span>On</text:span><text:span text:style-name="T4463"><text:s/></text:span><text:span>the</text:span><text:span text:style-name="T4464"><text:s/></text:span><text:span>other</text:span><text:span text:style-name="T4465"><text:s/></text:span><text:span>hand,</text:span><text:span text:style-name="T4466"><text:s/></text:span><text:span>certain</text:span><text:span text:style-name="T4467"><text:s/></text:span><text:span>operations</text:span><text:span text:style-name="T4468"><text:s/></text:span><text:span>may</text:span><text:span text:style-name="T4469"><text:s/></text:span><text:span>necessitate</text:span><text:span text:style-name="T4470"><text:s/></text:span><text:span>a</text:span><text:span text:style-name="T4471"><text:s/></text:span><text:span>more</text:span><text:span text:style-name="T4472"><text:s/></text:span><text:span>direct</text:span><text:span text:style-name="T4473"><text:s/></text:span><text:span>approach</text:span><text:span text:style-name="T4474"><text:s/></text:span><text:span>wherein </text:span><text:span>relayed transactions relying solely on signatures prove insufficient. In such scenarios, Demos assumes an intermediary role, executing logic directly on a blockchain while soliciting additional requirements from the requester, such as gas fees or specific </text:span><text:span text:style-name="T4475">information.</text:span><text:span/></text:p>
      <text:p text:style-name="P645"><text:span/><text:span/></text:p>
      <text:p text:style-name="P646"><text:span>In</text:span><text:span text:style-name="T4476"><text:s/></text:span><text:span>both</text:span><text:span text:style-name="T4477"><text:s/></text:span><text:span>cases,</text:span><text:span text:style-name="T4478"><text:s/></text:span><text:span>Demos</text:span><text:span text:style-name="T4479"><text:s/></text:span><text:span>is</text:span><text:span text:style-name="T4480"><text:s/></text:span><text:span>able</text:span><text:span text:style-name="T4481"><text:s/></text:span><text:span>to</text:span><text:span text:style-name="T4482"><text:s/></text:span><text:span>select</text:span><text:span text:style-name="T4483"><text:s/></text:span><text:span>the</text:span><text:span text:style-name="T4484"><text:s/></text:span><text:span>most</text:span><text:span text:style-name="T4485"><text:s/></text:span><text:span>efficient</text:span><text:span text:style-name="T4486"><text:s/></text:span><text:span>route</text:span><text:span text:style-name="T4487"><text:s/></text:span><text:span>and</text:span><text:span text:style-name="T4488"><text:s/></text:span><text:span>deliver</text:span><text:span text:style-name="T4489"><text:s/></text:span><text:span>an</text:span><text:span text:style-name="T4490"><text:s/></text:span><text:span>intuitive, user-friendly, and privacy-focused solution that remains agnostic to the underlying blockchain, benefiting developers, users, and clients alike.</text:span><text:span/></text:p>
      <text:p text:style-name="P647"><text:span text:style-name="T4491"/><text:span text:style-name="T4492"/></text:p>
      <text:p text:style-name="P648"><text:span text:style-name="T4493"/><text:span text:style-name="T4494"/></text:p>
      <text:list>
        <text:list-item>
          <text:h text:outline-level="6" text:restart-numbering="0" text:is-list-header="0" text:style-name="P649"><text:span/><text:span/><text:span>XM</text:span><text:span text:style-name="T4495"><text:s/></text:span><text:span>Security</text:span><text:span text:style-name="T4496"><text:s/></text:span><text:span>on</text:span><text:span text:style-name="T4497"><text:s/></text:span><text:span>Write</text:span><text:span text:style-name="T4498"><text:s/></text:span><text:span text:style-name="T4499">Transactions</text:span><text:span/><text:span/><text:span/></text:h>
        </text:list-item>
      </text:list>
      <text:p text:style-name="P650"><text:span>It's crucial to highlight a key aspect of the Demos SDK XM Module implementation: by default,</text:span><text:span text:style-name="T4500"><text:s/></text:span><text:span>the module doesn't transmit, demand, or in any way request sensitive </text:span><text:span text:style-name="T4501">information.</text:span><text:span/></text:p>
      <text:p text:style-name="P651"><text:span>For</text:span><text:span text:style-name="T4502"><text:s/></text:span><text:span>Write</text:span><text:span text:style-name="T4503"><text:s/></text:span><text:span>transactions,</text:span><text:span text:style-name="T4504"><text:s/></text:span><text:span>whether</text:span><text:span text:style-name="T4505"><text:s/></text:span><text:span>they</text:span><text:span text:style-name="T4506"><text:s/></text:span><text:span>are</text:span><text:span text:style-name="T4507"><text:s/></text:span><text:span>EVM-related</text:span><text:span text:style-name="T4508"><text:s/></text:span><text:span>or</text:span><text:span text:style-name="T4509"><text:s/></text:span><text:span>involve</text:span><text:span text:style-name="T4510"><text:s/></text:span><text:span>transfers</text:span><text:span text:style-name="T4511"><text:s/></text:span><text:span>on</text:span><text:span text:style-name="T4512"><text:s/></text:span><text:span>other</text:span><text:span text:style-name="T4513"><text:s/></text:span><text:span>Layer</text:span><text:span text:style-name="T4514"><text:s/></text:span><text:span>1 networks,</text:span><text:span text:style-name="T4515"><text:s/></text:span><text:span>the</text:span><text:span text:style-name="T4516"><text:s/></text:span><text:span>framework</text:span><text:span text:style-name="T4517"><text:s/></text:span><text:span>equips</text:span><text:span text:style-name="T4518"><text:s/></text:span><text:span>clients</text:span><text:span text:style-name="T4519"><text:s/></text:span><text:span>with</text:span><text:span text:style-name="T4520"><text:s/></text:span><text:span>all</text:span><text:span text:style-name="T4521"><text:s/></text:span><text:span>the</text:span><text:span text:style-name="T4522"><text:s/></text:span><text:span>essential</text:span><text:span text:style-name="T4523"><text:s/></text:span><text:span>methods</text:span><text:span text:style-name="T4524"><text:s/></text:span><text:span>to</text:span><text:span text:style-name="T4525"><text:s/></text:span><text:span>generate</text:span><text:span text:style-name="T4526"><text:s/></text:span><text:span>and</text:span><text:span text:style-name="T4527"><text:s/></text:span><text:span>sign transactions and payloads entirely on the client side. With the exception of the "Execute" step, which necessitates reachability to the RPC, it is entirely feasible to construct a fully compliant XMScript/XM Transaction offline.</text:span><text:span/></text:p>
      <text:p text:style-name="P652"><text:span>This</text:span><text:span text:style-name="T4528"><text:s/></text:span><text:span>methodology</text:span><text:span text:style-name="T4529"><text:s/></text:span><text:span>is</text:span><text:span text:style-name="T4530"><text:s/></text:span><text:span>referred</text:span><text:span text:style-name="T4531"><text:s/></text:span><text:span>to</text:span><text:span text:style-name="T4532"><text:s/></text:span><text:span>as</text:span><text:span text:style-name="T4533"><text:s/></text:span><text:span>"Security</text:span><text:span text:style-name="T4534"><text:s/></text:span><text:span>through</text:span><text:span text:style-name="T4535"><text:s/></text:span><text:span>Ignorance"</text:span><text:span text:style-name="T4536"><text:s/></text:span><text:span>and</text:span><text:span text:style-name="T4537"><text:s/></text:span><text:span>forms</text:span><text:span text:style-name="T4538"><text:s/></text:span><text:span>the</text:span><text:span text:style-name="T4539"><text:s/></text:span><text:span>foundation of the Demos Network's communication approach.</text:span><text:span/></text:p>
      <text:p text:style-name="P653"><text:span>Here</text:span><text:span text:style-name="T4540"><text:s/></text:span><text:span>is</text:span><text:span text:style-name="T4541"><text:s/></text:span><text:span>an</text:span><text:span text:style-name="T4542"><text:s/></text:span><text:span>example</text:span><text:span text:style-name="T4543"><text:s/></text:span><text:span>of</text:span><text:span text:style-name="T4544"><text:s/></text:span><text:span>a</text:span><text:span text:style-name="T4545"><text:s/></text:span><text:span>possible</text:span><text:span text:style-name="T4546"><text:s/></text:span><text:span>XM</text:span><text:span text:style-name="T4547"><text:s/></text:span><text:span>Transaction</text:span><text:span text:style-name="T4548"><text:s/></text:span><text:span text:style-name="T4549">workflow:</text:span><text:span/></text:p>
      <text:list text:style-name="WWNum17" text:continue-numbering="true">
        <text:list-item>
          <text:p text:style-name="P654"><text:span text:style-name="T4550">The</text:span><text:span text:style-name="T4551"><text:s/></text:span><text:span text:style-name="T4552">client initiates</text:span><text:span text:style-name="T4553"><text:s/></text:span><text:span text:style-name="T4554">script editing</text:span><text:span text:style-name="T4555"><text:s/></text:span><text:span text:style-name="T4556">entirely offline</text:span><text:span text:style-name="T4557"><text:s/></text:span><text:span text:style-name="T4558">by disconnecting</text:span><text:span text:style-name="T4559"><text:s/></text:span><text:span text:style-name="T4560">their </text:span><text:span text:style-name="T4561">router.</text:span><text:span/></text:p>
        </text:list-item>
        <text:list-item>
          <text:p text:style-name="P655"><text:span text:style-name="T4562">Upon</text:span><text:span text:style-name="T4563"><text:s/></text:span><text:span text:style-name="T4564">realizing</text:span><text:span text:style-name="T4565"><text:s/></text:span><text:span text:style-name="T4566">the</text:span><text:span text:style-name="T4567"><text:s/></text:span><text:span text:style-name="T4568">need</text:span><text:span text:style-name="T4569"><text:s/></text:span><text:span text:style-name="T4570">to</text:span><text:span text:style-name="T4571"><text:s/></text:span><text:span text:style-name="T4572">use</text:span><text:span text:style-name="T4573"><text:s/></text:span><text:span text:style-name="T4574">the</text:span><text:span text:style-name="T4575"><text:s/></text:span><text:span text:style-name="T4576">Pay</text:span><text:span text:style-name="T4577"><text:s/></text:span><text:span text:style-name="T4578">method</text:span><text:span text:style-name="T4579"><text:s/></text:span><text:span text:style-name="T4580">on</text:span><text:span text:style-name="T4581"><text:s/></text:span><text:span text:style-name="T4582">the</text:span><text:span text:style-name="T4583"><text:s/></text:span><text:span text:style-name="T4584">EXAMPLE</text:span><text:span text:style-name="T4585"><text:s/></text:span><text:span text:style-name="T4586">(XMPL)</text:span><text:span text:style-name="T4587"><text:s/></text:span><text:span text:style-name="T4588">chain,</text:span><text:span text:style-name="T4589"><text:s/></text:span><text:span text:style-name="T4590">the client utilizes the SDK to locally sign that operation.</text:span><text:span/></text:p>
        </text:list-item>
        <text:list-item>
          <text:p text:style-name="P656"><text:span text:style-name="T4591">Operations, both read and write, are continuously added to the </text:span><text:span text:style-name="T4592">script.</text:span><text:span/></text:p>
        </text:list-item>
        <text:list-item>
          <text:p text:style-name="P657"><text:span text:style-name="T4593">Upon</text:span><text:span text:style-name="T4594"><text:s/></text:span><text:span text:style-name="T4595">completion,</text:span><text:span text:style-name="T4596"><text:s/></text:span><text:span text:style-name="T4597">the</text:span><text:span text:style-name="T4598"><text:s/></text:span><text:span text:style-name="T4599">client</text:span><text:span text:style-name="T4600"><text:s/></text:span><text:span text:style-name="T4601">possesses</text:span><text:span text:style-name="T4602"><text:s/></text:span><text:span text:style-name="T4603">an</text:span><text:span text:style-name="T4604"><text:s/></text:span><text:span text:style-name="T4605">object</text:span><text:span text:style-name="T4606"><text:s/></text:span><text:span text:style-name="T4607">(a</text:span><text:span text:style-name="T4608"><text:s/></text:span><text:span text:style-name="T4609">XMScript)</text:span><text:span text:style-name="T4610"><text:s/></text:span><text:span text:style-name="T4611">containing</text:span><text:span text:style-name="T4612"><text:s/></text:span><text:span text:style-name="T4613">all operations in their specified order.</text:span><text:span/></text:p>
        </text:list-item>
        <text:list-item>
          <text:p text:style-name="P658"><text:span text:style-name="T4614">Write</text:span><text:span text:style-name="T4615"><text:s/></text:span><text:span text:style-name="T4616">operations</text:span><text:span text:style-name="T4617"><text:s/></text:span><text:span text:style-name="T4618">include signed</text:span><text:span text:style-name="T4619"><text:s/></text:span><text:span text:style-name="T4620">payloads</text:span><text:span text:style-name="T4621"><text:s/></text:span><text:span text:style-name="T4622">devoid of</text:span><text:span text:style-name="T4623"><text:s/></text:span><text:span text:style-name="T4624">sensitive </text:span><text:span text:style-name="T4625">information.</text:span><text:span/></text:p>
        </text:list-item>
        <text:list-item>
          <text:p text:style-name="P659"><text:span text:style-name="T4626">The client reconnects the router and dispatches the request to Demos </text:span><text:span text:style-name="T4627">RPC.</text:span><text:span/></text:p>
        </text:list-item>
        <text:list-item>
          <text:p text:style-name="P660"><text:span text:style-name="T4628">Demos</text:span><text:span text:style-name="T4629"><text:s/></text:span><text:span text:style-name="T4630">RPC</text:span><text:span text:style-name="T4631"><text:s/></text:span><text:span text:style-name="T4632">employs</text:span><text:span text:style-name="T4633"><text:s/></text:span><text:span text:style-name="T4634">the</text:span><text:span text:style-name="T4635"><text:s/></text:span><text:span text:style-name="T4636">Demos</text:span><text:span text:style-name="T4637"><text:s/></text:span><text:span text:style-name="T4638">XM</text:span><text:span text:style-name="T4639"><text:s/></text:span><text:span text:style-name="T4640">Module</text:span><text:span text:style-name="T4641"><text:s/></text:span><text:span text:style-name="T4642">to</text:span><text:span text:style-name="T4643"><text:s/></text:span><text:span text:style-name="T4644">execute,</text:span><text:span text:style-name="T4645"><text:s/></text:span><text:span text:style-name="T4646">relay,</text:span><text:span text:style-name="T4647"><text:s/></text:span><text:span text:style-name="T4648">and</text:span><text:span text:style-name="T4649"><text:s/></text:span><text:span text:style-name="T4650">manage</text:span><text:span text:style-name="T4651"><text:s/></text:span><text:span text:style-name="T4652">the included operations without any modification.</text:span><text:span/></text:p>
        </text:list-item>
        <text:list-item>
          <text:p text:style-name="P661"><text:span text:style-name="T4653">The</text:span><text:span text:style-name="T4654"><text:s/></text:span><text:span text:style-name="T4655">resulting</text:span><text:span text:style-name="T4656"><text:s/></text:span><text:span text:style-name="T4657">data</text:span><text:span text:style-name="T4658"><text:s/></text:span><text:span text:style-name="T4659">is</text:span><text:span text:style-name="T4660"><text:s/></text:span><text:span text:style-name="T4661">interpreted</text:span><text:span text:style-name="T4662"><text:s/></text:span><text:span text:style-name="T4663">and</text:span><text:span text:style-name="T4664"><text:s/></text:span><text:span text:style-name="T4665">processed,</text:span><text:span text:style-name="T4666"><text:s/></text:span><text:span text:style-name="T4667">ensuring</text:span><text:span text:style-name="T4668"><text:s/></text:span><text:span text:style-name="T4669">the</text:span><text:span text:style-name="T4670"><text:s/></text:span><text:span text:style-name="T4671">client</text:span><text:span text:style-name="T4672"><text:s/></text:span><text:span text:style-name="T4673">receives</text:span><text:span text:style-name="T4674"><text:s/></text:span><text:span text:style-name="T4675">it</text:span><text:span text:style-name="T4676"><text:s/></text:span><text:span text:style-name="T4677">in</text:span><text:span text:style-name="T4678"><text:s/></text:span><text:span text:style-name="T4679">a readable format.</text:span><text:span/></text:p>
        </text:list-item>
      </text:list>
      <text:p text:style-name="P662"><text:span>This</text:span><text:span text:style-name="T4680"><text:s/></text:span><text:span>way,</text:span><text:span text:style-name="T4681"><text:s/></text:span><text:span>no</text:span><text:span text:style-name="T4682"><text:s/></text:span><text:span>sensitive</text:span><text:span text:style-name="T4683"><text:s/></text:span><text:span>data</text:span><text:span text:style-name="T4684"><text:s/></text:span><text:span>can</text:span><text:span text:style-name="T4685"><text:s/></text:span><text:span>be</text:span><text:span text:style-name="T4686"><text:s/></text:span><text:span>leaked</text:span><text:span text:style-name="T4687"><text:s/></text:span><text:span>in</text:span><text:span text:style-name="T4688"><text:s/></text:span><text:span>any</text:span><text:span text:style-name="T4689"><text:s/></text:span><text:span>part</text:span><text:span text:style-name="T4690"><text:s/></text:span><text:span>of</text:span><text:span text:style-name="T4691"><text:s/></text:span><text:span>the</text:span><text:span text:style-name="T4692"><text:s/></text:span><text:span text:style-name="T4693">process.</text:span><text:span/></text:p>
      <text:list>
        <text:list-item>
          <text:h text:outline-level="2" text:restart-numbering="0" text:is-list-header="0" text:style-name="P663"><text:span/><text:bookmark-start text:name="_Toc53"/><text:span/><text:span>Web2</text:span><text:span text:style-name="T4694"><text:s/></text:span><text:span>and</text:span><text:span text:style-name="T4695"><text:s/></text:span><text:span>Cross-Web</text:span><text:span text:style-name="T4696"><text:s/></text:span><text:span text:style-name="T4697">Logic</text:span><text:span/><text:bookmark-end text:name="_Toc53"/><text:span/><text:span/></text:h>
        </text:list-item>
      </text:list>
      <text:p text:style-name="P664"><text:span text:style-name="T4698"/><text:span text:style-name="T4699"/></text:p>
      <text:p text:style-name="P665"><text:span>As</text:span><text:span text:style-name="T4700"><text:s/></text:span><text:span>Demos</text:span><text:span text:style-name="T4701"><text:s/></text:span><text:span>is</text:span><text:span text:style-name="T4702"><text:s/></text:span><text:span>built</text:span><text:span text:style-name="T4703"><text:s/></text:span><text:span>around</text:span><text:span text:style-name="T4704"><text:s/></text:span><text:span>different</text:span><text:span text:style-name="T4705"><text:s/></text:span><text:span>features</text:span><text:span text:style-name="T4706"><text:s/></text:span><text:span>that</text:span><text:span text:style-name="T4707"><text:s/></text:span><text:span>can</text:span><text:span text:style-name="T4708"><text:s/></text:span><text:span>and</text:span><text:span text:style-name="T4709"><text:s/></text:span><text:span>will</text:span><text:span text:style-name="T4710"><text:s/></text:span><text:span>interact</text:span><text:span text:style-name="T4711"><text:s/></text:span><text:span>with</text:span><text:span text:style-name="T4712"><text:s/></text:span><text:span>each</text:span><text:span text:style-name="T4713"><text:s/></text:span><text:span>other,</text:span><text:span text:style-name="T4714"><text:s/></text:span><text:span>one of the derived functionalities, known as Cross-Web Execution, is a combination of</text:span><text:span/></text:p>
      <text:p text:style-name="P666"><text:span>Cross-chain</text:span><text:span text:style-name="T4715"><text:s/></text:span><text:span>Execution</text:span><text:span text:style-name="T4716"><text:s/></text:span><text:span>and</text:span><text:span text:style-name="T4717"><text:s/></text:span><text:span>On-chain</text:span><text:span text:style-name="T4718"><text:s/></text:span><text:span>Web2,</text:span><text:span text:style-name="T4719"><text:s/></text:span><text:span>with</text:span><text:span text:style-name="T4720"><text:s/></text:span><text:span>its</text:span><text:span text:style-name="T4721"><text:s/></text:span><text:span>technical</text:span><text:span text:style-name="T4722"><text:s/></text:span><text:span>explanation</text:span><text:span text:style-name="T4723"><text:s/></text:span><text:span>being</text:span><text:span text:style-name="T4724"><text:s/></text:span><text:span>the</text:span><text:span text:style-name="T4725"><text:s/></text:span><text:span>sum</text:span><text:span text:style-name="T4726"><text:s/></text:span><text:span>of these constituent elements. It is necessary to highlight this synergistic feature, which may not be immediately evident.</text:span><text:span/></text:p>
      <text:p text:style-name="P667"><text:span/><text:span/></text:p>
      <text:p text:style-name="P668"><text:span>By</text:span><text:span text:style-name="T4727"><text:s/></text:span><text:span>employing</text:span><text:span text:style-name="T4728"><text:s/></text:span><text:span>the</text:span><text:span text:style-name="T4729"><text:s/></text:span><text:span>established</text:span><text:span text:style-name="T4730"><text:s/></text:span><text:span>methodologies</text:span><text:span text:style-name="T4731"><text:s/></text:span><text:span>for</text:span><text:span text:style-name="T4732"><text:s/></text:span><text:span>on-chain</text:span><text:span text:style-name="T4733"><text:s/></text:span><text:span>retrieval</text:span><text:span text:style-name="T4734"><text:s/></text:span><text:span>of</text:span><text:span text:style-name="T4735"><text:s/></text:span><text:span>Web2</text:span><text:span text:style-name="T4736"><text:s/></text:span><text:span>resources</text:span><text:span text:style-name="T4737"><text:s/></text:span><text:span>with assured integrity and security, alongside seamless and secure cross-chain smart contract execution, the convergence of these approaches gives rise to unparalleled capability.</text:span><text:span/></text:p>
      <text:p text:style-name="P669"><text:span/><text:span/></text:p>
      <text:p text:style-name="P670"><text:span>For instance, a dApp can incorporate smart contract logic deployed on an EVM network while</text:span><text:span text:style-name="T4738"><text:s/></text:span><text:span>leveraging</text:span><text:span text:style-name="T4739"><text:s/></text:span><text:span>attested</text:span><text:span text:style-name="T4740"><text:s/></text:span><text:span>Web2</text:span><text:span text:style-name="T4741"><text:s/></text:span><text:span>data</text:span><text:span text:style-name="T4742"><text:s/></text:span><text:span>as</text:span><text:span text:style-name="T4743"><text:s/></text:span><text:span>input.</text:span><text:span text:style-name="T4744"><text:s/></text:span><text:span>Conversely,</text:span><text:span text:style-name="T4745"><text:s/></text:span><text:span>developers</text:span><text:span text:style-name="T4746"><text:s/></text:span><text:span>have</text:span><text:span text:style-name="T4747"><text:s/></text:span><text:span>the</text:span><text:span text:style-name="T4748"><text:s/></text:span><text:span>flexibility</text:span><text:span text:style-name="T4749"><text:s/></text:span><text:span>to feed the results of a smart contract into a Web2 API, such as an AI endpoint.</text:span><text:span/></text:p>
      <text:p text:style-name="P671"><text:span/><text:span/></text:p>
      <text:p text:style-name="P672"><text:span>The potential applications are virtually limitless, contingent upon the performance characteristics</text:span><text:span text:style-name="T4750"><text:s/></text:span><text:span>of</text:span><text:span text:style-name="T4751"><text:s/></text:span><text:span>the</text:span><text:span text:style-name="T4752"><text:s/></text:span><text:span>involved</text:span><text:span text:style-name="T4753"><text:s/></text:span><text:span>endpoints.</text:span><text:span text:style-name="T4754"><text:s/></text:span><text:span>Consequently,</text:span><text:span text:style-name="T4755"><text:s/></text:span><text:span>the</text:span><text:span text:style-name="T4756"><text:s/></text:span><text:span>resulting</text:span><text:span text:style-name="T4757"><text:s/></text:span><text:span>data</text:span><text:span text:style-name="T4758"><text:s/></text:span><text:span>can</text:span><text:span text:style-name="T4759"><text:s/></text:span><text:span>be</text:span><text:span text:style-name="T4760"><text:s/></text:span><text:span>once again utilized in a similar manner across other networks, endpoints, or technological </text:span><text:span text:style-name="T4761">frameworks.</text:span><text:span/></text:p>
      <text:p text:style-name="P673"><text:span text:style-name="T4762"/><text:span text:style-name="T4763"/></text:p>
      <text:list>
        <text:list-item>
          <text:h text:outline-level="3" text:restart-numbering="0" text:is-list-header="0" text:style-name="P674"><text:span/><text:bookmark-start text:name="_Toc54"/><text:span/><text:span>Example:</text:span><text:span text:style-name="T4764"><text:s/></text:span><text:span>Cross-chain</text:span><text:span text:style-name="T4765"><text:s/></text:span><text:span text:style-name="T4766">Swapping</text:span><text:span/><text:bookmark-end text:name="_Toc54"/><text:span/><text:span/></text:h>
        </text:list-item>
      </text:list>
      <text:p text:style-name="P675"><text:span text:style-name="T4767"/><text:span text:style-name="T4768"/></text:p>
      <text:p text:style-name="P676"><text:span>Cross-chain</text:span><text:span text:style-name="T4769"><text:s/></text:span><text:span>Swapping,</text:span><text:span text:style-name="T4770"><text:s/></text:span><text:span>as</text:span><text:span text:style-name="T4771"><text:s/></text:span><text:span>an</text:span><text:span text:style-name="T4772"><text:s/></text:span><text:span>implementation</text:span><text:span text:style-name="T4773"><text:s/></text:span><text:span>of</text:span><text:span text:style-name="T4774"><text:s/></text:span><text:span>Cross-chain</text:span><text:span text:style-name="T4775"><text:s/></text:span><text:span>execution,</text:span><text:span text:style-name="T4776"><text:s/></text:span><text:span>constitutes</text:span><text:span text:style-name="T4777"><text:s/></text:span><text:span>a distinctive use case that necessitates a dedicated exposition of its fundamental </text:span><text:span text:style-name="T4778">mechanics.</text:span><text:span/></text:p>
      <text:p text:style-name="P677"><text:span text:style-name="T4779"/><text:span text:style-name="T4780"/></text:p>
      <text:p text:style-name="P678"><text:span>To</text:span><text:span text:style-name="T4781"><text:s/></text:span><text:span>facilitate</text:span><text:span text:style-name="T4782"><text:s/></text:span><text:span>a</text:span><text:span text:style-name="T4783"><text:s/></text:span><text:span>comprehensive</text:span><text:span text:style-name="T4784"><text:s/></text:span><text:span>understanding</text:span><text:span text:style-name="T4785"><text:s/></text:span><text:span>of</text:span><text:span text:style-name="T4786"><text:s/></text:span><text:span>Cross-chain</text:span><text:span text:style-name="T4787"><text:s/></text:span><text:span>swapping's</text:span><text:span text:style-name="T4788"><text:s/></text:span><text:span>underlying technical principles, it is beneficial to provide a brief explanation of this feature.</text:span><text:span/></text:p>
      <text:p text:style-name="P679"><text:span>Cross-chain</text:span><text:span text:style-name="T4789"><text:s/></text:span><text:span>Swapping</text:span><text:span text:style-name="T4790"><text:s/></text:span><text:span>entails</text:span><text:span text:style-name="T4791"><text:s/></text:span><text:span>the</text:span><text:span text:style-name="T4792"><text:s/></text:span><text:span>seamless,</text:span><text:span text:style-name="T4793"><text:s/></text:span><text:span>rapid,</text:span><text:span text:style-name="T4794"><text:s/></text:span><text:span>and</text:span><text:span text:style-name="T4795"><text:s/></text:span><text:span>efficient</text:span><text:span text:style-name="T4796"><text:s/></text:span><text:span>execution</text:span><text:span text:style-name="T4797"><text:s/></text:span><text:span>of</text:span><text:span text:style-name="T4798"><text:s/></text:span><text:span>direct</text:span><text:span text:style-name="T4799"><text:s/></text:span><text:span>swaps between disparate blockchain networks. For illustrative purposes, we shall consider a practical scenario where an ERC20 token is acquired using a Stablecoin on the Solana </text:span><text:span text:style-name="T4800">blockchain.</text:span><text:span/></text:p>
      <text:p text:style-name="P680"><text:span text:style-name="T4801"/><text:span text:style-name="T4802"/></text:p>
      <text:p text:style-name="P681"><text:span/><text:bookmark-start text:name="Design_and_Multiple_Routes_"/><text:span/><text:bookmark-end text:name="Design_and_Multiple_Routes_"/><text:span text:style-name="T4803">Design</text:span><text:span text:style-name="T4804"><text:s/></text:span><text:span text:style-name="T4805">and</text:span><text:span text:style-name="T4806"><text:s/></text:span><text:span text:style-name="T4807">Multiple</text:span><text:span text:style-name="T4808"><text:s/></text:span><text:span text:style-name="T4809">Routes</text:span><text:span/></text:p>
      <text:p text:style-name="P682"><text:span text:style-name="T4810"/><text:span text:style-name="T4811"/></text:p>
      <text:p text:style-name="P683"><text:span>During</text:span><text:span text:style-name="T4812"><text:s/></text:span><text:span>the</text:span><text:span text:style-name="T4813"><text:s/></text:span><text:span>development</text:span><text:span text:style-name="T4814"><text:s/></text:span><text:span>of</text:span><text:span text:style-name="T4815"><text:s/></text:span><text:span>Cross-chain</text:span><text:span text:style-name="T4816"><text:s/></text:span><text:span>swapping,</text:span><text:span text:style-name="T4817"><text:s/></text:span><text:span>it</text:span><text:span text:style-name="T4818"><text:s/></text:span><text:span>became</text:span><text:span text:style-name="T4819"><text:s/></text:span><text:span>evident</text:span><text:span text:style-name="T4820"><text:s/></text:span><text:span>that</text:span><text:span text:style-name="T4821"><text:s/></text:span><text:span>a</text:span><text:span text:style-name="T4822"><text:s/></text:span><text:span>single</text:span><text:span text:style-name="T4823"><text:s/></text:span><text:span>method could not consistently deliver the optimal combination of efficiency, speed, and security.</text:span><text:span/></text:p>
      <text:p text:style-name="P684"><text:span>Due to varying conditions on both sides of the swap operation and within the Demos network</text:span><text:span text:style-name="T4824"><text:s/></text:span><text:span>itself,</text:span><text:span text:style-name="T4825"><text:s/></text:span><text:span>Demos</text:span><text:span text:style-name="T4826"><text:s/></text:span><text:span>must</text:span><text:span text:style-name="T4827"><text:s/></text:span><text:span>possess</text:span><text:span text:style-name="T4828"><text:s/></text:span><text:span>the</text:span><text:span text:style-name="T4829"><text:s/></text:span><text:span>intelligence</text:span><text:span text:style-name="T4830"><text:s/></text:span><text:span>to</text:span><text:span text:style-name="T4831"><text:s/></text:span><text:span>select</text:span><text:span text:style-name="T4832"><text:s/></text:span><text:span>the</text:span><text:span text:style-name="T4833"><text:s/></text:span><text:span>best</text:span><text:span text:style-name="T4834"><text:s/></text:span><text:span>overall</text:span><text:span text:style-name="T4835"><text:s/></text:span><text:span>route</text:span><text:span text:style-name="T4836"><text:s/></text:span><text:span>from</text:span><text:span text:style-name="T4837"><text:s/></text:span><text:span>a set of possible options.</text:span><text:span/></text:p>
      <text:p text:style-name="P685"><text:span/><text:span/></text:p>
      <text:p text:style-name="P686"><text:span>To</text:span><text:span text:style-name="T4838"><text:s/></text:span><text:span>address</text:span><text:span text:style-name="T4839"><text:s/></text:span><text:span>this</text:span><text:span text:style-name="T4840"><text:s/></text:span><text:span>requirement,</text:span><text:span text:style-name="T4841"><text:s/></text:span><text:span>we</text:span><text:span text:style-name="T4842"><text:s/></text:span><text:span>have</text:span><text:span text:style-name="T4843"><text:s/></text:span><text:span>devised</text:span><text:span text:style-name="T4844"><text:s/></text:span><text:span>two</text:span><text:span text:style-name="T4845"><text:s/></text:span><text:span>primary</text:span><text:span text:style-name="T4846"><text:s/></text:span><text:span>scenarios</text:span><text:span text:style-name="T4847"><text:s/></text:span><text:span>in</text:span><text:span text:style-name="T4848"><text:s/></text:span><text:span>which</text:span><text:span text:style-name="T4849"><text:s/></text:span><text:span>Demos</text:span><text:span text:style-name="T4850"><text:s/></text:span><text:span>can make decisions regarding the chosen path.</text:span><text:span/></text:p>
      <text:list text:style-name="WWNum18" text:continue-numbering="true">
        <text:list-item>
          <text:h text:outline-level="6" text:restart-numbering="0" text:is-list-header="0" text:style-name="P687"><text:span/><text:span/><text:span>Full Liquidity </text:span><text:span text:style-name="T4851">Availability:</text:span><text:span/><text:span/><text:span/></text:h>
        </text:list-item>
      </text:list>
      <text:p text:style-name="P688"><text:span text:style-name="T4852"/><text:span text:style-name="T4853"/></text:p>
      <text:p text:style-name="P689"><text:span>In the ideal situation, </text:span><text:span>Demos will possess sufficient liquidity on both sides of the swap, enabling it to promptly provide liquidity after validating the swap request. In this case, Demos will either distribute the requested token directly to the buyer's address or, if necessary,</text:span><text:span text:style-name="T4854"><text:s/></text:span><text:span>exchange</text:span><text:span text:style-name="T4855"><text:s/></text:span><text:span>the</text:span><text:span text:style-name="T4856"><text:s/></text:span><text:span>available</text:span><text:span text:style-name="T4857"><text:s/></text:span><text:span>liquidity</text:span><text:span text:style-name="T4858"><text:s/></text:span><text:span>for</text:span><text:span text:style-name="T4859"><text:s/></text:span><text:span>the</text:span><text:span text:style-name="T4860"><text:s/></text:span><text:span>requested</text:span><text:span text:style-name="T4861"><text:s/></text:span><text:span>token</text:span><text:span text:style-name="T4862"><text:s/></text:span><text:span>before</text:span><text:span text:style-name="T4863"><text:s/></text:span><text:span>distribution.</text:span><text:span text:style-name="T4864"><text:s/></text:span><text:span>This method, which is the fastest and preferred approach, will be employed whenever the Full Liquidity Availability condition is met.</text:span><text:span/></text:p>
      <text:p text:style-name="P690"><text:span text:style-name="T4865"/><text:span text:style-name="T4866"/></text:p>
      <text:p text:style-name="P691"><text:span text:style-name="T4867"/><text:span text:style-name="T4868"/></text:p>
      <text:list text:style-name="WWNum18" text:continue-numbering="true">
        <text:list-item>
          <text:h text:outline-level="6" text:restart-numbering="0" text:is-list-header="0" text:style-name="P692"><text:span/><text:span/><text:span>Limited Liquidity </text:span><text:span text:style-name="T4869">Availability:</text:span><text:span/><text:span/><text:span/></text:h>
        </text:list-item>
      </text:list>
      <text:p text:style-name="P693"><text:span text:style-name="T4870"/><text:span text:style-name="T4871"/></text:p>
      <text:p text:style-name="P694"><text:span>When</text:span><text:span text:style-name="T4872"><text:s/></text:span><text:span>Demos</text:span><text:span text:style-name="T4873"><text:s/></text:span><text:span>lacks</text:span><text:span text:style-name="T4874"><text:s/></text:span><text:span>the</text:span><text:span text:style-name="T4875"><text:s/></text:span><text:span>necessary</text:span><text:span text:style-name="T4876"><text:s/></text:span><text:span>liquidity</text:span><text:span text:style-name="T4877"><text:s/></text:span><text:span>on</text:span><text:span text:style-name="T4878"><text:s/></text:span><text:span>both</text:span><text:span text:style-name="T4879"><text:s/></text:span><text:span>sides</text:span><text:span text:style-name="T4880"><text:s/></text:span><text:span>of</text:span><text:span text:style-name="T4881"><text:s/></text:span><text:span>the</text:span><text:span text:style-name="T4882"><text:s/></text:span><text:span>swap,</text:span><text:span text:style-name="T4883"><text:s/></text:span><text:span>it</text:span><text:span text:style-name="T4884"><text:s/></text:span><text:span>acts</text:span><text:span text:style-name="T4885"><text:s/></text:span><text:span>as</text:span><text:span text:style-name="T4886"><text:s/></text:span><text:span>a</text:span><text:span text:style-name="T4887"><text:s/></text:span><text:span>bridge and ramps aggregator with enhanced security measures. This scenario is expected to occur during the initial stages of Demos implementation.</text:span><text:span/></text:p>
      <text:p text:style-name="P695"><text:span/><text:span/></text:p>
      <text:p text:style-name="P696"><text:span>While maintaining the same interface and syntax for developers and users, internally Demos</text:span><text:span text:style-name="T4888"><text:s/></text:span><text:span>scans</text:span><text:span text:style-name="T4889"><text:s/></text:span><text:span>and</text:span><text:span text:style-name="T4890"><text:s/></text:span><text:span>selects</text:span><text:span text:style-name="T4891"><text:s/></text:span><text:span>from</text:span><text:span text:style-name="T4892"><text:s/></text:span><text:span>a</text:span><text:span text:style-name="T4893"><text:s/></text:span><text:span>list</text:span><text:span text:style-name="T4894"><text:s/></text:span><text:span>of</text:span><text:span text:style-name="T4895"><text:s/></text:span><text:span>bridges</text:span><text:span text:style-name="T4896"><text:s/></text:span><text:span>(on-chain)</text:span><text:span text:style-name="T4897"><text:s/></text:span><text:span>and</text:span><text:span text:style-name="T4898"><text:s/></text:span><text:span>ramps</text:span><text:span text:style-name="T4899"><text:s/></text:span><text:span>(off-chain</text:span><text:span text:style-name="T4900"><text:s/></text:span><text:span>via</text:span><text:span text:style-name="T4901"><text:s/></text:span><text:span>Web2 endpoints)</text:span><text:span text:style-name="T4902"><text:s/></text:span><text:span>to</text:span><text:span text:style-name="T4903"><text:s/></text:span><text:span>identify</text:span><text:span text:style-name="T4904"><text:s/></text:span><text:span>the</text:span><text:span text:style-name="T4905"><text:s/></text:span><text:span>most</text:span><text:span text:style-name="T4906"><text:s/></text:span><text:span>efficient</text:span><text:span text:style-name="T4907"><text:s/></text:span><text:span>and</text:span><text:span text:style-name="T4908"><text:s/></text:span><text:span>secure</text:span><text:span text:style-name="T4909"><text:s/></text:span><text:span>route.</text:span><text:span text:style-name="T4910"><text:s/></text:span><text:span>This</text:span><text:span text:style-name="T4911"><text:s/></text:span><text:span>eliminates</text:span><text:span text:style-name="T4912"><text:s/></text:span><text:span>the</text:span><text:span text:style-name="T4913"><text:s/></text:span><text:span>need</text:span><text:span text:style-name="T4914"><text:s/></text:span><text:span>for</text:span><text:span text:style-name="T4915"><text:s/></text:span><text:span>the requester to manually select a bridge or ramp, thereby saving time and minimizing the exposure of funds.</text:span><text:span/></text:p>
      <text:p text:style-name="P697"><text:span/><text:span/></text:p>
      <text:p text:style-name="P698"><text:span>In addition to this efficient selection process, Demos incorporates a firewall layer that continuously and heuristically detects security issues on bridges and ramps as quickly as possible.</text:span><text:span text:style-name="T4916"><text:s/></text:span><text:span>The</text:span><text:span text:style-name="T4917"><text:s/></text:span><text:span>mechanism</text:span><text:span text:style-name="T4918"><text:s/></text:span><text:span>employed</text:span><text:span text:style-name="T4919"><text:s/></text:span><text:span>by</text:span><text:span text:style-name="T4920"><text:s/></text:span><text:span>the</text:span><text:span text:style-name="T4921"><text:s/></text:span><text:span>firewall</text:span><text:span text:style-name="T4922"><text:s/></text:span><text:span>operates</text:span><text:span text:style-name="T4923"><text:s/></text:span><text:span>in</text:span><text:span text:style-name="T4924"><text:s/></text:span><text:span>diverse</text:span><text:span text:style-name="T4925"><text:s/></text:span><text:span>ways,</text:span><text:span text:style-name="T4926"><text:s/></text:span><text:span>which</text:span><text:span text:style-name="T4927"><text:s/></text:span><text:span>will</text:span><text:span text:style-name="T4928"><text:s/></text:span><text:span>be explained in the following paragraph.</text:span><text:span/></text:p>
      <text:p text:style-name="P699"><text:span text:style-name="T4929"/><text:span text:style-name="T4930"/></text:p>
      <text:p text:style-name="P700"><text:span text:style-name="T4931"/><text:span text:style-name="T4932"/></text:p>
      <text:p text:style-name="P701"><text:span/><text:bookmark-start text:name="Demos_Firewall_"/><text:span/><text:bookmark-end text:name="Demos_Firewall_"/><text:span/><text:bookmark-start text:name="_"/><text:span/><text:bookmark-end text:name="_"/><text:span text:style-name="T4933">Demos</text:span><text:span text:style-name="T4934"><text:s/></text:span><text:span text:style-name="T4935">Firewall</text:span><text:span/></text:p>
      <text:p text:style-name="P702"><text:span text:style-name="T4936"/><text:span text:style-name="T4937"/></text:p>
      <text:p text:style-name="P703"><text:span>In the context of the Li</text:span><text:span>mited Liquidity Available scenario, as previously mentioned, Demos employs a sophisticated mechanism to identify and select the optimal bridge or ramp for providing a seamless, efficient, and expeditious experience to the requestor. As widely acknowledged,</text:span><text:span text:style-name="T4938"><text:s/></text:span><text:span>bridges</text:span><text:span text:style-name="T4939"><text:s/></text:span><text:span>represent</text:span><text:span text:style-name="T4940"><text:s/></text:span><text:span>a</text:span><text:span text:style-name="T4941"><text:s/></text:span><text:span>prominent</text:span><text:span text:style-name="T4942"><text:s/></text:span><text:span>target</text:span><text:span text:style-name="T4943"><text:s/></text:span><text:span>for</text:span><text:span text:style-name="T4944"><text:s/></text:span><text:span>malicious</text:span><text:span text:style-name="T4945"><text:s/></text:span><text:span>actors</text:span><text:span text:style-name="T4946"><text:s/></text:span><text:span>seeking</text:span><text:span text:style-name="T4947"><text:s/></text:span><text:span>to</text:span><text:span text:style-name="T4948"><text:s/></text:span><text:span>exploit vulnerabilities and steal funds. To counteract this threat, Demos incorporates a firewall </text:span><text:span text:style-name="T4949">layer.</text:span><text:span/></text:p>
      <text:p text:style-name="P704"><text:span text:style-name="T4950"/><text:span text:style-name="T4951"/></text:p>
      <text:p text:style-name="P705"><text:span/><text:bookmark-start text:name="Constant_Auditing_"/><text:span/><text:bookmark-end text:name="Constant_Auditing_"/><text:span text:style-name="T4952">Constant</text:span><text:span text:style-name="T4953"><text:s/></text:span><text:span text:style-name="T4954">Auditing</text:span><text:span/></text:p>
      <text:p text:style-name="P706"><text:span text:style-name="T4955"/><text:span text:style-name="T4956"/></text:p>
      <text:p text:style-name="P707"><text:span>The Demos network employs a perpetual and automated process to audit the smart contracts and components of ramps and bridges, meticulously scrutinizing them for common</text:span><text:span text:style-name="T4957"><text:s/></text:span><text:span>vulnerabilities,</text:span><text:span text:style-name="T4958"><text:s/></text:span><text:span>exploits,</text:span><text:span text:style-name="T4959"><text:s/></text:span><text:span>and</text:span><text:span text:style-name="T4960"><text:s/></text:span><text:span>attacks.</text:span><text:span text:style-name="T4961"><text:s/></text:span><text:span>Despite</text:span><text:span text:style-name="T4962"><text:s/></text:span><text:span>variations</text:span><text:span text:style-name="T4963"><text:s/></text:span><text:span>in</text:span><text:span text:style-name="T4964"><text:s/></text:span><text:span>code</text:span><text:span text:style-name="T4965"><text:s/></text:span><text:span>implementation,</text:span><text:span text:style-name="T4966"><text:s/></text:span><text:span>it is noteworthy that a majority of bridge exploits stem from similar types of vulnerabilities.</text:span><text:span/></text:p>
      <text:p text:style-name="P708"><text:span>Demos</text:span><text:span text:style-name="T4967"><text:s/></text:span><text:span>vigilantly</text:span><text:span text:style-name="T4968"><text:s/></text:span><text:span>monitors</text:span><text:span text:style-name="T4969"><text:s/></text:span><text:span>the</text:span><text:span text:style-name="T4970"><text:s/></text:span><text:span>security</text:span><text:span text:style-name="T4971"><text:s/></text:span><text:span>posture</text:span><text:span text:style-name="T4972"><text:s/></text:span><text:span>of</text:span><text:span text:style-name="T4973"><text:s/></text:span><text:span>the</text:span><text:span text:style-name="T4974"><text:s/></text:span><text:span>platform</text:span><text:span text:style-name="T4975"><text:s/></text:span><text:span>to</text:span><text:span text:style-name="T4976"><text:s/></text:span><text:span>proactively</text:span><text:span text:style-name="T4977"><text:s/></text:span><text:span>thwart</text:span><text:span text:style-name="T4978"><text:s/></text:span><text:span>the utilization of insecure pathways, all while remaining imperceptible to the end user.</text:span><text:span/></text:p>
      <text:p text:style-name="P709"><text:span/><text:bookmark-start text:name="Immediate_Response_Propagation_"/><text:span/><text:bookmark-end text:name="Immediate_Response_Propagation_"/><text:span text:style-name="T4979">Immediate</text:span><text:span text:style-name="T4980"><text:s/></text:span><text:span text:style-name="T4981">Response</text:span><text:span text:style-name="T4982"><text:s/></text:span><text:span text:style-name="T4983">Propagation</text:span><text:span/></text:p>
      <text:p text:style-name="P710"><text:span text:style-name="T4984"/><text:span text:style-name="T4985"/></text:p>
      <text:p text:style-name="P711"><text:span>In instances where a bridge or ramp falls victim to exploitation, the attackers' primary source</text:span><text:span text:style-name="T4986"><text:s/></text:span><text:span>of</text:span><text:span text:style-name="T4987"><text:s/></text:span><text:span>gain</text:span><text:span text:style-name="T4988"><text:s/></text:span><text:span>does</text:span><text:span text:style-name="T4989"><text:s/></text:span><text:span>not</text:span><text:span text:style-name="T4990"><text:s/></text:span><text:span>solely</text:span><text:span text:style-name="T4991"><text:s/></text:span><text:span>derive</text:span><text:span text:style-name="T4992"><text:s/></text:span><text:span>from</text:span><text:span text:style-name="T4993"><text:s/></text:span><text:span>the</text:span><text:span text:style-name="T4994"><text:s/></text:span><text:span>initial</text:span><text:span text:style-name="T4995"><text:s/></text:span><text:span>attack.</text:span><text:span text:style-name="T4996"><text:s/></text:span><text:span>The</text:span><text:span text:style-name="T4997"><text:s/></text:span><text:span>most</text:span><text:span text:style-name="T4998"><text:s/></text:span><text:span>substantial</text:span><text:span text:style-name="T4999"><text:s/></text:span><text:span>harm</text:span><text:span text:style-name="T5000"><text:s/></text:span><text:span>is inflicted upon users who, oblivious to the service's compromise, continue utilizing it for prolonged</text:span><text:span text:style-name="T5001"><text:s/></text:span><text:span>periods,</text:span><text:span text:style-name="T5002"><text:s/></text:span><text:span>sometimes</text:span><text:span text:style-name="T5003"><text:s/></text:span><text:span>spanning</text:span><text:span text:style-name="T5004"><text:s/></text:span><text:span>hours</text:span><text:span text:style-name="T5005"><text:s/></text:span><text:span>or</text:span><text:span text:style-name="T5006"><text:s/></text:span><text:span>even</text:span><text:span text:style-name="T5007"><text:s/></text:span><text:span>days,</text:span><text:span text:style-name="T5008"><text:s/></text:span><text:span>until</text:span><text:span text:style-name="T5009"><text:s/></text:span><text:span>they</text:span><text:span text:style-name="T5010"><text:s/></text:span><text:span>become</text:span><text:span text:style-name="T5011"><text:s/></text:span><text:span>aware</text:span><text:span text:style-name="T5012"><text:s/></text:span><text:span>of the situation.</text:span><text:span/></text:p>
      <text:p text:style-name="P712"><text:span text:style-name="T5013"/><text:span text:style-name="T5014"/></text:p>
      <text:p text:style-name="P713"><text:span>Within</text:span><text:span text:style-name="T5015"><text:s/></text:span><text:span>this</text:span><text:span text:style-name="T5016"><text:s/></text:span><text:span>realm,</text:span><text:span text:style-name="T5017"><text:s/></text:span><text:span>Demos</text:span><text:span text:style-name="T5018"><text:s/></text:span><text:span>assumes</text:span><text:span text:style-name="T5019"><text:s/></text:span><text:span>the</text:span><text:span text:style-name="T5020"><text:s/></text:span><text:span>role</text:span><text:span text:style-name="T5021"><text:s/></text:span><text:span>of</text:span><text:span text:style-name="T5022"><text:s/></text:span><text:span>an</text:span><text:span text:style-name="T5023"><text:s/></text:span><text:span>all-encompassing,</text:span><text:span text:style-name="T5024"><text:s/></text:span><text:span>automated</text:span><text:span text:style-name="T5025"><text:s/></text:span><text:span>monitoring service. Even in cases where an explo</text:span><text:span>it employs ingenious tactics that evade immediate detection, Demos leverages heuristic analysis of transactions, news reports, and official statements to swiftly identify the issue and impede vulnerable routes for all Demos users, without them noticing it.</text:span><text:span/></text:p>
      <text:p text:style-name="P714"><text:span/><text:span/></text:p>
      <text:p text:style-name="P715"><text:span>Leveraging</text:span><text:span text:style-name="T5026"><text:s/></text:span><text:span>the</text:span><text:span text:style-name="T5027"><text:s/></text:span><text:span>aforementioned</text:span><text:span text:style-name="T5028"><text:s/></text:span><text:span>techniques,</text:span><text:span text:style-name="T5029"><text:s/></text:span><text:span>the</text:span><text:span text:style-name="T5030"><text:s/></text:span><text:span>Demos</text:span><text:span text:style-name="T5031"><text:s/></text:span><text:span>Firewall</text:span><text:span text:style-name="T5032"><text:s/></text:span><text:span>manifests</text:span><text:span text:style-name="T5033"><text:s/></text:span><text:span>as</text:span><text:span text:style-name="T5034"><text:s/></text:span><text:span>an</text:span><text:span text:style-name="T5035"><text:s/></text:span><text:span>advanced system</text:span><text:span text:style-name="T5036"><text:s/></text:span><text:span>that</text:span><text:span text:style-name="T5037"><text:s/></text:span><text:span>integrates</text:span><text:span text:style-name="T5038"><text:s/></text:span><text:span>heuristics,</text:span><text:span text:style-name="T5039"><text:s/></text:span><text:span>analytics,</text:span><text:span text:style-name="T5040"><text:s/></text:span><text:span>and</text:span><text:span text:style-name="T5041"><text:s/></text:span><text:span>machine</text:span><text:span text:style-name="T5042"><text:s/></text:span><text:span>learning,</text:span><text:span text:style-name="T5043"><text:s/></text:span><text:span>effectively</text:span><text:span text:style-name="T5044"><text:s/></text:span><text:span>safeguarding users, even when operating as an intelligent aggregator of bridges and ramps.</text:span><text:span/></text:p>
      <text:list>
        <text:list-item>
          <text:h text:outline-level="2" text:restart-numbering="0" text:is-list-header="0" text:style-name="P716"><text:span/><text:bookmark-start text:name="_Toc55"/><text:span/><text:span>L2 Parallel Subnetwork </text:span><text:span text:style-name="T5045">(L2PS)</text:span><text:span/><text:bookmark-end text:name="_Toc55"/><text:span/><text:span/></text:h>
        </text:list-item>
      </text:list>
      <text:p text:style-name="P717"><text:span text:style-name="T5046"/><text:span text:style-name="T5047"/></text:p>
      <text:p text:style-name="P718"><text:span>While</text:span><text:span text:style-name="T5048"><text:s/></text:span><text:span>the</text:span><text:span text:style-name="T5049"><text:s/></text:span><text:span>Demos</text:span><text:span text:style-name="T5050"><text:s/></text:span><text:span>Network</text:span><text:span text:style-name="T5051"><text:s/></text:span><text:span>is</text:span><text:span text:style-name="T5052"><text:s/></text:span><text:span>inherently</text:span><text:span text:style-name="T5053"><text:s/></text:span><text:span>fast</text:span><text:span text:style-name="T5054"><text:s/></text:span><text:span>and</text:span><text:span text:style-name="T5055"><text:s/></text:span><text:span>cheap,</text:span><text:span text:style-name="T5056"><text:s/></text:span><text:span>it</text:span><text:span text:style-name="T5057"><text:s/></text:span><text:span>still</text:span><text:span text:style-name="T5058"><text:s/></text:span><text:span>has</text:span><text:span text:style-name="T5059"><text:s/></text:span><text:span>to</text:span><text:span text:style-name="T5060"><text:s/></text:span><text:span>face</text:span><text:span text:style-name="T5061"><text:s/></text:span><text:span>some</text:span><text:span text:style-name="T5062"><text:s/></text:span><text:span>of</text:span><text:span text:style-name="T5063"><text:s/></text:span><text:span>the common problems that blockchain-like networks encounter in providing data.</text:span><text:span/></text:p>
      <text:p text:style-name="P719"><text:span>Due to the transaction gas framework that is critical to maintain a clean, safe and performant</text:span><text:span text:style-name="T5064"><text:s/></text:span><text:span>network,</text:span><text:span text:style-name="T5065"><text:s/></text:span><text:span>some</text:span><text:span text:style-name="T5066"><text:s/></text:span><text:span>kinds</text:span><text:span text:style-name="T5067"><text:s/></text:span><text:span>of</text:span><text:span text:style-name="T5068"><text:s/></text:span><text:span>data</text:span><text:span text:style-name="T5069"><text:s/></text:span><text:span>exchange</text:span><text:span text:style-name="T5070"><text:s/></text:span><text:span>would</text:span><text:span text:style-name="T5071"><text:s/></text:span><text:span>require</text:span><text:span text:style-name="T5072"><text:s/></text:span><text:span>an</text:span><text:span text:style-name="T5073"><text:s/></text:span><text:span>impractical</text:span><text:span text:style-name="T5074"><text:s/></text:span><text:span>amount</text:span><text:span text:style-name="T5075"><text:s/></text:span><text:span>of gas and an unacceptable latency.</text:span><text:span/></text:p>
      <text:p text:style-name="P720"><text:span>A</text:span><text:span text:style-name="T5076"><text:s/></text:span><text:span>classic</text:span><text:span text:style-name="T5077"><text:s/></text:span><text:span>example,</text:span><text:span text:style-name="T5078"><text:s/></text:span><text:span>which</text:span><text:span text:style-name="T5079"><text:s/></text:span><text:span>we</text:span><text:span text:style-name="T5080"><text:s/></text:span><text:span>will</text:span><text:span text:style-name="T5081"><text:s/></text:span><text:span>examine</text:span><text:span text:style-name="T5082"><text:s/></text:span><text:span>in</text:span><text:span text:style-name="T5083"><text:s/></text:span><text:span>detail</text:span><text:span text:style-name="T5084"><text:s/></text:span><text:span>later,</text:span><text:span text:style-name="T5085"><text:s/></text:span><text:span>is</text:span><text:span text:style-name="T5086"><text:s/></text:span><text:span>Instant</text:span><text:span text:style-name="T5087"><text:s/></text:span><text:span>Messaging.</text:span><text:span text:style-name="T5088"><text:s/></text:span><text:span>As</text:span><text:span text:style-name="T5089"><text:s/></text:span><text:span>of</text:span><text:span text:style-name="T5090"><text:s/></text:span><text:span>today, there are no fully on-chain mainstream solutions offering instant messaging in a practical </text:span><text:span text:style-name="T5091">form.</text:span><text:span/></text:p>
      <text:p text:style-name="P721"><text:span>Before diving deep into this example, though, Demos L2PS has to be </text:span><text:span text:style-name="T5092">introduced.</text:span><text:span/></text:p>
      <text:p text:style-name="P722"><text:span text:style-name="T5093"/><text:span text:style-name="T5094"/></text:p>
      <text:list>
        <text:list-item>
          <text:h text:outline-level="3" text:restart-numbering="0" text:is-list-header="0" text:style-name="P723"><text:span/><text:bookmark-start text:name="_Toc56"/><text:span/><text:span>What</text:span><text:span text:style-name="T5095"><text:s/></text:span><text:span>is</text:span><text:span text:style-name="T5096"><text:s/></text:span><text:span>a</text:span><text:span text:style-name="T5097"> Subnetwork?</text:span><text:span/><text:bookmark-end text:name="_Toc56"/><text:span/><text:span/></text:h>
        </text:list-item>
      </text:list>
      <text:p text:style-name="P724"><text:span>In the context of Demos Network specifications, a subnetwork is a network of Demos peers</text:span><text:span text:style-name="T5098"><text:s/></text:span><text:span>that</text:span><text:span text:style-name="T5099"><text:s/></text:span><text:span>in</text:span><text:span text:style-name="T5100"><text:s/></text:span><text:span>addition</text:span><text:span text:style-name="T5101"><text:s/></text:span><text:span>to</text:span><text:span text:style-name="T5102"><text:s/></text:span><text:span>the</text:span><text:span text:style-name="T5103"><text:s/></text:span><text:span>Demos</text:span><text:span text:style-name="T5104"><text:s/></text:span><text:span>main</text:span><text:span text:style-name="T5105"><text:s/></text:span><text:span>specifications</text:span><text:span text:style-name="T5106"><text:s/></text:span><text:span>integrate</text:span><text:span text:style-name="T5107"><text:s/></text:span><text:span>optional</text:span><text:span text:style-name="T5108"><text:s/></text:span><text:span>specifications defined in this paper.</text:span><text:span/></text:p>
      <text:p text:style-name="P725"><text:span>The</text:span><text:span text:style-name="T5109"><text:s/></text:span><text:span>integrated</text:span><text:span text:style-name="T5110"><text:s/></text:span><text:span>and</text:span><text:span text:style-name="T5111"><text:s/></text:span><text:span>automatic</text:span><text:span text:style-name="T5112"><text:s/></text:span><text:span>subnetwork</text:span><text:span text:style-name="T5113"><text:s/></text:span><text:span>included</text:span><text:span text:style-name="T5114"><text:s/></text:span><text:span>in</text:span><text:span text:style-name="T5115"><text:s/></text:span><text:span>any</text:span><text:span text:style-name="T5116"><text:s/></text:span><text:span>Demos</text:span><text:span text:style-name="T5117"><text:s/></text:span><text:span>node</text:span><text:span text:style-name="T5118"><text:s/></text:span><text:span>client</text:span><text:span text:style-name="T5119"><text:s/></text:span><text:span>is</text:span><text:span text:style-name="T5120"><text:s/></text:span><text:span>the</text:span><text:span text:style-name="T5121"><text:s/></text:span><text:span>Instant Messaging Protocol (IMP) which is used intensively by the Demos Network to efficiently deliver communications without clogging the main chain.</text:span><text:span/></text:p>
      <text:list>
        <text:list-item>
          <text:h text:outline-level="3" text:restart-numbering="0" text:is-list-header="0" text:style-name="P726"><text:span/><text:bookmark-start text:name="_Toc57"/><text:span/><text:span>Why</text:span><text:span text:style-name="T5122"><text:s/></text:span><text:span text:style-name="T5123">Parallel?</text:span><text:span/><text:bookmark-end text:name="_Toc57"/><text:span/><text:span/></text:h>
        </text:list-item>
      </text:list>
      <text:p text:style-name="P727"><text:span>Any L2PS integration in Demos must be at the very least fully compatible with a running Demos</text:span><text:span text:style-name="T5124"><text:s/></text:span><text:span>node</text:span><text:span text:style-name="T5125"><text:s/></text:span><text:span>and</text:span><text:span text:style-name="T5126"><text:s/></text:span><text:span>its</text:span><text:span text:style-name="T5127"><text:s/></text:span><text:span>pre-built</text:span><text:span text:style-name="T5128"><text:s/></text:span><text:span>modules.</text:span><text:span text:style-name="T5129"><text:s/></text:span><text:span>This</text:span><text:span text:style-name="T5130"><text:s/></text:span><text:span>means</text:span><text:span text:style-name="T5131"><text:s/></text:span><text:span>that</text:span><text:span text:style-name="T5132"><text:s/></text:span><text:span>no</text:span><text:span text:style-name="T5133"><text:s/></text:span><text:span>L2PS</text:span><text:span text:style-name="T5134"><text:s/></text:span><text:span>subnetwork</text:span><text:span text:style-name="T5135"><text:s/></text:span><text:span>can</text:span><text:span text:style-name="T5136"><text:s/></text:span><text:span>be</text:span><text:span text:style-name="T5137"><text:s/></text:span><text:span>run without a full Demos node installed and running.</text:span><text:span/></text:p>
      <text:p text:style-name="P728"><text:span>The</text:span><text:span text:style-name="T5138"><text:s/></text:span><text:span>“parallel”</text:span><text:span text:style-name="T5139"><text:s/></text:span><text:span>definition</text:span><text:span text:style-name="T5140"><text:s/></text:span><text:span>indicates</text:span><text:span text:style-name="T5141"><text:s/></text:span><text:span>that</text:span><text:span text:style-name="T5142"><text:s/></text:span><text:span>L2PS</text:span><text:span text:style-name="T5143"><text:s/></text:span><text:span>are</text:span><text:span text:style-name="T5144"><text:s/></text:span><text:span>not,</text:span><text:span text:style-name="T5145"><text:s/></text:span><text:span>as</text:span><text:span text:style-name="T5146"><text:s/></text:span><text:span>the</text:span><text:span text:style-name="T5147"><text:s/></text:span><text:span>usual</text:span><text:span text:style-name="T5148"><text:s/></text:span><text:span>L2</text:span><text:span text:style-name="T5149"><text:s/></text:span><text:span>concept</text:span><text:span text:style-name="T5150"><text:s/></text:span><text:span>may</text:span><text:span text:style-name="T5151"><text:s/></text:span><text:span>hint, separate networks that catch up with an L1: they are, instead, parallel protocols and channels that are used to provide resources and services in the most efficient way </text:span><text:span text:style-name="T5152">possible.</text:span><text:span/></text:p>
      <text:list>
        <text:list-item>
          <text:h text:outline-level="3" text:restart-numbering="0" text:is-list-header="0" text:style-name="P729"><text:span/><text:bookmark-start text:name="_Toc58"/><text:span/><text:span/><text:span>IMP:</text:span><text:span text:style-name="T5153"><text:s/></text:span><text:span>Demos</text:span><text:span text:style-name="T5154"><text:s/></text:span><text:span>built-in</text:span><text:span text:style-name="T5155"><text:s/></text:span><text:span text:style-name="T5156">L2PS</text:span><text:span/><text:span/><text:bookmark-end text:name="_Toc58"/><text:span/><text:span/></text:h>
        </text:list-item>
      </text:list>
      <text:p text:style-name="P730"><text:span/><draw:frame draw:name="image7.jpeg" draw:style-name="gr7" draw:z-index="7" text:anchor-type="paragraph" svg:width="16.9cm" svg:height="18.61cm" svg:x="2.053cm" svg:y="0.751cm"><draw:image xlink:href="Pictures/image5.jpg" xlink:type="simple" xlink:show="embed" xlink:actuate="onLoad"/></draw:frame><text:span text:style-name="T5157">Figure 7: </text:span><text:span text:style-name="T5158">IMP</text:span><text:span/></text:p>
      <text:p text:style-name="P731"><text:span>As mentioned above, Demos specifications define a mandatory L2PS called IMP. As Figure</text:span><text:span text:style-name="T5159"><text:s/></text:span><text:span>7</text:span><text:span text:style-name="T5160"><text:s/></text:span><text:span>suggests,</text:span><text:span text:style-name="T5161"><text:s/></text:span><text:span>IMP</text:span><text:span text:style-name="T5162"><text:s/></text:span><text:span>is</text:span><text:span text:style-name="T5163"><text:s/></text:span><text:span>designed</text:span><text:span text:style-name="T5164"><text:s/></text:span><text:span>to</text:span><text:span text:style-name="T5165"><text:s/></text:span><text:span>reduce</text:span><text:span text:style-name="T5166"><text:s/></text:span><text:span>network</text:span><text:span text:style-name="T5167"><text:s/></text:span><text:span>load</text:span><text:span text:style-name="T5168"><text:s/></text:span><text:span>whilst</text:span><text:span text:style-name="T5169"><text:s/></text:span><text:span>providing</text:span><text:span text:style-name="T5170"><text:s/></text:span><text:span>an</text:span><text:span text:style-name="T5171"><text:s/></text:span><text:span>efficient communication channel that is usable in different ways.</text:span><text:span/></text:p>
      <text:p text:style-name="P732"><text:span/><text:span/></text:p>
      <text:p text:style-name="P733"><text:span>IMP needs to create direct communication channels, as defined in Demos specifications, with</text:span><text:span text:style-name="T5172"><text:s/></text:span><text:span>near</text:span><text:span text:style-name="T5173"><text:s/></text:span><text:span>peers.</text:span><text:span text:style-name="T5174"><text:s/></text:span><text:span>While</text:span><text:span text:style-name="T5175"><text:s/></text:span><text:span>this</text:span><text:span text:style-name="T5176"><text:s/></text:span><text:span>is</text:span><text:span text:style-name="T5177"><text:s/></text:span><text:span>usually</text:span><text:span text:style-name="T5178"><text:s/></text:span><text:span>one</text:span><text:span text:style-name="T5179"><text:s/></text:span><text:span>of</text:span><text:span text:style-name="T5180"><text:s/></text:span><text:span>the</text:span><text:span text:style-name="T5181"><text:s/></text:span><text:span>weaknesses</text:span><text:span text:style-name="T5182"><text:s/></text:span><text:span>of</text:span><text:span text:style-name="T5183"><text:s/></text:span><text:span>an</text:span><text:span text:style-name="T5184"><text:s/></text:span><text:span>L2</text:span><text:span text:style-name="T5185"><text:s/></text:span><text:span>network,</text:span><text:span text:style-name="T5186"><text:s/></text:span><text:span>in</text:span><text:span text:style-name="T5187"><text:s/></text:span><text:span>the</text:span><text:span text:style-name="T5188"><text:s/></text:span><text:span>L2PS scenario the IMP node is also the Demos node and thus inherits all of the peers from the </text:span><text:span text:style-name="T5189">beginning.</text:span><text:span/></text:p>
      <text:p text:style-name="P734"><text:span>By building a dynamic, verifiable and unpredictable chain of IMP nodes, the L2PS is able to</text:span><text:span text:style-name="T5190"><text:s/></text:span><text:span>quickly</text:span><text:span text:style-name="T5191"><text:s/></text:span><text:span>and</text:span><text:span text:style-name="T5192"><text:s/></text:span><text:span>safely</text:span><text:span text:style-name="T5193"><text:s/></text:span><text:span>certify</text:span><text:span text:style-name="T5194"><text:s/></text:span><text:span>many</text:span><text:span text:style-name="T5195"><text:s/></text:span><text:span>types</text:span><text:span text:style-name="T5196"><text:s/></text:span><text:span>of</text:span><text:span text:style-name="T5197"><text:s/></text:span><text:span>data</text:span><text:span text:style-name="T5198"><text:s/></text:span><text:span>that</text:span><text:span text:style-name="T5199"><text:s/></text:span><text:span>don’t</text:span><text:span text:style-name="T5200"><text:s/></text:span><text:span>require</text:span><text:span text:style-name="T5201"><text:s/></text:span><text:span>immediate</text:span><text:span text:style-name="T5202"><text:s/></text:span><text:span>finality</text:span><text:span text:style-name="T5203"><text:s/></text:span><text:span>or</text:span><text:span text:style-name="T5204"><text:s/></text:span><text:span>that don’t require finality at all.</text:span><text:span/></text:p>
      <text:p text:style-name="P735"><text:span>As usual, an example explains it </text:span><text:span text:style-name="T5205">better:</text:span><text:span/></text:p>
      <text:list text:style-name="WWNum19" text:continue-numbering="true">
        <text:list-item>
          <text:p text:style-name="P736"><text:span text:style-name="T5206">Alice</text:span><text:span text:style-name="T5207"><text:s/></text:span><text:span text:style-name="T5208">wants</text:span><text:span text:style-name="T5209"><text:s/></text:span><text:span text:style-name="T5210">to</text:span><text:span text:style-name="T5211"><text:s/></text:span><text:span text:style-name="T5212">start</text:span><text:span text:style-name="T5213"><text:s/></text:span><text:span text:style-name="T5214">a</text:span><text:span text:style-name="T5215"><text:s/></text:span><text:span text:style-name="T5216">chat</text:span><text:span text:style-name="T5217"><text:s/></text:span><text:span text:style-name="T5218">session</text:span><text:span text:style-name="T5219"><text:s/></text:span><text:span text:style-name="T5220">with</text:span><text:span text:style-name="T5221"><text:s/></text:span><text:span text:style-name="T5222">Bob,</text:span><text:span text:style-name="T5223"><text:s/></text:span><text:span text:style-name="T5224">and</text:span><text:span text:style-name="T5225"><text:s/></text:span><text:span text:style-name="T5226">uses</text:span><text:span text:style-name="T5227"><text:s/></text:span><text:span text:style-name="T5228">the</text:span><text:span text:style-name="T5229"><text:s/></text:span><text:span text:style-name="T5230">Demos</text:span><text:span text:style-name="T5231"><text:s/></text:span><text:span text:style-name="T5232">SDK</text:span><text:span text:style-name="T5233"><text:s/></text:span><text:span text:style-name="T5234">to</text:span><text:span text:style-name="T5235"><text:s/></text:span><text:span text:style-name="T5236">call</text:span><text:span text:style-name="T5237"><text:s/></text:span><text:span text:style-name="T5238">the proper method</text:span><text:span/></text:p>
        </text:list-item>
        <text:list-item>
          <text:p text:style-name="P737"><text:span text:style-name="T5239">The Demos SDK connects to the Demos RPC and sends the L2PS </text:span><text:span text:style-name="T5240">request</text:span><text:span/></text:p>
        </text:list-item>
        <text:list-item>
          <text:p text:style-name="P738"><text:span text:style-name="T5241">The</text:span><text:span text:style-name="T5242"><text:s/></text:span><text:span text:style-name="T5243">Demos</text:span><text:span text:style-name="T5244"><text:s/></text:span><text:span text:style-name="T5245">RPC</text:span><text:span text:style-name="T5246"><text:s/></text:span><text:span text:style-name="T5247">interprets</text:span><text:span text:style-name="T5248"><text:s/></text:span><text:span text:style-name="T5249">the</text:span><text:span text:style-name="T5250"><text:s/></text:span><text:span text:style-name="T5251">L2PS</text:span><text:span text:style-name="T5252"><text:s/></text:span><text:span text:style-name="T5253">request</text:span><text:span text:style-name="T5254"><text:s/></text:span><text:span text:style-name="T5255">and</text:span><text:span text:style-name="T5256"><text:s/></text:span><text:span text:style-name="T5257">verifies</text:span><text:span text:style-name="T5258"><text:s/></text:span><text:span text:style-name="T5259">which</text:span><text:span text:style-name="T5260"><text:s/></text:span><text:span text:style-name="T5261">operation</text:span><text:span text:style-name="T5262"><text:s/></text:span><text:span text:style-name="T5263">is </text:span><text:span text:style-name="T5264">requested</text:span><text:span/></text:p>
        </text:list-item>
        <text:list-item>
          <text:p text:style-name="P739"><text:span text:style-name="T5265">To</text:span><text:span text:style-name="T5266"><text:s/></text:span><text:span text:style-name="T5267">find</text:span><text:span text:style-name="T5268"><text:s/></text:span><text:span text:style-name="T5269">Bob,</text:span><text:span text:style-name="T5270"><text:s/></text:span><text:span text:style-name="T5271">the</text:span><text:span text:style-name="T5272"><text:s/></text:span><text:span text:style-name="T5273">Demos</text:span><text:span text:style-name="T5274"><text:s/></text:span><text:span text:style-name="T5275">RPC</text:span><text:span text:style-name="T5276"><text:s/></text:span><text:span text:style-name="T5277">uses</text:span><text:span text:style-name="T5278"><text:s/></text:span><text:span text:style-name="T5279">the</text:span><text:span text:style-name="T5280"><text:s/></text:span><text:span text:style-name="T5281">already</text:span><text:span text:style-name="T5282"><text:s/></text:span><text:span text:style-name="T5283">established</text:span><text:span text:style-name="T5284"><text:s/></text:span><text:span text:style-name="T5285">IMP</text:span><text:span text:style-name="T5286"><text:s/></text:span><text:span text:style-name="T5287">network</text:span><text:span text:style-name="T5288"><text:s/></text:span><text:span text:style-name="T5289">of</text:span><text:span text:style-name="T5290"><text:s/></text:span><text:span text:style-name="T5291">peers</text:span><text:span text:style-name="T5292"><text:s/></text:span><text:span text:style-name="T5293">to propagate the request “Where is Bob?”</text:span><text:span/></text:p>
        </text:list-item>
        <text:list-item>
          <text:p text:style-name="P740"><text:span text:style-name="T5294">Due to the redundancy of the IMP connections, Bob is found almost </text:span><text:span text:style-name="T5295">immediately</text:span><text:span/></text:p>
        </text:list-item>
        <text:list-item>
          <text:p text:style-name="P741"><text:span text:style-name="T5296">Alice’s</text:span><text:span text:style-name="T5297"><text:s/></text:span><text:span text:style-name="T5298">RPC</text:span><text:span text:style-name="T5299"><text:s/></text:span><text:span text:style-name="T5300">either</text:span><text:span text:style-name="T5301"><text:s/></text:span><text:span text:style-name="T5302">connects</text:span><text:span text:style-name="T5303"><text:s/></text:span><text:span text:style-name="T5304">to</text:span><text:span text:style-name="T5305"><text:s/></text:span><text:span text:style-name="T5306">Bob’s</text:span><text:span text:style-name="T5307"><text:s/></text:span><text:span text:style-name="T5308">current</text:span><text:span text:style-name="T5309"><text:s/></text:span><text:span text:style-name="T5310">RPC</text:span><text:span text:style-name="T5311"><text:s/></text:span><text:span text:style-name="T5312">(if</text:span><text:span text:style-name="T5313"><text:s/></text:span><text:span text:style-name="T5314">Bob</text:span><text:span text:style-name="T5315"><text:s/></text:span><text:span text:style-name="T5316">is</text:span><text:span text:style-name="T5317"><text:s/></text:span><text:span text:style-name="T5318">connected</text:span><text:span text:style-name="T5319"><text:s/></text:span><text:span text:style-name="T5320">and</text:span><text:span text:style-name="T5321"><text:s/></text:span><text:span text:style-name="T5322">waiting for Alice), or writes the message in Bob’s inbox</text:span><text:span/></text:p>
        </text:list-item>
        <text:list-item>
          <text:p text:style-name="P742"><text:span text:style-name="T5323">Bob is able to either immediately receive or fetch the </text:span><text:span text:style-name="T5324">message</text:span><text:span/></text:p>
        </text:list-item>
        <text:list-item>
          <text:p text:style-name="P743"><text:span text:style-name="T5325">Routine garbage management ensures the healthy condition of IMP </text:span><text:span text:style-name="T5326">L2PS</text:span><text:span/></text:p>
        </text:list-item>
      </text:list>
      <text:p text:style-name="P744"><text:span>While</text:span><text:span text:style-name="T5327"><text:s/></text:span><text:span>this</text:span><text:span text:style-name="T5328"><text:s/></text:span><text:span>example</text:span><text:span text:style-name="T5329"><text:s/></text:span><text:span>explains</text:span><text:span text:style-name="T5330"><text:s/></text:span><text:span>in</text:span><text:span text:style-name="T5331"><text:s/></text:span><text:span>detail</text:span><text:span text:style-name="T5332"><text:s/></text:span><text:span>how</text:span><text:span text:style-name="T5333"><text:s/></text:span><text:span>L2PS</text:span><text:span text:style-name="T5334"><text:s/></text:span><text:span>logic</text:span><text:span text:style-name="T5335"><text:s/></text:span><text:span>works</text:span><text:span text:style-name="T5336"><text:s/></text:span><text:span>through</text:span><text:span text:style-name="T5337"><text:s/></text:span><text:span>an</text:span><text:span text:style-name="T5338"><text:s/></text:span><text:span>example</text:span><text:span text:style-name="T5339"><text:s/></text:span><text:span>of</text:span><text:span text:style-name="T5340"><text:s/></text:span><text:span>an</text:span><text:span text:style-name="T5341"><text:s/></text:span><text:span>IMP transaction, it also creates numerous questions that require a proper explanation. In the next paragraphs, we will examine each one of them.</text:span><text:span/></text:p>
      <text:list>
        <text:list-item>
          <text:h text:outline-level="3" text:restart-numbering="0" text:is-list-header="0" text:style-name="P745"><text:span/><text:bookmark-start text:name="_Toc59"/><text:span/><text:span>Privacy</text:span><text:span text:style-name="T5342"><text:s/></text:span><text:span>and</text:span><text:span text:style-name="T5343"><text:s/></text:span><text:span>L2PS:</text:span><text:span text:style-name="T5344"><text:s/></text:span><text:span>A</text:span><text:span text:style-name="T5345"><text:s/></text:span><text:span>built-in</text:span><text:span text:style-name="T5346"><text:s/></text:span><text:span text:style-name="T5347">concept</text:span><text:span/><text:bookmark-end text:name="_Toc59"/><text:span/><text:span/></text:h>
        </text:list-item>
      </text:list>
      <text:p text:style-name="P746"><text:span>In</text:span><text:span text:style-name="T5348"><text:s/></text:span><text:span>the</text:span><text:span text:style-name="T5349"><text:s/></text:span><text:span>example</text:span><text:span text:style-name="T5350"><text:s/></text:span><text:span>above,</text:span><text:span text:style-name="T5351"><text:s/></text:span><text:span>the</text:span><text:span text:style-name="T5352"><text:s/></text:span><text:span>notable</text:span><text:span text:style-name="T5353"><text:s/></text:span><text:span>observation</text:span><text:span text:style-name="T5354"><text:s/></text:span><text:span>is</text:span><text:span text:style-name="T5355"><text:s/></text:span><text:span>the</text:span><text:span text:style-name="T5356"><text:s/></text:span><text:span>complete</text:span><text:span text:style-name="T5357"><text:s/></text:span><text:span>omission</text:span><text:span text:style-name="T5358"><text:s/></text:span><text:span>of</text:span><text:span text:style-name="T5359"><text:s/></text:span><text:span>any</text:span><text:span text:style-name="T5360"><text:s/></text:span><text:span>mention</text:span><text:span text:style-name="T5361"><text:s/></text:span><text:span>of privacy and sensitive information.</text:span><text:span/></text:p>
      <text:p text:style-name="P747"><text:span>The</text:span><text:span text:style-name="T5362"><text:s/></text:span><text:span>Demos</text:span><text:span text:style-name="T5363"><text:s/></text:span><text:span>Network</text:span><text:span text:style-name="T5364"><text:s/></text:span><text:span>has</text:span><text:span text:style-name="T5365"><text:s/></text:span><text:span>a</text:span><text:span text:style-name="T5366"><text:s/></text:span><text:span>built</text:span><text:span text:style-name="T5367"><text:s/></text:span><text:span>in</text:span><text:span text:style-name="T5368"><text:s/></text:span><text:span>ZK</text:span><text:span text:style-name="T5369"><text:s/></text:span><text:span>Module</text:span><text:span text:style-name="T5370"><text:s/></text:span><text:span>(that</text:span><text:span text:style-name="T5371"><text:s/></text:span><text:span>is</text:span><text:span text:style-name="T5372"><text:s/></text:span><text:span>discussed</text:span><text:span text:style-name="T5373"><text:s/></text:span><text:span>in</text:span><text:span text:style-name="T5374"><text:s/></text:span><text:span>detail</text:span><text:span text:style-name="T5375"><text:s/></text:span><text:span>in</text:span><text:span text:style-name="T5376"><text:s/></text:span><text:span>the</text:span><text:span text:style-name="T5377"><text:s/></text:span><text:span>following chapters). This module is consistently updated, maintained, and applicable to various f</text:span><text:span>acets of Demos transactions. Apart from the chat example which would be secured through End-to-End encryption (also discussed in the next paragraph), there are many scenarios where an actor, to safeguard privacy, necessitates not only the temporary absence</text:span><text:span text:style-name="T5378"><text:s/></text:span><text:span>of</text:span><text:span text:style-name="T5379"><text:s/></text:span><text:span>data</text:span><text:span text:style-name="T5380"><text:s/></text:span><text:span>persistence</text:span><text:span text:style-name="T5381"><text:s/></text:span><text:span>but</text:span><text:span text:style-name="T5382"><text:s/></text:span><text:span>also</text:span><text:span text:style-name="T5383"><text:s/></text:span><text:span>the</text:span><text:span text:style-name="T5384"><text:s/></text:span><text:span>heightened</text:span><text:span text:style-name="T5385"><text:s/></text:span><text:span>privacy</text:span><text:span text:style-name="T5386"><text:s/></text:span><text:span>offered</text:span><text:span text:style-name="T5387"><text:s/></text:span><text:span>exclusively</text:span><text:span text:style-name="T5388"><text:s/></text:span><text:span>by</text:span><text:span text:style-name="T5389"><text:s/></text:span><text:span>Zero Knowledge technology.</text:span><text:span/></text:p>
      <text:list>
        <text:list-item>
          <text:h text:outline-level="2" text:restart-numbering="0" text:is-list-header="0" text:style-name="P748"><text:span/><text:bookmark-start text:name="_Toc60"/><text:span/><text:span>The ZK (Zero Knowledge) </text:span><text:span text:style-name="T5390">Module</text:span><text:span/><text:bookmark-end text:name="_Toc60"/><text:span/><text:span/></text:h>
        </text:list-item>
      </text:list>
      <text:p text:style-name="P749"><text:span>The Demos ZK Module is meticulously crafted from the ground up, utilizing battle-</text:span><text:span>proven algorithms and comprising approximately 200 lines of code. It incorporates a comprehensive primer and a meticulous implementation of Magic Box logic to enable repeatable and consistent Zero Knowledge Proofing. This process involves a concealed "Toy"</text:span><text:span text:style-name="T5391"><text:s/></text:span><text:span>(the</text:span><text:span text:style-name="T5392"><text:s/></text:span><text:span>data)</text:span><text:span text:style-name="T5393"><text:s/></text:span><text:span>within</text:span><text:span text:style-name="T5394"><text:s/></text:span><text:span>a</text:span><text:span text:style-name="T5395"><text:s/></text:span><text:span>Magic</text:span><text:span text:style-name="T5396"><text:s/></text:span><text:span>Box,</text:span><text:span text:style-name="T5397"><text:s/></text:span><text:span>ensuring</text:span><text:span text:style-name="T5398"><text:s/></text:span><text:span>complete</text:span><text:span text:style-name="T5399"><text:s/></text:span><text:span>privacy</text:span><text:span text:style-name="T5400"><text:s/></text:span><text:span>by</text:span><text:span text:style-name="T5401"><text:s/></text:span><text:span>securing</text:span><text:span text:style-name="T5402"><text:s/></text:span><text:span>it</text:span><text:span text:style-name="T5403"><text:s/></text:span><text:span>with</text:span><text:span text:style-name="T5404"><text:s/></text:span><text:span>a</text:span><text:span text:style-name="T5405"><text:s/></text:span><text:span>Secret </text:span><text:span text:style-name="T5406">Key.</text:span><text:span/></text:p>
      <text:p text:style-name="P750"><text:span>In the verification phase, the Verifier initiates a Coin Flip, receiving only the Magic Box. The Prover, tasked with demonstrating their knowledge of the box's content without revealing</text:span><text:span text:style-name="T5407"><text:s/></text:span><text:span>it,</text:span><text:span text:style-name="T5408"><text:s/></text:span><text:span>performs</text:span><text:span text:style-name="T5409"><text:s/></text:span><text:span>what</text:span><text:span text:style-name="T5410"><text:s/></text:span><text:span>is</text:span><text:span text:style-name="T5411"><text:s/></text:span><text:span>referred</text:span><text:span text:style-name="T5412"><text:s/></text:span><text:span>to</text:span><text:span text:style-name="T5413"><text:s/></text:span><text:span>as</text:span><text:span text:style-name="T5414"><text:s/></text:span><text:span>the</text:span><text:span text:style-name="T5415"><text:s/></text:span><text:span>Magic</text:span><text:span text:style-name="T5416"><text:s/></text:span><text:span>Trick.</text:span><text:span text:style-name="T5417"><text:s/></text:span><text:span>The</text:span><text:span text:style-name="T5418"><text:s/></text:span><text:span>successful</text:span><text:span text:style-name="T5419"><text:s/></text:span><text:span>execution</text:span><text:span text:style-name="T5420"><text:s/></text:span><text:span>of this Magic Trick is the ultimate outcome of the ZK Proofing process.</text:span><text:span/></text:p>
      <text:list>
        <text:list-item>
          <text:h text:outline-level="3" text:restart-numbering="0" text:is-list-header="0" text:style-name="P751"><text:span/><text:bookmark-start text:name="_Toc61"/><text:span/><text:span>The</text:span><text:span text:style-name="T5421"><text:s/></text:span><text:span>Importance</text:span><text:span text:style-name="T5422"><text:s/></text:span><text:span>of</text:span><text:span text:style-name="T5423"><text:s/></text:span><text:span>a</text:span><text:span text:style-name="T5424"><text:s/></text:span><text:span>ZK</text:span><text:span text:style-name="T5425"><text:s/></text:span><text:span>Module</text:span><text:span text:style-name="T5426"><text:s/></text:span><text:span>in</text:span><text:span text:style-name="T5427"><text:s/></text:span><text:span>the</text:span><text:span text:style-name="T5428"><text:s/></text:span><text:span text:style-name="T5429">Omniweb</text:span><text:span/><text:bookmark-end text:name="_Toc61"/><text:span/><text:span/></text:h>
        </text:list-item>
      </text:list>
      <text:p text:style-name="P752"><text:span>The ZK module is crucial in the Omniweb for several </text:span><text:span text:style-name="T5430">reasons:</text:span><text:span/></text:p>
      <text:list text:style-name="WWNum20" text:continue-numbering="true">
        <text:list-item>
          <text:p text:style-name="P753"><text:span text:style-name="T5431">Privacy: ZK proofs can prove the legitimacy of a transaction without revealing sensitive details from either party. This is particularly important in the context of blockchain</text:span><text:span text:style-name="T5432"><text:s/></text:span><text:span text:style-name="T5433">technology,</text:span><text:span text:style-name="T5434"><text:s/></text:span><text:span text:style-name="T5435">where</text:span><text:span text:style-name="T5436"><text:s/></text:span><text:span text:style-name="T5437">transactions</text:span><text:span text:style-name="T5438"><text:s/></text:span><text:span text:style-name="T5439">are</text:span><text:span text:style-name="T5440"><text:s/></text:span><text:span text:style-name="T5441">typically</text:span><text:span text:style-name="T5442"><text:s/></text:span><text:span text:style-name="T5443">public</text:span><text:span text:style-name="T5444"><text:s/></text:span><text:span text:style-name="T5445">and</text:span><text:span text:style-name="T5446"><text:s/></text:span><text:span text:style-name="T5447">traceable.</text:span><text:span text:style-name="T5448"><text:s/></text:span><text:span text:style-name="T5449">By using ZK proofs, users can maintain their privacy while still participating in the blockchain ecosystem.</text:span><text:span/></text:p>
        </text:list-item>
        <text:list-item>
          <text:p text:style-name="P754"><text:span text:style-name="T5450">Security: ZK proofs provide a secure way to verify transactions. If a prover knows the secret, the ZK protocol should always succeed in convincing the verifier. Conversely,</text:span><text:span text:style-name="T5451"><text:s/></text:span><text:span text:style-name="T5452">if</text:span><text:span text:style-name="T5453"><text:s/></text:span><text:span text:style-name="T5454">a</text:span><text:span text:style-name="T5455"><text:s/></text:span><text:span text:style-name="T5456">prover</text:span><text:span text:style-name="T5457"><text:s/></text:span><text:span text:style-name="T5458">does</text:span><text:span text:style-name="T5459"><text:s/></text:span><text:span text:style-name="T5460">not</text:span><text:span text:style-name="T5461"><text:s/></text:span><text:span text:style-name="T5462">know</text:span><text:span text:style-name="T5463"><text:s/></text:span><text:span text:style-name="T5464">the</text:span><text:span text:style-name="T5465"><text:s/></text:span><text:span text:style-name="T5466">secret,</text:span><text:span text:style-name="T5467"><text:s/></text:span><text:span text:style-name="T5468">the</text:span><text:span text:style-name="T5469"><text:s/></text:span><text:span text:style-name="T5470">proof</text:span><text:span text:style-name="T5471"><text:s/></text:span><text:span text:style-name="T5472">should</text:span><text:span text:style-name="T5473"><text:s/></text:span><text:span text:style-name="T5474">always</text:span><text:span text:style-name="T5475"><text:s/></text:span><text:span text:style-name="T5476">fail.</text:span><text:span text:style-name="T5477"><text:s/></text:span><text:span text:style-name="T5478">This ensures the integrity of transactions and prevents fraudulent activity.</text:span><text:span/></text:p>
        </text:list-item>
        <text:list-item>
          <text:p text:style-name="P755"><text:span text:style-name="T5479">Interoperability:</text:span><text:span text:style-name="T5480"><text:s/></text:span><text:span text:style-name="T5481">in</text:span><text:span text:style-name="T5482"><text:s/></text:span><text:span text:style-name="T5483">the</text:span><text:span text:style-name="T5484"><text:s/></text:span><text:span text:style-name="T5485">Omniweb,</text:span><text:span text:style-name="T5486"><text:s/></text:span><text:span text:style-name="T5487">multiple</text:span><text:span text:style-name="T5488"><text:s/></text:span><text:span text:style-name="T5489">blockchains</text:span><text:span text:style-name="T5490"><text:s/></text:span><text:span text:style-name="T5491">are</text:span><text:span text:style-name="T5492"><text:s/></text:span><text:span text:style-name="T5493">interconnected.</text:span><text:span text:style-name="T5494"><text:s/></text:span><text:span text:style-name="T5495">ZK</text:span><text:span text:style-name="T5496"><text:s/></text:span><text:span text:style-name="T5497">proofs can be used to verify transactions across these different chains, enhancing the interoperability of the system</text:span><text:span/></text:p>
        </text:list-item>
      </text:list>
      <text:p text:style-name="P756"><text:span text:style-name="T5498"/><text:span text:style-name="T5499"/></text:p>
      <text:p text:style-name="P757"><text:span/><text:bookmark-start text:name="Demos_and_Zero_Knowledge_"/><text:span/><text:bookmark-end text:name="Demos_and_Zero_Knowledge_"/><text:span text:style-name="T5500">Demos</text:span><text:span text:style-name="T5501"><text:s/></text:span><text:span text:style-name="T5502">and</text:span><text:span text:style-name="T5503"><text:s/></text:span><text:span text:style-name="T5504">Zero</text:span><text:span text:style-name="T5505"><text:s/></text:span><text:span text:style-name="T5506">Knowledge</text:span><text:span/></text:p>
      <text:p text:style-name="P758"><text:span>The ZK module enhances Demos by </text:span><text:span text:style-name="T5507">providing:</text:span><text:span/></text:p>
      <text:list text:style-name="WWNum21" text:continue-numbering="true">
        <text:list-item>
          <text:p text:style-name="P759"><text:span text:style-name="T5508">Scalability:</text:span><text:span text:style-name="T5509"><text:s/></text:span><text:span text:style-name="T5510">ZK</text:span><text:span text:style-name="T5511"><text:s/></text:span><text:span text:style-name="T5512">proofs</text:span><text:span text:style-name="T5513"><text:s/></text:span><text:span text:style-name="T5514">help</text:span><text:span text:style-name="T5515"><text:s/></text:span><text:span text:style-name="T5516">to</text:span><text:span text:style-name="T5517"><text:s/></text:span><text:span text:style-name="T5518">minimize</text:span><text:span text:style-name="T5519"><text:s/></text:span><text:span text:style-name="T5520">on-chain</text:span><text:span text:style-name="T5521"><text:s/></text:span><text:span text:style-name="T5522">computation,</text:span><text:span text:style-name="T5523"><text:s/></text:span><text:span text:style-name="T5524">thereby</text:span><text:span text:style-name="T5525"><text:s/></text:span><text:span text:style-name="T5526">enhancing</text:span><text:span text:style-name="T5527"><text:s/></text:span><text:span text:style-name="T5528">the scalability of the blockchain. This is because ZK proofs can validate a transaction without requiring the details of the transaction to be revealed or stored on the Demos blockchain.</text:span><text:span/></text:p>
        </text:list-item>
      </text:list>
      <text:p text:style-name="P760"><text:span text:style-name="T5529"/><text:span text:style-name="T5530"/></text:p>
      <text:list text:style-name="WWNum21" text:continue-numbering="true">
        <text:list-item>
          <text:p text:style-name="P761"><text:span text:style-name="T5531">Efficiency: ZK proofs are succinct, meaning they can be quickly verified, which is crucial</text:span><text:span text:style-name="T5532"><text:s/></text:span><text:span text:style-name="T5533">for</text:span><text:span text:style-name="T5534"><text:s/></text:span><text:span text:style-name="T5535">maintaining</text:span><text:span text:style-name="T5536"><text:s/></text:span><text:span text:style-name="T5537">the</text:span><text:span text:style-name="T5538"><text:s/></text:span><text:span text:style-name="T5539">efficiency</text:span><text:span text:style-name="T5540"><text:s/></text:span><text:span text:style-name="T5541">of</text:span><text:span text:style-name="T5542"><text:s/></text:span><text:span text:style-name="T5543">the</text:span><text:span text:style-name="T5544"><text:s/></text:span><text:span text:style-name="T5545">Demos</text:span><text:span text:style-name="T5546"><text:s/></text:span><text:span text:style-name="T5547">Network</text:span><text:span text:style-name="T5548"><text:s/></text:span><text:span text:style-name="T5549">and</text:span><text:span text:style-name="T5550"><text:s/></text:span><text:span text:style-name="T5551">lowering</text:span><text:span text:style-name="T5552"><text:s/></text:span><text:span text:style-name="T5553">the</text:span><text:span text:style-name="T5554"><text:s/></text:span><text:span text:style-name="T5555">entry </text:span><text:span text:style-name="T5556">barrier.</text:span><text:span/></text:p>
        </text:list-item>
      </text:list>
      <text:p text:style-name="P762"><text:span text:style-name="T5557"/><text:span text:style-name="T5558"/></text:p>
      <text:list text:style-name="WWNum21" text:continue-numbering="true">
        <text:list-item>
          <text:p text:style-name="P763"><text:span text:style-name="T5559">Trustless Environment: In a decentralized system like an Omniweb, trust is a significant</text:span><text:span text:style-name="T5560"><text:s/></text:span><text:span text:style-name="T5561">concern.</text:span><text:span text:style-name="T5562"><text:s/></text:span><text:span text:style-name="T5563">ZK</text:span><text:span text:style-name="T5564"><text:s/></text:span><text:span text:style-name="T5565">proofs</text:span><text:span text:style-name="T5566"><text:s/></text:span><text:span text:style-name="T5567">enable</text:span><text:span text:style-name="T5568"><text:s/></text:span><text:span text:style-name="T5569">a</text:span><text:span text:style-name="T5570"><text:s/></text:span><text:span text:style-name="T5571">trustless</text:span><text:span text:style-name="T5572"><text:s/></text:span><text:span text:style-name="T5573">environment</text:span><text:span text:style-name="T5574"><text:s/></text:span><text:span text:style-name="T5575">where</text:span><text:span text:style-name="T5576"><text:s/></text:span><text:span text:style-name="T5577">parties</text:span><text:span text:style-name="T5578"><text:s/></text:span><text:span text:style-name="T5579">can verify each other's claims without needing to trust each other.</text:span><text:span/></text:p>
        </text:list-item>
        <text:soft-page-break/>
      </text:list>
      <text:p text:style-name="P764"><text:span>In the context of a Demos powered Omniweb, the ZK module is a critical component, providing</text:span><text:span text:style-name="T5580"><text:s/></text:span><text:span>privacy,</text:span><text:span text:style-name="T5581"><text:s/></text:span><text:span>security,</text:span><text:span text:style-name="T5582"><text:s/></text:span><text:span>interoperability,</text:span><text:span text:style-name="T5583"><text:s/></text:span><text:span>scalability,</text:span><text:span text:style-name="T5584"><text:s/></text:span><text:span>and</text:span><text:span text:style-name="T5585"><text:s/></text:span><text:span>efficiency</text:span><text:span text:style-name="T5586"><text:s/></text:span><text:span>on</text:span><text:span text:style-name="T5587"><text:s/></text:span><text:span>demand</text:span><text:span text:style-name="T5588"><text:s/></text:span><text:span>while</text:span><text:span text:style-name="T5589"><text:s/></text:span><text:span>not being</text:span><text:span text:style-name="T5590"><text:s/></text:span><text:span>enforced</text:span><text:span text:style-name="T5591"><text:s/></text:span><text:span>if</text:span><text:span text:style-name="T5592"><text:s/></text:span><text:span>not</text:span><text:span text:style-name="T5593"><text:s/></text:span><text:span>requested.</text:span><text:span text:style-name="T5594"><text:s/></text:span><text:span>This</text:span><text:span text:style-name="T5595"><text:s/></text:span><text:span>enables</text:span><text:span text:style-name="T5596"><text:s/></text:span><text:span>a</text:span><text:span text:style-name="T5597"><text:s/></text:span><text:span>trustless</text:span><text:span text:style-name="T5598"><text:s/></text:span><text:span>environment</text:span><text:span text:style-name="T5599"><text:s/></text:span><text:span>where</text:span><text:span text:style-name="T5600"><text:s/></text:span><text:span>transactions can be verified without revealing sensitive information, significantly expanding Demos scalability and versatility.</text:span><text:span/></text:p>
      <text:p text:style-name="P765"><text:span text:style-name="T5601"/><text:span text:style-name="T5602"/></text:p>
      <text:p text:style-name="P766"><text:span text:style-name="T5603"/><text:span text:style-name="T5604"/></text:p>
      <text:p text:style-name="P767"><text:span/><text:bookmark-start text:name="Demos_ZK_Module_and_Beyond_"/><text:span/><text:bookmark-end text:name="Demos_ZK_Module_and_Beyond_"/><text:span text:style-name="T5605">Demos</text:span><text:span text:style-name="T5606"><text:s/></text:span><text:span text:style-name="T5607">ZK</text:span><text:span text:style-name="T5608"><text:s/></text:span><text:span text:style-name="T5609">Module</text:span><text:span text:style-name="T5610"><text:s/></text:span><text:span text:style-name="T5611">and</text:span><text:span text:style-name="T5612"><text:s/></text:span><text:span text:style-name="T5613">Beyond</text:span><text:span/></text:p>
      <text:p text:style-name="P768"><text:span text:style-name="T5614"/><text:span text:style-name="T5615"/></text:p>
      <text:p text:style-name="P769"><text:span>The Demos Network ZK Module is equipped with a comprehensive interactive Zero Knowledge</text:span><text:span text:style-name="T5616"><text:s/></text:span><text:span>proof</text:span><text:span text:style-name="T5617"><text:s/></text:span><text:span>suite,</text:span><text:span text:style-name="T5618"><text:s/></text:span><text:span>which</text:span><text:span text:style-name="T5619"><text:s/></text:span><text:span>incorporates</text:span><text:span text:style-name="T5620"><text:s/></text:span><text:span>the</text:span><text:span text:style-name="T5621"><text:s/></text:span><text:span>Miller-Rabin</text:span><text:span text:style-name="T5622"><text:s/></text:span><text:span>Test</text:span><text:span text:style-name="T5623"><text:s/></text:span><text:span>for</text:span><text:span text:style-name="T5624"><text:s/></text:span><text:span>generating</text:span><text:span text:style-name="T5625"><text:s/></text:span><text:span>large</text:span><text:span text:style-name="T5626"><text:s/></text:span><text:span>prime </text:span><text:span text:style-name="T5627">numbers.</text:span><text:span/></text:p>
      <text:p text:style-name="P770"><text:span/><text:span/></text:p>
      <text:p text:style-name="P771"><text:span>The Miller-Rabin Test is a probabilistic algorithm used to determine whether a given number</text:span><text:span text:style-name="T5628"><text:s/></text:span><text:span>is</text:span><text:span text:style-name="T5629"><text:s/></text:span><text:span>prime.</text:span><text:span text:style-name="T5630"><text:s/></text:span><text:span>It</text:span><text:span text:style-name="T5631"><text:s/></text:span><text:span>is</text:span><text:span text:style-name="T5632"><text:s/></text:span><text:span>particularly</text:span><text:span text:style-name="T5633"><text:s/></text:span><text:span>useful</text:span><text:span text:style-name="T5634"><text:s/></text:span><text:span>in</text:span><text:span text:style-name="T5635"><text:s/></text:span><text:span>cryptographic</text:span><text:span text:style-name="T5636"><text:s/></text:span><text:span>applications</text:span><text:span text:style-name="T5637"><text:s/></text:span><text:span>where</text:span><text:span text:style-name="T5638"><text:s/></text:span><text:span>large</text:span><text:span text:style-name="T5639"><text:s/></text:span><text:span>primes are essential for security, such as in the generation of RSA keys. By repeatedly testing random bases against the number in </text:span><text:span>question, the Miller-Rabin Test can provide a high level of confidence in the primality of the number, making it a valuable tool for Zero Knowledge proofs where the hardness of certain mathematical problems, like factoring large primes, underpins security.</text:span><text:span/></text:p>
      <text:p text:style-name="P772"><text:span/><text:span/></text:p>
      <text:p text:style-name="P773"><text:span>The Dem</text:span><text:span>os Network further extends the utility of its ZK Module by offering Prover and Verifier classes. These classes simplify the process of generating commitments and responding to challenges, thereby streamlining the creation and verification of Zero Knowledge</text:span><text:span text:style-name="T5640"><text:s/></text:span><text:span>proofs.</text:span><text:span text:style-name="T5641"><text:s/></text:span><text:span>This</text:span><text:span text:style-name="T5642"><text:s/></text:span><text:span>simplification</text:span><text:span text:style-name="T5643"><text:s/></text:span><text:span>is</text:span><text:span text:style-name="T5644"><text:s/></text:span><text:span>crucial</text:span><text:span text:style-name="T5645"><text:s/></text:span><text:span>for</text:span><text:span text:style-name="T5646"><text:s/></text:span><text:span>developers</text:span><text:span text:style-name="T5647"><text:s/></text:span><text:span>and</text:span><text:span text:style-name="T5648"><text:s/></text:span><text:span>users</text:span><text:span text:style-name="T5649"><text:s/></text:span><text:span>who</text:span><text:span text:style-name="T5650"><text:s/></text:span><text:span>require</text:span><text:span text:style-name="T5651"><text:s/></text:span><text:span>a standardized and accessible way to engage with cryptographic protocols.</text:span><text:span/></text:p>
      <text:p text:style-name="P774"><text:span/><text:span/></text:p>
      <text:p text:style-name="P775"><text:span>In</text:span><text:span text:style-name="T5652"><text:s/></text:span><text:span>addition</text:span><text:span text:style-name="T5653"><text:s/></text:span><text:span>to</text:span><text:span text:style-name="T5654"><text:s/></text:span><text:span>its</text:span><text:span text:style-name="T5655"><text:s/></text:span><text:span>core</text:span><text:span text:style-name="T5656"><text:s/></text:span><text:span>offerings,</text:span><text:span text:style-name="T5657"><text:s/></text:span><text:span>the</text:span><text:span text:style-name="T5658"><text:s/></text:span><text:span>Demos</text:span><text:span text:style-name="T5659"><text:s/></text:span><text:span>Network</text:span><text:span text:style-name="T5660"><text:s/></text:span><text:span>facilitates</text:span><text:span text:style-name="T5661"><text:s/></text:span><text:span>the</text:span><text:span text:style-name="T5662"><text:s/></text:span><text:span>integration</text:span><text:span text:style-name="T5663"><text:s/></text:span><text:span>of</text:span><text:span text:style-name="T5664"><text:s/></text:span><text:span>custom</text:span><text:span text:style-name="T5665"><text:s/></text:span><text:span>ZK services. This means that partners and infrastructures can seamlessly incorporate their specialized ZK services, enhancing the netw</text:span><text:span>ork's capabilities. For example, a partner could integrate a hardware-based ZK computation service that accelerates the proof generation process, similar to how certain startups are developing FPGA and ASIC solutions to speed up cryptographic computations.</text:span><text:span/></text:p>
      <text:p text:style-name="P776"><text:span/><text:span/></text:p>
      <text:p text:style-name="P777"><text:span>Another</text:span><text:span text:style-name="T5666"><text:s/></text:span><text:span>potential</text:span><text:span text:style-name="T5667"><text:s/></text:span><text:span>integration</text:span><text:span text:style-name="T5668"><text:s/></text:span><text:span>could</text:span><text:span text:style-name="T5669"><text:s/></text:span><text:span>involve</text:span><text:span text:style-name="T5670"><text:s/></text:span><text:span>a</text:span><text:span text:style-name="T5671"><text:s/></text:span><text:span>cloud-based</text:span><text:span text:style-name="T5672"><text:s/></text:span><text:span>ZK</text:span><text:span text:style-name="T5673"><text:s/></text:span><text:span>service</text:span><text:span text:style-name="T5674"><text:s/></text:span><text:span>that</text:span><text:span text:style-name="T5675"><text:s/></text:span><text:span>offers</text:span><text:span text:style-name="T5676"><text:s/></text:span><text:span>scalable proof generation through a SaaS model, providing API access to clients who require</text:span><text:span/></text:p>
      <text:p text:style-name="P778"><text:span>on-demand cryptographic services without the need for in-house </text:span><text:span text:style-name="T5677">infrastructure.</text:span><text:span/></text:p>
      <text:p text:style-name="P779"><text:span/><text:span/></text:p>
      <text:p text:style-name="P780"><text:span>These custom</text:span><text:span> integrations exemplify the flexibility of the Demos Network, allowing it to cater to a diverse range of cryptographic needs and use cases. By supporting such integrations, the network not only broadens its applicability but also fosters an ecosystem where</text:span><text:span text:style-name="T5678"><text:s/></text:span><text:span>innovation</text:span><text:span text:style-name="T5679"><text:s/></text:span><text:span>in</text:span><text:span text:style-name="T5680"><text:s/></text:span><text:span>Zero</text:span><text:span text:style-name="T5681"><text:s/></text:span><text:span>Knowledge</text:span><text:span text:style-name="T5682"><text:s/></text:span><text:span>proof</text:span><text:span text:style-name="T5683"><text:s/></text:span><text:span>generation</text:span><text:span text:style-name="T5684"><text:s/></text:span><text:span>can</text:span><text:span text:style-name="T5685"><text:s/></text:span><text:span>thrive,</text:span><text:span text:style-name="T5686"><text:s/></text:span><text:span>ultimately</text:span><text:span text:style-name="T5687"><text:s/></text:span><text:span>contributing</text:span><text:span text:style-name="T5688"><text:s/></text:span><text:span>to a more secure and efficient blockchain landscape.</text:span><text:span/></text:p>
      <text:list>
        <text:list-item>
          <text:h text:outline-level="2" text:restart-numbering="0" text:is-list-header="0" text:style-name="P781"><text:span/><text:bookmark-start text:name="_Toc62"/><text:span/><text:span>Homomorphic</text:span><text:span text:style-name="T5689"><text:s/></text:span><text:span>Encryption:</text:span><text:span text:style-name="T5690"><text:s/></text:span><text:span>Tailoring</text:span><text:span text:style-name="T5691"><text:s/></text:span><text:span>Privacy</text:span><text:span text:style-name="T5692"><text:s/></text:span><text:span>for</text:span><text:span text:style-name="T5693"><text:s/></text:span><text:span>Real Use Cases</text:span><text:span/><text:bookmark-end text:name="_Toc62"/><text:span/><text:span/></text:h>
        </text:list-item>
      </text:list>
      <text:p text:style-name="P782"><text:span text:style-name="T5694"/><text:span text:style-name="T5695"/></text:p>
      <text:p text:style-name="P783"><text:span>To establish a robust privacy framework, Demos acknowledges the necessity of a novel approach</text:span><text:span text:style-name="T5696"><text:s/></text:span><text:span>to</text:span><text:span text:style-name="T5697"><text:s/></text:span><text:span>Zero-Knowledge</text:span><text:span text:style-name="T5698"><text:s/></text:span><text:span>operations,</text:span><text:span text:style-name="T5699"><text:s/></text:span><text:span>complementing</text:span><text:span text:style-name="T5700"><text:s/></text:span><text:span>traditional</text:span><text:span text:style-name="T5701"><text:s/></text:span><text:span>ZK</text:span><text:span text:style-name="T5702"><text:s/></text:span><text:span>Proofs.</text:span><text:span text:style-name="T5703"><text:s/></text:span><text:span>Consider</text:span><text:span text:style-name="T5704"><text:s/></text:span><text:span>a scenario</text:span><text:span text:style-name="T5705"><text:s/></text:span><text:span>where</text:span><text:span text:style-name="T5706"><text:s/></text:span><text:span>a</text:span><text:span text:style-name="T5707"><text:s/></text:span><text:span>user</text:span><text:span text:style-name="T5708"><text:s/></text:span><text:span>wishes</text:span><text:span text:style-name="T5709"><text:s/></text:span><text:span>to</text:span><text:span text:style-name="T5710"><text:s/></text:span><text:span>transmit</text:span><text:span text:style-name="T5711"><text:s/></text:span><text:span>encrypted</text:span><text:span text:style-name="T5712"><text:s/></text:span><text:span>data</text:span><text:span text:style-name="T5713"><text:s/></text:span><text:span>without</text:span><text:span text:style-name="T5714"><text:s/></text:span><text:span>disclosing</text:span><text:span text:style-name="T5715"><text:s/></text:span><text:span>it,</text:span><text:span text:style-name="T5716"><text:s/></text:span><text:span>yet</text:span><text:span text:style-name="T5717"><text:s/></text:span><text:span>enabling others to perform trusted and verifiable operations on the data.</text:span><text:span/></text:p>
      <text:p text:style-name="P784"><text:span>This approach is known as Homomorphism, and it involves the use of Homomorphic Encryption for secure data manipulation. Specifically, Fully Homomorphic Encryption (FHE)</text:span><text:span text:style-name="T5718"><text:s/></text:span><text:span>empowers</text:span><text:span text:style-name="T5719"><text:s/></text:span><text:span>Demos</text:span><text:span text:style-name="T5720"><text:s/></text:span><text:span>users</text:span><text:span text:style-name="T5721"><text:s/></text:span><text:span>and</text:span><text:span text:style-name="T5722"><text:s/></text:span><text:span>developers</text:span><text:span text:style-name="T5723"><text:s/></text:span><text:span>to</text:span><text:span text:style-name="T5724"><text:s/></text:span><text:span>create</text:span><text:span text:style-name="T5725"><text:s/></text:span><text:span>cutting-edge,</text:span><text:span text:style-name="T5726"><text:s/></text:span><text:span>privacy-preserving applications on the Demos Network. FHE ensures that users can enjoy the benefits of advanced privacy features without compromising on dynamism and functionality.</text:span><text:span/></text:p>
      <text:list>
        <text:list-item>
          <text:h text:outline-level="3" text:restart-numbering="0" text:is-list-header="0" text:style-name="P785"><text:span/><text:bookmark-start text:name="_Toc63"/><text:span/><text:span>A</text:span><text:span text:style-name="T5727"><text:s/></text:span><text:span>Practical</text:span><text:span text:style-name="T5728"><text:s/></text:span><text:span>Example</text:span><text:span text:style-name="T5729"><text:s/></text:span><text:span>of</text:span><text:span text:style-name="T5730"><text:s/></text:span><text:span text:style-name="T5731">FHE</text:span><text:span/><text:bookmark-end text:name="_Toc63"/><text:span/><text:span/></text:h>
        </text:list-item>
      </text:list>
      <text:p text:style-name="P786"><text:span>Given the recent developments in Fully Homomorphic Encryption (FHE) and Homomorphic Encryption in general, it's helpful to explore a potential use case. Consider the</text:span><text:span text:style-name="T5732"><text:s/></text:span><text:span>scenario</text:span><text:span text:style-name="T5733"><text:s/></text:span><text:span>where</text:span><text:span text:style-name="T5734"><text:s/></text:span><text:span>Alice</text:span><text:span text:style-name="T5735"><text:s/></text:span><text:span>possesses</text:span><text:span text:style-name="T5736"><text:s/></text:span><text:span>a</text:span><text:span text:style-name="T5737"><text:s/></text:span><text:span>confidential</text:span><text:span text:style-name="T5738"><text:s/></text:span><text:span>number</text:span><text:span text:style-name="T5739"><text:s/></text:span><text:span>and</text:span><text:span text:style-name="T5740"><text:s/></text:span><text:span>wants</text:span><text:span text:style-name="T5741"><text:s/></text:span><text:span>Bob</text:span><text:span text:style-name="T5742"><text:s/></text:span><text:span>to</text:span><text:span text:style-name="T5743"><text:s/></text:span><text:span>add</text:span><text:span text:style-name="T5744"><text:s/></text:span><text:span>his</text:span><text:span text:style-name="T5745"><text:s/></text:span><text:span>data to this number without revealing the specifics.</text:span><text:span/></text:p>
      <text:p text:style-name="P787"><text:span>Traditionally,</text:span><text:span text:style-name="T5746"><text:s/></text:span><text:span>Alice</text:span><text:span text:style-name="T5747"><text:s/></text:span><text:span>might</text:span><text:span text:style-name="T5748"><text:s/></text:span><text:span>ask</text:span><text:span text:style-name="T5749"><text:s/></text:span><text:span>Bob</text:span><text:span text:style-name="T5750"><text:s/></text:span><text:span>for</text:span><text:span text:style-name="T5751"><text:s/></text:span><text:span>the</text:span><text:span text:style-name="T5752"><text:s/></text:span><text:span>sum,</text:span><text:span text:style-name="T5753"><text:s/></text:span><text:span>verify</text:span><text:span text:style-name="T5754"><text:s/></text:span><text:span>its</text:span><text:span text:style-name="T5755"><text:s/></text:span><text:span>authenticity,</text:span><text:span text:style-name="T5756"><text:s/></text:span><text:span>manually</text:span><text:span text:style-name="T5757"><text:s/></text:span><text:span>add</text:span><text:span text:style-name="T5758"><text:s/></text:span><text:span>it,</text:span><text:span text:style-name="T5759"><text:s/></text:span><text:span>and then provide Bob with a proof of the completed operation. However, with an FHE approach, these steps can be streamlined into distributed processes:</text:span><text:span/></text:p>
      <text:p text:style-name="P788"><text:span text:style-name="T5760">−</text:span><text:span><text:tab/>Alice</text:span><text:span text:style-name="T5761"><text:s/></text:span><text:span>encrypts</text:span><text:span text:style-name="T5762"><text:s/></text:span><text:span>her</text:span><text:span text:style-name="T5763"><text:s/></text:span><text:span>sensitive</text:span><text:span text:style-name="T5764"><text:s/></text:span><text:span>variable</text:span><text:span text:style-name="T5765"><text:s/></text:span><text:span>containing</text:span><text:span text:style-name="T5766"><text:s/></text:span><text:span>the</text:span><text:span text:style-name="T5767"><text:s/></text:span><text:span>number</text:span><text:span text:style-name="T5768"><text:s/></text:span><text:span>5</text:span><text:span text:style-name="T5769"><text:s/></text:span><text:span>using</text:span><text:span text:style-name="T5770"><text:s/></text:span><text:span>Homomorphic Encryption within the Demos SDK</text:span><text:span/></text:p>
      <text:p text:style-name="P789"><text:span text:style-name="T5771">−</text:span><text:span><text:tab/>Bob, receiving the encrypted message, is unable to decipher its </text:span><text:span text:style-name="T5772">content</text:span><text:span/></text:p>
      <text:p text:style-name="P790"><text:span text:style-name="T5773">−</text:span><text:span><text:tab/>Using</text:span><text:span text:style-name="T5774"><text:s/></text:span><text:span>the</text:span><text:span text:style-name="T5775"><text:s/></text:span><text:span>Demos</text:span><text:span text:style-name="T5776"><text:s/></text:span><text:span>SDK</text:span><text:span text:style-name="T5777"><text:s/></text:span><text:span>FHE</text:span><text:span text:style-name="T5778"><text:s/></text:span><text:span>module,</text:span><text:span text:style-name="T5779"><text:s/></text:span><text:span>Bob</text:span><text:span text:style-name="T5780"><text:s/></text:span><text:span>adds</text:span><text:span text:style-name="T5781"><text:s/></text:span><text:span>his</text:span><text:span text:style-name="T5782"><text:s/></text:span><text:span>value</text:span><text:span text:style-name="T5783"><text:s/></text:span><text:span>(2)</text:span><text:span text:style-name="T5784"><text:s/></text:span><text:span>to</text:span><text:span text:style-name="T5785"><text:s/></text:span><text:span>the</text:span><text:span text:style-name="T5786"><text:s/></text:span><text:span>encrypted message without needing to decrypt</text:span><text:span/></text:p>
      <text:p text:style-name="P791"><text:span text:style-name="T5787">−</text:span><text:span><text:tab/>Alice,</text:span><text:span text:style-name="T5788"><text:s/></text:span><text:span>receiving</text:span><text:span text:style-name="T5789"><text:s/></text:span><text:span>the</text:span><text:span text:style-name="T5790"><text:s/></text:span><text:span>modified</text:span><text:span text:style-name="T5791"><text:s/></text:span><text:span>and</text:span><text:span text:style-name="T5792"><text:s/></text:span><text:span>encrypted</text:span><text:span text:style-name="T5793"><text:s/></text:span><text:span>data,</text:span><text:span text:style-name="T5794"><text:s/></text:span><text:span>decrypts</text:span><text:span text:style-name="T5795"><text:s/></text:span><text:span>it</text:span><text:span text:style-name="T5796"><text:s/></text:span><text:span>using</text:span><text:span text:style-name="T5797"><text:s/></text:span><text:span>the</text:span><text:span text:style-name="T5798"><text:s/></text:span><text:span>Demos</text:span><text:span text:style-name="T5799"><text:s/></text:span><text:span>SDK, as she originally encrypted it</text:span><text:span/></text:p>
      <text:p text:style-name="P792"><text:span text:style-name="T5800">−</text:span><text:span><text:tab/>The</text:span><text:span text:style-name="T5801"><text:s/></text:span><text:span>decrypted</text:span><text:span text:style-name="T5802"><text:s/></text:span><text:span>data</text:span><text:span text:style-name="T5803"><text:s/></text:span><text:span>reads</text:span><text:span text:style-name="T5804"><text:s/></text:span><text:span>7</text:span><text:span text:style-name="T5805"><text:s/></text:span><text:span>(5+2),</text:span><text:span text:style-name="T5806"><text:s/></text:span><text:span>and</text:span><text:span text:style-name="T5807"><text:s/></text:span><text:span>Alice</text:span><text:span text:style-name="T5808"><text:s/></text:span><text:span>can</text:span><text:span text:style-name="T5809"><text:s/></text:span><text:span>cryptographically</text:span><text:span text:style-name="T5810"><text:s/></text:span><text:span>verify</text:span><text:span text:style-name="T5811"><text:s/></text:span><text:span>the</text:span><text:span text:style-name="T5812"><text:s/></text:span><text:span>result with security measures in place</text:span><text:span/></text:p>
      <text:p text:style-name="P793"><text:span text:style-name="T5813"/><text:span text:style-name="T5814"/></text:p>
      <text:p text:style-name="P794"><text:span text:style-name="T5815"/><text:span text:style-name="T5816"/></text:p>
      <text:list>
        <text:list-item>
          <text:h text:outline-level="3" text:restart-numbering="0" text:is-list-header="0" text:style-name="P795"><text:span/><text:bookmark-start text:name="_Toc64"/><text:span/><text:span>A</text:span><text:span text:style-name="T5817"><text:s/></text:span><text:span>Trustless</text:span><text:span text:style-name="T5818"><text:s/></text:span><text:span>Approach</text:span><text:span text:style-name="T5819"><text:s/></text:span><text:span>to</text:span><text:span text:style-name="T5820"><text:s/></text:span><text:span>Data</text:span><text:span text:style-name="T5821"><text:s/></text:span><text:span text:style-name="T5822">Transformation</text:span><text:span/><text:bookmark-end text:name="_Toc64"/><text:span/><text:span/></text:h>
        </text:list-item>
      </text:list>
      <text:p text:style-name="P796"><text:span>The</text:span><text:span text:style-name="T5823"><text:s/></text:span><text:span>simplified</text:span><text:span text:style-name="T5824"><text:s/></text:span><text:span>example</text:span><text:span text:style-name="T5825"><text:s/></text:span><text:span>above</text:span><text:span text:style-name="T5826"><text:s/></text:span><text:span>serves</text:span><text:span text:style-name="T5827"><text:s/></text:span><text:span>as</text:span><text:span text:style-name="T5828"><text:s/></text:span><text:span>an</text:span><text:span text:style-name="T5829"><text:s/></text:span><text:span>illustration</text:span><text:span text:style-name="T5830"><text:s/></text:span><text:span>of</text:span><text:span text:style-name="T5831"><text:s/></text:span><text:span>how</text:span><text:span text:style-name="T5832"><text:s/></text:span><text:span>privacy</text:span><text:span text:style-name="T5833"><text:s/></text:span><text:span>is</text:span><text:span text:style-name="T5834"><text:s/></text:span><text:span>intricately</text:span><text:span text:style-name="T5835"><text:s/></text:span><text:span>wov</text:span><text:span>en into the user experience within the Demos Network specifications. Emphasizing the significance of employing suitable technology for specific features, Fully Homomorphic Encryption (FHE) introduces a rapid and focused layer of security across the entire </text:span><text:span text:style-name="T5836">networ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9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712"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712" style:display-name="Heading 7" style:family="paragraph" style:name="144">
      <style:paragraph-properties fo:margin-top="2pt" fo:margin-bottom="0pt"/>
      <style:text-properties fo:color="#595959" fo:font-family="Arial" style:font-family-asian="Arial" style:font-family-complex="Arial"/>
    </style:style>
    <style:style style:parent-style-name="712" style:display-name="Heading 8" style:family="paragraph" style:name="145">
      <style:paragraph-properties fo:margin-bottom="0pt"/>
      <style:text-properties fo:color="#272727" fo:font-family="Arial" style:font-family-asian="Arial" style:font-family-complex="Arial" fo:font-style="italic"/>
    </style:style>
    <style:style style:parent-style-name="712" style:display-name="Heading 9" style:family="paragraph" style:name="146">
      <style:paragraph-properties fo:margin-bottom="0pt"/>
      <style:text-properties fo:color="#272727" fo:font-family="Arial" style:font-family-asian="Arial" style:font-family-complex="Arial" fo:font-style="italic"/>
    </style:style>
    <style:style style:parent-style-name="719" style:display-name="Heading 1 Char" style:family="text" style:name="149">
      <style:paragraph-properties/>
      <style:text-properties fo:color="#0f4761" fo:font-family="Arial" style:font-family-asian="Arial" style:font-family-complex="Arial" fo:font-size="20pt"/>
    </style:style>
    <style:style style:parent-style-name="719" style:display-name="Heading 2 Char" style:family="text" style:name="150">
      <style:paragraph-properties/>
      <style:text-properties fo:color="#0f4761" fo:font-family="Arial" style:font-family-asian="Arial" style:font-family-complex="Arial" fo:font-size="16pt"/>
    </style:style>
    <style:style style:parent-style-name="719" style:display-name="Heading 3 Char" style:family="text" style:name="151">
      <style:paragraph-properties/>
      <style:text-properties fo:color="#0f4761" fo:font-family="Arial" style:font-family-asian="Arial" style:font-family-complex="Arial" fo:font-size="14pt"/>
    </style:style>
    <style:style style:parent-style-name="719" style:display-name="Heading 4 Char" style:family="text" style:name="152">
      <style:paragraph-properties/>
      <style:text-properties fo:color="#0f4761" fo:font-family="Arial" style:font-family-asian="Arial" style:font-family-complex="Arial" fo:font-style="italic"/>
    </style:style>
    <style:style style:parent-style-name="719" style:display-name="Heading 5 Char" style:family="text" style:name="153">
      <style:paragraph-properties/>
      <style:text-properties fo:color="#0f4761" fo:font-family="Arial" style:font-family-asian="Arial" style:font-family-complex="Arial"/>
    </style:style>
    <style:style style:parent-style-name="719" style:display-name="Heading 6 Char" style:family="text" style:name="154">
      <style:paragraph-properties/>
      <style:text-properties fo:color="#595959" fo:font-family="Arial" style:font-family-asian="Arial" style:font-family-complex="Arial" fo:font-style="italic"/>
    </style:style>
    <style:style style:parent-style-name="719" style:display-name="Heading 7 Char" style:family="text" style:name="155">
      <style:paragraph-properties/>
      <style:text-properties fo:color="#595959" fo:font-family="Arial" style:font-family-asian="Arial" style:font-family-complex="Arial"/>
    </style:style>
    <style:style style:parent-style-name="719" style:display-name="Heading 8 Char" style:family="text" style:name="156">
      <style:paragraph-properties/>
      <style:text-properties fo:color="#272727" fo:font-family="Arial" style:font-family-asian="Arial" style:font-family-complex="Arial" fo:font-style="italic"/>
    </style:style>
    <style:style style:parent-style-name="719" style:display-name="Heading 9 Char" style:family="text" style:name="157">
      <style:paragraph-properties/>
      <style:text-properties fo:color="#272727" fo:font-family="Arial" style:font-family-asian="Arial" style:font-family-complex="Arial" fo:font-style="italic"/>
    </style:style>
    <style:style style:parent-style-name="712"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719" style:display-name="Title Char" style:family="text" style:name="159">
      <style:paragraph-properties/>
      <style:text-properties fo:font-family="Arial" style:font-family-asian="Arial" style:font-family-complex="Arial" fo:font-size="28pt" fo:letter-spacing="-0.5pt"/>
    </style:style>
    <style:style style:parent-style-name="712" style:display-name="Subtitle" style:family="paragraph" style:name="160">
      <style:paragraph-properties/>
      <style:text-properties fo:color="#595959" fo:font-size="14pt" fo:letter-spacing="0.75pt"/>
    </style:style>
    <style:style style:parent-style-name="719" style:display-name="Subtitle Char" style:family="text" style:name="161">
      <style:paragraph-properties/>
      <style:text-properties fo:color="#595959" fo:font-size="14pt" fo:letter-spacing="0.75pt"/>
    </style:style>
    <style:style style:parent-style-name="712" style:display-name="Quote" style:family="paragraph" style:name="162">
      <style:paragraph-properties fo:text-align="center" fo:margin-top="8pt"/>
      <style:text-properties fo:color="#404040" fo:font-style="italic"/>
    </style:style>
    <style:style style:parent-style-name="719" style:display-name="Quote Char" style:family="text" style:name="163">
      <style:paragraph-properties/>
      <style:text-properties fo:color="#404040" fo:font-style="italic"/>
    </style:style>
    <style:style style:parent-style-name="719" style:display-name="Intense Emphasis" style:family="text" style:name="165">
      <style:paragraph-properties/>
      <style:text-properties fo:color="#0f4761" fo:font-style="italic"/>
    </style:style>
    <style:style style:parent-style-name="712"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719" style:display-name="Intense Quote Char" style:family="text" style:name="167">
      <style:paragraph-properties/>
      <style:text-properties fo:color="#0f4761" fo:font-style="italic"/>
    </style:style>
    <style:style style:parent-style-name="719" style:display-name="Intense Reference" style:family="text" style:name="168">
      <style:paragraph-properties/>
      <style:text-properties fo:font-variant="small-caps" fo:color="#0f4761" fo:letter-spacing="0.25pt" fo:font-weight="bold"/>
    </style:style>
    <style:style style:parent-style-name="712" style:display-name="No Spacing" style:family="paragraph" style:name="169">
      <style:paragraph-properties fo:line-height="100%" fo:margin-bottom="0pt"/>
      <style:text-properties fo:font-size="12pt"/>
    </style:style>
    <style:style style:parent-style-name="719" style:display-name="Subtle Emphasis" style:family="text" style:name="170">
      <style:paragraph-properties/>
      <style:text-properties fo:color="#404040" fo:font-style="italic"/>
    </style:style>
    <style:style style:parent-style-name="719" style:display-name="Emphasis" style:family="text" style:name="171">
      <style:paragraph-properties/>
      <style:text-properties fo:font-style="italic"/>
    </style:style>
    <style:style style:parent-style-name="719" style:display-name="Strong" style:family="text" style:name="172">
      <style:paragraph-properties/>
      <style:text-properties fo:font-weight="bold"/>
    </style:style>
    <style:style style:parent-style-name="719" style:display-name="Subtle Reference" style:family="text" style:name="173">
      <style:paragraph-properties/>
      <style:text-properties fo:font-variant="small-caps" fo:color="#5a5a5a"/>
    </style:style>
    <style:style style:parent-style-name="719" style:display-name="Book Title" style:family="text" style:name="174">
      <style:paragraph-properties/>
      <style:text-properties fo:letter-spacing="0.25pt" fo:font-style="italic" fo:font-weight="bold"/>
    </style:style>
    <style:style style:parent-style-name="712"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719" style:display-name="Header Char" style:family="text" style:name="176">
      <style:paragraph-properties/>
    </style:style>
    <style:style style:parent-style-name="712"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719" style:display-name="Footer Char" style:family="text" style:name="178">
      <style:paragraph-properties/>
    </style:style>
    <style:style style:parent-style-name="712" style:display-name="Caption" style:family="paragraph" style:name="179">
      <style:paragraph-properties fo:line-height="100%" fo:margin-bottom="10pt"/>
      <style:text-properties fo:color="#0e2841" fo:font-size="9pt" fo:font-style="italic"/>
    </style:style>
    <style:style style:parent-style-name="712" style:display-name="footnote text" style:family="paragraph" style:name="180">
      <style:paragraph-properties fo:line-height="100%" fo:margin-bottom="0pt"/>
      <style:text-properties fo:font-size="10pt"/>
    </style:style>
    <style:style style:parent-style-name="719" style:display-name="Footnote Text Char" style:family="text" style:name="181">
      <style:paragraph-properties/>
      <style:text-properties fo:font-size="10pt"/>
    </style:style>
    <style:style style:parent-style-name="719" style:display-name="footnote reference" style:family="text" style:name="182">
      <style:paragraph-properties/>
      <style:text-properties style:text-position="super 58%"/>
    </style:style>
    <style:style style:parent-style-name="712" style:display-name="endnote text" style:family="paragraph" style:name="183">
      <style:paragraph-properties fo:line-height="100%" fo:margin-bottom="0pt"/>
      <style:text-properties fo:font-size="10pt"/>
    </style:style>
    <style:style style:parent-style-name="719" style:display-name="Endnote Text Char" style:family="text" style:name="184">
      <style:paragraph-properties/>
      <style:text-properties fo:font-size="10pt"/>
    </style:style>
    <style:style style:parent-style-name="719" style:display-name="endnote reference" style:family="text" style:name="185">
      <style:paragraph-properties/>
      <style:text-properties style:text-position="super 58%"/>
    </style:style>
    <style:style style:parent-style-name="719"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19"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712" style:display-name="toc 4" style:family="paragraph" style:name="191">
      <style:paragraph-properties fo:margin-left="1.164cm" fo:margin-bottom="5pt"/>
    </style:style>
    <style:style style:parent-style-name="712" style:display-name="toc 5" style:family="paragraph" style:name="192">
      <style:paragraph-properties fo:margin-left="1.552cm" fo:margin-bottom="5pt"/>
    </style:style>
    <style:style style:parent-style-name="712" style:display-name="toc 6" style:family="paragraph" style:name="193">
      <style:paragraph-properties fo:margin-left="1.94cm" fo:margin-bottom="5pt"/>
    </style:style>
    <style:style style:parent-style-name="712" style:display-name="toc 7" style:family="paragraph" style:name="194">
      <style:paragraph-properties fo:margin-left="2.328cm" fo:margin-bottom="5pt"/>
    </style:style>
    <style:style style:parent-style-name="712" style:display-name="toc 8" style:family="paragraph" style:name="195">
      <style:paragraph-properties fo:margin-left="2.717cm" fo:margin-bottom="5pt"/>
    </style:style>
    <style:style style:parent-style-name="712" style:display-name="toc 9" style:family="paragraph" style:name="196">
      <style:paragraph-properties fo:margin-left="3.105cm" fo:margin-bottom="5pt"/>
    </style:style>
    <style:style style:display-name="TOC Heading" style:family="paragraph" style:name="206">
      <style:paragraph-properties/>
    </style:style>
    <style:style style:parent-style-name="712" style:display-name="table of figures" style:family="paragraph" style:name="207">
      <style:paragraph-properties fo:margin-bottom="0pt"/>
    </style:style>
    <style:style style:display-name="DStyle_paragraph" style:family="paragraph" style:name="703">
      <style:paragraph-properties fo:line-height="100%" fo:text-align="left" fo:margin-top="0pt" fo:margin-bottom="0pt" fo:border="none"/>
      <style:text-properties fo:font-variant="normal" fo:text-transform="none" fo:color="#000000" style:text-line-through-type="none" fo:font-family="Calibri" style:font-family-asian="Calibri" style:font-family-complex="Times New Roman" fo:font-size="11pt" fo:letter-spacing="0pt" fo:language="en" fo:country="US" fo:font-style="normal" style:text-underline-type="none" style:text-underline-width="auto" fo:font-weight="normal"/>
    </style:style>
    <style:style style:parent-style-name="703" style:display-name="Standard" style:family="paragraph" style:name="704">
      <style:paragraph-properties/>
    </style:style>
    <style:style style:parent-style-name="704" style:display-name="Heading" style:family="paragraph" style:name="705">
      <style:paragraph-properties fo:margin-top="12pt" fo:margin-bottom="6pt"/>
      <style:text-properties fo:font-family="Liberation Sans" style:font-family-asian="Noto Sans" style:font-family-complex="DejaVu Sans" fo:font-size="14pt"/>
    </style:style>
    <style:style style:parent-style-name="704" style:display-name="Text body" style:family="paragraph" style:name="706">
      <style:paragraph-properties fo:line-height="115%" fo:margin-top="0pt" fo:margin-bottom="7pt"/>
    </style:style>
    <style:style style:parent-style-name="712" style:display-name="Heading 1" style:family="paragraph" style:name="707">
      <style:paragraph-properties fo:margin-left="0.1993cm" fo:margin-right="0cm" fo:text-indent="0cm" fo:margin-top="3.7pt" fo:margin-bottom="0pt"/>
      <style:text-properties fo:font-size="18pt" fo:font-weight="bold"/>
    </style:style>
    <style:style style:parent-style-name="712" style:display-name="Heading 2" style:family="paragraph" style:name="708">
      <style:paragraph-properties fo:margin-left="0.1993cm" fo:margin-right="0cm" fo:text-indent="0cm" fo:margin-top="3.7pt" fo:margin-bottom="0pt"/>
      <style:text-properties fo:font-size="16pt" fo:font-weight="bold"/>
    </style:style>
    <style:style style:parent-style-name="712" style:display-name="Heading 3" style:family="paragraph" style:name="709">
      <style:paragraph-properties fo:margin-left="0.1993cm" fo:margin-right="0cm" fo:text-indent="0cm"/>
      <style:text-properties fo:font-size="14pt" fo:font-weight="bold"/>
    </style:style>
    <style:style style:parent-style-name="712" style:display-name="Heading 4" style:family="paragraph" style:name="710">
      <style:paragraph-properties fo:margin-left="0.7091cm" fo:margin-right="0cm" fo:text-indent="-0.5116cm"/>
      <style:text-properties fo:font-size="13pt" fo:font-style="italic" fo:font-weight="bold"/>
    </style:style>
    <style:style style:parent-style-name="712" style:display-name="Heading 5" style:family="paragraph" style:name="711">
      <style:paragraph-properties fo:margin-left="0.6703cm" fo:margin-right="0cm" fo:text-indent="-0.4728cm"/>
      <style:text-properties fo:font-size="12pt" fo:font-weight="bold"/>
    </style:style>
    <style:style style:parent-style-name="703" style:class="default" style:display-name="Normal" style:family="paragraph" style:name="712">
      <style:paragraph-properties/>
      <style:text-properties fo:font-family="Arial" style:font-family-asian="Arial" style:font-family-complex="Arial" fo:font-size="10pt"/>
    </style:style>
    <style:style style:parent-style-name="712" style:display-name="toc 1" style:family="paragraph" style:name="713">
      <style:paragraph-properties fo:margin-left="0.1993cm" fo:margin-right="0cm" fo:text-indent="0cm" fo:margin-top="3pt" fo:margin-bottom="0pt"/>
      <style:text-properties fo:font-size="10pt" fo:font-weight="bold"/>
    </style:style>
    <style:style style:parent-style-name="712" style:display-name="toc 2" style:family="paragraph" style:name="714">
      <style:paragraph-properties fo:margin-left="0.1993cm" fo:margin-right="0cm" fo:text-indent="0cm" fo:margin-top="3pt" fo:margin-bottom="0pt"/>
      <style:text-properties fo:font-size="10pt"/>
    </style:style>
    <style:style style:parent-style-name="712" style:display-name="toc 3" style:family="paragraph" style:name="715">
      <style:paragraph-properties fo:margin-left="0.1993cm" fo:margin-right="0cm" fo:text-indent="0cm" fo:margin-top="3pt" fo:margin-bottom="0pt"/>
      <style:text-properties fo:font-size="10pt"/>
    </style:style>
    <style:style style:parent-style-name="712" style:display-name="Body Text" style:family="paragraph" style:name="716">
      <style:paragraph-properties fo:margin-left="0.1993cm" fo:margin-right="0cm" fo:text-indent="0cm"/>
      <style:text-properties fo:font-size="12pt"/>
    </style:style>
    <style:style style:parent-style-name="712" style:display-name="List Paragraph" style:family="paragraph" style:name="717">
      <style:paragraph-properties fo:margin-left="1.443cm" fo:margin-right="0cm" fo:text-indent="-0.5027cm"/>
      <style:text-properties/>
    </style:style>
    <style:style style:parent-style-name="712" style:display-name="Table Paragraph" style:family="paragraph" style:name="718">
      <style:paragraph-properties/>
    </style:style>
    <style:style style:parent-style-name="703" style:class="default" style:display-name="Default Paragraph Font" style:family="text" style:name="719">
      <style:paragraph-properties/>
      <style:text-properties/>
    </style:style>
    <style:style style:parent-style-name="703" style:display-name="WW_CharLFO1LVL1" style:family="text" style:name="720">
      <style:paragraph-properties/>
      <style:text-properties fo:font-family="Arial" style:font-family-asian="Arial" style:font-family-complex="Arial" fo:font-size="12pt" fo:language="en" fo:country="US" fo:font-style="normal" fo:font-weight="normal"/>
    </style:style>
    <style:style style:parent-style-name="703" style:display-name="WW_CharLFO1LVL2" style:family="text" style:name="721">
      <style:paragraph-properties/>
      <style:text-properties fo:language="en" fo:country="US"/>
    </style:style>
    <style:style style:parent-style-name="703" style:display-name="WW_CharLFO1LVL3" style:family="text" style:name="722">
      <style:paragraph-properties/>
      <style:text-properties fo:language="en" fo:country="US"/>
    </style:style>
    <style:style style:parent-style-name="703" style:display-name="WW_CharLFO1LVL4" style:family="text" style:name="723">
      <style:paragraph-properties/>
      <style:text-properties fo:language="en" fo:country="US"/>
    </style:style>
    <style:style style:parent-style-name="703" style:display-name="WW_CharLFO1LVL5" style:family="text" style:name="724">
      <style:paragraph-properties/>
      <style:text-properties fo:language="en" fo:country="US"/>
    </style:style>
    <style:style style:parent-style-name="703" style:display-name="WW_CharLFO1LVL6" style:family="text" style:name="725">
      <style:paragraph-properties/>
      <style:text-properties fo:language="en" fo:country="US"/>
    </style:style>
    <style:style style:parent-style-name="703" style:display-name="WW_CharLFO1LVL7" style:family="text" style:name="726">
      <style:paragraph-properties/>
      <style:text-properties fo:language="en" fo:country="US"/>
    </style:style>
    <style:style style:parent-style-name="703" style:display-name="WW_CharLFO1LVL8" style:family="text" style:name="727">
      <style:paragraph-properties/>
      <style:text-properties fo:language="en" fo:country="US"/>
    </style:style>
    <style:style style:parent-style-name="703" style:display-name="WW_CharLFO1LVL9" style:family="text" style:name="728">
      <style:paragraph-properties/>
      <style:text-properties fo:language="en" fo:country="US"/>
    </style:style>
    <style:style style:parent-style-name="703" style:display-name="WW_CharLFO2LVL1" style:family="text" style:name="729">
      <style:paragraph-properties/>
      <style:text-properties fo:font-family="Arial" style:font-family-asian="Arial" style:font-family-complex="Arial" fo:font-size="12pt" fo:language="en" fo:country="US" fo:font-style="normal" fo:font-weight="normal"/>
    </style:style>
    <style:style style:parent-style-name="703" style:display-name="WW_CharLFO2LVL2" style:family="text" style:name="730">
      <style:paragraph-properties/>
      <style:text-properties fo:language="en" fo:country="US"/>
    </style:style>
    <style:style style:parent-style-name="703" style:display-name="WW_CharLFO2LVL3" style:family="text" style:name="731">
      <style:paragraph-properties/>
      <style:text-properties fo:language="en" fo:country="US"/>
    </style:style>
    <style:style style:parent-style-name="703" style:display-name="WW_CharLFO2LVL4" style:family="text" style:name="732">
      <style:paragraph-properties/>
      <style:text-properties fo:language="en" fo:country="US"/>
    </style:style>
    <style:style style:parent-style-name="703" style:display-name="WW_CharLFO2LVL5" style:family="text" style:name="733">
      <style:paragraph-properties/>
      <style:text-properties fo:language="en" fo:country="US"/>
    </style:style>
    <style:style style:parent-style-name="703" style:display-name="WW_CharLFO2LVL6" style:family="text" style:name="734">
      <style:paragraph-properties/>
      <style:text-properties fo:language="en" fo:country="US"/>
    </style:style>
    <style:style style:parent-style-name="703" style:display-name="WW_CharLFO2LVL7" style:family="text" style:name="735">
      <style:paragraph-properties/>
      <style:text-properties fo:language="en" fo:country="US"/>
    </style:style>
    <style:style style:parent-style-name="703" style:display-name="WW_CharLFO2LVL8" style:family="text" style:name="736">
      <style:paragraph-properties/>
      <style:text-properties fo:language="en" fo:country="US"/>
    </style:style>
    <style:style style:parent-style-name="703" style:display-name="WW_CharLFO2LVL9" style:family="text" style:name="737">
      <style:paragraph-properties/>
      <style:text-properties fo:language="en" fo:country="US"/>
    </style:style>
    <style:style style:parent-style-name="703" style:display-name="WW_CharLFO3LVL1" style:family="text" style:name="738">
      <style:paragraph-properties/>
      <style:text-properties fo:font-family="Arial" style:font-family-asian="Arial" style:font-family-complex="Arial" fo:font-size="12pt" fo:language="en" fo:country="US" fo:font-style="normal" fo:font-weight="normal"/>
    </style:style>
    <style:style style:parent-style-name="703" style:display-name="WW_CharLFO3LVL2" style:family="text" style:name="739">
      <style:paragraph-properties/>
      <style:text-properties fo:language="en" fo:country="US"/>
    </style:style>
    <style:style style:parent-style-name="703" style:display-name="WW_CharLFO3LVL3" style:family="text" style:name="740">
      <style:paragraph-properties/>
      <style:text-properties fo:language="en" fo:country="US"/>
    </style:style>
    <style:style style:parent-style-name="703" style:display-name="WW_CharLFO3LVL4" style:family="text" style:name="741">
      <style:paragraph-properties/>
      <style:text-properties fo:language="en" fo:country="US"/>
    </style:style>
    <style:style style:parent-style-name="703" style:display-name="WW_CharLFO3LVL5" style:family="text" style:name="742">
      <style:paragraph-properties/>
      <style:text-properties fo:language="en" fo:country="US"/>
    </style:style>
    <style:style style:parent-style-name="703" style:display-name="WW_CharLFO3LVL6" style:family="text" style:name="743">
      <style:paragraph-properties/>
      <style:text-properties fo:language="en" fo:country="US"/>
    </style:style>
    <style:style style:parent-style-name="703" style:display-name="WW_CharLFO3LVL7" style:family="text" style:name="744">
      <style:paragraph-properties/>
      <style:text-properties fo:language="en" fo:country="US"/>
    </style:style>
    <style:style style:parent-style-name="703" style:display-name="WW_CharLFO3LVL8" style:family="text" style:name="745">
      <style:paragraph-properties/>
      <style:text-properties fo:language="en" fo:country="US"/>
    </style:style>
    <style:style style:parent-style-name="703" style:display-name="WW_CharLFO3LVL9" style:family="text" style:name="746">
      <style:paragraph-properties/>
      <style:text-properties fo:language="en" fo:country="US"/>
    </style:style>
    <style:style style:parent-style-name="703" style:display-name="WW_CharLFO4LVL1" style:family="text" style:name="747">
      <style:paragraph-properties/>
      <style:text-properties fo:font-family="Arial" style:font-family-asian="Arial" style:font-family-complex="Arial" fo:font-size="12pt" fo:language="en" fo:country="US" fo:font-style="normal" fo:font-weight="bold"/>
    </style:style>
    <style:style style:parent-style-name="703" style:display-name="WW_CharLFO4LVL2" style:family="text" style:name="748">
      <style:paragraph-properties/>
      <style:text-properties fo:language="en" fo:country="US"/>
    </style:style>
    <style:style style:parent-style-name="703" style:display-name="WW_CharLFO4LVL3" style:family="text" style:name="749">
      <style:paragraph-properties/>
      <style:text-properties fo:language="en" fo:country="US"/>
    </style:style>
    <style:style style:parent-style-name="703" style:display-name="WW_CharLFO4LVL4" style:family="text" style:name="750">
      <style:paragraph-properties/>
      <style:text-properties fo:language="en" fo:country="US"/>
    </style:style>
    <style:style style:parent-style-name="703" style:display-name="WW_CharLFO4LVL5" style:family="text" style:name="751">
      <style:paragraph-properties/>
      <style:text-properties fo:language="en" fo:country="US"/>
    </style:style>
    <style:style style:parent-style-name="703" style:display-name="WW_CharLFO4LVL6" style:family="text" style:name="752">
      <style:paragraph-properties/>
      <style:text-properties fo:language="en" fo:country="US"/>
    </style:style>
    <style:style style:parent-style-name="703" style:display-name="WW_CharLFO4LVL7" style:family="text" style:name="753">
      <style:paragraph-properties/>
      <style:text-properties fo:language="en" fo:country="US"/>
    </style:style>
    <style:style style:parent-style-name="703" style:display-name="WW_CharLFO4LVL8" style:family="text" style:name="754">
      <style:paragraph-properties/>
      <style:text-properties fo:language="en" fo:country="US"/>
    </style:style>
    <style:style style:parent-style-name="703" style:display-name="WW_CharLFO4LVL9" style:family="text" style:name="755">
      <style:paragraph-properties/>
      <style:text-properties fo:language="en" fo:country="US"/>
    </style:style>
    <style:style style:parent-style-name="703" style:display-name="WW_CharLFO5LVL1" style:family="text" style:name="756">
      <style:paragraph-properties/>
      <style:text-properties fo:font-family="Arial" style:font-family-asian="Arial" style:font-family-complex="Arial" fo:font-size="12pt" fo:language="en" fo:country="US" fo:font-style="normal" fo:font-weight="normal"/>
    </style:style>
    <style:style style:parent-style-name="703" style:display-name="WW_CharLFO5LVL2" style:family="text" style:name="757">
      <style:paragraph-properties/>
      <style:text-properties fo:language="en" fo:country="US"/>
    </style:style>
    <style:style style:parent-style-name="703" style:display-name="WW_CharLFO5LVL3" style:family="text" style:name="758">
      <style:paragraph-properties/>
      <style:text-properties fo:language="en" fo:country="US"/>
    </style:style>
    <style:style style:parent-style-name="703" style:display-name="WW_CharLFO5LVL4" style:family="text" style:name="759">
      <style:paragraph-properties/>
      <style:text-properties fo:language="en" fo:country="US"/>
    </style:style>
    <style:style style:parent-style-name="703" style:display-name="WW_CharLFO5LVL5" style:family="text" style:name="760">
      <style:paragraph-properties/>
      <style:text-properties fo:language="en" fo:country="US"/>
    </style:style>
    <style:style style:parent-style-name="703" style:display-name="WW_CharLFO5LVL6" style:family="text" style:name="761">
      <style:paragraph-properties/>
      <style:text-properties fo:language="en" fo:country="US"/>
    </style:style>
    <style:style style:parent-style-name="703" style:display-name="WW_CharLFO5LVL7" style:family="text" style:name="762">
      <style:paragraph-properties/>
      <style:text-properties fo:language="en" fo:country="US"/>
    </style:style>
    <style:style style:parent-style-name="703" style:display-name="WW_CharLFO5LVL8" style:family="text" style:name="763">
      <style:paragraph-properties/>
      <style:text-properties fo:language="en" fo:country="US"/>
    </style:style>
    <style:style style:parent-style-name="703" style:display-name="WW_CharLFO5LVL9" style:family="text" style:name="764">
      <style:paragraph-properties/>
      <style:text-properties fo:language="en" fo:country="US"/>
    </style:style>
    <style:style style:parent-style-name="703" style:display-name="WW_CharLFO6LVL1" style:family="text" style:name="765">
      <style:paragraph-properties/>
      <style:text-properties fo:font-family="Arial" style:font-family-asian="Arial" style:font-family-complex="Arial" fo:font-size="12pt" fo:language="en" fo:country="US" fo:font-style="normal" fo:font-weight="normal"/>
    </style:style>
    <style:style style:parent-style-name="703" style:display-name="WW_CharLFO6LVL2" style:family="text" style:name="766">
      <style:paragraph-properties/>
      <style:text-properties fo:language="en" fo:country="US"/>
    </style:style>
    <style:style style:parent-style-name="703" style:display-name="WW_CharLFO6LVL3" style:family="text" style:name="767">
      <style:paragraph-properties/>
      <style:text-properties fo:language="en" fo:country="US"/>
    </style:style>
    <style:style style:parent-style-name="703" style:display-name="WW_CharLFO6LVL4" style:family="text" style:name="768">
      <style:paragraph-properties/>
      <style:text-properties fo:language="en" fo:country="US"/>
    </style:style>
    <style:style style:parent-style-name="703" style:display-name="WW_CharLFO6LVL5" style:family="text" style:name="769">
      <style:paragraph-properties/>
      <style:text-properties fo:language="en" fo:country="US"/>
    </style:style>
    <style:style style:parent-style-name="703" style:display-name="WW_CharLFO6LVL6" style:family="text" style:name="770">
      <style:paragraph-properties/>
      <style:text-properties fo:language="en" fo:country="US"/>
    </style:style>
    <style:style style:parent-style-name="703" style:display-name="WW_CharLFO6LVL7" style:family="text" style:name="771">
      <style:paragraph-properties/>
      <style:text-properties fo:language="en" fo:country="US"/>
    </style:style>
    <style:style style:parent-style-name="703" style:display-name="WW_CharLFO6LVL8" style:family="text" style:name="772">
      <style:paragraph-properties/>
      <style:text-properties fo:language="en" fo:country="US"/>
    </style:style>
    <style:style style:parent-style-name="703" style:display-name="WW_CharLFO6LVL9" style:family="text" style:name="773">
      <style:paragraph-properties/>
      <style:text-properties fo:language="en" fo:country="US"/>
    </style:style>
    <style:style style:parent-style-name="703" style:display-name="WW_CharLFO7LVL1" style:family="text" style:name="774">
      <style:paragraph-properties/>
      <style:text-properties fo:font-family="Arial" style:font-family-asian="Arial" style:font-family-complex="Arial" fo:font-size="12pt" fo:language="en" fo:country="US" fo:font-style="normal" fo:font-weight="normal"/>
    </style:style>
    <style:style style:parent-style-name="703" style:display-name="WW_CharLFO7LVL2" style:family="text" style:name="775">
      <style:paragraph-properties/>
      <style:text-properties fo:language="en" fo:country="US"/>
    </style:style>
    <style:style style:parent-style-name="703" style:display-name="WW_CharLFO7LVL3" style:family="text" style:name="776">
      <style:paragraph-properties/>
      <style:text-properties fo:language="en" fo:country="US"/>
    </style:style>
    <style:style style:parent-style-name="703" style:display-name="WW_CharLFO7LVL4" style:family="text" style:name="777">
      <style:paragraph-properties/>
      <style:text-properties fo:language="en" fo:country="US"/>
    </style:style>
    <style:style style:parent-style-name="703" style:display-name="WW_CharLFO7LVL5" style:family="text" style:name="778">
      <style:paragraph-properties/>
      <style:text-properties fo:language="en" fo:country="US"/>
    </style:style>
    <style:style style:parent-style-name="703" style:display-name="WW_CharLFO7LVL6" style:family="text" style:name="779">
      <style:paragraph-properties/>
      <style:text-properties fo:language="en" fo:country="US"/>
    </style:style>
    <style:style style:parent-style-name="703" style:display-name="WW_CharLFO7LVL7" style:family="text" style:name="780">
      <style:paragraph-properties/>
      <style:text-properties fo:language="en" fo:country="US"/>
    </style:style>
    <style:style style:parent-style-name="703" style:display-name="WW_CharLFO7LVL8" style:family="text" style:name="781">
      <style:paragraph-properties/>
      <style:text-properties fo:language="en" fo:country="US"/>
    </style:style>
    <style:style style:parent-style-name="703" style:display-name="WW_CharLFO7LVL9" style:family="text" style:name="782">
      <style:paragraph-properties/>
      <style:text-properties fo:language="en" fo:country="US"/>
    </style:style>
    <style:style style:parent-style-name="703" style:display-name="WW_CharLFO8LVL1" style:family="text" style:name="783">
      <style:paragraph-properties/>
      <style:text-properties fo:font-family="Arial" style:font-family-asian="Arial" style:font-family-complex="Arial" fo:font-size="12pt" fo:language="en" fo:country="US" fo:font-style="normal" fo:font-weight="normal"/>
    </style:style>
    <style:style style:parent-style-name="703" style:display-name="WW_CharLFO8LVL2" style:family="text" style:name="784">
      <style:paragraph-properties/>
      <style:text-properties fo:language="en" fo:country="US"/>
    </style:style>
    <style:style style:parent-style-name="703" style:display-name="WW_CharLFO8LVL3" style:family="text" style:name="785">
      <style:paragraph-properties/>
      <style:text-properties fo:language="en" fo:country="US"/>
    </style:style>
    <style:style style:parent-style-name="703" style:display-name="WW_CharLFO8LVL4" style:family="text" style:name="786">
      <style:paragraph-properties/>
      <style:text-properties fo:language="en" fo:country="US"/>
    </style:style>
    <style:style style:parent-style-name="703" style:display-name="WW_CharLFO8LVL5" style:family="text" style:name="787">
      <style:paragraph-properties/>
      <style:text-properties fo:language="en" fo:country="US"/>
    </style:style>
    <style:style style:parent-style-name="703" style:display-name="WW_CharLFO8LVL6" style:family="text" style:name="788">
      <style:paragraph-properties/>
      <style:text-properties fo:language="en" fo:country="US"/>
    </style:style>
    <style:style style:parent-style-name="703" style:display-name="WW_CharLFO8LVL7" style:family="text" style:name="789">
      <style:paragraph-properties/>
      <style:text-properties fo:language="en" fo:country="US"/>
    </style:style>
    <style:style style:parent-style-name="703" style:display-name="WW_CharLFO8LVL8" style:family="text" style:name="790">
      <style:paragraph-properties/>
      <style:text-properties fo:language="en" fo:country="US"/>
    </style:style>
    <style:style style:parent-style-name="703" style:display-name="WW_CharLFO8LVL9" style:family="text" style:name="791">
      <style:paragraph-properties/>
      <style:text-properties fo:language="en" fo:country="US"/>
    </style:style>
    <style:style style:parent-style-name="703" style:display-name="WW_CharLFO9LVL1" style:family="text" style:name="792">
      <style:paragraph-properties/>
      <style:text-properties fo:font-family="Arial" style:font-family-asian="Arial" style:font-family-complex="Arial" fo:font-size="12pt" fo:language="en" fo:country="US" fo:font-style="normal" fo:font-weight="normal"/>
    </style:style>
    <style:style style:parent-style-name="703" style:display-name="WW_CharLFO9LVL2" style:family="text" style:name="793">
      <style:paragraph-properties/>
      <style:text-properties fo:language="en" fo:country="US"/>
    </style:style>
    <style:style style:parent-style-name="703" style:display-name="WW_CharLFO9LVL3" style:family="text" style:name="794">
      <style:paragraph-properties/>
      <style:text-properties fo:language="en" fo:country="US"/>
    </style:style>
    <style:style style:parent-style-name="703" style:display-name="WW_CharLFO9LVL4" style:family="text" style:name="795">
      <style:paragraph-properties/>
      <style:text-properties fo:language="en" fo:country="US"/>
    </style:style>
    <style:style style:parent-style-name="703" style:display-name="WW_CharLFO9LVL5" style:family="text" style:name="796">
      <style:paragraph-properties/>
      <style:text-properties fo:language="en" fo:country="US"/>
    </style:style>
    <style:style style:parent-style-name="703" style:display-name="WW_CharLFO9LVL6" style:family="text" style:name="797">
      <style:paragraph-properties/>
      <style:text-properties fo:language="en" fo:country="US"/>
    </style:style>
    <style:style style:parent-style-name="703" style:display-name="WW_CharLFO9LVL7" style:family="text" style:name="798">
      <style:paragraph-properties/>
      <style:text-properties fo:language="en" fo:country="US"/>
    </style:style>
    <style:style style:parent-style-name="703" style:display-name="WW_CharLFO9LVL8" style:family="text" style:name="799">
      <style:paragraph-properties/>
      <style:text-properties fo:language="en" fo:country="US"/>
    </style:style>
    <style:style style:parent-style-name="703" style:display-name="WW_CharLFO9LVL9" style:family="text" style:name="800">
      <style:paragraph-properties/>
      <style:text-properties fo:language="en" fo:country="US"/>
    </style:style>
    <style:style style:parent-style-name="703" style:display-name="WW_CharLFO10LVL1" style:family="text" style:name="801">
      <style:paragraph-properties/>
      <style:text-properties fo:font-family="Arial" style:font-family-asian="Arial" style:font-family-complex="Arial" fo:font-size="12pt" fo:language="en" fo:country="US" fo:font-style="normal" fo:font-weight="normal"/>
    </style:style>
    <style:style style:parent-style-name="703" style:display-name="WW_CharLFO10LVL2" style:family="text" style:name="802">
      <style:paragraph-properties/>
      <style:text-properties fo:font-family="Arial" style:font-family-asian="Arial" style:font-family-complex="Arial" fo:font-size="12pt" fo:language="en" fo:country="US" fo:font-style="normal" fo:font-weight="normal"/>
    </style:style>
    <style:style style:parent-style-name="703" style:display-name="WW_CharLFO10LVL3" style:family="text" style:name="803">
      <style:paragraph-properties/>
      <style:text-properties fo:language="en" fo:country="US"/>
    </style:style>
    <style:style style:parent-style-name="703" style:display-name="WW_CharLFO10LVL4" style:family="text" style:name="804">
      <style:paragraph-properties/>
      <style:text-properties fo:language="en" fo:country="US"/>
    </style:style>
    <style:style style:parent-style-name="703" style:display-name="WW_CharLFO10LVL5" style:family="text" style:name="805">
      <style:paragraph-properties/>
      <style:text-properties fo:language="en" fo:country="US"/>
    </style:style>
    <style:style style:parent-style-name="703" style:display-name="WW_CharLFO10LVL6" style:family="text" style:name="806">
      <style:paragraph-properties/>
      <style:text-properties fo:language="en" fo:country="US"/>
    </style:style>
    <style:style style:parent-style-name="703" style:display-name="WW_CharLFO10LVL7" style:family="text" style:name="807">
      <style:paragraph-properties/>
      <style:text-properties fo:language="en" fo:country="US"/>
    </style:style>
    <style:style style:parent-style-name="703" style:display-name="WW_CharLFO10LVL8" style:family="text" style:name="808">
      <style:paragraph-properties/>
      <style:text-properties fo:language="en" fo:country="US"/>
    </style:style>
    <style:style style:parent-style-name="703" style:display-name="WW_CharLFO10LVL9" style:family="text" style:name="809">
      <style:paragraph-properties/>
      <style:text-properties fo:language="en" fo:country="US"/>
    </style:style>
    <style:style style:parent-style-name="703" style:display-name="WW_CharLFO11LVL1" style:family="text" style:name="810">
      <style:paragraph-properties/>
      <style:text-properties fo:font-family="Arial" style:font-family-asian="Arial" style:font-family-complex="Arial" fo:font-size="13pt" fo:letter-spacing="-0.05pt" fo:language="en" fo:country="US" fo:font-style="italic" fo:font-weight="bold"/>
    </style:style>
    <style:style style:parent-style-name="703" style:display-name="WW_CharLFO11LVL2" style:family="text" style:name="811">
      <style:paragraph-properties/>
      <style:text-properties fo:language="en" fo:country="US"/>
    </style:style>
    <style:style style:parent-style-name="703" style:display-name="WW_CharLFO11LVL3" style:family="text" style:name="812">
      <style:paragraph-properties/>
      <style:text-properties fo:language="en" fo:country="US"/>
    </style:style>
    <style:style style:parent-style-name="703" style:display-name="WW_CharLFO11LVL4" style:family="text" style:name="813">
      <style:paragraph-properties/>
      <style:text-properties fo:language="en" fo:country="US"/>
    </style:style>
    <style:style style:parent-style-name="703" style:display-name="WW_CharLFO11LVL5" style:family="text" style:name="814">
      <style:paragraph-properties/>
      <style:text-properties fo:language="en" fo:country="US"/>
    </style:style>
    <style:style style:parent-style-name="703" style:display-name="WW_CharLFO11LVL6" style:family="text" style:name="815">
      <style:paragraph-properties/>
      <style:text-properties fo:language="en" fo:country="US"/>
    </style:style>
    <style:style style:parent-style-name="703" style:display-name="WW_CharLFO11LVL7" style:family="text" style:name="816">
      <style:paragraph-properties/>
      <style:text-properties fo:language="en" fo:country="US"/>
    </style:style>
    <style:style style:parent-style-name="703" style:display-name="WW_CharLFO11LVL8" style:family="text" style:name="817">
      <style:paragraph-properties/>
      <style:text-properties fo:language="en" fo:country="US"/>
    </style:style>
    <style:style style:parent-style-name="703" style:display-name="WW_CharLFO11LVL9" style:family="text" style:name="818">
      <style:paragraph-properties/>
      <style:text-properties fo:language="en" fo:country="US"/>
    </style:style>
    <style:style style:parent-style-name="703" style:display-name="WW_CharLFO12LVL1" style:family="text" style:name="819">
      <style:paragraph-properties/>
      <style:text-properties fo:font-family="Arial" style:font-family-asian="Arial" style:font-family-complex="Arial" fo:font-size="12pt" fo:language="en" fo:country="US" fo:font-style="normal" fo:font-weight="normal"/>
    </style:style>
    <style:style style:parent-style-name="703" style:display-name="WW_CharLFO12LVL2" style:family="text" style:name="820">
      <style:paragraph-properties/>
      <style:text-properties fo:language="en" fo:country="US"/>
    </style:style>
    <style:style style:parent-style-name="703" style:display-name="WW_CharLFO12LVL3" style:family="text" style:name="821">
      <style:paragraph-properties/>
      <style:text-properties fo:language="en" fo:country="US"/>
    </style:style>
    <style:style style:parent-style-name="703" style:display-name="WW_CharLFO12LVL4" style:family="text" style:name="822">
      <style:paragraph-properties/>
      <style:text-properties fo:language="en" fo:country="US"/>
    </style:style>
    <style:style style:parent-style-name="703" style:display-name="WW_CharLFO12LVL5" style:family="text" style:name="823">
      <style:paragraph-properties/>
      <style:text-properties fo:language="en" fo:country="US"/>
    </style:style>
    <style:style style:parent-style-name="703" style:display-name="WW_CharLFO12LVL6" style:family="text" style:name="824">
      <style:paragraph-properties/>
      <style:text-properties fo:language="en" fo:country="US"/>
    </style:style>
    <style:style style:parent-style-name="703" style:display-name="WW_CharLFO12LVL7" style:family="text" style:name="825">
      <style:paragraph-properties/>
      <style:text-properties fo:language="en" fo:country="US"/>
    </style:style>
    <style:style style:parent-style-name="703" style:display-name="WW_CharLFO12LVL8" style:family="text" style:name="826">
      <style:paragraph-properties/>
      <style:text-properties fo:language="en" fo:country="US"/>
    </style:style>
    <style:style style:parent-style-name="703" style:display-name="WW_CharLFO12LVL9" style:family="text" style:name="827">
      <style:paragraph-properties/>
      <style:text-properties fo:language="en" fo:country="US"/>
    </style:style>
    <style:style style:parent-style-name="703" style:display-name="WW_CharLFO13LVL1" style:family="text" style:name="828">
      <style:paragraph-properties/>
      <style:text-properties fo:font-family="Arial" style:font-family-asian="Arial" style:font-family-complex="Arial" fo:font-size="13pt" fo:letter-spacing="-0.05pt" fo:language="en" fo:country="US" fo:font-style="italic" fo:font-weight="bold"/>
    </style:style>
    <style:style style:parent-style-name="703" style:display-name="WW_CharLFO13LVL2" style:family="text" style:name="829">
      <style:paragraph-properties/>
      <style:text-properties fo:language="en" fo:country="US"/>
    </style:style>
    <style:style style:parent-style-name="703" style:display-name="WW_CharLFO13LVL3" style:family="text" style:name="830">
      <style:paragraph-properties/>
      <style:text-properties fo:language="en" fo:country="US"/>
    </style:style>
    <style:style style:parent-style-name="703" style:display-name="WW_CharLFO13LVL4" style:family="text" style:name="831">
      <style:paragraph-properties/>
      <style:text-properties fo:language="en" fo:country="US"/>
    </style:style>
    <style:style style:parent-style-name="703" style:display-name="WW_CharLFO13LVL5" style:family="text" style:name="832">
      <style:paragraph-properties/>
      <style:text-properties fo:language="en" fo:country="US"/>
    </style:style>
    <style:style style:parent-style-name="703" style:display-name="WW_CharLFO13LVL6" style:family="text" style:name="833">
      <style:paragraph-properties/>
      <style:text-properties fo:language="en" fo:country="US"/>
    </style:style>
    <style:style style:parent-style-name="703" style:display-name="WW_CharLFO13LVL7" style:family="text" style:name="834">
      <style:paragraph-properties/>
      <style:text-properties fo:language="en" fo:country="US"/>
    </style:style>
    <style:style style:parent-style-name="703" style:display-name="WW_CharLFO13LVL8" style:family="text" style:name="835">
      <style:paragraph-properties/>
      <style:text-properties fo:language="en" fo:country="US"/>
    </style:style>
    <style:style style:parent-style-name="703" style:display-name="WW_CharLFO13LVL9" style:family="text" style:name="836">
      <style:paragraph-properties/>
      <style:text-properties fo:language="en" fo:country="US"/>
    </style:style>
    <style:style style:parent-style-name="703" style:display-name="WW_CharLFO14LVL1" style:family="text" style:name="837">
      <style:paragraph-properties/>
      <style:text-properties fo:font-family="Arial" style:font-family-asian="Arial" style:font-family-complex="Arial" fo:font-size="12pt" fo:language="en" fo:country="US" fo:font-style="normal" fo:font-weight="normal"/>
    </style:style>
    <style:style style:parent-style-name="703" style:display-name="WW_CharLFO14LVL2" style:family="text" style:name="838">
      <style:paragraph-properties/>
      <style:text-properties fo:language="en" fo:country="US"/>
    </style:style>
    <style:style style:parent-style-name="703" style:display-name="WW_CharLFO14LVL3" style:family="text" style:name="839">
      <style:paragraph-properties/>
      <style:text-properties fo:language="en" fo:country="US"/>
    </style:style>
    <style:style style:parent-style-name="703" style:display-name="WW_CharLFO14LVL4" style:family="text" style:name="840">
      <style:paragraph-properties/>
      <style:text-properties fo:language="en" fo:country="US"/>
    </style:style>
    <style:style style:parent-style-name="703" style:display-name="WW_CharLFO14LVL5" style:family="text" style:name="841">
      <style:paragraph-properties/>
      <style:text-properties fo:language="en" fo:country="US"/>
    </style:style>
    <style:style style:parent-style-name="703" style:display-name="WW_CharLFO14LVL6" style:family="text" style:name="842">
      <style:paragraph-properties/>
      <style:text-properties fo:language="en" fo:country="US"/>
    </style:style>
    <style:style style:parent-style-name="703" style:display-name="WW_CharLFO14LVL7" style:family="text" style:name="843">
      <style:paragraph-properties/>
      <style:text-properties fo:language="en" fo:country="US"/>
    </style:style>
    <style:style style:parent-style-name="703" style:display-name="WW_CharLFO14LVL8" style:family="text" style:name="844">
      <style:paragraph-properties/>
      <style:text-properties fo:language="en" fo:country="US"/>
    </style:style>
    <style:style style:parent-style-name="703" style:display-name="WW_CharLFO14LVL9" style:family="text" style:name="845">
      <style:paragraph-properties/>
      <style:text-properties fo:language="en" fo:country="US"/>
    </style:style>
    <style:style style:parent-style-name="703" style:display-name="WW_CharLFO15LVL1" style:family="text" style:name="846">
      <style:paragraph-properties/>
      <style:text-properties fo:font-family="Arial" style:font-family-asian="Arial" style:font-family-complex="Arial" fo:font-size="12pt" fo:language="en" fo:country="US" fo:font-style="normal" fo:font-weight="normal"/>
    </style:style>
    <style:style style:parent-style-name="703" style:display-name="WW_CharLFO15LVL2" style:family="text" style:name="847">
      <style:paragraph-properties/>
      <style:text-properties fo:language="en" fo:country="US"/>
    </style:style>
    <style:style style:parent-style-name="703" style:display-name="WW_CharLFO15LVL3" style:family="text" style:name="848">
      <style:paragraph-properties/>
      <style:text-properties fo:language="en" fo:country="US"/>
    </style:style>
    <style:style style:parent-style-name="703" style:display-name="WW_CharLFO15LVL4" style:family="text" style:name="849">
      <style:paragraph-properties/>
      <style:text-properties fo:language="en" fo:country="US"/>
    </style:style>
    <style:style style:parent-style-name="703" style:display-name="WW_CharLFO15LVL5" style:family="text" style:name="850">
      <style:paragraph-properties/>
      <style:text-properties fo:language="en" fo:country="US"/>
    </style:style>
    <style:style style:parent-style-name="703" style:display-name="WW_CharLFO15LVL6" style:family="text" style:name="851">
      <style:paragraph-properties/>
      <style:text-properties fo:language="en" fo:country="US"/>
    </style:style>
    <style:style style:parent-style-name="703" style:display-name="WW_CharLFO15LVL7" style:family="text" style:name="852">
      <style:paragraph-properties/>
      <style:text-properties fo:language="en" fo:country="US"/>
    </style:style>
    <style:style style:parent-style-name="703" style:display-name="WW_CharLFO15LVL8" style:family="text" style:name="853">
      <style:paragraph-properties/>
      <style:text-properties fo:language="en" fo:country="US"/>
    </style:style>
    <style:style style:parent-style-name="703" style:display-name="WW_CharLFO15LVL9" style:family="text" style:name="854">
      <style:paragraph-properties/>
      <style:text-properties fo:language="en" fo:country="US"/>
    </style:style>
    <style:style style:parent-style-name="703" style:display-name="WW_CharLFO16LVL1" style:family="text" style:name="855">
      <style:paragraph-properties/>
      <style:text-properties fo:font-family="Arial" style:font-family-asian="Arial" style:font-family-complex="Arial" fo:font-size="12pt" fo:language="en" fo:country="US" fo:font-style="normal" fo:font-weight="normal"/>
    </style:style>
    <style:style style:parent-style-name="703" style:display-name="WW_CharLFO16LVL2" style:family="text" style:name="856">
      <style:paragraph-properties/>
      <style:text-properties fo:language="en" fo:country="US"/>
    </style:style>
    <style:style style:parent-style-name="703" style:display-name="WW_CharLFO16LVL3" style:family="text" style:name="857">
      <style:paragraph-properties/>
      <style:text-properties fo:language="en" fo:country="US"/>
    </style:style>
    <style:style style:parent-style-name="703" style:display-name="WW_CharLFO16LVL4" style:family="text" style:name="858">
      <style:paragraph-properties/>
      <style:text-properties fo:language="en" fo:country="US"/>
    </style:style>
    <style:style style:parent-style-name="703" style:display-name="WW_CharLFO16LVL5" style:family="text" style:name="859">
      <style:paragraph-properties/>
      <style:text-properties fo:language="en" fo:country="US"/>
    </style:style>
    <style:style style:parent-style-name="703" style:display-name="WW_CharLFO16LVL6" style:family="text" style:name="860">
      <style:paragraph-properties/>
      <style:text-properties fo:language="en" fo:country="US"/>
    </style:style>
    <style:style style:parent-style-name="703" style:display-name="WW_CharLFO16LVL7" style:family="text" style:name="861">
      <style:paragraph-properties/>
      <style:text-properties fo:language="en" fo:country="US"/>
    </style:style>
    <style:style style:parent-style-name="703" style:display-name="WW_CharLFO16LVL8" style:family="text" style:name="862">
      <style:paragraph-properties/>
      <style:text-properties fo:language="en" fo:country="US"/>
    </style:style>
    <style:style style:parent-style-name="703" style:display-name="WW_CharLFO16LVL9" style:family="text" style:name="863">
      <style:paragraph-properties/>
      <style:text-properties fo:language="en" fo:country="US"/>
    </style:style>
    <style:style style:parent-style-name="703" style:display-name="WW_CharLFO17LVL1" style:family="text" style:name="864">
      <style:paragraph-properties/>
      <style:text-properties fo:font-family="Arial" style:font-family-asian="Arial" style:font-family-complex="Arial" fo:font-size="12pt" fo:language="en" fo:country="US" fo:font-style="normal" fo:font-weight="normal"/>
    </style:style>
    <style:style style:parent-style-name="703" style:display-name="WW_CharLFO17LVL2" style:family="text" style:name="865">
      <style:paragraph-properties/>
      <style:text-properties fo:language="en" fo:country="US"/>
    </style:style>
    <style:style style:parent-style-name="703" style:display-name="WW_CharLFO17LVL3" style:family="text" style:name="866">
      <style:paragraph-properties/>
      <style:text-properties fo:language="en" fo:country="US"/>
    </style:style>
    <style:style style:parent-style-name="703" style:display-name="WW_CharLFO17LVL4" style:family="text" style:name="867">
      <style:paragraph-properties/>
      <style:text-properties fo:language="en" fo:country="US"/>
    </style:style>
    <style:style style:parent-style-name="703" style:display-name="WW_CharLFO17LVL5" style:family="text" style:name="868">
      <style:paragraph-properties/>
      <style:text-properties fo:language="en" fo:country="US"/>
    </style:style>
    <style:style style:parent-style-name="703" style:display-name="WW_CharLFO17LVL6" style:family="text" style:name="869">
      <style:paragraph-properties/>
      <style:text-properties fo:language="en" fo:country="US"/>
    </style:style>
    <style:style style:parent-style-name="703" style:display-name="WW_CharLFO17LVL7" style:family="text" style:name="870">
      <style:paragraph-properties/>
      <style:text-properties fo:language="en" fo:country="US"/>
    </style:style>
    <style:style style:parent-style-name="703" style:display-name="WW_CharLFO17LVL8" style:family="text" style:name="871">
      <style:paragraph-properties/>
      <style:text-properties fo:language="en" fo:country="US"/>
    </style:style>
    <style:style style:parent-style-name="703" style:display-name="WW_CharLFO17LVL9" style:family="text" style:name="872">
      <style:paragraph-properties/>
      <style:text-properties fo:language="en" fo:country="US"/>
    </style:style>
    <style:style style:parent-style-name="703" style:display-name="WW_CharLFO18LVL1" style:family="text" style:name="873">
      <style:paragraph-properties/>
      <style:text-properties fo:font-family="Arial" style:font-family-asian="Arial" style:font-family-complex="Arial" fo:font-size="13pt" fo:letter-spacing="-0.05pt" fo:language="en" fo:country="US" fo:font-style="italic" fo:font-weight="bold"/>
    </style:style>
    <style:style style:parent-style-name="703" style:display-name="WW_CharLFO18LVL2" style:family="text" style:name="874">
      <style:paragraph-properties/>
      <style:text-properties fo:language="en" fo:country="US"/>
    </style:style>
    <style:style style:parent-style-name="703" style:display-name="WW_CharLFO18LVL3" style:family="text" style:name="875">
      <style:paragraph-properties/>
      <style:text-properties fo:language="en" fo:country="US"/>
    </style:style>
    <style:style style:parent-style-name="703" style:display-name="WW_CharLFO18LVL4" style:family="text" style:name="876">
      <style:paragraph-properties/>
      <style:text-properties fo:language="en" fo:country="US"/>
    </style:style>
    <style:style style:parent-style-name="703" style:display-name="WW_CharLFO18LVL5" style:family="text" style:name="877">
      <style:paragraph-properties/>
      <style:text-properties fo:language="en" fo:country="US"/>
    </style:style>
    <style:style style:parent-style-name="703" style:display-name="WW_CharLFO18LVL6" style:family="text" style:name="878">
      <style:paragraph-properties/>
      <style:text-properties fo:language="en" fo:country="US"/>
    </style:style>
    <style:style style:parent-style-name="703" style:display-name="WW_CharLFO18LVL7" style:family="text" style:name="879">
      <style:paragraph-properties/>
      <style:text-properties fo:language="en" fo:country="US"/>
    </style:style>
    <style:style style:parent-style-name="703" style:display-name="WW_CharLFO18LVL8" style:family="text" style:name="880">
      <style:paragraph-properties/>
      <style:text-properties fo:language="en" fo:country="US"/>
    </style:style>
    <style:style style:parent-style-name="703" style:display-name="WW_CharLFO18LVL9" style:family="text" style:name="881">
      <style:paragraph-properties/>
      <style:text-properties fo:language="en" fo:country="US"/>
    </style:style>
    <style:style style:parent-style-name="703" style:display-name="WW_CharLFO19LVL1" style:family="text" style:name="882">
      <style:paragraph-properties/>
      <style:text-properties fo:font-family="Arial" style:font-family-asian="Arial" style:font-family-complex="Arial" fo:font-size="12pt" fo:language="en" fo:country="US" fo:font-style="normal" fo:font-weight="normal"/>
    </style:style>
    <style:style style:parent-style-name="703" style:display-name="WW_CharLFO19LVL2" style:family="text" style:name="883">
      <style:paragraph-properties/>
      <style:text-properties fo:language="en" fo:country="US"/>
    </style:style>
    <style:style style:parent-style-name="703" style:display-name="WW_CharLFO19LVL3" style:family="text" style:name="884">
      <style:paragraph-properties/>
      <style:text-properties fo:language="en" fo:country="US"/>
    </style:style>
    <style:style style:parent-style-name="703" style:display-name="WW_CharLFO19LVL4" style:family="text" style:name="885">
      <style:paragraph-properties/>
      <style:text-properties fo:language="en" fo:country="US"/>
    </style:style>
    <style:style style:parent-style-name="703" style:display-name="WW_CharLFO19LVL5" style:family="text" style:name="886">
      <style:paragraph-properties/>
      <style:text-properties fo:language="en" fo:country="US"/>
    </style:style>
    <style:style style:parent-style-name="703" style:display-name="WW_CharLFO19LVL6" style:family="text" style:name="887">
      <style:paragraph-properties/>
      <style:text-properties fo:language="en" fo:country="US"/>
    </style:style>
    <style:style style:parent-style-name="703" style:display-name="WW_CharLFO19LVL7" style:family="text" style:name="888">
      <style:paragraph-properties/>
      <style:text-properties fo:language="en" fo:country="US"/>
    </style:style>
    <style:style style:parent-style-name="703" style:display-name="WW_CharLFO19LVL8" style:family="text" style:name="889">
      <style:paragraph-properties/>
      <style:text-properties fo:language="en" fo:country="US"/>
    </style:style>
    <style:style style:parent-style-name="703" style:display-name="WW_CharLFO19LVL9" style:family="text" style:name="890">
      <style:paragraph-properties/>
      <style:text-properties fo:language="en" fo:country="US"/>
    </style:style>
    <style:style style:parent-style-name="703" style:display-name="WW_CharLFO20LVL1" style:family="text" style:name="891">
      <style:paragraph-properties/>
      <style:text-properties fo:font-family="Arial" style:font-family-asian="Arial" style:font-family-complex="Arial" fo:font-size="12pt" fo:language="en" fo:country="US" fo:font-style="normal" fo:font-weight="normal"/>
    </style:style>
    <style:style style:parent-style-name="703" style:display-name="WW_CharLFO20LVL2" style:family="text" style:name="892">
      <style:paragraph-properties/>
      <style:text-properties fo:language="en" fo:country="US"/>
    </style:style>
    <style:style style:parent-style-name="703" style:display-name="WW_CharLFO20LVL3" style:family="text" style:name="893">
      <style:paragraph-properties/>
      <style:text-properties fo:language="en" fo:country="US"/>
    </style:style>
    <style:style style:parent-style-name="703" style:display-name="WW_CharLFO20LVL4" style:family="text" style:name="894">
      <style:paragraph-properties/>
      <style:text-properties fo:language="en" fo:country="US"/>
    </style:style>
    <style:style style:parent-style-name="703" style:display-name="WW_CharLFO20LVL5" style:family="text" style:name="895">
      <style:paragraph-properties/>
      <style:text-properties fo:language="en" fo:country="US"/>
    </style:style>
    <style:style style:parent-style-name="703" style:display-name="WW_CharLFO20LVL6" style:family="text" style:name="896">
      <style:paragraph-properties/>
      <style:text-properties fo:language="en" fo:country="US"/>
    </style:style>
    <style:style style:parent-style-name="703" style:display-name="WW_CharLFO20LVL7" style:family="text" style:name="897">
      <style:paragraph-properties/>
      <style:text-properties fo:language="en" fo:country="US"/>
    </style:style>
    <style:style style:parent-style-name="703" style:display-name="WW_CharLFO20LVL8" style:family="text" style:name="898">
      <style:paragraph-properties/>
      <style:text-properties fo:language="en" fo:country="US"/>
    </style:style>
    <style:style style:parent-style-name="703" style:display-name="WW_CharLFO20LVL9" style:family="text" style:name="899">
      <style:paragraph-properties/>
      <style:text-properties fo:language="en" fo:country="US"/>
    </style:style>
    <style:style style:parent-style-name="703" style:display-name="WW_CharLFO21LVL1" style:family="text" style:name="900">
      <style:paragraph-properties/>
      <style:text-properties fo:language="en" fo:country="US"/>
    </style:style>
    <style:style style:parent-style-name="703" style:display-name="WW_CharLFO21LVL2" style:family="text" style:name="901">
      <style:paragraph-properties/>
      <style:text-properties fo:language="en" fo:country="US"/>
    </style:style>
    <style:style style:parent-style-name="703" style:display-name="WW_CharLFO21LVL3" style:family="text" style:name="902">
      <style:paragraph-properties/>
      <style:text-properties fo:language="en" fo:country="US"/>
    </style:style>
    <style:style style:parent-style-name="703" style:display-name="WW_CharLFO21LVL4" style:family="text" style:name="903">
      <style:paragraph-properties/>
      <style:text-properties fo:language="en" fo:country="US"/>
    </style:style>
    <style:style style:parent-style-name="703" style:display-name="WW_CharLFO21LVL5" style:family="text" style:name="904">
      <style:paragraph-properties/>
      <style:text-properties fo:language="en" fo:country="US"/>
    </style:style>
    <style:style style:parent-style-name="703" style:display-name="WW_CharLFO21LVL6" style:family="text" style:name="905">
      <style:paragraph-properties/>
      <style:text-properties fo:language="en" fo:country="US"/>
    </style:style>
    <style:style style:parent-style-name="703" style:display-name="WW_CharLFO21LVL7" style:family="text" style:name="906">
      <style:paragraph-properties/>
      <style:text-properties fo:language="en" fo:country="US"/>
    </style:style>
    <style:style style:parent-style-name="703" style:display-name="WW_CharLFO21LVL8" style:family="text" style:name="907">
      <style:paragraph-properties/>
      <style:text-properties fo:language="en" fo:country="US"/>
    </style:style>
    <style:style style:parent-style-name="703" style:display-name="WW_CharLFO21LVL9" style:family="text" style:name="908">
      <style:paragraph-properties/>
      <style:text-properties fo:language="en" fo:country="US"/>
    </style:style>
    <style:style style:parent-style-name="703" style:display-name="Internet link" style:family="text" style:name="909">
      <style:paragraph-properties/>
      <style:text-properties fo:color="#000080" style:text-underline-type="single" style:text-underline-style="solid" style:text-underline-width="auto" style:text-underline-color="font-color"/>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Arial"/>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Arial"/>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fo:font-family="Arial"/>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font-family="Arial"/>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fo:font-family="Arial"/>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font-family="Arial"/>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Arial"/>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Arial"/>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Arial" style:font-family-asian="Arial" style:font-family-complex="Aria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Arial" style:font-family-asian="Arial" style:font-family-complex="Aria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Arial" style:font-family-asian="Arial" style:font-family-complex="Aria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Arial" style:font-family-asian="Arial" style:font-family-complex="Aria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text:list-style style:name="WWNum1">
      <text:list-level-style-number text:level="1" text:style-name="T1" style:num-format="1" style:num-suffix=".">
        <style:list-level-properties text:list-level-position-and-space-mode="label-alignment">
          <style:list-level-label-alignment fo:text-indent="-1.27cm" fo:margin-left="7.187cm"/>
        </style:list-level-properties>
        <style:text-properties/>
      </text:list-level-style-number>
      <text:list-level-style-bullet text:level="2" text:style-name="T2" text:bullet-char="• ">
        <style:list-level-properties text:list-level-position-and-space-mode="label-alignment">
          <style:list-level-label-alignment fo:text-indent="-1.27cm" fo:margin-left="8.238cm"/>
        </style:list-level-properties>
        <style:text-properties/>
      </text:list-level-style-bullet>
      <text:list-level-style-bullet text:level="3" text:style-name="T3" text:bullet-char="• ">
        <style:list-level-properties text:list-level-position-and-space-mode="label-alignment">
          <style:list-level-label-alignment fo:text-indent="-1.27cm" fo:margin-left="9.279cm"/>
        </style:list-level-properties>
        <style:text-properties/>
      </text:list-level-style-bullet>
      <text:list-level-style-bullet text:level="4" text:style-name="T4" text:bullet-char="• ">
        <style:list-level-properties text:list-level-position-and-space-mode="label-alignment">
          <style:list-level-label-alignment fo:text-indent="-1.27cm" fo:margin-left="10.32cm"/>
        </style:list-level-properties>
        <style:text-properties/>
      </text:list-level-style-bullet>
      <text:list-level-style-bullet text:level="5" text:style-name="T5" text:bullet-char="• ">
        <style:list-level-properties text:list-level-position-and-space-mode="label-alignment">
          <style:list-level-label-alignment fo:text-indent="-1.27cm" fo:margin-left="11.36cm"/>
        </style:list-level-properties>
        <style:text-properties/>
      </text:list-level-style-bullet>
      <text:list-level-style-bullet text:level="6" text:style-name="T6" text:bullet-char="• ">
        <style:list-level-properties text:list-level-position-and-space-mode="label-alignment">
          <style:list-level-label-alignment fo:text-indent="-1.27cm" fo:margin-left="12.4cm"/>
        </style:list-level-properties>
        <style:text-properties/>
      </text:list-level-style-bullet>
      <text:list-level-style-bullet text:level="7" text:style-name="T7" text:bullet-char="• ">
        <style:list-level-properties text:list-level-position-and-space-mode="label-alignment">
          <style:list-level-label-alignment fo:text-indent="-1.27cm" fo:margin-left="13.44cm"/>
        </style:list-level-properties>
        <style:text-properties/>
      </text:list-level-style-bullet>
      <text:list-level-style-bullet text:level="8" text:style-name="T8" text:bullet-char="• ">
        <style:list-level-properties text:list-level-position-and-space-mode="label-alignment">
          <style:list-level-label-alignment fo:text-indent="-1.27cm" fo:margin-left="14.48cm"/>
        </style:list-level-properties>
        <style:text-properties/>
      </text:list-level-style-bullet>
      <text:list-level-style-bullet text:level="9" text:style-name="T9" text:bullet-char="• ">
        <style:list-level-properties text:list-level-position-and-space-mode="label-alignment">
          <style:list-level-label-alignment fo:text-indent="-1.27cm" fo:margin-left="15.52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1.362cm" fo:margin-left="1.445cm"/>
        </style:list-level-properties>
        <style:text-properties fo:font-family="Arial"/>
      </text:list-level-style-bullet>
      <text:list-level-style-bullet text:level="2" text:style-name="T11" text:bullet-char="• ">
        <style:list-level-properties text:list-level-position-and-space-mode="label-alignment">
          <style:list-level-label-alignment fo:text-indent="-1.362cm" fo:margin-left="3.062cm"/>
        </style:list-level-properties>
        <style:text-properties/>
      </text:list-level-style-bullet>
      <text:list-level-style-bullet text:level="3" text:style-name="T12" text:bullet-char="• ">
        <style:list-level-properties text:list-level-position-and-space-mode="label-alignment">
          <style:list-level-label-alignment fo:text-indent="-1.362cm" fo:margin-left="4.678cm"/>
        </style:list-level-properties>
        <style:text-properties/>
      </text:list-level-style-bullet>
      <text:list-level-style-bullet text:level="4" text:style-name="T13" text:bullet-char="• ">
        <style:list-level-properties text:list-level-position-and-space-mode="label-alignment">
          <style:list-level-label-alignment fo:text-indent="-1.362cm" fo:margin-left="6.294cm"/>
        </style:list-level-properties>
        <style:text-properties/>
      </text:list-level-style-bullet>
      <text:list-level-style-bullet text:level="5" text:style-name="T14" text:bullet-char="• ">
        <style:list-level-properties text:list-level-position-and-space-mode="label-alignment">
          <style:list-level-label-alignment fo:text-indent="-1.362cm" fo:margin-left="7.91cm"/>
        </style:list-level-properties>
        <style:text-properties/>
      </text:list-level-style-bullet>
      <text:list-level-style-bullet text:level="6" text:style-name="T15" text:bullet-char="• ">
        <style:list-level-properties text:list-level-position-and-space-mode="label-alignment">
          <style:list-level-label-alignment fo:text-indent="-1.362cm" fo:margin-left="9.526cm"/>
        </style:list-level-properties>
        <style:text-properties/>
      </text:list-level-style-bullet>
      <text:list-level-style-bullet text:level="7" text:style-name="T16" text:bullet-char="• ">
        <style:list-level-properties text:list-level-position-and-space-mode="label-alignment">
          <style:list-level-label-alignment fo:text-indent="-1.362cm" fo:margin-left="11.14cm"/>
        </style:list-level-properties>
        <style:text-properties/>
      </text:list-level-style-bullet>
      <text:list-level-style-bullet text:level="8" text:style-name="T17" text:bullet-char="• ">
        <style:list-level-properties text:list-level-position-and-space-mode="label-alignment">
          <style:list-level-label-alignment fo:text-indent="-1.362cm" fo:margin-left="12.76cm"/>
        </style:list-level-properties>
        <style:text-properties/>
      </text:list-level-style-bullet>
      <text:list-level-style-bullet text:level="9" text:style-name="T18" text:bullet-char="• ">
        <style:list-level-properties text:list-level-position-and-space-mode="label-alignment">
          <style:list-level-label-alignment fo:text-indent="-1.362cm" fo:margin-left="14.37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1.445cm"/>
        </style:list-level-properties>
        <style:text-properties fo:font-family="Arial"/>
      </text:list-level-style-bullet>
      <text:list-level-style-bullet text:level="2" text:style-name="T20" text:bullet-char="• ">
        <style:list-level-properties text:list-level-position-and-space-mode="label-alignment">
          <style:list-level-label-alignment fo:text-indent="-0.635cm" fo:margin-left="3.062cm"/>
        </style:list-level-properties>
        <style:text-properties/>
      </text:list-level-style-bullet>
      <text:list-level-style-bullet text:level="3" text:style-name="T21" text:bullet-char="• ">
        <style:list-level-properties text:list-level-position-and-space-mode="label-alignment">
          <style:list-level-label-alignment fo:text-indent="-0.635cm" fo:margin-left="4.678cm"/>
        </style:list-level-properties>
        <style:text-properties/>
      </text:list-level-style-bullet>
      <text:list-level-style-bullet text:level="4" text:style-name="T22" text:bullet-char="• ">
        <style:list-level-properties text:list-level-position-and-space-mode="label-alignment">
          <style:list-level-label-alignment fo:text-indent="-0.635cm" fo:margin-left="6.294cm"/>
        </style:list-level-properties>
        <style:text-properties/>
      </text:list-level-style-bullet>
      <text:list-level-style-bullet text:level="5" text:style-name="T23" text:bullet-char="• ">
        <style:list-level-properties text:list-level-position-and-space-mode="label-alignment">
          <style:list-level-label-alignment fo:text-indent="-0.635cm" fo:margin-left="7.91cm"/>
        </style:list-level-properties>
        <style:text-properties/>
      </text:list-level-style-bullet>
      <text:list-level-style-bullet text:level="6" text:style-name="T24" text:bullet-char="• ">
        <style:list-level-properties text:list-level-position-and-space-mode="label-alignment">
          <style:list-level-label-alignment fo:text-indent="-0.635cm" fo:margin-left="9.526cm"/>
        </style:list-level-properties>
        <style:text-properties/>
      </text:list-level-style-bullet>
      <text:list-level-style-bullet text:level="7" text:style-name="T25" text:bullet-char="• ">
        <style:list-level-properties text:list-level-position-and-space-mode="label-alignment">
          <style:list-level-label-alignment fo:text-indent="-0.635cm" fo:margin-left="11.14cm"/>
        </style:list-level-properties>
        <style:text-properties/>
      </text:list-level-style-bullet>
      <text:list-level-style-bullet text:level="8" text:style-name="T26" text:bullet-char="• ">
        <style:list-level-properties text:list-level-position-and-space-mode="label-alignment">
          <style:list-level-label-alignment fo:text-indent="-0.635cm" fo:margin-left="12.76cm"/>
        </style:list-level-properties>
        <style:text-properties/>
      </text:list-level-style-bullet>
      <text:list-level-style-bullet text:level="9" text:style-name="T27" text:bullet-char="• ">
        <style:list-level-properties text:list-level-position-and-space-mode="label-alignment">
          <style:list-level-label-alignment fo:text-indent="-0.635cm" fo:margin-left="14.37cm"/>
        </style:list-level-properties>
        <style:text-properties/>
      </text:list-level-style-bullet>
    </text:list-style>
    <text:list-style style:name="WWNum4">
      <text:list-level-style-number text:level="1" text:style-name="T28" style:num-format="1" style:num-suffix=".">
        <style:list-level-properties text:list-level-position-and-space-mode="label-alignment">
          <style:list-level-label-alignment fo:text-indent="-0.5098cm" fo:margin-left="0.7091cm"/>
        </style:list-level-properties>
        <style:text-properties/>
      </text:list-level-style-number>
      <text:list-level-style-bullet text:level="2" text:style-name="T29" text:bullet-char="• ">
        <style:list-level-properties text:list-level-position-and-space-mode="label-alignment">
          <style:list-level-label-alignment fo:text-indent="-0.5098cm" fo:margin-left="2.396cm"/>
        </style:list-level-properties>
        <style:text-properties/>
      </text:list-level-style-bullet>
      <text:list-level-style-bullet text:level="3" text:style-name="T30" text:bullet-char="• ">
        <style:list-level-properties text:list-level-position-and-space-mode="label-alignment">
          <style:list-level-label-alignment fo:text-indent="-0.5098cm" fo:margin-left="4.085cm"/>
        </style:list-level-properties>
        <style:text-properties/>
      </text:list-level-style-bullet>
      <text:list-level-style-bullet text:level="4" text:style-name="T31" text:bullet-char="• ">
        <style:list-level-properties text:list-level-position-and-space-mode="label-alignment">
          <style:list-level-label-alignment fo:text-indent="-0.5098cm" fo:margin-left="5.775cm"/>
        </style:list-level-properties>
        <style:text-properties/>
      </text:list-level-style-bullet>
      <text:list-level-style-bullet text:level="5" text:style-name="T32" text:bullet-char="• ">
        <style:list-level-properties text:list-level-position-and-space-mode="label-alignment">
          <style:list-level-label-alignment fo:text-indent="-0.5098cm" fo:margin-left="7.465cm"/>
        </style:list-level-properties>
        <style:text-properties/>
      </text:list-level-style-bullet>
      <text:list-level-style-bullet text:level="6" text:style-name="T33" text:bullet-char="• ">
        <style:list-level-properties text:list-level-position-and-space-mode="label-alignment">
          <style:list-level-label-alignment fo:text-indent="-0.5098cm" fo:margin-left="9.155cm"/>
        </style:list-level-properties>
        <style:text-properties/>
      </text:list-level-style-bullet>
      <text:list-level-style-bullet text:level="7" text:style-name="T34" text:bullet-char="• ">
        <style:list-level-properties text:list-level-position-and-space-mode="label-alignment">
          <style:list-level-label-alignment fo:text-indent="-0.5098cm" fo:margin-left="10.84cm"/>
        </style:list-level-properties>
        <style:text-properties/>
      </text:list-level-style-bullet>
      <text:list-level-style-bullet text:level="8" text:style-name="T35" text:bullet-char="• ">
        <style:list-level-properties text:list-level-position-and-space-mode="label-alignment">
          <style:list-level-label-alignment fo:text-indent="-0.5098cm" fo:margin-left="12.53cm"/>
        </style:list-level-properties>
        <style:text-properties/>
      </text:list-level-style-bullet>
      <text:list-level-style-bullet text:level="9" text:style-name="T36" text:bullet-char="• ">
        <style:list-level-properties text:list-level-position-and-space-mode="label-alignment">
          <style:list-level-label-alignment fo:text-indent="-0.5098cm" fo:margin-left="14.22cm"/>
        </style:list-level-properties>
        <style:text-properties/>
      </text:list-level-style-bullet>
    </text:list-style>
    <text:list-style style:name="WWNum5">
      <text:list-level-style-number text:level="1" text:style-name="T37" style:num-format="1" style:num-suffix=".">
        <style:list-level-properties text:list-level-position-and-space-mode="label-alignment">
          <style:list-level-label-alignment fo:text-indent="-0.471cm" fo:margin-left="0.2011cm"/>
        </style:list-level-properties>
        <style:text-properties/>
      </text:list-level-style-number>
      <text:list-level-style-bullet text:level="2" text:style-name="T38" text:bullet-char="• ">
        <style:list-level-properties text:list-level-position-and-space-mode="label-alignment">
          <style:list-level-label-alignment fo:text-indent="-0.471cm" fo:margin-left="1.951cm"/>
        </style:list-level-properties>
        <style:text-properties/>
      </text:list-level-style-bullet>
      <text:list-level-style-bullet text:level="3" text:style-name="T39" text:bullet-char="• ">
        <style:list-level-properties text:list-level-position-and-space-mode="label-alignment">
          <style:list-level-label-alignment fo:text-indent="-0.471cm" fo:margin-left="3.69cm"/>
        </style:list-level-properties>
        <style:text-properties/>
      </text:list-level-style-bullet>
      <text:list-level-style-bullet text:level="4" text:style-name="T40" text:bullet-char="• ">
        <style:list-level-properties text:list-level-position-and-space-mode="label-alignment">
          <style:list-level-label-alignment fo:text-indent="-0.471cm" fo:margin-left="5.43cm"/>
        </style:list-level-properties>
        <style:text-properties/>
      </text:list-level-style-bullet>
      <text:list-level-style-bullet text:level="5" text:style-name="T41" text:bullet-char="• ">
        <style:list-level-properties text:list-level-position-and-space-mode="label-alignment">
          <style:list-level-label-alignment fo:text-indent="-0.471cm" fo:margin-left="7.167cm"/>
        </style:list-level-properties>
        <style:text-properties/>
      </text:list-level-style-bullet>
      <text:list-level-style-bullet text:level="6" text:style-name="T42" text:bullet-char="• ">
        <style:list-level-properties text:list-level-position-and-space-mode="label-alignment">
          <style:list-level-label-alignment fo:text-indent="-0.471cm" fo:margin-left="8.908cm"/>
        </style:list-level-properties>
        <style:text-properties/>
      </text:list-level-style-bullet>
      <text:list-level-style-bullet text:level="7" text:style-name="T43" text:bullet-char="• ">
        <style:list-level-properties text:list-level-position-and-space-mode="label-alignment">
          <style:list-level-label-alignment fo:text-indent="-0.471cm" fo:margin-left="10.65cm"/>
        </style:list-level-properties>
        <style:text-properties/>
      </text:list-level-style-bullet>
      <text:list-level-style-bullet text:level="8" text:style-name="T44" text:bullet-char="• ">
        <style:list-level-properties text:list-level-position-and-space-mode="label-alignment">
          <style:list-level-label-alignment fo:text-indent="-0.471cm" fo:margin-left="12.39cm"/>
        </style:list-level-properties>
        <style:text-properties/>
      </text:list-level-style-bullet>
      <text:list-level-style-bullet text:level="9" text:style-name="T45" text:bullet-char="• ">
        <style:list-level-properties text:list-level-position-and-space-mode="label-alignment">
          <style:list-level-label-alignment fo:text-indent="-0.471cm" fo:margin-left="14.12cm"/>
        </style:list-level-properties>
        <style:text-properties/>
      </text:list-level-style-bullet>
    </text:list-style>
    <text:list-style style:name="WWNum6">
      <text:list-level-style-number text:level="1" text:style-name="T46" style:num-format="1" style:num-suffix=".">
        <style:list-level-properties text:list-level-position-and-space-mode="label-alignment">
          <style:list-level-label-alignment fo:text-indent="-0.471cm" fo:margin-left="0.2011cm"/>
        </style:list-level-properties>
        <style:text-properties/>
      </text:list-level-style-number>
      <text:list-level-style-bullet text:level="2" text:style-name="T47" text:bullet-char="• ">
        <style:list-level-properties text:list-level-position-and-space-mode="label-alignment">
          <style:list-level-label-alignment fo:text-indent="-0.471cm" fo:margin-left="1.951cm"/>
        </style:list-level-properties>
        <style:text-properties/>
      </text:list-level-style-bullet>
      <text:list-level-style-bullet text:level="3" text:style-name="T48" text:bullet-char="• ">
        <style:list-level-properties text:list-level-position-and-space-mode="label-alignment">
          <style:list-level-label-alignment fo:text-indent="-0.471cm" fo:margin-left="3.69cm"/>
        </style:list-level-properties>
        <style:text-properties/>
      </text:list-level-style-bullet>
      <text:list-level-style-bullet text:level="4" text:style-name="T49" text:bullet-char="• ">
        <style:list-level-properties text:list-level-position-and-space-mode="label-alignment">
          <style:list-level-label-alignment fo:text-indent="-0.471cm" fo:margin-left="5.43cm"/>
        </style:list-level-properties>
        <style:text-properties/>
      </text:list-level-style-bullet>
      <text:list-level-style-bullet text:level="5" text:style-name="T50" text:bullet-char="• ">
        <style:list-level-properties text:list-level-position-and-space-mode="label-alignment">
          <style:list-level-label-alignment fo:text-indent="-0.471cm" fo:margin-left="7.167cm"/>
        </style:list-level-properties>
        <style:text-properties/>
      </text:list-level-style-bullet>
      <text:list-level-style-bullet text:level="6" text:style-name="T51" text:bullet-char="• ">
        <style:list-level-properties text:list-level-position-and-space-mode="label-alignment">
          <style:list-level-label-alignment fo:text-indent="-0.471cm" fo:margin-left="8.908cm"/>
        </style:list-level-properties>
        <style:text-properties/>
      </text:list-level-style-bullet>
      <text:list-level-style-bullet text:level="7" text:style-name="T52" text:bullet-char="• ">
        <style:list-level-properties text:list-level-position-and-space-mode="label-alignment">
          <style:list-level-label-alignment fo:text-indent="-0.471cm" fo:margin-left="10.65cm"/>
        </style:list-level-properties>
        <style:text-properties/>
      </text:list-level-style-bullet>
      <text:list-level-style-bullet text:level="8" text:style-name="T53" text:bullet-char="• ">
        <style:list-level-properties text:list-level-position-and-space-mode="label-alignment">
          <style:list-level-label-alignment fo:text-indent="-0.471cm" fo:margin-left="12.39cm"/>
        </style:list-level-properties>
        <style:text-properties/>
      </text:list-level-style-bullet>
      <text:list-level-style-bullet text:level="9" text:style-name="T54" text:bullet-char="• ">
        <style:list-level-properties text:list-level-position-and-space-mode="label-alignment">
          <style:list-level-label-alignment fo:text-indent="-0.471cm" fo:margin-left="14.12cm"/>
        </style:list-level-properties>
        <style:text-properties/>
      </text:list-level-style-bullet>
    </text:list-style>
    <text:list-style style:name="WWNum7">
      <text:list-level-style-number text:level="1" text:style-name="T55" style:num-format="1" style:num-suffix=".">
        <style:list-level-properties text:list-level-position-and-space-mode="label-alignment">
          <style:list-level-label-alignment fo:text-indent="-0.471cm" fo:margin-left="0.6703cm"/>
        </style:list-level-properties>
        <style:text-properties/>
      </text:list-level-style-number>
      <text:list-level-style-bullet text:level="2" text:style-name="T56" text:bullet-char="• ">
        <style:list-level-properties text:list-level-position-and-space-mode="label-alignment">
          <style:list-level-label-alignment fo:text-indent="-0.471cm" fo:margin-left="2.364cm"/>
        </style:list-level-properties>
        <style:text-properties/>
      </text:list-level-style-bullet>
      <text:list-level-style-bullet text:level="3" text:style-name="T57" text:bullet-char="• ">
        <style:list-level-properties text:list-level-position-and-space-mode="label-alignment">
          <style:list-level-label-alignment fo:text-indent="-0.471cm" fo:margin-left="4.057cm"/>
        </style:list-level-properties>
        <style:text-properties/>
      </text:list-level-style-bullet>
      <text:list-level-style-bullet text:level="4" text:style-name="T58" text:bullet-char="• ">
        <style:list-level-properties text:list-level-position-and-space-mode="label-alignment">
          <style:list-level-label-alignment fo:text-indent="-0.471cm" fo:margin-left="5.751cm"/>
        </style:list-level-properties>
        <style:text-properties/>
      </text:list-level-style-bullet>
      <text:list-level-style-bullet text:level="5" text:style-name="T59" text:bullet-char="• ">
        <style:list-level-properties text:list-level-position-and-space-mode="label-alignment">
          <style:list-level-label-alignment fo:text-indent="-0.471cm" fo:margin-left="7.444cm"/>
        </style:list-level-properties>
        <style:text-properties/>
      </text:list-level-style-bullet>
      <text:list-level-style-bullet text:level="6" text:style-name="T60" text:bullet-char="• ">
        <style:list-level-properties text:list-level-position-and-space-mode="label-alignment">
          <style:list-level-label-alignment fo:text-indent="-0.471cm" fo:margin-left="9.138cm"/>
        </style:list-level-properties>
        <style:text-properties/>
      </text:list-level-style-bullet>
      <text:list-level-style-bullet text:level="7" text:style-name="T61" text:bullet-char="• ">
        <style:list-level-properties text:list-level-position-and-space-mode="label-alignment">
          <style:list-level-label-alignment fo:text-indent="-0.471cm" fo:margin-left="10.83cm"/>
        </style:list-level-properties>
        <style:text-properties/>
      </text:list-level-style-bullet>
      <text:list-level-style-bullet text:level="8" text:style-name="T62" text:bullet-char="• ">
        <style:list-level-properties text:list-level-position-and-space-mode="label-alignment">
          <style:list-level-label-alignment fo:text-indent="-0.471cm" fo:margin-left="12.52cm"/>
        </style:list-level-properties>
        <style:text-properties/>
      </text:list-level-style-bullet>
      <text:list-level-style-bullet text:level="9" text:style-name="T63" text:bullet-char="• ">
        <style:list-level-properties text:list-level-position-and-space-mode="label-alignment">
          <style:list-level-label-alignment fo:text-indent="-0.471cm" fo:margin-left="14.22cm"/>
        </style:list-level-properties>
        <style:text-properties/>
      </text:list-level-style-bullet>
    </text:list-style>
    <text:list-style style:name="WWNum8">
      <text:list-level-style-number text:level="1" text:style-name="T64" style:num-format="1" style:num-suffix=".">
        <style:list-level-properties text:list-level-position-and-space-mode="label-alignment">
          <style:list-level-label-alignment fo:text-indent="-0.471cm" fo:margin-left="0.6703cm"/>
        </style:list-level-properties>
        <style:text-properties/>
      </text:list-level-style-number>
      <text:list-level-style-bullet text:level="2" text:style-name="T65" text:bullet-char="• ">
        <style:list-level-properties text:list-level-position-and-space-mode="label-alignment">
          <style:list-level-label-alignment fo:text-indent="-0.471cm" fo:margin-left="2.364cm"/>
        </style:list-level-properties>
        <style:text-properties/>
      </text:list-level-style-bullet>
      <text:list-level-style-bullet text:level="3" text:style-name="T66" text:bullet-char="• ">
        <style:list-level-properties text:list-level-position-and-space-mode="label-alignment">
          <style:list-level-label-alignment fo:text-indent="-0.471cm" fo:margin-left="4.057cm"/>
        </style:list-level-properties>
        <style:text-properties/>
      </text:list-level-style-bullet>
      <text:list-level-style-bullet text:level="4" text:style-name="T67" text:bullet-char="• ">
        <style:list-level-properties text:list-level-position-and-space-mode="label-alignment">
          <style:list-level-label-alignment fo:text-indent="-0.471cm" fo:margin-left="5.751cm"/>
        </style:list-level-properties>
        <style:text-properties/>
      </text:list-level-style-bullet>
      <text:list-level-style-bullet text:level="5" text:style-name="T68" text:bullet-char="• ">
        <style:list-level-properties text:list-level-position-and-space-mode="label-alignment">
          <style:list-level-label-alignment fo:text-indent="-0.471cm" fo:margin-left="7.444cm"/>
        </style:list-level-properties>
        <style:text-properties/>
      </text:list-level-style-bullet>
      <text:list-level-style-bullet text:level="6" text:style-name="T69" text:bullet-char="• ">
        <style:list-level-properties text:list-level-position-and-space-mode="label-alignment">
          <style:list-level-label-alignment fo:text-indent="-0.471cm" fo:margin-left="9.138cm"/>
        </style:list-level-properties>
        <style:text-properties/>
      </text:list-level-style-bullet>
      <text:list-level-style-bullet text:level="7" text:style-name="T70" text:bullet-char="• ">
        <style:list-level-properties text:list-level-position-and-space-mode="label-alignment">
          <style:list-level-label-alignment fo:text-indent="-0.471cm" fo:margin-left="10.83cm"/>
        </style:list-level-properties>
        <style:text-properties/>
      </text:list-level-style-bullet>
      <text:list-level-style-bullet text:level="8" text:style-name="T71" text:bullet-char="• ">
        <style:list-level-properties text:list-level-position-and-space-mode="label-alignment">
          <style:list-level-label-alignment fo:text-indent="-0.471cm" fo:margin-left="12.52cm"/>
        </style:list-level-properties>
        <style:text-properties/>
      </text:list-level-style-bullet>
      <text:list-level-style-bullet text:level="9" text:style-name="T72" text:bullet-char="• ">
        <style:list-level-properties text:list-level-position-and-space-mode="label-alignment">
          <style:list-level-label-alignment fo:text-indent="-0.471cm" fo:margin-left="14.22cm"/>
        </style:list-level-properties>
        <style:text-properties/>
      </text:list-level-style-bullet>
    </text:list-style>
    <text:list-style style:name="WWNum9">
      <text:list-level-style-number text:level="1" text:style-name="T73" style:num-format="1" style:num-suffix=".">
        <style:list-level-properties text:list-level-position-and-space-mode="label-alignment">
          <style:list-level-label-alignment fo:text-indent="-0.5098cm" fo:margin-left="0.7091cm"/>
        </style:list-level-properties>
        <style:text-properties/>
      </text:list-level-style-number>
      <text:list-level-style-bullet text:level="2" text:style-name="T74" text:bullet-char="• ">
        <style:list-level-properties text:list-level-position-and-space-mode="label-alignment">
          <style:list-level-label-alignment fo:text-indent="-0.5098cm" fo:margin-left="2.396cm"/>
        </style:list-level-properties>
        <style:text-properties/>
      </text:list-level-style-bullet>
      <text:list-level-style-bullet text:level="3" text:style-name="T75" text:bullet-char="• ">
        <style:list-level-properties text:list-level-position-and-space-mode="label-alignment">
          <style:list-level-label-alignment fo:text-indent="-0.5098cm" fo:margin-left="4.085cm"/>
        </style:list-level-properties>
        <style:text-properties/>
      </text:list-level-style-bullet>
      <text:list-level-style-bullet text:level="4" text:style-name="T76" text:bullet-char="• ">
        <style:list-level-properties text:list-level-position-and-space-mode="label-alignment">
          <style:list-level-label-alignment fo:text-indent="-0.5098cm" fo:margin-left="5.775cm"/>
        </style:list-level-properties>
        <style:text-properties/>
      </text:list-level-style-bullet>
      <text:list-level-style-bullet text:level="5" text:style-name="T77" text:bullet-char="• ">
        <style:list-level-properties text:list-level-position-and-space-mode="label-alignment">
          <style:list-level-label-alignment fo:text-indent="-0.5098cm" fo:margin-left="7.465cm"/>
        </style:list-level-properties>
        <style:text-properties/>
      </text:list-level-style-bullet>
      <text:list-level-style-bullet text:level="6" text:style-name="T78" text:bullet-char="• ">
        <style:list-level-properties text:list-level-position-and-space-mode="label-alignment">
          <style:list-level-label-alignment fo:text-indent="-0.5098cm" fo:margin-left="9.155cm"/>
        </style:list-level-properties>
        <style:text-properties/>
      </text:list-level-style-bullet>
      <text:list-level-style-bullet text:level="7" text:style-name="T79" text:bullet-char="• ">
        <style:list-level-properties text:list-level-position-and-space-mode="label-alignment">
          <style:list-level-label-alignment fo:text-indent="-0.5098cm" fo:margin-left="10.84cm"/>
        </style:list-level-properties>
        <style:text-properties/>
      </text:list-level-style-bullet>
      <text:list-level-style-bullet text:level="8" text:style-name="T80" text:bullet-char="• ">
        <style:list-level-properties text:list-level-position-and-space-mode="label-alignment">
          <style:list-level-label-alignment fo:text-indent="-0.5098cm" fo:margin-left="12.53cm"/>
        </style:list-level-properties>
        <style:text-properties/>
      </text:list-level-style-bullet>
      <text:list-level-style-bullet text:level="9" text:style-name="T81" text:bullet-char="• ">
        <style:list-level-properties text:list-level-position-and-space-mode="label-alignment">
          <style:list-level-label-alignment fo:text-indent="-0.5098cm" fo:margin-left="14.22cm"/>
        </style:list-level-properties>
        <style:text-properties/>
      </text:list-level-style-bullet>
    </text:list-style>
    <text:list-style style:name="WWNum10">
      <text:list-level-style-number text:level="1" text:style-name="T82" style:num-format="1" style:num-suffix=".">
        <style:list-level-properties text:list-level-position-and-space-mode="label-alignment">
          <style:list-level-label-alignment fo:text-indent="-0.471cm" fo:margin-left="0.6703cm"/>
        </style:list-level-properties>
        <style:text-properties/>
      </text:list-level-style-number>
      <text:list-level-style-bullet text:level="2" text:style-name="T83" text:bullet-char="• ">
        <style:list-level-properties text:list-level-position-and-space-mode="label-alignment">
          <style:list-level-label-alignment fo:text-indent="-0.471cm" fo:margin-left="2.364cm"/>
        </style:list-level-properties>
        <style:text-properties/>
      </text:list-level-style-bullet>
      <text:list-level-style-bullet text:level="3" text:style-name="T84" text:bullet-char="• ">
        <style:list-level-properties text:list-level-position-and-space-mode="label-alignment">
          <style:list-level-label-alignment fo:text-indent="-0.471cm" fo:margin-left="4.057cm"/>
        </style:list-level-properties>
        <style:text-properties/>
      </text:list-level-style-bullet>
      <text:list-level-style-bullet text:level="4" text:style-name="T85" text:bullet-char="• ">
        <style:list-level-properties text:list-level-position-and-space-mode="label-alignment">
          <style:list-level-label-alignment fo:text-indent="-0.471cm" fo:margin-left="5.751cm"/>
        </style:list-level-properties>
        <style:text-properties/>
      </text:list-level-style-bullet>
      <text:list-level-style-bullet text:level="5" text:style-name="T86" text:bullet-char="• ">
        <style:list-level-properties text:list-level-position-and-space-mode="label-alignment">
          <style:list-level-label-alignment fo:text-indent="-0.471cm" fo:margin-left="7.444cm"/>
        </style:list-level-properties>
        <style:text-properties/>
      </text:list-level-style-bullet>
      <text:list-level-style-bullet text:level="6" text:style-name="T87" text:bullet-char="• ">
        <style:list-level-properties text:list-level-position-and-space-mode="label-alignment">
          <style:list-level-label-alignment fo:text-indent="-0.471cm" fo:margin-left="9.138cm"/>
        </style:list-level-properties>
        <style:text-properties/>
      </text:list-level-style-bullet>
      <text:list-level-style-bullet text:level="7" text:style-name="T88" text:bullet-char="• ">
        <style:list-level-properties text:list-level-position-and-space-mode="label-alignment">
          <style:list-level-label-alignment fo:text-indent="-0.471cm" fo:margin-left="10.83cm"/>
        </style:list-level-properties>
        <style:text-properties/>
      </text:list-level-style-bullet>
      <text:list-level-style-bullet text:level="8" text:style-name="T89" text:bullet-char="• ">
        <style:list-level-properties text:list-level-position-and-space-mode="label-alignment">
          <style:list-level-label-alignment fo:text-indent="-0.471cm" fo:margin-left="12.52cm"/>
        </style:list-level-properties>
        <style:text-properties/>
      </text:list-level-style-bullet>
      <text:list-level-style-bullet text:level="9" text:style-name="T90" text:bullet-char="• ">
        <style:list-level-properties text:list-level-position-and-space-mode="label-alignment">
          <style:list-level-label-alignment fo:text-indent="-0.471cm" fo:margin-left="14.22cm"/>
        </style:list-level-properties>
        <style:text-properties/>
      </text:list-level-style-bullet>
    </text:list-style>
    <text:list-style style:name="WWNum11">
      <text:list-level-style-number text:level="1" text:style-name="T91" style:num-format="1" style:num-suffix=".">
        <style:list-level-properties text:list-level-position-and-space-mode="label-alignment">
          <style:list-level-label-alignment fo:text-indent="-0.5098cm" fo:margin-left="0.7091cm"/>
        </style:list-level-properties>
        <style:text-properties/>
      </text:list-level-style-number>
      <text:list-level-style-bullet text:level="2" text:style-name="T92" text:bullet-char="• ">
        <style:list-level-properties text:list-level-position-and-space-mode="label-alignment">
          <style:list-level-label-alignment fo:text-indent="-0.5098cm" fo:margin-left="2.396cm"/>
        </style:list-level-properties>
        <style:text-properties/>
      </text:list-level-style-bullet>
      <text:list-level-style-bullet text:level="3" text:style-name="T93" text:bullet-char="• ">
        <style:list-level-properties text:list-level-position-and-space-mode="label-alignment">
          <style:list-level-label-alignment fo:text-indent="-0.5098cm" fo:margin-left="4.085cm"/>
        </style:list-level-properties>
        <style:text-properties/>
      </text:list-level-style-bullet>
      <text:list-level-style-bullet text:level="4" text:style-name="T94" text:bullet-char="• ">
        <style:list-level-properties text:list-level-position-and-space-mode="label-alignment">
          <style:list-level-label-alignment fo:text-indent="-0.5098cm" fo:margin-left="5.775cm"/>
        </style:list-level-properties>
        <style:text-properties/>
      </text:list-level-style-bullet>
      <text:list-level-style-bullet text:level="5" text:style-name="T95" text:bullet-char="• ">
        <style:list-level-properties text:list-level-position-and-space-mode="label-alignment">
          <style:list-level-label-alignment fo:text-indent="-0.5098cm" fo:margin-left="7.465cm"/>
        </style:list-level-properties>
        <style:text-properties/>
      </text:list-level-style-bullet>
      <text:list-level-style-bullet text:level="6" text:style-name="T96" text:bullet-char="• ">
        <style:list-level-properties text:list-level-position-and-space-mode="label-alignment">
          <style:list-level-label-alignment fo:text-indent="-0.5098cm" fo:margin-left="9.155cm"/>
        </style:list-level-properties>
        <style:text-properties/>
      </text:list-level-style-bullet>
      <text:list-level-style-bullet text:level="7" text:style-name="T97" text:bullet-char="• ">
        <style:list-level-properties text:list-level-position-and-space-mode="label-alignment">
          <style:list-level-label-alignment fo:text-indent="-0.5098cm" fo:margin-left="10.84cm"/>
        </style:list-level-properties>
        <style:text-properties/>
      </text:list-level-style-bullet>
      <text:list-level-style-bullet text:level="8" text:style-name="T98" text:bullet-char="• ">
        <style:list-level-properties text:list-level-position-and-space-mode="label-alignment">
          <style:list-level-label-alignment fo:text-indent="-0.5098cm" fo:margin-left="12.53cm"/>
        </style:list-level-properties>
        <style:text-properties/>
      </text:list-level-style-bullet>
      <text:list-level-style-bullet text:level="9" text:style-name="T99" text:bullet-char="• ">
        <style:list-level-properties text:list-level-position-and-space-mode="label-alignment">
          <style:list-level-label-alignment fo:text-indent="-0.5098cm" fo:margin-left="14.22cm"/>
        </style:list-level-properties>
        <style:text-properties/>
      </text:list-level-style-bullet>
    </text:list-style>
    <text:list-style style:name="WWNum12">
      <text:list-level-style-number text:level="1" text:style-name="T100" style:num-format="1" style:num-suffix=".">
        <style:list-level-properties text:list-level-position-and-space-mode="label-alignment">
          <style:list-level-label-alignment fo:text-indent="-0.471cm" fo:margin-left="0.6703cm"/>
        </style:list-level-properties>
        <style:text-properties/>
      </text:list-level-style-number>
      <text:list-level-style-bullet text:level="2" text:style-name="T101" text:bullet-char="">
        <style:list-level-properties text:list-level-position-and-space-mode="label-alignment">
          <style:list-level-label-alignment fo:text-indent="-0.635cm" fo:margin-left="1.471cm"/>
        </style:list-level-properties>
        <style:text-properties fo:font-family="Arial"/>
      </text:list-level-style-bullet>
      <text:list-level-style-bullet text:level="3" text:style-name="T102" text:bullet-char="• ">
        <style:list-level-properties text:list-level-position-and-space-mode="label-alignment">
          <style:list-level-label-alignment fo:text-indent="-0.635cm" fo:margin-left="3.272cm"/>
        </style:list-level-properties>
        <style:text-properties/>
      </text:list-level-style-bullet>
      <text:list-level-style-bullet text:level="4" text:style-name="T103" text:bullet-char="• ">
        <style:list-level-properties text:list-level-position-and-space-mode="label-alignment">
          <style:list-level-label-alignment fo:text-indent="-0.635cm" fo:margin-left="5.064cm"/>
        </style:list-level-properties>
        <style:text-properties/>
      </text:list-level-style-bullet>
      <text:list-level-style-bullet text:level="5" text:style-name="T104" text:bullet-char="• ">
        <style:list-level-properties text:list-level-position-and-space-mode="label-alignment">
          <style:list-level-label-alignment fo:text-indent="-0.635cm" fo:margin-left="6.853cm"/>
        </style:list-level-properties>
        <style:text-properties/>
      </text:list-level-style-bullet>
      <text:list-level-style-bullet text:level="6" text:style-name="T105" text:bullet-char="• ">
        <style:list-level-properties text:list-level-position-and-space-mode="label-alignment">
          <style:list-level-label-alignment fo:text-indent="-0.635cm" fo:margin-left="8.647cm"/>
        </style:list-level-properties>
        <style:text-properties/>
      </text:list-level-style-bullet>
      <text:list-level-style-bullet text:level="7" text:style-name="T106" text:bullet-char="• ">
        <style:list-level-properties text:list-level-position-and-space-mode="label-alignment">
          <style:list-level-label-alignment fo:text-indent="-0.635cm" fo:margin-left="10.44cm"/>
        </style:list-level-properties>
        <style:text-properties/>
      </text:list-level-style-bullet>
      <text:list-level-style-bullet text:level="8" text:style-name="T107" text:bullet-char="• ">
        <style:list-level-properties text:list-level-position-and-space-mode="label-alignment">
          <style:list-level-label-alignment fo:text-indent="-0.635cm" fo:margin-left="12.23cm"/>
        </style:list-level-properties>
        <style:text-properties/>
      </text:list-level-style-bullet>
      <text:list-level-style-bullet text:level="9" text:style-name="T108" text:bullet-char="• ">
        <style:list-level-properties text:list-level-position-and-space-mode="label-alignment">
          <style:list-level-label-alignment fo:text-indent="-0.635cm" fo:margin-left="14.02cm"/>
        </style:list-level-properties>
        <style:text-properties/>
      </text:list-level-style-bullet>
    </text:list-style>
    <text:list-style style:name="WWNum13">
      <text:list-level-style-number text:level="1" text:style-name="T109" style:num-format="1" style:num-suffix=".">
        <style:list-level-properties text:list-level-position-and-space-mode="label-alignment">
          <style:list-level-label-alignment fo:text-indent="-0.471cm" fo:margin-left="0.2011cm"/>
        </style:list-level-properties>
        <style:text-properties/>
      </text:list-level-style-number>
      <text:list-level-style-bullet text:level="2" text:style-name="T110" text:bullet-char="• ">
        <style:list-level-properties text:list-level-position-and-space-mode="label-alignment">
          <style:list-level-label-alignment fo:text-indent="-0.471cm" fo:margin-left="1.951cm"/>
        </style:list-level-properties>
        <style:text-properties/>
      </text:list-level-style-bullet>
      <text:list-level-style-bullet text:level="3" text:style-name="T111" text:bullet-char="• ">
        <style:list-level-properties text:list-level-position-and-space-mode="label-alignment">
          <style:list-level-label-alignment fo:text-indent="-0.471cm" fo:margin-left="3.69cm"/>
        </style:list-level-properties>
        <style:text-properties/>
      </text:list-level-style-bullet>
      <text:list-level-style-bullet text:level="4" text:style-name="T112" text:bullet-char="• ">
        <style:list-level-properties text:list-level-position-and-space-mode="label-alignment">
          <style:list-level-label-alignment fo:text-indent="-0.471cm" fo:margin-left="5.43cm"/>
        </style:list-level-properties>
        <style:text-properties/>
      </text:list-level-style-bullet>
      <text:list-level-style-bullet text:level="5" text:style-name="T113" text:bullet-char="• ">
        <style:list-level-properties text:list-level-position-and-space-mode="label-alignment">
          <style:list-level-label-alignment fo:text-indent="-0.471cm" fo:margin-left="7.167cm"/>
        </style:list-level-properties>
        <style:text-properties/>
      </text:list-level-style-bullet>
      <text:list-level-style-bullet text:level="6" text:style-name="T114" text:bullet-char="• ">
        <style:list-level-properties text:list-level-position-and-space-mode="label-alignment">
          <style:list-level-label-alignment fo:text-indent="-0.471cm" fo:margin-left="8.908cm"/>
        </style:list-level-properties>
        <style:text-properties/>
      </text:list-level-style-bullet>
      <text:list-level-style-bullet text:level="7" text:style-name="T115" text:bullet-char="• ">
        <style:list-level-properties text:list-level-position-and-space-mode="label-alignment">
          <style:list-level-label-alignment fo:text-indent="-0.471cm" fo:margin-left="10.65cm"/>
        </style:list-level-properties>
        <style:text-properties/>
      </text:list-level-style-bullet>
      <text:list-level-style-bullet text:level="8" text:style-name="T116" text:bullet-char="• ">
        <style:list-level-properties text:list-level-position-and-space-mode="label-alignment">
          <style:list-level-label-alignment fo:text-indent="-0.471cm" fo:margin-left="12.39cm"/>
        </style:list-level-properties>
        <style:text-properties/>
      </text:list-level-style-bullet>
      <text:list-level-style-bullet text:level="9" text:style-name="T117" text:bullet-char="• ">
        <style:list-level-properties text:list-level-position-and-space-mode="label-alignment">
          <style:list-level-label-alignment fo:text-indent="-0.471cm" fo:margin-left="14.12cm"/>
        </style:list-level-properties>
        <style:text-properties/>
      </text:list-level-style-bullet>
    </text:list-style>
    <text:list-style style:name="WWNum14">
      <text:list-level-style-bullet text:level="1" text:style-name="T118" text:bullet-char="">
        <style:list-level-properties text:list-level-position-and-space-mode="label-alignment">
          <style:list-level-label-alignment fo:text-indent="-0.635cm" fo:margin-left="1.895cm"/>
        </style:list-level-properties>
        <style:text-properties fo:font-family="Arial"/>
      </text:list-level-style-bullet>
      <text:list-level-style-bullet text:level="2" text:style-name="T119" text:bullet-char="• ">
        <style:list-level-properties text:list-level-position-and-space-mode="label-alignment">
          <style:list-level-label-alignment fo:text-indent="-0.635cm" fo:margin-left="3.475cm"/>
        </style:list-level-properties>
        <style:text-properties/>
      </text:list-level-style-bullet>
      <text:list-level-style-bullet text:level="3" text:style-name="T120" text:bullet-char="• ">
        <style:list-level-properties text:list-level-position-and-space-mode="label-alignment">
          <style:list-level-label-alignment fo:text-indent="-0.635cm" fo:margin-left="5.045cm"/>
        </style:list-level-properties>
        <style:text-properties/>
      </text:list-level-style-bullet>
      <text:list-level-style-bullet text:level="4" text:style-name="T121" text:bullet-char="• ">
        <style:list-level-properties text:list-level-position-and-space-mode="label-alignment">
          <style:list-level-label-alignment fo:text-indent="-0.635cm" fo:margin-left="6.615cm"/>
        </style:list-level-properties>
        <style:text-properties/>
      </text:list-level-style-bullet>
      <text:list-level-style-bullet text:level="5" text:style-name="T122" text:bullet-char="• ">
        <style:list-level-properties text:list-level-position-and-space-mode="label-alignment">
          <style:list-level-label-alignment fo:text-indent="-0.635cm" fo:margin-left="8.183cm"/>
        </style:list-level-properties>
        <style:text-properties/>
      </text:list-level-style-bullet>
      <text:list-level-style-bullet text:level="6" text:style-name="T123" text:bullet-char="• ">
        <style:list-level-properties text:list-level-position-and-space-mode="label-alignment">
          <style:list-level-label-alignment fo:text-indent="-0.635cm" fo:margin-left="9.753cm"/>
        </style:list-level-properties>
        <style:text-properties/>
      </text:list-level-style-bullet>
      <text:list-level-style-bullet text:level="7" text:style-name="T124" text:bullet-char="• ">
        <style:list-level-properties text:list-level-position-and-space-mode="label-alignment">
          <style:list-level-label-alignment fo:text-indent="-0.635cm" fo:margin-left="11.32cm"/>
        </style:list-level-properties>
        <style:text-properties/>
      </text:list-level-style-bullet>
      <text:list-level-style-bullet text:level="8" text:style-name="T125" text:bullet-char="• ">
        <style:list-level-properties text:list-level-position-and-space-mode="label-alignment">
          <style:list-level-label-alignment fo:text-indent="-0.635cm" fo:margin-left="12.89cm"/>
        </style:list-level-properties>
        <style:text-properties/>
      </text:list-level-style-bullet>
      <text:list-level-style-bullet text:level="9" text:style-name="T126" text:bullet-char="• ">
        <style:list-level-properties text:list-level-position-and-space-mode="label-alignment">
          <style:list-level-label-alignment fo:text-indent="-0.635cm" fo:margin-left="14.46cm"/>
        </style:list-level-properties>
        <style:text-properties/>
      </text:list-level-style-bullet>
    </text:list-style>
    <text:list-style style:name="WWNum15">
      <text:list-level-style-bullet text:level="1" text:style-name="T127" text:bullet-char="">
        <style:list-level-properties text:list-level-position-and-space-mode="label-alignment">
          <style:list-level-label-alignment fo:text-indent="-0.5027cm" fo:margin-left="1.445cm"/>
        </style:list-level-properties>
        <style:text-properties fo:font-family="Arial"/>
      </text:list-level-style-bullet>
      <text:list-level-style-bullet text:level="2" text:style-name="T128" text:bullet-char="• ">
        <style:list-level-properties text:list-level-position-and-space-mode="label-alignment">
          <style:list-level-label-alignment fo:text-indent="-0.5027cm" fo:margin-left="3.062cm"/>
        </style:list-level-properties>
        <style:text-properties/>
      </text:list-level-style-bullet>
      <text:list-level-style-bullet text:level="3" text:style-name="T129" text:bullet-char="• ">
        <style:list-level-properties text:list-level-position-and-space-mode="label-alignment">
          <style:list-level-label-alignment fo:text-indent="-0.5027cm" fo:margin-left="4.678cm"/>
        </style:list-level-properties>
        <style:text-properties/>
      </text:list-level-style-bullet>
      <text:list-level-style-bullet text:level="4" text:style-name="T130" text:bullet-char="• ">
        <style:list-level-properties text:list-level-position-and-space-mode="label-alignment">
          <style:list-level-label-alignment fo:text-indent="-0.5027cm" fo:margin-left="6.294cm"/>
        </style:list-level-properties>
        <style:text-properties/>
      </text:list-level-style-bullet>
      <text:list-level-style-bullet text:level="5" text:style-name="T131" text:bullet-char="• ">
        <style:list-level-properties text:list-level-position-and-space-mode="label-alignment">
          <style:list-level-label-alignment fo:text-indent="-0.5027cm" fo:margin-left="7.91cm"/>
        </style:list-level-properties>
        <style:text-properties/>
      </text:list-level-style-bullet>
      <text:list-level-style-bullet text:level="6" text:style-name="T132" text:bullet-char="• ">
        <style:list-level-properties text:list-level-position-and-space-mode="label-alignment">
          <style:list-level-label-alignment fo:text-indent="-0.5027cm" fo:margin-left="9.526cm"/>
        </style:list-level-properties>
        <style:text-properties/>
      </text:list-level-style-bullet>
      <text:list-level-style-bullet text:level="7" text:style-name="T133" text:bullet-char="• ">
        <style:list-level-properties text:list-level-position-and-space-mode="label-alignment">
          <style:list-level-label-alignment fo:text-indent="-0.5027cm" fo:margin-left="11.14cm"/>
        </style:list-level-properties>
        <style:text-properties/>
      </text:list-level-style-bullet>
      <text:list-level-style-bullet text:level="8" text:style-name="T134" text:bullet-char="• ">
        <style:list-level-properties text:list-level-position-and-space-mode="label-alignment">
          <style:list-level-label-alignment fo:text-indent="-0.5027cm" fo:margin-left="12.76cm"/>
        </style:list-level-properties>
        <style:text-properties/>
      </text:list-level-style-bullet>
      <text:list-level-style-bullet text:level="9" text:style-name="T135" text:bullet-char="• ">
        <style:list-level-properties text:list-level-position-and-space-mode="label-alignment">
          <style:list-level-label-alignment fo:text-indent="-0.5027cm" fo:margin-left="14.37cm"/>
        </style:list-level-properties>
        <style:text-properties/>
      </text:list-level-style-bullet>
    </text:list-style>
    <text:list-style style:name="WWNum16">
      <text:list-level-style-bullet text:level="1" text:style-name="T136" text:bullet-char="">
        <style:list-level-properties text:list-level-position-and-space-mode="label-alignment">
          <style:list-level-label-alignment fo:text-indent="-0.5027cm" fo:margin-left="1.445cm"/>
        </style:list-level-properties>
        <style:text-properties fo:font-family="Arial"/>
      </text:list-level-style-bullet>
      <text:list-level-style-bullet text:level="2" text:style-name="T137" text:bullet-char="• ">
        <style:list-level-properties text:list-level-position-and-space-mode="label-alignment">
          <style:list-level-label-alignment fo:text-indent="-0.5027cm" fo:margin-left="3.062cm"/>
        </style:list-level-properties>
        <style:text-properties/>
      </text:list-level-style-bullet>
      <text:list-level-style-bullet text:level="3" text:style-name="T138" text:bullet-char="• ">
        <style:list-level-properties text:list-level-position-and-space-mode="label-alignment">
          <style:list-level-label-alignment fo:text-indent="-0.5027cm" fo:margin-left="4.678cm"/>
        </style:list-level-properties>
        <style:text-properties/>
      </text:list-level-style-bullet>
      <text:list-level-style-bullet text:level="4" text:style-name="T139" text:bullet-char="• ">
        <style:list-level-properties text:list-level-position-and-space-mode="label-alignment">
          <style:list-level-label-alignment fo:text-indent="-0.5027cm" fo:margin-left="6.294cm"/>
        </style:list-level-properties>
        <style:text-properties/>
      </text:list-level-style-bullet>
      <text:list-level-style-bullet text:level="5" text:style-name="T140" text:bullet-char="• ">
        <style:list-level-properties text:list-level-position-and-space-mode="label-alignment">
          <style:list-level-label-alignment fo:text-indent="-0.5027cm" fo:margin-left="7.91cm"/>
        </style:list-level-properties>
        <style:text-properties/>
      </text:list-level-style-bullet>
      <text:list-level-style-bullet text:level="6" text:style-name="T141" text:bullet-char="• ">
        <style:list-level-properties text:list-level-position-and-space-mode="label-alignment">
          <style:list-level-label-alignment fo:text-indent="-0.5027cm" fo:margin-left="9.526cm"/>
        </style:list-level-properties>
        <style:text-properties/>
      </text:list-level-style-bullet>
      <text:list-level-style-bullet text:level="7" text:style-name="T142" text:bullet-char="• ">
        <style:list-level-properties text:list-level-position-and-space-mode="label-alignment">
          <style:list-level-label-alignment fo:text-indent="-0.5027cm" fo:margin-left="11.14cm"/>
        </style:list-level-properties>
        <style:text-properties/>
      </text:list-level-style-bullet>
      <text:list-level-style-bullet text:level="8" text:style-name="T143" text:bullet-char="• ">
        <style:list-level-properties text:list-level-position-and-space-mode="label-alignment">
          <style:list-level-label-alignment fo:text-indent="-0.5027cm" fo:margin-left="12.76cm"/>
        </style:list-level-properties>
        <style:text-properties/>
      </text:list-level-style-bullet>
      <text:list-level-style-bullet text:level="9" text:style-name="T144" text:bullet-char="• ">
        <style:list-level-properties text:list-level-position-and-space-mode="label-alignment">
          <style:list-level-label-alignment fo:text-indent="-0.5027cm" fo:margin-left="14.37cm"/>
        </style:list-level-properties>
        <style:text-properties/>
      </text:list-level-style-bullet>
    </text:list-style>
    <text:list-style style:name="WWNum17">
      <text:list-level-style-bullet text:level="1" text:style-name="T145" text:bullet-char="">
        <style:list-level-properties text:list-level-position-and-space-mode="label-alignment">
          <style:list-level-label-alignment fo:text-indent="-0.5027cm" fo:margin-left="1.445cm"/>
        </style:list-level-properties>
        <style:text-properties fo:font-family="Arial"/>
      </text:list-level-style-bullet>
      <text:list-level-style-bullet text:level="2" text:style-name="T146" text:bullet-char="• ">
        <style:list-level-properties text:list-level-position-and-space-mode="label-alignment">
          <style:list-level-label-alignment fo:text-indent="-0.5027cm" fo:margin-left="3.062cm"/>
        </style:list-level-properties>
        <style:text-properties/>
      </text:list-level-style-bullet>
      <text:list-level-style-bullet text:level="3" text:style-name="T147" text:bullet-char="• ">
        <style:list-level-properties text:list-level-position-and-space-mode="label-alignment">
          <style:list-level-label-alignment fo:text-indent="-0.5027cm" fo:margin-left="4.678cm"/>
        </style:list-level-properties>
        <style:text-properties/>
      </text:list-level-style-bullet>
      <text:list-level-style-bullet text:level="4" text:style-name="T148" text:bullet-char="• ">
        <style:list-level-properties text:list-level-position-and-space-mode="label-alignment">
          <style:list-level-label-alignment fo:text-indent="-0.5027cm" fo:margin-left="6.294cm"/>
        </style:list-level-properties>
        <style:text-properties/>
      </text:list-level-style-bullet>
      <text:list-level-style-bullet text:level="5" text:style-name="T149" text:bullet-char="• ">
        <style:list-level-properties text:list-level-position-and-space-mode="label-alignment">
          <style:list-level-label-alignment fo:text-indent="-0.5027cm" fo:margin-left="7.91cm"/>
        </style:list-level-properties>
        <style:text-properties/>
      </text:list-level-style-bullet>
      <text:list-level-style-bullet text:level="6" text:style-name="T150" text:bullet-char="• ">
        <style:list-level-properties text:list-level-position-and-space-mode="label-alignment">
          <style:list-level-label-alignment fo:text-indent="-0.5027cm" fo:margin-left="9.526cm"/>
        </style:list-level-properties>
        <style:text-properties/>
      </text:list-level-style-bullet>
      <text:list-level-style-bullet text:level="7" text:style-name="T151" text:bullet-char="• ">
        <style:list-level-properties text:list-level-position-and-space-mode="label-alignment">
          <style:list-level-label-alignment fo:text-indent="-0.5027cm" fo:margin-left="11.14cm"/>
        </style:list-level-properties>
        <style:text-properties/>
      </text:list-level-style-bullet>
      <text:list-level-style-bullet text:level="8" text:style-name="T152" text:bullet-char="• ">
        <style:list-level-properties text:list-level-position-and-space-mode="label-alignment">
          <style:list-level-label-alignment fo:text-indent="-0.5027cm" fo:margin-left="12.76cm"/>
        </style:list-level-properties>
        <style:text-properties/>
      </text:list-level-style-bullet>
      <text:list-level-style-bullet text:level="9" text:style-name="T153" text:bullet-char="• ">
        <style:list-level-properties text:list-level-position-and-space-mode="label-alignment">
          <style:list-level-label-alignment fo:text-indent="-0.5027cm" fo:margin-left="14.37cm"/>
        </style:list-level-properties>
        <style:text-properties/>
      </text:list-level-style-bullet>
    </text:list-style>
    <text:list-style style:name="WWNum18">
      <text:list-level-style-number text:level="1" text:style-name="T154" style:num-format="1" style:num-suffix=".">
        <style:list-level-properties text:list-level-position-and-space-mode="label-alignment">
          <style:list-level-label-alignment fo:text-indent="-0.471cm" fo:margin-left="0.6703cm"/>
        </style:list-level-properties>
        <style:text-properties/>
      </text:list-level-style-number>
      <text:list-level-style-bullet text:level="2" text:style-name="T155" text:bullet-char="• ">
        <style:list-level-properties text:list-level-position-and-space-mode="label-alignment">
          <style:list-level-label-alignment fo:text-indent="-0.471cm" fo:margin-left="2.364cm"/>
        </style:list-level-properties>
        <style:text-properties/>
      </text:list-level-style-bullet>
      <text:list-level-style-bullet text:level="3" text:style-name="T156" text:bullet-char="• ">
        <style:list-level-properties text:list-level-position-and-space-mode="label-alignment">
          <style:list-level-label-alignment fo:text-indent="-0.471cm" fo:margin-left="4.057cm"/>
        </style:list-level-properties>
        <style:text-properties/>
      </text:list-level-style-bullet>
      <text:list-level-style-bullet text:level="4" text:style-name="T157" text:bullet-char="• ">
        <style:list-level-properties text:list-level-position-and-space-mode="label-alignment">
          <style:list-level-label-alignment fo:text-indent="-0.471cm" fo:margin-left="5.751cm"/>
        </style:list-level-properties>
        <style:text-properties/>
      </text:list-level-style-bullet>
      <text:list-level-style-bullet text:level="5" text:style-name="T158" text:bullet-char="• ">
        <style:list-level-properties text:list-level-position-and-space-mode="label-alignment">
          <style:list-level-label-alignment fo:text-indent="-0.471cm" fo:margin-left="7.444cm"/>
        </style:list-level-properties>
        <style:text-properties/>
      </text:list-level-style-bullet>
      <text:list-level-style-bullet text:level="6" text:style-name="T159" text:bullet-char="• ">
        <style:list-level-properties text:list-level-position-and-space-mode="label-alignment">
          <style:list-level-label-alignment fo:text-indent="-0.471cm" fo:margin-left="9.138cm"/>
        </style:list-level-properties>
        <style:text-properties/>
      </text:list-level-style-bullet>
      <text:list-level-style-bullet text:level="7" text:style-name="T160" text:bullet-char="• ">
        <style:list-level-properties text:list-level-position-and-space-mode="label-alignment">
          <style:list-level-label-alignment fo:text-indent="-0.471cm" fo:margin-left="10.83cm"/>
        </style:list-level-properties>
        <style:text-properties/>
      </text:list-level-style-bullet>
      <text:list-level-style-bullet text:level="8" text:style-name="T161" text:bullet-char="• ">
        <style:list-level-properties text:list-level-position-and-space-mode="label-alignment">
          <style:list-level-label-alignment fo:text-indent="-0.471cm" fo:margin-left="12.52cm"/>
        </style:list-level-properties>
        <style:text-properties/>
      </text:list-level-style-bullet>
      <text:list-level-style-bullet text:level="9" text:style-name="T162" text:bullet-char="• ">
        <style:list-level-properties text:list-level-position-and-space-mode="label-alignment">
          <style:list-level-label-alignment fo:text-indent="-0.471cm" fo:margin-left="14.22cm"/>
        </style:list-level-properties>
        <style:text-properties/>
      </text:list-level-style-bullet>
    </text:list-style>
    <text:list-style style:name="WWNum19">
      <text:list-level-style-bullet text:level="1" text:style-name="T163" text:bullet-char="">
        <style:list-level-properties text:list-level-position-and-space-mode="label-alignment">
          <style:list-level-label-alignment fo:text-indent="-0.5027cm" fo:margin-left="1.445cm"/>
        </style:list-level-properties>
        <style:text-properties fo:font-family="Arial"/>
      </text:list-level-style-bullet>
      <text:list-level-style-bullet text:level="2" text:style-name="T164" text:bullet-char="• ">
        <style:list-level-properties text:list-level-position-and-space-mode="label-alignment">
          <style:list-level-label-alignment fo:text-indent="-0.5027cm" fo:margin-left="3.062cm"/>
        </style:list-level-properties>
        <style:text-properties/>
      </text:list-level-style-bullet>
      <text:list-level-style-bullet text:level="3" text:style-name="T165" text:bullet-char="• ">
        <style:list-level-properties text:list-level-position-and-space-mode="label-alignment">
          <style:list-level-label-alignment fo:text-indent="-0.5027cm" fo:margin-left="4.678cm"/>
        </style:list-level-properties>
        <style:text-properties/>
      </text:list-level-style-bullet>
      <text:list-level-style-bullet text:level="4" text:style-name="T166" text:bullet-char="• ">
        <style:list-level-properties text:list-level-position-and-space-mode="label-alignment">
          <style:list-level-label-alignment fo:text-indent="-0.5027cm" fo:margin-left="6.294cm"/>
        </style:list-level-properties>
        <style:text-properties/>
      </text:list-level-style-bullet>
      <text:list-level-style-bullet text:level="5" text:style-name="T167" text:bullet-char="• ">
        <style:list-level-properties text:list-level-position-and-space-mode="label-alignment">
          <style:list-level-label-alignment fo:text-indent="-0.5027cm" fo:margin-left="7.91cm"/>
        </style:list-level-properties>
        <style:text-properties/>
      </text:list-level-style-bullet>
      <text:list-level-style-bullet text:level="6" text:style-name="T168" text:bullet-char="• ">
        <style:list-level-properties text:list-level-position-and-space-mode="label-alignment">
          <style:list-level-label-alignment fo:text-indent="-0.5027cm" fo:margin-left="9.526cm"/>
        </style:list-level-properties>
        <style:text-properties/>
      </text:list-level-style-bullet>
      <text:list-level-style-bullet text:level="7" text:style-name="T169" text:bullet-char="• ">
        <style:list-level-properties text:list-level-position-and-space-mode="label-alignment">
          <style:list-level-label-alignment fo:text-indent="-0.5027cm" fo:margin-left="11.14cm"/>
        </style:list-level-properties>
        <style:text-properties/>
      </text:list-level-style-bullet>
      <text:list-level-style-bullet text:level="8" text:style-name="T170" text:bullet-char="• ">
        <style:list-level-properties text:list-level-position-and-space-mode="label-alignment">
          <style:list-level-label-alignment fo:text-indent="-0.5027cm" fo:margin-left="12.76cm"/>
        </style:list-level-properties>
        <style:text-properties/>
      </text:list-level-style-bullet>
      <text:list-level-style-bullet text:level="9" text:style-name="T171" text:bullet-char="• ">
        <style:list-level-properties text:list-level-position-and-space-mode="label-alignment">
          <style:list-level-label-alignment fo:text-indent="-0.5027cm" fo:margin-left="14.37cm"/>
        </style:list-level-properties>
        <style:text-properties/>
      </text:list-level-style-bullet>
    </text:list-style>
    <text:list-style style:name="WWNum20">
      <text:list-level-style-number text:level="1" text:style-name="T172" style:num-format="1" style:num-suffix=".">
        <style:list-level-properties text:list-level-position-and-space-mode="label-alignment">
          <style:list-level-label-alignment fo:text-indent="-0.5027cm" fo:margin-left="1.445cm"/>
        </style:list-level-properties>
        <style:text-properties/>
      </text:list-level-style-number>
      <text:list-level-style-bullet text:level="2" text:style-name="T173" text:bullet-char="• ">
        <style:list-level-properties text:list-level-position-and-space-mode="label-alignment">
          <style:list-level-label-alignment fo:text-indent="-0.5027cm" fo:margin-left="3.062cm"/>
        </style:list-level-properties>
        <style:text-properties/>
      </text:list-level-style-bullet>
      <text:list-level-style-bullet text:level="3" text:style-name="T174" text:bullet-char="• ">
        <style:list-level-properties text:list-level-position-and-space-mode="label-alignment">
          <style:list-level-label-alignment fo:text-indent="-0.5027cm" fo:margin-left="4.678cm"/>
        </style:list-level-properties>
        <style:text-properties/>
      </text:list-level-style-bullet>
      <text:list-level-style-bullet text:level="4" text:style-name="T175" text:bullet-char="• ">
        <style:list-level-properties text:list-level-position-and-space-mode="label-alignment">
          <style:list-level-label-alignment fo:text-indent="-0.5027cm" fo:margin-left="6.294cm"/>
        </style:list-level-properties>
        <style:text-properties/>
      </text:list-level-style-bullet>
      <text:list-level-style-bullet text:level="5" text:style-name="T176" text:bullet-char="• ">
        <style:list-level-properties text:list-level-position-and-space-mode="label-alignment">
          <style:list-level-label-alignment fo:text-indent="-0.5027cm" fo:margin-left="7.91cm"/>
        </style:list-level-properties>
        <style:text-properties/>
      </text:list-level-style-bullet>
      <text:list-level-style-bullet text:level="6" text:style-name="T177" text:bullet-char="• ">
        <style:list-level-properties text:list-level-position-and-space-mode="label-alignment">
          <style:list-level-label-alignment fo:text-indent="-0.5027cm" fo:margin-left="9.526cm"/>
        </style:list-level-properties>
        <style:text-properties/>
      </text:list-level-style-bullet>
      <text:list-level-style-bullet text:level="7" text:style-name="T178" text:bullet-char="• ">
        <style:list-level-properties text:list-level-position-and-space-mode="label-alignment">
          <style:list-level-label-alignment fo:text-indent="-0.5027cm" fo:margin-left="11.14cm"/>
        </style:list-level-properties>
        <style:text-properties/>
      </text:list-level-style-bullet>
      <text:list-level-style-bullet text:level="8" text:style-name="T179" text:bullet-char="• ">
        <style:list-level-properties text:list-level-position-and-space-mode="label-alignment">
          <style:list-level-label-alignment fo:text-indent="-0.5027cm" fo:margin-left="12.76cm"/>
        </style:list-level-properties>
        <style:text-properties/>
      </text:list-level-style-bullet>
      <text:list-level-style-bullet text:level="9" text:style-name="T180" text:bullet-char="• ">
        <style:list-level-properties text:list-level-position-and-space-mode="label-alignment">
          <style:list-level-label-alignment fo:text-indent="-0.5027cm" fo:margin-left="14.37cm"/>
        </style:list-level-properties>
        <style:text-properties/>
      </text:list-level-style-bullet>
    </text:list-style>
    <text:list-style style:name="WWNum21">
      <text:list-level-style-number text:level="1" text:style-name="T181" style:num-format="1" style:num-suffix=".">
        <style:list-level-properties text:list-level-position-and-space-mode="label-alignment">
          <style:list-level-label-alignment fo:text-indent="-0.5027cm" fo:margin-left="1.445cm"/>
        </style:list-level-properties>
        <style:text-properties/>
      </text:list-level-style-number>
      <text:list-level-style-bullet text:level="2" text:style-name="T182" text:bullet-char="• ">
        <style:list-level-properties text:list-level-position-and-space-mode="label-alignment">
          <style:list-level-label-alignment fo:text-indent="-0.5027cm" fo:margin-left="3.062cm"/>
        </style:list-level-properties>
        <style:text-properties/>
      </text:list-level-style-bullet>
      <text:list-level-style-bullet text:level="3" text:style-name="T183" text:bullet-char="• ">
        <style:list-level-properties text:list-level-position-and-space-mode="label-alignment">
          <style:list-level-label-alignment fo:text-indent="-0.5027cm" fo:margin-left="4.678cm"/>
        </style:list-level-properties>
        <style:text-properties/>
      </text:list-level-style-bullet>
      <text:list-level-style-bullet text:level="4" text:style-name="T184" text:bullet-char="• ">
        <style:list-level-properties text:list-level-position-and-space-mode="label-alignment">
          <style:list-level-label-alignment fo:text-indent="-0.5027cm" fo:margin-left="6.294cm"/>
        </style:list-level-properties>
        <style:text-properties/>
      </text:list-level-style-bullet>
      <text:list-level-style-bullet text:level="5" text:style-name="T185" text:bullet-char="• ">
        <style:list-level-properties text:list-level-position-and-space-mode="label-alignment">
          <style:list-level-label-alignment fo:text-indent="-0.5027cm" fo:margin-left="7.91cm"/>
        </style:list-level-properties>
        <style:text-properties/>
      </text:list-level-style-bullet>
      <text:list-level-style-bullet text:level="6" text:style-name="T186" text:bullet-char="• ">
        <style:list-level-properties text:list-level-position-and-space-mode="label-alignment">
          <style:list-level-label-alignment fo:text-indent="-0.5027cm" fo:margin-left="9.526cm"/>
        </style:list-level-properties>
        <style:text-properties/>
      </text:list-level-style-bullet>
      <text:list-level-style-bullet text:level="7" text:style-name="T187" text:bullet-char="• ">
        <style:list-level-properties text:list-level-position-and-space-mode="label-alignment">
          <style:list-level-label-alignment fo:text-indent="-0.5027cm" fo:margin-left="11.14cm"/>
        </style:list-level-properties>
        <style:text-properties/>
      </text:list-level-style-bullet>
      <text:list-level-style-bullet text:level="8" text:style-name="T188" text:bullet-char="• ">
        <style:list-level-properties text:list-level-position-and-space-mode="label-alignment">
          <style:list-level-label-alignment fo:text-indent="-0.5027cm" fo:margin-left="12.76cm"/>
        </style:list-level-properties>
        <style:text-properties/>
      </text:list-level-style-bullet>
      <text:list-level-style-bullet text:level="9" text:style-name="T189" text:bullet-char="• ">
        <style:list-level-properties text:list-level-position-and-space-mode="label-alignment">
          <style:list-level-label-alignment fo:text-indent="-0.5027cm" fo:margin-left="14.37cm"/>
        </style:list-level-properties>
        <style:text-properties/>
      </text:list-level-style-bullet>
    </text:list-style>
    <text:list-style style:name="WWNum22">
      <text:list-level-style-bullet text:level="1" text:style-name="T190">
        <style:list-level-properties text:list-level-position-and-space-mode="label-alignment">
          <style:list-level-label-alignment fo:margin-left="0cm"/>
        </style:list-level-properties>
        <style:text-properties/>
      </text:list-level-style-bullet>
      <text:list-level-style-bullet text:level="2" text:style-name="T191">
        <style:list-level-properties text:list-level-position-and-space-mode="label-alignment">
          <style:list-level-label-alignment fo:margin-left="0cm"/>
        </style:list-level-properties>
        <style:text-properties/>
      </text:list-level-style-bullet>
      <text:list-level-style-bullet text:level="3" text:style-name="T192">
        <style:list-level-properties text:list-level-position-and-space-mode="label-alignment">
          <style:list-level-label-alignment fo:margin-left="0cm"/>
        </style:list-level-properties>
        <style:text-properties/>
      </text:list-level-style-bullet>
      <text:list-level-style-bullet text:level="4" text:style-name="T193">
        <style:list-level-properties text:list-level-position-and-space-mode="label-alignment">
          <style:list-level-label-alignment fo:margin-left="0cm"/>
        </style:list-level-properties>
        <style:text-properties/>
      </text:list-level-style-bullet>
      <text:list-level-style-bullet text:level="5" text:style-name="T194">
        <style:list-level-properties text:list-level-position-and-space-mode="label-alignment">
          <style:list-level-label-alignment fo:margin-left="0cm"/>
        </style:list-level-properties>
        <style:text-properties/>
      </text:list-level-style-bullet>
      <text:list-level-style-bullet text:level="6" text:style-name="T195">
        <style:list-level-properties text:list-level-position-and-space-mode="label-alignment">
          <style:list-level-label-alignment fo:margin-left="0cm"/>
        </style:list-level-properties>
        <style:text-properties/>
      </text:list-level-style-bullet>
      <text:list-level-style-bullet text:level="7" text:style-name="T196">
        <style:list-level-properties text:list-level-position-and-space-mode="label-alignment">
          <style:list-level-label-alignment fo:margin-left="0cm"/>
        </style:list-level-properties>
        <style:text-properties/>
      </text:list-level-style-bullet>
      <text:list-level-style-bullet text:level="8" text:style-name="T197">
        <style:list-level-properties text:list-level-position-and-space-mode="label-alignment">
          <style:list-level-label-alignment fo:margin-left="0cm"/>
        </style:list-level-properties>
        <style:text-properties/>
      </text:list-level-style-bullet>
      <text:list-level-style-bullet text:level="9" text:style-name="T198">
        <style:list-level-properties text:list-level-position-and-space-mode="label-alignment">
          <style:list-level-label-alignment fo:margin-left="0cm"/>
        </style:list-level-properties>
        <style:text-properties/>
      </text:list-level-style-bullet>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number text:level="1" text:style-name="T208" style:num-format="1" style:num-suffix=".">
        <style:list-level-properties text:list-level-position-and-space-mode="label-alignment">
          <style:list-level-label-alignment fo:text-indent="-0.471cm" fo:margin-left="0.2011cm"/>
        </style:list-level-properties>
        <style:text-properties/>
      </text:list-level-style-number>
      <text:list-level-style-bullet text:level="2" text:style-name="T209" text:bullet-char="• ">
        <style:list-level-properties text:list-level-position-and-space-mode="label-alignment">
          <style:list-level-label-alignment fo:text-indent="-0.471cm" fo:margin-left="1.951cm"/>
        </style:list-level-properties>
        <style:text-properties/>
      </text:list-level-style-bullet>
      <text:list-level-style-bullet text:level="3" text:style-name="T210" text:bullet-char="• ">
        <style:list-level-properties text:list-level-position-and-space-mode="label-alignment">
          <style:list-level-label-alignment fo:text-indent="-0.471cm" fo:margin-left="3.69cm"/>
        </style:list-level-properties>
        <style:text-properties/>
      </text:list-level-style-bullet>
      <text:list-level-style-bullet text:level="4" text:style-name="T211" text:bullet-char="• ">
        <style:list-level-properties text:list-level-position-and-space-mode="label-alignment">
          <style:list-level-label-alignment fo:text-indent="-0.471cm" fo:margin-left="5.43cm"/>
        </style:list-level-properties>
        <style:text-properties/>
      </text:list-level-style-bullet>
      <text:list-level-style-bullet text:level="5" text:style-name="T212" text:bullet-char="• ">
        <style:list-level-properties text:list-level-position-and-space-mode="label-alignment">
          <style:list-level-label-alignment fo:text-indent="-0.471cm" fo:margin-left="7.167cm"/>
        </style:list-level-properties>
        <style:text-properties/>
      </text:list-level-style-bullet>
      <text:list-level-style-bullet text:level="6" text:style-name="T213" text:bullet-char="• ">
        <style:list-level-properties text:list-level-position-and-space-mode="label-alignment">
          <style:list-level-label-alignment fo:text-indent="-0.471cm" fo:margin-left="8.908cm"/>
        </style:list-level-properties>
        <style:text-properties/>
      </text:list-level-style-bullet>
      <text:list-level-style-bullet text:level="7" text:style-name="T214" text:bullet-char="• ">
        <style:list-level-properties text:list-level-position-and-space-mode="label-alignment">
          <style:list-level-label-alignment fo:text-indent="-0.471cm" fo:margin-left="10.65cm"/>
        </style:list-level-properties>
        <style:text-properties/>
      </text:list-level-style-bullet>
      <text:list-level-style-bullet text:level="8" text:style-name="T215" text:bullet-char="• ">
        <style:list-level-properties text:list-level-position-and-space-mode="label-alignment">
          <style:list-level-label-alignment fo:text-indent="-0.471cm" fo:margin-left="12.39cm"/>
        </style:list-level-properties>
        <style:text-properties/>
      </text:list-level-style-bullet>
      <text:list-level-style-bullet text:level="9" text:style-name="T216" text:bullet-char="• ">
        <style:list-level-properties text:list-level-position-and-space-mode="label-alignment">
          <style:list-level-label-alignment fo:text-indent="-0.471cm" fo:margin-left="14.12cm"/>
        </style:list-level-properties>
        <style:text-propertie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number text:level="1" text:style-name="T24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4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4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4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5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52" style:num-format="1"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03cm" fo:page-height="29.7cm" style:print-orientation="portrait" fo:margin-top="1.87cm" fo:margin-bottom="0.4939cm" fo:margin-left="1.799cm" fo:margin-right="1.623cm"/>
    </style:page-layout>
    <style:page-layout style:name="Mpm2">
      <style:page-layout-properties fo:page-width="21.03cm" fo:page-height="29.7cm" style:print-orientation="portrait" fo:margin-top="3.422cm" fo:margin-bottom="0.4939cm" fo:margin-left="1.799cm" fo:margin-right="1.623cm"/>
    </style:page-layout>
    <style:page-layout style:name="Mpm3">
      <style:page-layout-properties fo:page-width="21.03cm" fo:page-height="29.7cm" style:print-orientation="portrait" fo:margin-top="1.87cm" fo:margin-bottom="0.4939cm" fo:margin-left="1.799cm" fo:margin-right="1.623cm"/>
    </style:page-layout>
    <style:page-layout style:name="Mpm4">
      <style:page-layout-properties fo:page-width="21.03cm" fo:page-height="29.7cm" style:print-orientation="portrait" fo:margin-top="1.87cm" fo:margin-bottom="0.4939cm" fo:margin-left="1.799cm" fo:margin-right="1.623cm"/>
    </style:page-layout>
    <style:page-layout style:name="Mpm5">
      <style:page-layout-properties fo:page-width="21.03cm" fo:page-height="29.7cm" style:print-orientation="portrait" fo:margin-top="2.364cm" fo:margin-bottom="0.4939cm" fo:margin-left="1.799cm" fo:margin-right="1.623cm"/>
    </style:page-layout>
    <style:page-layout style:name="Mpm6">
      <style:page-layout-properties fo:page-width="21.03cm" fo:page-height="29.7cm" style:print-orientation="portrait" fo:margin-top="1.87cm" fo:margin-bottom="0.4939cm" fo:margin-left="1.799cm" fo:margin-right="1.623cm"/>
    </style:page-layout>
    <style:page-layout style:name="Mpm7">
      <style:page-layout-properties fo:page-width="21.03cm" fo:page-height="29.7cm" style:print-orientation="portrait" fo:margin-top="1.87cm" fo:margin-bottom="0.4939cm" fo:margin-left="1.799cm" fo:margin-right="1.623cm"/>
    </style:page-layout>
    <style:page-layout style:name="Mpm8">
      <style:page-layout-properties fo:page-width="21.03cm" fo:page-height="29.7cm" style:print-orientation="portrait" fo:margin-top="1.87cm" fo:margin-bottom="0.4939cm" fo:margin-left="1.799cm" fo:margin-right="1.623cm"/>
    </style:page-layout>
    <style:page-layout style:name="Mpm9">
      <style:page-layout-properties fo:page-width="21.03cm" fo:page-height="29.7cm" style:print-orientation="portrait" fo:margin-top="1.87cm" fo:margin-bottom="0.4939cm" fo:margin-left="1.799cm" fo:margin-right="1.623cm"/>
    </style:page-layout>
    <style:page-layout style:name="Mpm10">
      <style:page-layout-properties fo:page-width="21.03cm" fo:page-height="29.7cm" style:print-orientation="portrait" fo:margin-top="1.87cm" fo:margin-bottom="0.4939cm" fo:margin-left="1.799cm" fo:margin-right="1.623cm"/>
    </style:page-layout>
    <style:page-layout style:name="Mpm11">
      <style:page-layout-properties fo:page-width="21.03cm" fo:page-height="29.7cm" style:print-orientation="portrait" fo:margin-top="1.87cm" fo:margin-bottom="0.4939cm" fo:margin-left="1.799cm" fo:margin-right="1.623cm"/>
    </style:page-layout>
    <style:page-layout style:name="Mpm12">
      <style:page-layout-properties fo:page-width="21.03cm" fo:page-height="29.7cm" style:print-orientation="portrait" fo:margin-top="2.717cm" fo:margin-bottom="0.4939cm" fo:margin-left="1.799cm" fo:margin-right="1.623cm"/>
    </style:page-layout>
    <style:page-layout style:name="Mpm13">
      <style:page-layout-properties fo:page-width="21.03cm" fo:page-height="29.7cm" style:print-orientation="portrait" fo:margin-top="1.87cm" fo:margin-bottom="0.4939cm" fo:margin-left="1.799cm" fo:margin-right="1.623cm"/>
    </style:page-layout>
    <style:page-layout style:name="Mpm14">
      <style:page-layout-properties fo:page-width="21.03cm" fo:page-height="29.7cm" style:print-orientation="portrait" fo:margin-top="1.87cm" fo:margin-bottom="0.4939cm" fo:margin-left="1.799cm" fo:margin-right="1.623cm"/>
    </style:page-layout>
    <style:page-layout style:name="Mpm15">
      <style:page-layout-properties fo:page-width="21.03cm" fo:page-height="29.7cm" style:print-orientation="portrait" fo:margin-top="2.681cm" fo:margin-bottom="0.4939cm" fo:margin-left="1.799cm" fo:margin-right="1.623cm"/>
    </style:page-layout>
    <style:page-layout style:name="Mpm16">
      <style:page-layout-properties fo:page-width="21.03cm" fo:page-height="29.7cm" style:print-orientation="portrait" fo:margin-top="1.87cm" fo:margin-bottom="0.4939cm" fo:margin-left="1.799cm" fo:margin-right="1.623cm"/>
    </style:page-layout>
    <style:page-layout style:name="Mpm17">
      <style:page-layout-properties fo:page-width="21.03cm" fo:page-height="29.7cm" style:print-orientation="portrait" fo:margin-top="1.87cm" fo:margin-bottom="0.4939cm" fo:margin-left="1.799cm" fo:margin-right="1.623cm"/>
    </style:page-layout>
    <style:page-layout style:name="Mpm18">
      <style:page-layout-properties fo:page-width="21.03cm" fo:page-height="29.7cm" style:print-orientation="portrait" fo:margin-top="2.717cm" fo:margin-bottom="0.4939cm" fo:margin-left="1.799cm" fo:margin-right="1.623cm"/>
    </style:page-layout>
    <style:page-layout style:name="Mpm19">
      <style:page-layout-properties fo:page-width="21.03cm" fo:page-height="29.7cm" style:print-orientation="portrait" fo:margin-top="1.87cm" fo:margin-bottom="0.4939cm" fo:margin-left="1.799cm" fo:margin-right="1.623cm"/>
    </style:page-layout>
    <style:page-layout style:name="Mpm20">
      <style:page-layout-properties fo:page-width="21.03cm" fo:page-height="29.7cm" style:print-orientation="portrait" fo:margin-top="1.87cm" fo:margin-bottom="0.4939cm" fo:margin-left="1.799cm" fo:margin-right="1.623cm"/>
    </style:page-layout>
    <style:page-layout style:name="Mpm21">
      <style:page-layout-properties fo:page-width="21.03cm" fo:page-height="29.7cm" style:print-orientation="portrait" fo:margin-top="1.87cm" fo:margin-bottom="0.4939cm" fo:margin-left="1.799cm" fo:margin-right="1.623cm"/>
    </style:page-layout>
    <style:page-layout style:name="Mpm22">
      <style:page-layout-properties fo:page-width="21.03cm" fo:page-height="29.7cm" style:print-orientation="portrait" fo:margin-top="2.54cm" fo:margin-bottom="0.4939cm" fo:margin-left="1.799cm" fo:margin-right="1.623cm"/>
    </style:page-layout>
    <style:page-layout style:name="Mpm23">
      <style:page-layout-properties fo:page-width="21.03cm" fo:page-height="29.7cm" style:print-orientation="portrait" fo:margin-top="1.87cm" fo:margin-bottom="0.4939cm" fo:margin-left="1.799cm" fo:margin-right="1.623cm"/>
    </style:page-layout>
    <style:page-layout style:name="Mpm24">
      <style:page-layout-properties fo:page-width="21.03cm" fo:page-height="29.7cm" style:print-orientation="portrait" fo:margin-top="1.87cm" fo:margin-bottom="0.4939cm" fo:margin-left="1.799cm" fo:margin-right="1.623cm"/>
    </style:page-layout>
    <style:page-layout style:name="Mpm25">
      <style:page-layout-properties fo:page-width="21.03cm" fo:page-height="29.7cm" style:print-orientation="portrait" fo:margin-top="1.87cm" fo:margin-bottom="0.4939cm" fo:margin-left="1.799cm" fo:margin-right="1.623cm"/>
    </style:page-layout>
    <style:page-layout style:name="Mpm26">
      <style:page-layout-properties fo:page-width="21.03cm" fo:page-height="29.7cm" style:print-orientation="portrait" fo:margin-top="2.364cm" fo:margin-bottom="0.4939cm" fo:margin-left="1.799cm" fo:margin-right="1.623cm"/>
    </style:page-layout>
    <style:page-layout style:name="Mpm27">
      <style:page-layout-properties fo:page-width="21.03cm" fo:page-height="29.7cm" style:print-orientation="portrait" fo:margin-top="1.87cm" fo:margin-bottom="0.4939cm" fo:margin-left="1.799cm" fo:margin-right="1.623cm"/>
    </style:page-layout>
    <style:page-layout style:name="Mpm28">
      <style:page-layout-properties fo:page-width="21.03cm" fo:page-height="29.7cm" style:print-orientation="portrait" fo:margin-top="1.87cm" fo:margin-bottom="0.4939cm" fo:margin-left="1.799cm" fo:margin-right="1.623cm"/>
    </style:page-layout>
    <style:page-layout style:name="Mpm29">
      <style:page-layout-properties fo:page-width="21.03cm" fo:page-height="29.7cm" style:print-orientation="portrait" fo:margin-top="2.858cm" fo:margin-bottom="0.4939cm" fo:margin-left="1.799cm" fo:margin-right="1.623cm"/>
    </style:page-layout>
    <style:page-layout style:name="Mpm30">
      <style:page-layout-properties fo:page-width="21.03cm" fo:page-height="29.7cm" style:print-orientation="portrait" fo:margin-top="1.87cm" fo:margin-bottom="0.4939cm" fo:margin-left="1.799cm" fo:margin-right="1.623cm"/>
    </style:page-layout>
    <style:page-layout style:name="Mpm31">
      <style:page-layout-properties fo:page-width="21.03cm" fo:page-height="29.7cm" style:print-orientation="portrait" fo:margin-top="1.87cm" fo:margin-bottom="0.4939cm" fo:margin-left="1.799cm" fo:margin-right="1.623cm"/>
    </style:page-layout>
    <style:page-layout style:name="Mpm32">
      <style:page-layout-properties fo:page-width="21.03cm" fo:page-height="29.7cm" style:print-orientation="portrait" fo:margin-top="1.87cm" fo:margin-bottom="0.4939cm" fo:margin-left="1.799cm" fo:margin-right="1.623cm"/>
    </style:page-layout>
    <style:page-layout style:name="Mpm33">
      <style:page-layout-properties fo:page-width="21.03cm" fo:page-height="29.7cm" style:print-orientation="portrait" fo:margin-top="3.105cm" fo:margin-bottom="0.4939cm" fo:margin-left="1.799cm" fo:margin-right="1.623cm"/>
    </style:page-layout>
    <style:page-layout style:name="Mpm34">
      <style:page-layout-properties fo:page-width="21.03cm" fo:page-height="29.7cm" style:print-orientation="portrait" fo:margin-top="1.87cm" fo:margin-bottom="0.4939cm" fo:margin-left="1.799cm" fo:margin-right="1.623cm"/>
    </style:page-layout>
    <style:page-layout style:name="Mpm35">
      <style:page-layout-properties fo:page-width="21.03cm" fo:page-height="29.7cm" style:print-orientation="portrait" fo:margin-top="1.87cm" fo:margin-bottom="0.4939cm" fo:margin-left="1.799cm" fo:margin-right="1.623cm"/>
    </style:page-layout>
    <style:page-layout style:name="Mpm36">
      <style:page-layout-properties fo:page-width="21.03cm" fo:page-height="29.7cm" style:print-orientation="portrait" fo:margin-top="2.364cm" fo:margin-bottom="0.4939cm" fo:margin-left="1.799cm" fo:margin-right="1.623cm"/>
    </style:page-layout>
    <style:page-layout style:name="Mpm37">
      <style:page-layout-properties fo:page-width="21.03cm" fo:page-height="29.7cm" style:print-orientation="portrait" fo:margin-top="1.87cm" fo:margin-bottom="0.4939cm" fo:margin-left="1.799cm" fo:margin-right="1.623cm"/>
    </style:page-layout>
    <style:page-layout style:name="Mpm38">
      <style:page-layout-properties fo:page-width="21.03cm" fo:page-height="29.7cm" style:print-orientation="portrait" fo:margin-top="1.87cm" fo:margin-bottom="0.4939cm" fo:margin-left="1.799cm" fo:margin-right="1.623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style:master-page style:name="MasterPage15" style:page-layout-name="Mpm15"/>
    <style:master-page style:name="MasterPage16" style:page-layout-name="Mpm16"/>
    <style:master-page style:name="MasterPage17" style:page-layout-name="Mpm17"/>
    <style:master-page style:name="MasterPage18" style:page-layout-name="Mpm18"/>
    <style:master-page style:name="MasterPage19" style:page-layout-name="Mpm19"/>
    <style:master-page style:name="MasterPage20" style:page-layout-name="Mpm20"/>
    <style:master-page style:name="MasterPage21" style:page-layout-name="Mpm21"/>
    <style:master-page style:name="MasterPage22" style:page-layout-name="Mpm22"/>
    <style:master-page style:name="MasterPage23" style:page-layout-name="Mpm23"/>
    <style:master-page style:name="MasterPage24" style:page-layout-name="Mpm24"/>
    <style:master-page style:name="MasterPage25" style:page-layout-name="Mpm25"/>
    <style:master-page style:name="MasterPage26" style:page-layout-name="Mpm26"/>
    <style:master-page style:name="MasterPage27" style:page-layout-name="Mpm27"/>
    <style:master-page style:name="MasterPage28" style:page-layout-name="Mpm28"/>
    <style:master-page style:name="MasterPage29" style:page-layout-name="Mpm29"/>
    <style:master-page style:name="MasterPage30" style:page-layout-name="Mpm30"/>
    <style:master-page style:name="MasterPage31" style:page-layout-name="Mpm31"/>
    <style:master-page style:name="MasterPage32" style:page-layout-name="Mpm32"/>
    <style:master-page style:name="MasterPage33" style:page-layout-name="Mpm33"/>
    <style:master-page style:name="MasterPage34" style:page-layout-name="Mpm34"/>
    <style:master-page style:name="MasterPage35" style:page-layout-name="Mpm35"/>
    <style:master-page style:name="MasterPage36" style:page-layout-name="Mpm36"/>
    <style:master-page style:name="MasterPage37" style:page-layout-name="Mpm37"/>
    <style:master-page style:name="MasterPage38" style:page-layout-name="Mpm3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21</meta:generator>
    <dc:creator>app</dc:creator>
    <meta:creation-date>2025-05-24T15:03:00Z</meta:creation-date>
    <dc:title>demos_yp_v5</dc:title>
    <meta:user-defined meta:name="Producer" meta:value-type="string">Skia/PDF m134 Google Docs Renderer</meta:user-defined>
  </office:meta>
</office:document-meta>
</file>